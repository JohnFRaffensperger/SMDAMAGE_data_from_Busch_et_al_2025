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4098in"/>
    </style:style>
    <style:style style:name="co2" style:family="table-column">
      <style:table-column-properties fo:break-before="auto" style:column-width="0.8035in"/>
    </style:style>
    <style:style style:name="co3" style:family="table-column">
      <style:table-column-properties fo:break-before="auto" style:column-width="0.5055in"/>
    </style:style>
    <style:style style:name="co4" style:family="table-column">
      <style:table-column-properties fo:break-before="auto" style:column-width="3.4618in"/>
    </style:style>
    <style:style style:name="co5" style:family="table-column">
      <style:table-column-properties fo:break-before="auto" style:column-width="1.718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193in" fo:break-before="auto" style:use-optimal-row-height="true"/>
    </style:style>
    <style:style style:name="ro2" style:family="table-row">
      <style:table-row-properties style:row-height="0.854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Plantation_20_example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currency-style style:name="N10103P0" style:volatile="true" number:language="en" number:country="US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03" number:language="en" number:country="US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03P0"/>
    </number:currency-style>
    <style:style style:name="ce1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padding="0.028in"/>
    </style:style>
    <style:style style:name="ce3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 fo:padding="0.028in"/>
    </style:style>
    <style:style style:name="ce5" style:family="table-cell" style:parent-style-name="Default" style:data-style-name="N11">
      <style:table-cell-properties fo:padding="0.028in"/>
    </style:style>
    <style:style style:name="ce6" style:family="table-cell" style:parent-style-name="Default" style:data-style-name="N10103">
      <style:table-cell-properties fo:padding="0.028in"/>
    </style:style>
    <style:style style:name="ce7" style:family="table-cell" style:parent-style-name="Default" style:data-style-name="N10">
      <style:table-cell-properties fo:padding="0.028in"/>
    </style:style>
    <style:style style:name="ce8" style:family="table-cell" style:parent-style-name="Default" style:data-style-name="N10103">
      <style:table-cell-properties fo:background-color="#eeeeee" style:diagonal-bl-tr="none" style:diagonal-tl-br="none" fo:border="0.74pt solid #999999" fo:padding="0.028in" style:rotation-align="none"/>
    </style:style>
    <style:style style:name="ce9" style:family="table-cell" style:parent-style-name="Default" style:data-style-name="N135">
      <style:table-cell-properties fo:background-color="#eeeeee" style:diagonal-bl-tr="none" style:diagonal-tl-br="none" fo:border="0.74pt solid #999999" fo:padding="0.028in" style:rotation-align="none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 style:data-style-name="N4">
      <style:table-cell-properties fo:background-color="#eeeeee" style:diagonal-bl-tr="none" style:diagonal-tl-br="none" fo:border="0.74pt solid #999999" fo:padding="0.028in" style:rotation-align="none"/>
    </style:style>
    <style:style style:name="ce26" style:family="table-cell" style:parent-style-name="Default">
      <style:table-cell-properties fo:background-color="#e6e6e6" fo:border="0.54pt solid #a0a0a0"/>
    </style:style>
    <style:style style:name="ce27" style:family="table-cell" style:parent-style-name="Default">
      <style:table-cell-properties fo:background-color="#e6e6e6"/>
    </style:style>
  </office:automatic-styles>
  <office:body>
    <office:spreadsheet>
      <table:calculation-settings table:case-sensitive="false" table:automatic-find-labels="false" table:use-regular-expressions="false" table:use-wildcards="true" table:null-year="1950"/>
      <table:table table:name="Plantation example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2"/>
        <table:table-column table:style-name="co3" table:number-columns-repeated="5" table:default-cell-style-name="ce2"/>
        <table:table-column table:style-name="co4" table:default-cell-style-name="ce2"/>
        <table:table-column table:style-name="co3" table:number-columns-repeated="248" table:default-cell-style-name="ce2"/>
        <table:table-column table:style-name="co3" table:number-columns-repeated="16127"/>
        <table:table-row table:style-name="ro1">
          <table:table-cell table:style-name="ce1" office:value-type="string" calcext:value-type="string">
            <text:p>Busch 2024 plantation example (same baseline pixel assumptions as NR sheet)</text:p>
          </table:table-cell>
          <table:table-cell table:style-name="ce1"/>
          <table:table-cell table:number-columns-repeated="255"/>
          <table:table-cell table:style-name="Default" table:number-columns-repeated="16127"/>
        </table:table-row>
        <table:table-row table:style-name="ro1">
          <table:table-cell table:style-name="Default" table:number-columns-repeated="2"/>
          <table:table-cell table:number-columns-repeated="255"/>
          <table:table-cell table:style-name="Default" table:number-columns-repeated="16127"/>
        </table:table-row>
        <table:table-row table:style-name="ro1">
          <table:table-cell office:value-type="string" calcext:value-type="string">
            <text:p>iso</text:p>
          </table:table-cell>
          <table:table-cell office:value-type="string" calcext:value-type="string">
            <text:p>BRA</text:p>
          </table:table-cell>
          <table:table-cell table:number-columns-repeated="255"/>
          <table:table-cell table:style-name="Default" table:number-columns-repeated="16127"/>
        </table:table-row>
        <table:table-row table:style-name="ro1">
          <table:table-cell office:value-type="string" calcext:value-type="string">
            <text:p>plantation_genus</text:p>
          </table:table-cell>
          <table:table-cell office:value-type="string" calcext:value-type="string">
            <text:p>pinu</text:p>
          </table:table-cell>
          <table:table-cell table:number-columns-repeated="6"/>
          <table:table-cell table:style-name="Default" table:number-columns-repeated="121"/>
          <table:table-cell table:number-columns-repeated="128"/>
          <table:table-cell table:style-name="Default" table:number-columns-repeated="16127"/>
        </table:table-row>
        <table:table-row table:style-name="ro1">
          <table:table-cell office:value-type="string" calcext:value-type="string">
            <text:p>selected_plantation_rotation_year (mapped)</text:p>
          </table:table-cell>
          <table:table-cell office:value-type="float" office:value="32" calcext:value-type="float">
            <text:p>32</text:p>
          </table:table-cell>
          <table:table-cell table:number-columns-repeated="6"/>
          <table:table-cell table:style-name="Default" table:number-columns-repeated="121"/>
          <table:table-cell table:number-columns-repeated="128"/>
          <table:table-cell table:style-name="Default" table:number-columns-repeated="16127"/>
        </table:table-row>
        <table:table-row table:style-name="ro1">
          <table:table-cell office:value-type="string" calcext:value-type="string">
            <text:p>Chapman growth factor, pl_A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Default" table:number-columns-repeated="121"/>
          <table:table-cell table:number-columns-repeated="128"/>
          <table:table-cell table:style-name="Default" table:number-columns-repeated="16127"/>
        </table:table-row>
        <table:table-row table:style-name="ro1">
          <table:table-cell office:value-type="string" calcext:value-type="string">
            <text:p>Chapman growth factor, pl_k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number-columns-repeated="5"/>
          <table:table-cell table:style-name="Default" table:number-columns-repeated="121"/>
          <table:table-cell table:number-columns-repeated="128"/>
          <table:table-cell table:style-name="Default" table:number-columns-repeated="16127"/>
        </table:table-row>
        <table:table-row table:style-name="ro1">
          <table:table-cell/>
          <table:table-cell table:style-name="Default"/>
          <table:table-cell table:number-columns-repeated="6"/>
          <table:table-cell table:style-name="ce1" office:value-type="string" calcext:value-type="string">
            <text:p>Yea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120" calcext:value-type="float">
            <text:p>120</text:p>
          </table:table-cell>
          <table:table-cell table:number-columns-repeated="128"/>
          <table:table-cell table:style-name="Default" table:number-columns-repeated="16127"/>
        </table:table-row>
        <table:table-row table:style-name="ro2">
          <table:table-cell/>
          <table:table-cell table:style-name="ce4" office:value-type="string" calcext:value-type="string">
            <text:p>PLANTATION_SOIL_C</text:p>
          </table:table-cell>
          <table:table-cell table:style-name="ce10" office:value-type="string" calcext:value-type="string">
            <text:p>pl_rootshoot</text:p>
          </table:table-cell>
          <table:table-cell table:style-name="ce10" office:value-type="string" calcext:value-type="string">
            <text:p>w (wood storage share)</text:p>
          </table:table-cell>
          <table:table-cell table:style-name="ce11" office:value-type="string" calcext:value-type="string">
            <text:p>AGB_C_POOL</text:p>
          </table:table-cell>
          <table:table-cell table:style-name="ce11" office:value-type="string" calcext:value-type="string">
            <text:p>BGB_C_POOL</text:p>
          </table:table-cell>
          <table:table-cell table:style-name="ce11" office:value-type="string" calcext:value-type="string">
            <text:p>SOIL_C_POOL</text:p>
          </table:table-cell>
          <table:table-cell table:style-name="ce11" office:value-type="string" calcext:value-type="string">
            <text:p>HARVEST_C_POOL</text:p>
          </table:table-cell>
          <table:table-cell table:style-name="ce12" office:value-type="string" calcext:value-type="string">
            <text:p>g_harvested_cum_tC_per_ha</text:p>
          </table:table-cell>
          <table:table-cell table:style-name="ce13" table:formula="of:=[.$B$6]*(1-EXP(-[.$B$7]*[.J$8]))^2*IF([.J8]=[.$B$5];1;0)" office:value-type="float" office:value="0" calcext:value-type="float">
            <text:p>0.00</text:p>
          </table:table-cell>
          <table:table-cell table:style-name="ce13" table:formula="of:=[.J$9]+[.$B$6]*(1-EXP(-[.$B$7]*[.K$8]))^2*IF([.K8]=[.$B$5];1;0)" office:value-type="float" office:value="0" calcext:value-type="float">
            <text:p>0.00</text:p>
          </table:table-cell>
          <table:table-cell table:style-name="ce13" table:formula="of:=[.K$9]+[.$B$6]*(1-EXP(-[.$B$7]*[.L$8]))^2*IF([.L8]=[.$B$5];1;0)" office:value-type="float" office:value="0" calcext:value-type="float">
            <text:p>0.00</text:p>
          </table:table-cell>
          <table:table-cell table:style-name="ce13" table:formula="of:=[.L$9]+[.$B$6]*(1-EXP(-[.$B$7]*[.M$8]))^2*IF([.M8]=[.$B$5];1;0)" office:value-type="float" office:value="0" calcext:value-type="float">
            <text:p>0.00</text:p>
          </table:table-cell>
          <table:table-cell table:style-name="ce13" table:formula="of:=[.M$9]+[.$B$6]*(1-EXP(-[.$B$7]*[.N$8]))^2*IF([.N8]=[.$B$5];1;0)" office:value-type="float" office:value="0" calcext:value-type="float">
            <text:p>0.00</text:p>
          </table:table-cell>
          <table:table-cell table:style-name="ce13" table:formula="of:=[.N$9]+[.$B$6]*(1-EXP(-[.$B$7]*[.O$8]))^2*IF([.O8]=[.$B$5];1;0)" office:value-type="float" office:value="0" calcext:value-type="float">
            <text:p>0.00</text:p>
          </table:table-cell>
          <table:table-cell table:style-name="ce13" table:formula="of:=[.O$9]+[.$B$6]*(1-EXP(-[.$B$7]*[.P$8]))^2*IF([.P8]=[.$B$5];1;0)" office:value-type="float" office:value="0" calcext:value-type="float">
            <text:p>0.00</text:p>
          </table:table-cell>
          <table:table-cell table:style-name="ce13" table:formula="of:=[.P$9]+[.$B$6]*(1-EXP(-[.$B$7]*[.Q$8]))^2*IF([.Q8]=[.$B$5];1;0)" office:value-type="float" office:value="0" calcext:value-type="float">
            <text:p>0.00</text:p>
          </table:table-cell>
          <table:table-cell table:style-name="ce13" table:formula="of:=[.Q$9]+[.$B$6]*(1-EXP(-[.$B$7]*[.R$8]))^2*IF([.R8]=[.$B$5];1;0)" office:value-type="float" office:value="0" calcext:value-type="float">
            <text:p>0.00</text:p>
          </table:table-cell>
          <table:table-cell table:style-name="ce13" table:formula="of:=[.R$9]+[.$B$6]*(1-EXP(-[.$B$7]*[.S$8]))^2*IF([.S8]=[.$B$5];1;0)" office:value-type="float" office:value="0" calcext:value-type="float">
            <text:p>0.00</text:p>
          </table:table-cell>
          <table:table-cell table:style-name="ce13" table:formula="of:=[.S$9]+[.$B$6]*(1-EXP(-[.$B$7]*[.T$8]))^2*IF([.T8]=[.$B$5];1;0)" office:value-type="float" office:value="0" calcext:value-type="float">
            <text:p>0.00</text:p>
          </table:table-cell>
          <table:table-cell table:style-name="ce13" table:formula="of:=[.T$9]+[.$B$6]*(1-EXP(-[.$B$7]*[.U$8]))^2*IF([.U8]=[.$B$5];1;0)" office:value-type="float" office:value="0" calcext:value-type="float">
            <text:p>0.00</text:p>
          </table:table-cell>
          <table:table-cell table:style-name="ce13" table:formula="of:=[.U$9]+[.$B$6]*(1-EXP(-[.$B$7]*[.V$8]))^2*IF([.V8]=[.$B$5];1;0)" office:value-type="float" office:value="0" calcext:value-type="float">
            <text:p>0.00</text:p>
          </table:table-cell>
          <table:table-cell table:style-name="ce13" table:formula="of:=[.V$9]+[.$B$6]*(1-EXP(-[.$B$7]*[.W$8]))^2*IF([.W8]=[.$B$5];1;0)" office:value-type="float" office:value="0" calcext:value-type="float">
            <text:p>0.00</text:p>
          </table:table-cell>
          <table:table-cell table:style-name="ce13" table:formula="of:=[.W$9]+[.$B$6]*(1-EXP(-[.$B$7]*[.X$8]))^2*IF([.X8]=[.$B$5];1;0)" office:value-type="float" office:value="0" calcext:value-type="float">
            <text:p>0.00</text:p>
          </table:table-cell>
          <table:table-cell table:style-name="ce13" table:formula="of:=[.X$9]+[.$B$6]*(1-EXP(-[.$B$7]*[.Y$8]))^2*IF([.Y8]=[.$B$5];1;0)" office:value-type="float" office:value="0" calcext:value-type="float">
            <text:p>0.00</text:p>
          </table:table-cell>
          <table:table-cell table:style-name="ce13" table:formula="of:=[.Y$9]+[.$B$6]*(1-EXP(-[.$B$7]*[.Z$8]))^2*IF([.Z8]=[.$B$5];1;0)" office:value-type="float" office:value="0" calcext:value-type="float">
            <text:p>0.00</text:p>
          </table:table-cell>
          <table:table-cell table:style-name="ce13" table:formula="of:=[.Z$9]+[.$B$6]*(1-EXP(-[.$B$7]*[.AA$8]))^2*IF([.AA8]=[.$B$5];1;0)" office:value-type="float" office:value="0" calcext:value-type="float">
            <text:p>0.00</text:p>
          </table:table-cell>
          <table:table-cell table:style-name="ce13" table:formula="of:=[.AA$9]+[.$B$6]*(1-EXP(-[.$B$7]*[.AB$8]))^2*IF([.AB8]=[.$B$5];1;0)" office:value-type="float" office:value="0" calcext:value-type="float">
            <text:p>0.00</text:p>
          </table:table-cell>
          <table:table-cell table:style-name="ce13" table:formula="of:=[.AB$9]+[.$B$6]*(1-EXP(-[.$B$7]*[.AC$8]))^2*IF([.AC8]=[.$B$5];1;0)" office:value-type="float" office:value="0" calcext:value-type="float">
            <text:p>0.00</text:p>
          </table:table-cell>
          <table:table-cell table:style-name="ce13" table:formula="of:=[.AC$9]+[.$B$6]*(1-EXP(-[.$B$7]*[.AD$8]))^2*IF([.AD8]=[.$B$5];1;0)" office:value-type="float" office:value="0" calcext:value-type="float">
            <text:p>0.00</text:p>
          </table:table-cell>
          <table:table-cell table:style-name="ce13" table:formula="of:=[.AD$9]+[.$B$6]*(1-EXP(-[.$B$7]*[.AE$8]))^2*IF([.AE8]=[.$B$5];1;0)" office:value-type="float" office:value="0" calcext:value-type="float">
            <text:p>0.00</text:p>
          </table:table-cell>
          <table:table-cell table:style-name="ce13" table:formula="of:=[.AE$9]+[.$B$6]*(1-EXP(-[.$B$7]*[.AF$8]))^2*IF([.AF8]=[.$B$5];1;0)" office:value-type="float" office:value="0" calcext:value-type="float">
            <text:p>0.00</text:p>
          </table:table-cell>
          <table:table-cell table:style-name="ce13" table:formula="of:=[.AF$9]+[.$B$6]*(1-EXP(-[.$B$7]*[.AG$8]))^2*IF([.AG8]=[.$B$5];1;0)" office:value-type="float" office:value="0" calcext:value-type="float">
            <text:p>0.00</text:p>
          </table:table-cell>
          <table:table-cell table:style-name="ce13" table:formula="of:=[.AG$9]+[.$B$6]*(1-EXP(-[.$B$7]*[.AH$8]))^2*IF([.AH8]=[.$B$5];1;0)" office:value-type="float" office:value="0" calcext:value-type="float">
            <text:p>0.00</text:p>
          </table:table-cell>
          <table:table-cell table:style-name="ce13" table:formula="of:=[.AH$9]+[.$B$6]*(1-EXP(-[.$B$7]*[.AI$8]))^2*IF([.AI8]=[.$B$5];1;0)" office:value-type="float" office:value="0" calcext:value-type="float">
            <text:p>0.00</text:p>
          </table:table-cell>
          <table:table-cell table:style-name="ce13" table:formula="of:=[.AI$9]+[.$B$6]*(1-EXP(-[.$B$7]*[.AJ$8]))^2*IF([.AJ8]=[.$B$5];1;0)" office:value-type="float" office:value="0" calcext:value-type="float">
            <text:p>0.00</text:p>
          </table:table-cell>
          <table:table-cell table:style-name="ce13" table:formula="of:=[.AJ$9]+[.$B$6]*(1-EXP(-[.$B$7]*[.AK$8]))^2*IF([.AK8]=[.$B$5];1;0)" office:value-type="float" office:value="0" calcext:value-type="float">
            <text:p>0.00</text:p>
          </table:table-cell>
          <table:table-cell table:style-name="ce13" table:formula="of:=[.AK$9]+[.$B$6]*(1-EXP(-[.$B$7]*[.AL$8]))^2*IF([.AL8]=[.$B$5];1;0)" office:value-type="float" office:value="0" calcext:value-type="float">
            <text:p>0.00</text:p>
          </table:table-cell>
          <table:table-cell table:style-name="ce13" table:formula="of:=[.AL$9]+[.$B$6]*(1-EXP(-[.$B$7]*[.AM$8]))^2*IF([.AM8]=[.$B$5];1;0)" office:value-type="float" office:value="0" calcext:value-type="float">
            <text:p>0.00</text:p>
          </table:table-cell>
          <table:table-cell table:style-name="ce13" table:formula="of:=[.AM$9]+[.$B$6]*(1-EXP(-[.$B$7]*[.AN$8]))^2*IF([.AN8]=[.$B$5];1;0)" office:value-type="float" office:value="0" calcext:value-type="float">
            <text:p>0.00</text:p>
          </table:table-cell>
          <table:table-cell table:style-name="ce13" table:formula="of:=[.$B$6]*(1-EXP(-[.$B$7]*[.AO$8]))^2*IF([.AO8]=[.$B$5];1;0)" office:value-type="float" office:value="5" calcext:value-type="float">
            <text:p>5.00</text:p>
          </table:table-cell>
          <table:table-cell table:style-name="ce13" table:formula="of:=[.AO$9]+[.$B$6]*(1-EXP(-[.$B$7]*[.AP$8]))^2*IF([.AP8]=[.$B$5];1;0)" office:value-type="float" office:value="5" calcext:value-type="float">
            <text:p>5.00</text:p>
          </table:table-cell>
          <table:table-cell table:style-name="ce13" table:formula="of:=[.AP$9]+[.$B$6]*(1-EXP(-[.$B$7]*[.AQ$8]))^2*IF([.AQ8]=[.$B$5];1;0)" office:value-type="float" office:value="5" calcext:value-type="float">
            <text:p>5.00</text:p>
          </table:table-cell>
          <table:table-cell table:style-name="ce13" table:formula="of:=[.AQ$9]+[.$B$6]*(1-EXP(-[.$B$7]*[.AR$8]))^2*IF([.AR8]=[.$B$5];1;0)" office:value-type="float" office:value="5" calcext:value-type="float">
            <text:p>5.00</text:p>
          </table:table-cell>
          <table:table-cell table:style-name="ce13" table:formula="of:=[.AR$9]+[.$B$6]*(1-EXP(-[.$B$7]*[.AS$8]))^2*IF([.AS8]=[.$B$5];1;0)" office:value-type="float" office:value="5" calcext:value-type="float">
            <text:p>5.00</text:p>
          </table:table-cell>
          <table:table-cell table:style-name="ce13" table:formula="of:=[.AS$9]+[.$B$6]*(1-EXP(-[.$B$7]*[.AT$8]))^2*IF([.AT8]=[.$B$5];1;0)" office:value-type="float" office:value="5" calcext:value-type="float">
            <text:p>5.00</text:p>
          </table:table-cell>
          <table:table-cell table:style-name="ce13" table:formula="of:=[.AT$9]+[.$B$6]*(1-EXP(-[.$B$7]*[.AU$8]))^2*IF([.AU8]=[.$B$5];1;0)" office:value-type="float" office:value="5" calcext:value-type="float">
            <text:p>5.00</text:p>
          </table:table-cell>
          <table:table-cell table:style-name="ce13" table:formula="of:=[.AU$9]+[.$B$6]*(1-EXP(-[.$B$7]*[.AV$8]))^2*IF([.AV8]=[.$B$5];1;0)" office:value-type="float" office:value="5" calcext:value-type="float">
            <text:p>5.00</text:p>
          </table:table-cell>
          <table:table-cell table:style-name="ce13" table:formula="of:=[.AV$9]+[.$B$6]*(1-EXP(-[.$B$7]*[.AW$8]))^2*IF([.AW8]=[.$B$5];1;0)" office:value-type="float" office:value="5" calcext:value-type="float">
            <text:p>5.00</text:p>
          </table:table-cell>
          <table:table-cell table:style-name="ce13" table:formula="of:=[.AW$9]+[.$B$6]*(1-EXP(-[.$B$7]*[.AX$8]))^2*IF([.AX8]=[.$B$5];1;0)" office:value-type="float" office:value="5" calcext:value-type="float">
            <text:p>5.00</text:p>
          </table:table-cell>
          <table:table-cell table:style-name="ce13" table:formula="of:=[.AX$9]+[.$B$6]*(1-EXP(-[.$B$7]*[.AY$8]))^2*IF([.AY8]=[.$B$5];1;0)" office:value-type="float" office:value="5" calcext:value-type="float">
            <text:p>5.00</text:p>
          </table:table-cell>
          <table:table-cell table:style-name="ce13" table:formula="of:=[.AY$9]+[.$B$6]*(1-EXP(-[.$B$7]*[.AZ$8]))^2*IF([.AZ8]=[.$B$5];1;0)" office:value-type="float" office:value="5" calcext:value-type="float">
            <text:p>5.00</text:p>
          </table:table-cell>
          <table:table-cell table:style-name="ce13" table:formula="of:=[.AZ$9]+[.$B$6]*(1-EXP(-[.$B$7]*[.BA$8]))^2*IF([.BA8]=[.$B$5];1;0)" office:value-type="float" office:value="5" calcext:value-type="float">
            <text:p>5.00</text:p>
          </table:table-cell>
          <table:table-cell table:style-name="ce13" table:formula="of:=[.BA$9]+[.$B$6]*(1-EXP(-[.$B$7]*[.BB$8]))^2*IF([.BB8]=[.$B$5];1;0)" office:value-type="float" office:value="5" calcext:value-type="float">
            <text:p>5.00</text:p>
          </table:table-cell>
          <table:table-cell table:style-name="ce13" table:formula="of:=[.BB$9]+[.$B$6]*(1-EXP(-[.$B$7]*[.BC$8]))^2*IF([.BC8]=[.$B$5];1;0)" office:value-type="float" office:value="5" calcext:value-type="float">
            <text:p>5.00</text:p>
          </table:table-cell>
          <table:table-cell table:style-name="ce13" table:formula="of:=[.BC$9]+[.$B$6]*(1-EXP(-[.$B$7]*[.BD$8]))^2*IF([.BD8]=[.$B$5];1;0)" office:value-type="float" office:value="5" calcext:value-type="float">
            <text:p>5.00</text:p>
          </table:table-cell>
          <table:table-cell table:style-name="ce13" table:formula="of:=[.BD$9]+[.$B$6]*(1-EXP(-[.$B$7]*[.BE$8]))^2*IF([.BE8]=[.$B$5];1;0)" office:value-type="float" office:value="5" calcext:value-type="float">
            <text:p>5.00</text:p>
          </table:table-cell>
          <table:table-cell table:style-name="ce13" table:formula="of:=[.BE$9]+[.$B$6]*(1-EXP(-[.$B$7]*[.BF$8]))^2*IF([.BF8]=[.$B$5];1;0)" office:value-type="float" office:value="5" calcext:value-type="float">
            <text:p>5.00</text:p>
          </table:table-cell>
          <table:table-cell table:style-name="ce13" table:formula="of:=[.BF$9]+[.$B$6]*(1-EXP(-[.$B$7]*[.BG$8]))^2*IF([.BG8]=[.$B$5];1;0)" office:value-type="float" office:value="5" calcext:value-type="float">
            <text:p>5.00</text:p>
          </table:table-cell>
          <table:table-cell table:style-name="ce13" table:formula="of:=[.BG$9]+[.$B$6]*(1-EXP(-[.$B$7]*[.BH$8]))^2*IF([.BH8]=[.$B$5];1;0)" office:value-type="float" office:value="5" calcext:value-type="float">
            <text:p>5.00</text:p>
          </table:table-cell>
          <table:table-cell table:style-name="ce13" table:formula="of:=[.BH$9]+[.$B$6]*(1-EXP(-[.$B$7]*[.BI$8]))^2*IF([.BI8]=[.$B$5];1;0)" office:value-type="float" office:value="5" calcext:value-type="float">
            <text:p>5.00</text:p>
          </table:table-cell>
          <table:table-cell table:style-name="ce13" table:formula="of:=[.BI$9]+[.$B$6]*(1-EXP(-[.$B$7]*[.BJ$8]))^2*IF([.BJ8]=[.$B$5];1;0)" office:value-type="float" office:value="5" calcext:value-type="float">
            <text:p>5.00</text:p>
          </table:table-cell>
          <table:table-cell table:style-name="ce13" table:formula="of:=[.BJ$9]+[.$B$6]*(1-EXP(-[.$B$7]*[.BK$8]))^2*IF([.BK8]=[.$B$5];1;0)" office:value-type="float" office:value="5" calcext:value-type="float">
            <text:p>5.00</text:p>
          </table:table-cell>
          <table:table-cell table:style-name="ce13" table:formula="of:=[.BK$9]+[.$B$6]*(1-EXP(-[.$B$7]*[.BL$8]))^2*IF([.BL8]=[.$B$5];1;0)" office:value-type="float" office:value="5" calcext:value-type="float">
            <text:p>5.00</text:p>
          </table:table-cell>
          <table:table-cell table:style-name="ce13" table:formula="of:=[.BL$9]+[.$B$6]*(1-EXP(-[.$B$7]*[.BM$8]))^2*IF([.BM8]=[.$B$5];1;0)" office:value-type="float" office:value="5" calcext:value-type="float">
            <text:p>5.00</text:p>
          </table:table-cell>
          <table:table-cell table:style-name="ce13" table:formula="of:=[.BM$9]+[.$B$6]*(1-EXP(-[.$B$7]*[.BN$8]))^2*IF([.BN8]=[.$B$5];1;0)" office:value-type="float" office:value="5" calcext:value-type="float">
            <text:p>5.00</text:p>
          </table:table-cell>
          <table:table-cell table:style-name="ce13" table:formula="of:=[.BN$9]+[.$B$6]*(1-EXP(-[.$B$7]*[.BO$8]))^2*IF([.BO8]=[.$B$5];1;0)" office:value-type="float" office:value="5" calcext:value-type="float">
            <text:p>5.00</text:p>
          </table:table-cell>
          <table:table-cell table:style-name="ce13" table:formula="of:=[.BO$9]+[.$B$6]*(1-EXP(-[.$B$7]*[.BP$8]))^2*IF([.BP8]=[.$B$5];1;0)" office:value-type="float" office:value="5" calcext:value-type="float">
            <text:p>5.00</text:p>
          </table:table-cell>
          <table:table-cell table:style-name="ce13" table:formula="of:=[.BP$9]+[.$B$6]*(1-EXP(-[.$B$7]*[.BQ$8]))^2*IF([.BQ8]=[.$B$5];1;0)" office:value-type="float" office:value="5" calcext:value-type="float">
            <text:p>5.00</text:p>
          </table:table-cell>
          <table:table-cell table:style-name="ce13" table:formula="of:=[.BQ$9]+[.$B$6]*(1-EXP(-[.$B$7]*[.BR$8]))^2*IF([.BR8]=[.$B$5];1;0)" office:value-type="float" office:value="5" calcext:value-type="float">
            <text:p>5.00</text:p>
          </table:table-cell>
          <table:table-cell table:style-name="ce13" table:formula="of:=[.BR$9]+[.$B$6]*(1-EXP(-[.$B$7]*[.BS$8]))^2*IF([.BS8]=[.$B$5];1;0)" office:value-type="float" office:value="5" calcext:value-type="float">
            <text:p>5.00</text:p>
          </table:table-cell>
          <table:table-cell table:style-name="ce13" table:formula="of:=[.BS$9]+[.$B$6]*(1-EXP(-[.$B$7]*[.BT$8]))^2*IF([.BT8]=[.$B$5];1;0)" office:value-type="float" office:value="5" calcext:value-type="float">
            <text:p>5.00</text:p>
          </table:table-cell>
          <table:table-cell table:style-name="ce13" table:formula="of:=[.BT$9]+[.$B$6]*(1-EXP(-[.$B$7]*[.BU$8]))^2*IF([.BU8]=[.$B$5];1;0)" office:value-type="float" office:value="5" calcext:value-type="float">
            <text:p>5.00</text:p>
          </table:table-cell>
          <table:table-cell table:style-name="ce13" table:formula="of:=[.BU$9]+[.$B$6]*(1-EXP(-[.$B$7]*[.BV$8]))^2*IF([.BV8]=[.$B$5];1;0)" office:value-type="float" office:value="5" calcext:value-type="float">
            <text:p>5.00</text:p>
          </table:table-cell>
          <table:table-cell table:style-name="ce13" table:formula="of:=[.BV$9]+[.$B$6]*(1-EXP(-[.$B$7]*[.BW$8]))^2*IF([.BW8]=[.$B$5];1;0)" office:value-type="float" office:value="5" calcext:value-type="float">
            <text:p>5.00</text:p>
          </table:table-cell>
          <table:table-cell table:style-name="ce13" table:formula="of:=[.BW$9]+[.$B$6]*(1-EXP(-[.$B$7]*[.BX$8]))^2*IF([.BX8]=[.$B$5];1;0)" office:value-type="float" office:value="5" calcext:value-type="float">
            <text:p>5.00</text:p>
          </table:table-cell>
          <table:table-cell table:style-name="ce13" table:formula="of:=[.BX$9]+[.$B$6]*(1-EXP(-[.$B$7]*[.BY$8]))^2*IF([.BY8]=[.$B$5];1;0)" office:value-type="float" office:value="5" calcext:value-type="float">
            <text:p>5.00</text:p>
          </table:table-cell>
          <table:table-cell table:style-name="ce13" table:formula="of:=[.BY$9]+[.$B$6]*(1-EXP(-[.$B$7]*[.BZ$8]))^2*IF([.BZ8]=[.$B$5];1;0)" office:value-type="float" office:value="5" calcext:value-type="float">
            <text:p>5.00</text:p>
          </table:table-cell>
          <table:table-cell table:style-name="ce13" table:formula="of:=[.BZ$9]+[.$B$6]*(1-EXP(-[.$B$7]*[.CA$8]))^2*IF([.CA8]=[.$B$5];1;0)" office:value-type="float" office:value="5" calcext:value-type="float">
            <text:p>5.00</text:p>
          </table:table-cell>
          <table:table-cell table:style-name="ce13" table:formula="of:=[.CA$9]+[.$B$6]*(1-EXP(-[.$B$7]*[.CB$8]))^2*IF([.CB8]=[.$B$5];1;0)" office:value-type="float" office:value="5" calcext:value-type="float">
            <text:p>5.00</text:p>
          </table:table-cell>
          <table:table-cell table:style-name="ce13" table:formula="of:=[.CB$9]+[.$B$6]*(1-EXP(-[.$B$7]*[.CC$8]))^2*IF([.CC8]=[.$B$5];1;0)" office:value-type="float" office:value="5" calcext:value-type="float">
            <text:p>5.00</text:p>
          </table:table-cell>
          <table:table-cell table:style-name="ce13" table:formula="of:=[.CC$9]+[.$B$6]*(1-EXP(-[.$B$7]*[.CD$8]))^2*IF([.CD8]=[.$B$5];1;0)" office:value-type="float" office:value="5" calcext:value-type="float">
            <text:p>5.00</text:p>
          </table:table-cell>
          <table:table-cell table:style-name="ce13" table:formula="of:=[.CD$9]+[.$B$6]*(1-EXP(-[.$B$7]*[.CE$8]))^2*IF([.CE8]=[.$B$5];1;0)" office:value-type="float" office:value="5" calcext:value-type="float">
            <text:p>5.00</text:p>
          </table:table-cell>
          <table:table-cell table:style-name="ce13" table:formula="of:=[.CE$9]+[.$B$6]*(1-EXP(-[.$B$7]*[.CF$8]))^2*IF([.CF8]=[.$B$5];1;0)" office:value-type="float" office:value="5" calcext:value-type="float">
            <text:p>5.00</text:p>
          </table:table-cell>
          <table:table-cell table:style-name="ce13" table:formula="of:=[.CF$9]+[.$B$6]*(1-EXP(-[.$B$7]*[.CG$8]))^2*IF([.CG8]=[.$B$5];1;0)" office:value-type="float" office:value="5" calcext:value-type="float">
            <text:p>5.00</text:p>
          </table:table-cell>
          <table:table-cell table:style-name="ce13" table:formula="of:=[.CG$9]+[.$B$6]*(1-EXP(-[.$B$7]*[.CH$8]))^2*IF([.CH8]=[.$B$5];1;0)" office:value-type="float" office:value="5" calcext:value-type="float">
            <text:p>5.00</text:p>
          </table:table-cell>
          <table:table-cell table:style-name="ce13" table:formula="of:=[.CH$9]+[.$B$6]*(1-EXP(-[.$B$7]*[.CI$8]))^2*IF([.CI8]=[.$B$5];1;0)" office:value-type="float" office:value="5" calcext:value-type="float">
            <text:p>5.00</text:p>
          </table:table-cell>
          <table:table-cell table:style-name="ce13" table:formula="of:=[.CI$9]+[.$B$6]*(1-EXP(-[.$B$7]*[.CJ$8]))^2*IF([.CJ8]=[.$B$5];1;0)" office:value-type="float" office:value="5" calcext:value-type="float">
            <text:p>5.00</text:p>
          </table:table-cell>
          <table:table-cell table:style-name="ce13" table:formula="of:=[.CJ$9]+[.$B$6]*(1-EXP(-[.$B$7]*[.CK$8]))^2*IF([.CK8]=[.$B$5];1;0)" office:value-type="float" office:value="5" calcext:value-type="float">
            <text:p>5.00</text:p>
          </table:table-cell>
          <table:table-cell table:style-name="ce13" table:formula="of:=[.CK$9]+[.$B$6]*(1-EXP(-[.$B$7]*[.CL$8]))^2*IF([.CL8]=[.$B$5];1;0)" office:value-type="float" office:value="5" calcext:value-type="float">
            <text:p>5.00</text:p>
          </table:table-cell>
          <table:table-cell table:style-name="ce13" table:formula="of:=[.CL$9]+[.$B$6]*(1-EXP(-[.$B$7]*[.CM$8]))^2*IF([.CM8]=[.$B$5];1;0)" office:value-type="float" office:value="5" calcext:value-type="float">
            <text:p>5.00</text:p>
          </table:table-cell>
          <table:table-cell table:style-name="ce13" table:formula="of:=[.CM$9]+[.$B$6]*(1-EXP(-[.$B$7]*[.CN$8]))^2*IF([.CN8]=[.$B$5];1;0)" office:value-type="float" office:value="5" calcext:value-type="float">
            <text:p>5.00</text:p>
          </table:table-cell>
          <table:table-cell table:style-name="ce13" table:formula="of:=[.CN$9]+[.$B$6]*(1-EXP(-[.$B$7]*[.CO$8]))^2*IF([.CO8]=[.$B$5];1;0)" office:value-type="float" office:value="5" calcext:value-type="float">
            <text:p>5.00</text:p>
          </table:table-cell>
          <table:table-cell table:style-name="ce13" table:formula="of:=[.CO$9]+[.$B$6]*(1-EXP(-[.$B$7]*[.CP$8]))^2*IF([.CP8]=[.$B$5];1;0)" office:value-type="float" office:value="5" calcext:value-type="float">
            <text:p>5.00</text:p>
          </table:table-cell>
          <table:table-cell table:style-name="ce13" table:formula="of:=[.CP$9]+[.$B$6]*(1-EXP(-[.$B$7]*[.CQ$8]))^2*IF([.CQ8]=[.$B$5];1;0)" office:value-type="float" office:value="5" calcext:value-type="float">
            <text:p>5.00</text:p>
          </table:table-cell>
          <table:table-cell table:style-name="ce13" table:formula="of:=[.CQ$9]+[.$B$6]*(1-EXP(-[.$B$7]*[.CR$8]))^2*IF([.CR8]=[.$B$5];1;0)" office:value-type="float" office:value="5" calcext:value-type="float">
            <text:p>5.00</text:p>
          </table:table-cell>
          <table:table-cell table:style-name="ce13" table:formula="of:=[.CR$9]+[.$B$6]*(1-EXP(-[.$B$7]*[.CS$8]))^2*IF([.CS8]=[.$B$5];1;0)" office:value-type="float" office:value="5" calcext:value-type="float">
            <text:p>5.00</text:p>
          </table:table-cell>
          <table:table-cell table:style-name="ce13" table:formula="of:=[.CS$9]+[.$B$6]*(1-EXP(-[.$B$7]*[.CT$8]))^2*IF([.CT8]=[.$B$5];1;0)" office:value-type="float" office:value="5" calcext:value-type="float">
            <text:p>5.00</text:p>
          </table:table-cell>
          <table:table-cell table:style-name="ce13" table:formula="of:=[.CT$9]+[.$B$6]*(1-EXP(-[.$B$7]*[.CU$8]))^2*IF([.CU8]=[.$B$5];1;0)" office:value-type="float" office:value="5" calcext:value-type="float">
            <text:p>5.00</text:p>
          </table:table-cell>
          <table:table-cell table:style-name="ce13" table:formula="of:=[.CU$9]+[.$B$6]*(1-EXP(-[.$B$7]*[.CV$8]))^2*IF([.CV8]=[.$B$5];1;0)" office:value-type="float" office:value="5" calcext:value-type="float">
            <text:p>5.00</text:p>
          </table:table-cell>
          <table:table-cell table:style-name="ce13" table:formula="of:=[.CV$9]+[.$B$6]*(1-EXP(-[.$B$7]*[.CW$8]))^2*IF([.CW8]=[.$B$5];1;0)" office:value-type="float" office:value="5" calcext:value-type="float">
            <text:p>5.00</text:p>
          </table:table-cell>
          <table:table-cell table:style-name="ce13" table:formula="of:=[.CW$9]+[.$B$6]*(1-EXP(-[.$B$7]*[.CX$8]))^2*IF([.CX8]=[.$B$5];1;0)" office:value-type="float" office:value="5" calcext:value-type="float">
            <text:p>5.00</text:p>
          </table:table-cell>
          <table:table-cell table:style-name="ce13" table:formula="of:=[.CX$9]+[.$B$6]*(1-EXP(-[.$B$7]*[.CY$8]))^2*IF([.CY8]=[.$B$5];1;0)" office:value-type="float" office:value="5" calcext:value-type="float">
            <text:p>5.00</text:p>
          </table:table-cell>
          <table:table-cell table:style-name="ce13" table:formula="of:=[.CY$9]+[.$B$6]*(1-EXP(-[.$B$7]*[.CZ$8]))^2*IF([.CZ8]=[.$B$5];1;0)" office:value-type="float" office:value="5" calcext:value-type="float">
            <text:p>5.00</text:p>
          </table:table-cell>
          <table:table-cell table:style-name="ce13" table:formula="of:=[.CZ$9]+[.$B$6]*(1-EXP(-[.$B$7]*[.DA$8]))^2*IF([.DA8]=[.$B$5];1;0)" office:value-type="float" office:value="5" calcext:value-type="float">
            <text:p>5.00</text:p>
          </table:table-cell>
          <table:table-cell table:style-name="ce13" table:formula="of:=[.DA$9]+[.$B$6]*(1-EXP(-[.$B$7]*[.DB$8]))^2*IF([.DB8]=[.$B$5];1;0)" office:value-type="float" office:value="5" calcext:value-type="float">
            <text:p>5.00</text:p>
          </table:table-cell>
          <table:table-cell table:style-name="ce13" table:formula="of:=[.DB$9]+[.$B$6]*(1-EXP(-[.$B$7]*[.DC$8]))^2*IF([.DC8]=[.$B$5];1;0)" office:value-type="float" office:value="5" calcext:value-type="float">
            <text:p>5.00</text:p>
          </table:table-cell>
          <table:table-cell table:style-name="ce13" table:formula="of:=[.DC$9]+[.$B$6]*(1-EXP(-[.$B$7]*[.DD$8]))^2*IF([.DD8]=[.$B$5];1;0)" office:value-type="float" office:value="5" calcext:value-type="float">
            <text:p>5.00</text:p>
          </table:table-cell>
          <table:table-cell table:style-name="ce13" table:formula="of:=[.DD$9]+[.$B$6]*(1-EXP(-[.$B$7]*[.DE$8]))^2*IF([.DE8]=[.$B$5];1;0)" office:value-type="float" office:value="5" calcext:value-type="float">
            <text:p>5.00</text:p>
          </table:table-cell>
          <table:table-cell table:style-name="ce13" table:formula="of:=[.DE$9]+[.$B$6]*(1-EXP(-[.$B$7]*[.DF$8]))^2*IF([.DF8]=[.$B$5];1;0)" office:value-type="float" office:value="5" calcext:value-type="float">
            <text:p>5.00</text:p>
          </table:table-cell>
          <table:table-cell table:style-name="ce13" table:formula="of:=[.DF$9]+[.$B$6]*(1-EXP(-[.$B$7]*[.DG$8]))^2*IF([.DG8]=[.$B$5];1;0)" office:value-type="float" office:value="5" calcext:value-type="float">
            <text:p>5.00</text:p>
          </table:table-cell>
          <table:table-cell table:style-name="ce13" table:formula="of:=[.DG$9]+[.$B$6]*(1-EXP(-[.$B$7]*[.DH$8]))^2*IF([.DH8]=[.$B$5];1;0)" office:value-type="float" office:value="5" calcext:value-type="float">
            <text:p>5.00</text:p>
          </table:table-cell>
          <table:table-cell table:style-name="ce13" table:formula="of:=[.DH$9]+[.$B$6]*(1-EXP(-[.$B$7]*[.DI$8]))^2*IF([.DI8]=[.$B$5];1;0)" office:value-type="float" office:value="5" calcext:value-type="float">
            <text:p>5.00</text:p>
          </table:table-cell>
          <table:table-cell table:style-name="ce13" table:formula="of:=[.DI$9]+[.$B$6]*(1-EXP(-[.$B$7]*[.DJ$8]))^2*IF([.DJ8]=[.$B$5];1;0)" office:value-type="float" office:value="5" calcext:value-type="float">
            <text:p>5.00</text:p>
          </table:table-cell>
          <table:table-cell table:style-name="ce13" table:formula="of:=[.DJ$9]+[.$B$6]*(1-EXP(-[.$B$7]*[.DK$8]))^2*IF([.DK8]=[.$B$5];1;0)" office:value-type="float" office:value="5" calcext:value-type="float">
            <text:p>5.00</text:p>
          </table:table-cell>
          <table:table-cell table:style-name="ce13" table:formula="of:=[.DK$9]+[.$B$6]*(1-EXP(-[.$B$7]*[.DL$8]))^2*IF([.DL8]=[.$B$5];1;0)" office:value-type="float" office:value="5" calcext:value-type="float">
            <text:p>5.00</text:p>
          </table:table-cell>
          <table:table-cell table:style-name="ce13" table:formula="of:=[.DL$9]+[.$B$6]*(1-EXP(-[.$B$7]*[.DM$8]))^2*IF([.DM8]=[.$B$5];1;0)" office:value-type="float" office:value="5" calcext:value-type="float">
            <text:p>5.00</text:p>
          </table:table-cell>
          <table:table-cell table:style-name="ce13" table:formula="of:=[.DM$9]+[.$B$6]*(1-EXP(-[.$B$7]*[.DN$8]))^2*IF([.DN8]=[.$B$5];1;0)" office:value-type="float" office:value="5" calcext:value-type="float">
            <text:p>5.00</text:p>
          </table:table-cell>
          <table:table-cell table:style-name="ce13" table:formula="of:=[.DN$9]+[.$B$6]*(1-EXP(-[.$B$7]*[.DO$8]))^2*IF([.DO8]=[.$B$5];1;0)" office:value-type="float" office:value="5" calcext:value-type="float">
            <text:p>5.00</text:p>
          </table:table-cell>
          <table:table-cell table:style-name="ce13" table:formula="of:=[.DO$9]+[.$B$6]*(1-EXP(-[.$B$7]*[.DP$8]))^2*IF([.DP8]=[.$B$5];1;0)" office:value-type="float" office:value="5" calcext:value-type="float">
            <text:p>5.00</text:p>
          </table:table-cell>
          <table:table-cell table:style-name="ce13" table:formula="of:=[.DP$9]+[.$B$6]*(1-EXP(-[.$B$7]*[.DQ$8]))^2*IF([.DQ8]=[.$B$5];1;0)" office:value-type="float" office:value="5" calcext:value-type="float">
            <text:p>5.00</text:p>
          </table:table-cell>
          <table:table-cell table:style-name="ce13" table:formula="of:=[.DQ$9]+[.$B$6]*(1-EXP(-[.$B$7]*[.DR$8]))^2*IF([.DR8]=[.$B$5];1;0)" office:value-type="float" office:value="5" calcext:value-type="float">
            <text:p>5.00</text:p>
          </table:table-cell>
          <table:table-cell table:style-name="ce13" table:formula="of:=[.DR$9]+[.$B$6]*(1-EXP(-[.$B$7]*[.DS$8]))^2*IF([.DS8]=[.$B$5];1;0)" office:value-type="float" office:value="5" calcext:value-type="float">
            <text:p>5.00</text:p>
          </table:table-cell>
          <table:table-cell table:style-name="ce13" table:formula="of:=[.DS$9]+[.$B$6]*(1-EXP(-[.$B$7]*[.DT$8]))^2*IF([.DT8]=[.$B$5];1;0)" office:value-type="float" office:value="5" calcext:value-type="float">
            <text:p>5.00</text:p>
          </table:table-cell>
          <table:table-cell table:style-name="ce13" table:formula="of:=[.DT$9]+[.$B$6]*(1-EXP(-[.$B$7]*[.DU$8]))^2*IF([.DU8]=[.$B$5];1;0)" office:value-type="float" office:value="5" calcext:value-type="float">
            <text:p>5.00</text:p>
          </table:table-cell>
          <table:table-cell table:style-name="ce13" table:formula="of:=[.DU$9]+[.$B$6]*(1-EXP(-[.$B$7]*[.DV$8]))^2*IF([.DV8]=[.$B$5];1;0)" office:value-type="float" office:value="5" calcext:value-type="float">
            <text:p>5.00</text:p>
          </table:table-cell>
          <table:table-cell table:style-name="ce13" table:formula="of:=[.DV$9]+[.$B$6]*(1-EXP(-[.$B$7]*[.DW$8]))^2*IF([.DW8]=[.$B$5];1;0)" office:value-type="float" office:value="5" calcext:value-type="float">
            <text:p>5.00</text:p>
          </table:table-cell>
          <table:table-cell table:style-name="ce13" table:formula="of:=[.DW$9]+[.$B$6]*(1-EXP(-[.$B$7]*[.DX$8]))^2*IF([.DX8]=[.$B$5];1;0)" office:value-type="float" office:value="5" calcext:value-type="float">
            <text:p>5.00</text:p>
          </table:table-cell>
          <table:table-cell table:style-name="ce13" table:formula="of:=[.DX$9]+[.$B$6]*(1-EXP(-[.$B$7]*[.DY$8]))^2*IF([.DY8]=[.$B$5];1;0)" office:value-type="float" office:value="5" calcext:value-type="float">
            <text:p>5.00</text:p>
          </table:table-cell>
          <table:table-cell table:number-columns-repeated="128"/>
          <table:table-cell table:style-name="Default" table:number-columns-repeated="16127"/>
        </table:table-row>
        <table:table-row table:style-name="ro1">
          <table:table-cell/>
          <table:table-cell office:value-type="float" office:value="0.092749069" calcext:value-type="float">
            <text:p>0.092749069</text:p>
          </table:table-cell>
          <table:table-cell office:value-type="float" office:value="0.26" calcext:value-type="float">
            <text:p>0.26</text:p>
          </table:table-cell>
          <table:table-cell office:value-type="float" office:value="0.268" calcext:value-type="float">
            <text:p>0.268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2" office:value-type="string" calcext:value-type="string">
            <text:p>C_pl(t) cumulative tC/ha</text:p>
          </table:table-cell>
          <table:table-cell table:style-name="ce13" table:formula="of:=[.$B$6]*(1-EXP(-[.$B$7]*IF([.J8]&gt;=[.$B$5];0;[.J8])))^2*([.$E$10]+[.$F$10]*[.$C$10])+[.$G$10]*[.$B$10]*MIN(MAX([.$B$5]-1;0);[.J$8])+[.$H$10]*[.$D$10]*[.J$9]" office:value-type="float" office:value="6.39217704287026" calcext:value-type="float">
            <text:p>6.39</text:p>
          </table:table-cell>
          <table:table-cell table:style-name="ce13" table:formula="of:=[.$B$6]*(1-EXP(-[.$B$7]*IF([.K8]&gt;=[.$B$5];0;[.K8])))^2*([.$E$10]+[.$F$10]*[.$C$10])+[.$G$10]*[.$B$10]*MIN(MAX([.$B$5]-1;0);[.K$8])+[.$H$10]*[.$D$10]*[.K$9]" office:value-type="float" office:value="6.48549811202947" calcext:value-type="float">
            <text:p>6.49</text:p>
          </table:table-cell>
          <table:table-cell table:style-name="ce13" table:formula="of:=[.$B$6]*(1-EXP(-[.$B$7]*IF([.L8]&gt;=[.$B$5];0;[.L8])))^2*([.$E$10]+[.$F$10]*[.$C$10])+[.$G$10]*[.$B$10]*MIN(MAX([.$B$5]-1;0);[.L$8])+[.$H$10]*[.$D$10]*[.L$9]" office:value-type="float" office:value="6.57824720699882" calcext:value-type="float">
            <text:p>6.58</text:p>
          </table:table-cell>
          <table:table-cell table:style-name="ce13" table:formula="of:=[.$B$6]*(1-EXP(-[.$B$7]*IF([.M8]&gt;=[.$B$5];0;[.M8])))^2*([.$E$10]+[.$F$10]*[.$C$10])+[.$G$10]*[.$B$10]*MIN(MAX([.$B$5]-1;0);[.M$8])+[.$H$10]*[.$D$10]*[.M$9]" office:value-type="float" office:value="6.670996276" calcext:value-type="float">
            <text:p>6.67</text:p>
          </table:table-cell>
          <table:table-cell table:style-name="ce13" table:formula="of:=[.$B$6]*(1-EXP(-[.$B$7]*IF([.N8]&gt;=[.$B$5];0;[.N8])))^2*([.$E$10]+[.$F$10]*[.$C$10])+[.$G$10]*[.$B$10]*MIN(MAX([.$B$5]-1;0);[.N$8])+[.$H$10]*[.$D$10]*[.N$9]" office:value-type="float" office:value="6.763745345" calcext:value-type="float">
            <text:p>6.76</text:p>
          </table:table-cell>
          <table:table-cell table:style-name="ce13" table:formula="of:=[.$B$6]*(1-EXP(-[.$B$7]*IF([.O8]&gt;=[.$B$5];0;[.O8])))^2*([.$E$10]+[.$F$10]*[.$C$10])+[.$G$10]*[.$B$10]*MIN(MAX([.$B$5]-1;0);[.O$8])+[.$H$10]*[.$D$10]*[.O$9]" office:value-type="float" office:value="6.856494414" calcext:value-type="float">
            <text:p>6.86</text:p>
          </table:table-cell>
          <table:table-cell table:style-name="ce13" table:formula="of:=[.$B$6]*(1-EXP(-[.$B$7]*IF([.P8]&gt;=[.$B$5];0;[.P8])))^2*([.$E$10]+[.$F$10]*[.$C$10])+[.$G$10]*[.$B$10]*MIN(MAX([.$B$5]-1;0);[.P$8])+[.$H$10]*[.$D$10]*[.P$9]" office:value-type="float" office:value="6.949243483" calcext:value-type="float">
            <text:p>6.95</text:p>
          </table:table-cell>
          <table:table-cell table:style-name="ce13" table:formula="of:=[.$B$6]*(1-EXP(-[.$B$7]*IF([.Q8]&gt;=[.$B$5];0;[.Q8])))^2*([.$E$10]+[.$F$10]*[.$C$10])+[.$G$10]*[.$B$10]*MIN(MAX([.$B$5]-1;0);[.Q$8])+[.$H$10]*[.$D$10]*[.Q$9]" office:value-type="float" office:value="7.041992552" calcext:value-type="float">
            <text:p>7.04</text:p>
          </table:table-cell>
          <table:table-cell table:style-name="ce13" table:formula="of:=[.$B$6]*(1-EXP(-[.$B$7]*IF([.R8]&gt;=[.$B$5];0;[.R8])))^2*([.$E$10]+[.$F$10]*[.$C$10])+[.$G$10]*[.$B$10]*MIN(MAX([.$B$5]-1;0);[.R$8])+[.$H$10]*[.$D$10]*[.R$9]" office:value-type="float" office:value="7.134741621" calcext:value-type="float">
            <text:p>7.13</text:p>
          </table:table-cell>
          <table:table-cell table:style-name="ce13" table:formula="of:=[.$B$6]*(1-EXP(-[.$B$7]*IF([.S8]&gt;=[.$B$5];0;[.S8])))^2*([.$E$10]+[.$F$10]*[.$C$10])+[.$G$10]*[.$B$10]*MIN(MAX([.$B$5]-1;0);[.S$8])+[.$H$10]*[.$D$10]*[.S$9]" office:value-type="float" office:value="7.22749069" calcext:value-type="float">
            <text:p>7.23</text:p>
          </table:table-cell>
          <table:table-cell table:style-name="ce13" table:formula="of:=[.$B$6]*(1-EXP(-[.$B$7]*IF([.T8]&gt;=[.$B$5];0;[.T8])))^2*([.$E$10]+[.$F$10]*[.$C$10])+[.$G$10]*[.$B$10]*MIN(MAX([.$B$5]-1;0);[.T$8])+[.$H$10]*[.$D$10]*[.T$9]" office:value-type="float" office:value="7.320239759" calcext:value-type="float">
            <text:p>7.32</text:p>
          </table:table-cell>
          <table:table-cell table:style-name="ce13" table:formula="of:=[.$B$6]*(1-EXP(-[.$B$7]*IF([.U8]&gt;=[.$B$5];0;[.U8])))^2*([.$E$10]+[.$F$10]*[.$C$10])+[.$G$10]*[.$B$10]*MIN(MAX([.$B$5]-1;0);[.U$8])+[.$H$10]*[.$D$10]*[.U$9]" office:value-type="float" office:value="7.412988828" calcext:value-type="float">
            <text:p>7.41</text:p>
          </table:table-cell>
          <table:table-cell table:style-name="ce13" table:formula="of:=[.$B$6]*(1-EXP(-[.$B$7]*IF([.V8]&gt;=[.$B$5];0;[.V8])))^2*([.$E$10]+[.$F$10]*[.$C$10])+[.$G$10]*[.$B$10]*MIN(MAX([.$B$5]-1;0);[.V$8])+[.$H$10]*[.$D$10]*[.V$9]" office:value-type="float" office:value="7.505737897" calcext:value-type="float">
            <text:p>7.51</text:p>
          </table:table-cell>
          <table:table-cell table:style-name="ce13" table:formula="of:=[.$B$6]*(1-EXP(-[.$B$7]*IF([.W8]&gt;=[.$B$5];0;[.W8])))^2*([.$E$10]+[.$F$10]*[.$C$10])+[.$G$10]*[.$B$10]*MIN(MAX([.$B$5]-1;0);[.W$8])+[.$H$10]*[.$D$10]*[.W$9]" office:value-type="float" office:value="7.598486966" calcext:value-type="float">
            <text:p>7.60</text:p>
          </table:table-cell>
          <table:table-cell table:style-name="ce13" table:formula="of:=[.$B$6]*(1-EXP(-[.$B$7]*IF([.X8]&gt;=[.$B$5];0;[.X8])))^2*([.$E$10]+[.$F$10]*[.$C$10])+[.$G$10]*[.$B$10]*MIN(MAX([.$B$5]-1;0);[.X$8])+[.$H$10]*[.$D$10]*[.X$9]" office:value-type="float" office:value="7.691236035" calcext:value-type="float">
            <text:p>7.69</text:p>
          </table:table-cell>
          <table:table-cell table:style-name="ce13" table:formula="of:=[.$B$6]*(1-EXP(-[.$B$7]*IF([.Y8]&gt;=[.$B$5];0;[.Y8])))^2*([.$E$10]+[.$F$10]*[.$C$10])+[.$G$10]*[.$B$10]*MIN(MAX([.$B$5]-1;0);[.Y$8])+[.$H$10]*[.$D$10]*[.Y$9]" office:value-type="float" office:value="7.783985104" calcext:value-type="float">
            <text:p>7.78</text:p>
          </table:table-cell>
          <table:table-cell table:style-name="ce13" table:formula="of:=[.$B$6]*(1-EXP(-[.$B$7]*IF([.Z8]&gt;=[.$B$5];0;[.Z8])))^2*([.$E$10]+[.$F$10]*[.$C$10])+[.$G$10]*[.$B$10]*MIN(MAX([.$B$5]-1;0);[.Z$8])+[.$H$10]*[.$D$10]*[.Z$9]" office:value-type="float" office:value="7.876734173" calcext:value-type="float">
            <text:p>7.88</text:p>
          </table:table-cell>
          <table:table-cell table:style-name="ce13" table:formula="of:=[.$B$6]*(1-EXP(-[.$B$7]*IF([.AA8]&gt;=[.$B$5];0;[.AA8])))^2*([.$E$10]+[.$F$10]*[.$C$10])+[.$G$10]*[.$B$10]*MIN(MAX([.$B$5]-1;0);[.AA$8])+[.$H$10]*[.$D$10]*[.AA$9]" office:value-type="float" office:value="7.969483242" calcext:value-type="float">
            <text:p>7.97</text:p>
          </table:table-cell>
          <table:table-cell table:style-name="ce13" table:formula="of:=[.$B$6]*(1-EXP(-[.$B$7]*IF([.AB8]&gt;=[.$B$5];0;[.AB8])))^2*([.$E$10]+[.$F$10]*[.$C$10])+[.$G$10]*[.$B$10]*MIN(MAX([.$B$5]-1;0);[.AB$8])+[.$H$10]*[.$D$10]*[.AB$9]" office:value-type="float" office:value="8.062232311" calcext:value-type="float">
            <text:p>8.06</text:p>
          </table:table-cell>
          <table:table-cell table:style-name="ce13" table:formula="of:=[.$B$6]*(1-EXP(-[.$B$7]*IF([.AC8]&gt;=[.$B$5];0;[.AC8])))^2*([.$E$10]+[.$F$10]*[.$C$10])+[.$G$10]*[.$B$10]*MIN(MAX([.$B$5]-1;0);[.AC$8])+[.$H$10]*[.$D$10]*[.AC$9]" office:value-type="float" office:value="8.15498138" calcext:value-type="float">
            <text:p>8.15</text:p>
          </table:table-cell>
          <table:table-cell table:style-name="ce13" table:formula="of:=[.$B$6]*(1-EXP(-[.$B$7]*IF([.AD8]&gt;=[.$B$5];0;[.AD8])))^2*([.$E$10]+[.$F$10]*[.$C$10])+[.$G$10]*[.$B$10]*MIN(MAX([.$B$5]-1;0);[.AD$8])+[.$H$10]*[.$D$10]*[.AD$9]" office:value-type="float" office:value="8.247730449" calcext:value-type="float">
            <text:p>8.25</text:p>
          </table:table-cell>
          <table:table-cell table:style-name="ce13" table:formula="of:=[.$B$6]*(1-EXP(-[.$B$7]*IF([.AE8]&gt;=[.$B$5];0;[.AE8])))^2*([.$E$10]+[.$F$10]*[.$C$10])+[.$G$10]*[.$B$10]*MIN(MAX([.$B$5]-1;0);[.AE$8])+[.$H$10]*[.$D$10]*[.AE$9]" office:value-type="float" office:value="8.340479518" calcext:value-type="float">
            <text:p>8.34</text:p>
          </table:table-cell>
          <table:table-cell table:style-name="ce13" table:formula="of:=[.$B$6]*(1-EXP(-[.$B$7]*IF([.AF8]&gt;=[.$B$5];0;[.AF8])))^2*([.$E$10]+[.$F$10]*[.$C$10])+[.$G$10]*[.$B$10]*MIN(MAX([.$B$5]-1;0);[.AF$8])+[.$H$10]*[.$D$10]*[.AF$9]" office:value-type="float" office:value="8.433228587" calcext:value-type="float">
            <text:p>8.43</text:p>
          </table:table-cell>
          <table:table-cell table:style-name="ce13" table:formula="of:=[.$B$6]*(1-EXP(-[.$B$7]*IF([.AG8]&gt;=[.$B$5];0;[.AG8])))^2*([.$E$10]+[.$F$10]*[.$C$10])+[.$G$10]*[.$B$10]*MIN(MAX([.$B$5]-1;0);[.AG$8])+[.$H$10]*[.$D$10]*[.AG$9]" office:value-type="float" office:value="8.525977656" calcext:value-type="float">
            <text:p>8.53</text:p>
          </table:table-cell>
          <table:table-cell table:style-name="ce13" table:formula="of:=[.$B$6]*(1-EXP(-[.$B$7]*IF([.AH8]&gt;=[.$B$5];0;[.AH8])))^2*([.$E$10]+[.$F$10]*[.$C$10])+[.$G$10]*[.$B$10]*MIN(MAX([.$B$5]-1;0);[.AH$8])+[.$H$10]*[.$D$10]*[.AH$9]" office:value-type="float" office:value="8.618726725" calcext:value-type="float">
            <text:p>8.62</text:p>
          </table:table-cell>
          <table:table-cell table:style-name="ce13" table:formula="of:=[.$B$6]*(1-EXP(-[.$B$7]*IF([.AI8]&gt;=[.$B$5];0;[.AI8])))^2*([.$E$10]+[.$F$10]*[.$C$10])+[.$G$10]*[.$B$10]*MIN(MAX([.$B$5]-1;0);[.AI$8])+[.$H$10]*[.$D$10]*[.AI$9]" office:value-type="float" office:value="8.711475794" calcext:value-type="float">
            <text:p>8.71</text:p>
          </table:table-cell>
          <table:table-cell table:style-name="ce13" table:formula="of:=[.$B$6]*(1-EXP(-[.$B$7]*IF([.AJ8]&gt;=[.$B$5];0;[.AJ8])))^2*([.$E$10]+[.$F$10]*[.$C$10])+[.$G$10]*[.$B$10]*MIN(MAX([.$B$5]-1;0);[.AJ$8])+[.$H$10]*[.$D$10]*[.AJ$9]" office:value-type="float" office:value="8.804224863" calcext:value-type="float">
            <text:p>8.80</text:p>
          </table:table-cell>
          <table:table-cell table:style-name="ce13" table:formula="of:=[.$B$6]*(1-EXP(-[.$B$7]*IF([.AK8]&gt;=[.$B$5];0;[.AK8])))^2*([.$E$10]+[.$F$10]*[.$C$10])+[.$G$10]*[.$B$10]*MIN(MAX([.$B$5]-1;0);[.AK$8])+[.$H$10]*[.$D$10]*[.AK$9]" office:value-type="float" office:value="8.896973932" calcext:value-type="float">
            <text:p>8.90</text:p>
          </table:table-cell>
          <table:table-cell table:style-name="ce13" table:formula="of:=[.$B$6]*(1-EXP(-[.$B$7]*IF([.AL8]&gt;=[.$B$5];0;[.AL8])))^2*([.$E$10]+[.$F$10]*[.$C$10])+[.$G$10]*[.$B$10]*MIN(MAX([.$B$5]-1;0);[.AL$8])+[.$H$10]*[.$D$10]*[.AL$9]" office:value-type="float" office:value="8.989723001" calcext:value-type="float">
            <text:p>8.99</text:p>
          </table:table-cell>
          <table:table-cell table:style-name="ce13" table:formula="of:=[.$B$6]*(1-EXP(-[.$B$7]*IF([.AM8]&gt;=[.$B$5];0;[.AM8])))^2*([.$E$10]+[.$F$10]*[.$C$10])+[.$G$10]*[.$B$10]*MIN(MAX([.$B$5]-1;0);[.AM$8])+[.$H$10]*[.$D$10]*[.AM$9]" office:value-type="float" office:value="9.08247207" calcext:value-type="float">
            <text:p>9.08</text:p>
          </table:table-cell>
          <table:table-cell table:style-name="ce13" table:formula="of:=[.$B$6]*(1-EXP(-[.$B$7]*IF([.AN8]&gt;=[.$B$5];0;[.AN8])))^2*([.$E$10]+[.$F$10]*[.$C$10])+[.$G$10]*[.$B$10]*MIN(MAX([.$B$5]-1;0);[.AN$8])+[.$H$10]*[.$D$10]*[.AN$9]" office:value-type="float" office:value="9.175221139" calcext:value-type="float">
            <text:p>9.18</text:p>
          </table:table-cell>
          <table:table-cell table:style-name="ce13" table:formula="of:=[.$B$6]*(1-EXP(-[.$B$7]*IF([.AO8]&gt;=[.$B$5];0;[.AO8])))^2*([.$E$10]+[.$F$10]*[.$C$10])+[.$G$10]*[.$B$10]*MIN(MAX([.$B$5]-1;0);[.AO$8])+[.$H$10]*[.$D$10]*[.AO$9]" office:value-type="float" office:value="4.215221139" calcext:value-type="float">
            <text:p>4.22</text:p>
          </table:table-cell>
          <table:table-cell table:style-name="ce13" table:formula="of:=[.$B$6]*(1-EXP(-[.$B$7]*IF([.AP8]&gt;=[.$B$5];0;[.AP8])))^2*([.$E$10]+[.$F$10]*[.$C$10])+[.$G$10]*[.$B$10]*MIN(MAX([.$B$5]-1;0);[.AP$8])+[.$H$10]*[.$D$10]*[.AP$9]" office:value-type="float" office:value="4.215221139" calcext:value-type="float">
            <text:p>4.22</text:p>
          </table:table-cell>
          <table:table-cell table:style-name="ce13" table:formula="of:=[.$B$6]*(1-EXP(-[.$B$7]*IF([.AQ8]&gt;=[.$B$5];0;[.AQ8])))^2*([.$E$10]+[.$F$10]*[.$C$10])+[.$G$10]*[.$B$10]*MIN(MAX([.$B$5]-1;0);[.AQ$8])+[.$H$10]*[.$D$10]*[.AQ$9]" office:value-type="float" office:value="4.215221139" calcext:value-type="float">
            <text:p>4.22</text:p>
          </table:table-cell>
          <table:table-cell table:style-name="ce13" table:formula="of:=[.$B$6]*(1-EXP(-[.$B$7]*IF([.AR8]&gt;=[.$B$5];0;[.AR8])))^2*([.$E$10]+[.$F$10]*[.$C$10])+[.$G$10]*[.$B$10]*MIN(MAX([.$B$5]-1;0);[.AR$8])+[.$H$10]*[.$D$10]*[.AR$9]" office:value-type="float" office:value="4.215221139" calcext:value-type="float">
            <text:p>4.22</text:p>
          </table:table-cell>
          <table:table-cell table:style-name="ce13" table:formula="of:=[.$B$6]*(1-EXP(-[.$B$7]*IF([.AS8]&gt;=[.$B$5];0;[.AS8])))^2*([.$E$10]+[.$F$10]*[.$C$10])+[.$G$10]*[.$B$10]*MIN(MAX([.$B$5]-1;0);[.AS$8])+[.$H$10]*[.$D$10]*[.AS$9]" office:value-type="float" office:value="4.215221139" calcext:value-type="float">
            <text:p>4.22</text:p>
          </table:table-cell>
          <table:table-cell table:style-name="ce13" table:formula="of:=[.$B$6]*(1-EXP(-[.$B$7]*IF([.AT8]&gt;=[.$B$5];0;[.AT8])))^2*([.$E$10]+[.$F$10]*[.$C$10])+[.$G$10]*[.$B$10]*MIN(MAX([.$B$5]-1;0);[.AT$8])+[.$H$10]*[.$D$10]*[.AT$9]" office:value-type="float" office:value="4.215221139" calcext:value-type="float">
            <text:p>4.22</text:p>
          </table:table-cell>
          <table:table-cell table:style-name="ce13" table:formula="of:=[.$B$6]*(1-EXP(-[.$B$7]*IF([.AU8]&gt;=[.$B$5];0;[.AU8])))^2*([.$E$10]+[.$F$10]*[.$C$10])+[.$G$10]*[.$B$10]*MIN(MAX([.$B$5]-1;0);[.AU$8])+[.$H$10]*[.$D$10]*[.AU$9]" office:value-type="float" office:value="4.215221139" calcext:value-type="float">
            <text:p>4.22</text:p>
          </table:table-cell>
          <table:table-cell table:style-name="ce13" table:formula="of:=[.$B$6]*(1-EXP(-[.$B$7]*IF([.AV8]&gt;=[.$B$5];0;[.AV8])))^2*([.$E$10]+[.$F$10]*[.$C$10])+[.$G$10]*[.$B$10]*MIN(MAX([.$B$5]-1;0);[.AV$8])+[.$H$10]*[.$D$10]*[.AV$9]" office:value-type="float" office:value="4.215221139" calcext:value-type="float">
            <text:p>4.22</text:p>
          </table:table-cell>
          <table:table-cell table:style-name="ce13" table:formula="of:=[.$B$6]*(1-EXP(-[.$B$7]*IF([.AW8]&gt;=[.$B$5];0;[.AW8])))^2*([.$E$10]+[.$F$10]*[.$C$10])+[.$G$10]*[.$B$10]*MIN(MAX([.$B$5]-1;0);[.AW$8])+[.$H$10]*[.$D$10]*[.AW$9]" office:value-type="float" office:value="4.215221139" calcext:value-type="float">
            <text:p>4.22</text:p>
          </table:table-cell>
          <table:table-cell table:style-name="ce13" table:formula="of:=[.$B$6]*(1-EXP(-[.$B$7]*IF([.AX8]&gt;=[.$B$5];0;[.AX8])))^2*([.$E$10]+[.$F$10]*[.$C$10])+[.$G$10]*[.$B$10]*MIN(MAX([.$B$5]-1;0);[.AX$8])+[.$H$10]*[.$D$10]*[.AX$9]" office:value-type="float" office:value="4.215221139" calcext:value-type="float">
            <text:p>4.22</text:p>
          </table:table-cell>
          <table:table-cell table:style-name="ce13" table:formula="of:=[.$B$6]*(1-EXP(-[.$B$7]*IF([.AY8]&gt;=[.$B$5];0;[.AY8])))^2*([.$E$10]+[.$F$10]*[.$C$10])+[.$G$10]*[.$B$10]*MIN(MAX([.$B$5]-1;0);[.AY$8])+[.$H$10]*[.$D$10]*[.AY$9]" office:value-type="float" office:value="4.215221139" calcext:value-type="float">
            <text:p>4.22</text:p>
          </table:table-cell>
          <table:table-cell table:style-name="ce13" table:formula="of:=[.$B$6]*(1-EXP(-[.$B$7]*IF([.AZ8]&gt;=[.$B$5];0;[.AZ8])))^2*([.$E$10]+[.$F$10]*[.$C$10])+[.$G$10]*[.$B$10]*MIN(MAX([.$B$5]-1;0);[.AZ$8])+[.$H$10]*[.$D$10]*[.AZ$9]" office:value-type="float" office:value="4.215221139" calcext:value-type="float">
            <text:p>4.22</text:p>
          </table:table-cell>
          <table:table-cell table:style-name="ce13" table:formula="of:=[.$B$6]*(1-EXP(-[.$B$7]*IF([.BA8]&gt;=[.$B$5];0;[.BA8])))^2*([.$E$10]+[.$F$10]*[.$C$10])+[.$G$10]*[.$B$10]*MIN(MAX([.$B$5]-1;0);[.BA$8])+[.$H$10]*[.$D$10]*[.BA$9]" office:value-type="float" office:value="4.215221139" calcext:value-type="float">
            <text:p>4.22</text:p>
          </table:table-cell>
          <table:table-cell table:style-name="ce13" table:formula="of:=[.$B$6]*(1-EXP(-[.$B$7]*IF([.BB8]&gt;=[.$B$5];0;[.BB8])))^2*([.$E$10]+[.$F$10]*[.$C$10])+[.$G$10]*[.$B$10]*MIN(MAX([.$B$5]-1;0);[.BB$8])+[.$H$10]*[.$D$10]*[.BB$9]" office:value-type="float" office:value="4.215221139" calcext:value-type="float">
            <text:p>4.22</text:p>
          </table:table-cell>
          <table:table-cell table:style-name="ce13" table:formula="of:=[.$B$6]*(1-EXP(-[.$B$7]*IF([.BC8]&gt;=[.$B$5];0;[.BC8])))^2*([.$E$10]+[.$F$10]*[.$C$10])+[.$G$10]*[.$B$10]*MIN(MAX([.$B$5]-1;0);[.BC$8])+[.$H$10]*[.$D$10]*[.BC$9]" office:value-type="float" office:value="4.215221139" calcext:value-type="float">
            <text:p>4.22</text:p>
          </table:table-cell>
          <table:table-cell table:style-name="ce13" table:formula="of:=[.$B$6]*(1-EXP(-[.$B$7]*IF([.BD8]&gt;=[.$B$5];0;[.BD8])))^2*([.$E$10]+[.$F$10]*[.$C$10])+[.$G$10]*[.$B$10]*MIN(MAX([.$B$5]-1;0);[.BD$8])+[.$H$10]*[.$D$10]*[.BD$9]" office:value-type="float" office:value="4.215221139" calcext:value-type="float">
            <text:p>4.22</text:p>
          </table:table-cell>
          <table:table-cell table:style-name="ce13" table:formula="of:=[.$B$6]*(1-EXP(-[.$B$7]*IF([.BE8]&gt;=[.$B$5];0;[.BE8])))^2*([.$E$10]+[.$F$10]*[.$C$10])+[.$G$10]*[.$B$10]*MIN(MAX([.$B$5]-1;0);[.BE$8])+[.$H$10]*[.$D$10]*[.BE$9]" office:value-type="float" office:value="4.215221139" calcext:value-type="float">
            <text:p>4.22</text:p>
          </table:table-cell>
          <table:table-cell table:style-name="ce13" table:formula="of:=[.$B$6]*(1-EXP(-[.$B$7]*IF([.BF8]&gt;=[.$B$5];0;[.BF8])))^2*([.$E$10]+[.$F$10]*[.$C$10])+[.$G$10]*[.$B$10]*MIN(MAX([.$B$5]-1;0);[.BF$8])+[.$H$10]*[.$D$10]*[.BF$9]" office:value-type="float" office:value="4.215221139" calcext:value-type="float">
            <text:p>4.22</text:p>
          </table:table-cell>
          <table:table-cell table:style-name="ce13" table:formula="of:=[.$B$6]*(1-EXP(-[.$B$7]*IF([.BG8]&gt;=[.$B$5];0;[.BG8])))^2*([.$E$10]+[.$F$10]*[.$C$10])+[.$G$10]*[.$B$10]*MIN(MAX([.$B$5]-1;0);[.BG$8])+[.$H$10]*[.$D$10]*[.BG$9]" office:value-type="float" office:value="4.215221139" calcext:value-type="float">
            <text:p>4.22</text:p>
          </table:table-cell>
          <table:table-cell table:style-name="ce13" table:formula="of:=[.$B$6]*(1-EXP(-[.$B$7]*IF([.BH8]&gt;=[.$B$5];0;[.BH8])))^2*([.$E$10]+[.$F$10]*[.$C$10])+[.$G$10]*[.$B$10]*MIN(MAX([.$B$5]-1;0);[.BH$8])+[.$H$10]*[.$D$10]*[.BH$9]" office:value-type="float" office:value="4.215221139" calcext:value-type="float">
            <text:p>4.22</text:p>
          </table:table-cell>
          <table:table-cell table:style-name="ce13" table:formula="of:=[.$B$6]*(1-EXP(-[.$B$7]*IF([.BI8]&gt;=[.$B$5];0;[.BI8])))^2*([.$E$10]+[.$F$10]*[.$C$10])+[.$G$10]*[.$B$10]*MIN(MAX([.$B$5]-1;0);[.BI$8])+[.$H$10]*[.$D$10]*[.BI$9]" office:value-type="float" office:value="4.215221139" calcext:value-type="float">
            <text:p>4.22</text:p>
          </table:table-cell>
          <table:table-cell table:style-name="ce13" table:formula="of:=[.$B$6]*(1-EXP(-[.$B$7]*IF([.BJ8]&gt;=[.$B$5];0;[.BJ8])))^2*([.$E$10]+[.$F$10]*[.$C$10])+[.$G$10]*[.$B$10]*MIN(MAX([.$B$5]-1;0);[.BJ$8])+[.$H$10]*[.$D$10]*[.BJ$9]" office:value-type="float" office:value="4.215221139" calcext:value-type="float">
            <text:p>4.22</text:p>
          </table:table-cell>
          <table:table-cell table:style-name="ce13" table:formula="of:=[.$B$6]*(1-EXP(-[.$B$7]*IF([.BK8]&gt;=[.$B$5];0;[.BK8])))^2*([.$E$10]+[.$F$10]*[.$C$10])+[.$G$10]*[.$B$10]*MIN(MAX([.$B$5]-1;0);[.BK$8])+[.$H$10]*[.$D$10]*[.BK$9]" office:value-type="float" office:value="4.215221139" calcext:value-type="float">
            <text:p>4.22</text:p>
          </table:table-cell>
          <table:table-cell table:style-name="ce13" table:formula="of:=[.$B$6]*(1-EXP(-[.$B$7]*IF([.BL8]&gt;=[.$B$5];0;[.BL8])))^2*([.$E$10]+[.$F$10]*[.$C$10])+[.$G$10]*[.$B$10]*MIN(MAX([.$B$5]-1;0);[.BL$8])+[.$H$10]*[.$D$10]*[.BL$9]" office:value-type="float" office:value="4.215221139" calcext:value-type="float">
            <text:p>4.22</text:p>
          </table:table-cell>
          <table:table-cell table:style-name="ce13" table:formula="of:=[.$B$6]*(1-EXP(-[.$B$7]*IF([.BM8]&gt;=[.$B$5];0;[.BM8])))^2*([.$E$10]+[.$F$10]*[.$C$10])+[.$G$10]*[.$B$10]*MIN(MAX([.$B$5]-1;0);[.BM$8])+[.$H$10]*[.$D$10]*[.BM$9]" office:value-type="float" office:value="4.215221139" calcext:value-type="float">
            <text:p>4.22</text:p>
          </table:table-cell>
          <table:table-cell table:style-name="ce13" table:formula="of:=[.$B$6]*(1-EXP(-[.$B$7]*IF([.BN8]&gt;=[.$B$5];0;[.BN8])))^2*([.$E$10]+[.$F$10]*[.$C$10])+[.$G$10]*[.$B$10]*MIN(MAX([.$B$5]-1;0);[.BN$8])+[.$H$10]*[.$D$10]*[.BN$9]" office:value-type="float" office:value="4.215221139" calcext:value-type="float">
            <text:p>4.22</text:p>
          </table:table-cell>
          <table:table-cell table:style-name="ce13" table:formula="of:=[.$B$6]*(1-EXP(-[.$B$7]*IF([.BO8]&gt;=[.$B$5];0;[.BO8])))^2*([.$E$10]+[.$F$10]*[.$C$10])+[.$G$10]*[.$B$10]*MIN(MAX([.$B$5]-1;0);[.BO$8])+[.$H$10]*[.$D$10]*[.BO$9]" office:value-type="float" office:value="4.215221139" calcext:value-type="float">
            <text:p>4.22</text:p>
          </table:table-cell>
          <table:table-cell table:style-name="ce13" table:formula="of:=[.$B$6]*(1-EXP(-[.$B$7]*IF([.BP8]&gt;=[.$B$5];0;[.BP8])))^2*([.$E$10]+[.$F$10]*[.$C$10])+[.$G$10]*[.$B$10]*MIN(MAX([.$B$5]-1;0);[.BP$8])+[.$H$10]*[.$D$10]*[.BP$9]" office:value-type="float" office:value="4.215221139" calcext:value-type="float">
            <text:p>4.22</text:p>
          </table:table-cell>
          <table:table-cell table:style-name="ce13" table:formula="of:=[.$B$6]*(1-EXP(-[.$B$7]*IF([.BQ8]&gt;=[.$B$5];0;[.BQ8])))^2*([.$E$10]+[.$F$10]*[.$C$10])+[.$G$10]*[.$B$10]*MIN(MAX([.$B$5]-1;0);[.BQ$8])+[.$H$10]*[.$D$10]*[.BQ$9]" office:value-type="float" office:value="4.215221139" calcext:value-type="float">
            <text:p>4.22</text:p>
          </table:table-cell>
          <table:table-cell table:style-name="ce13" table:formula="of:=[.$B$6]*(1-EXP(-[.$B$7]*IF([.BR8]&gt;=[.$B$5];0;[.BR8])))^2*([.$E$10]+[.$F$10]*[.$C$10])+[.$G$10]*[.$B$10]*MIN(MAX([.$B$5]-1;0);[.BR$8])+[.$H$10]*[.$D$10]*[.BR$9]" office:value-type="float" office:value="4.215221139" calcext:value-type="float">
            <text:p>4.22</text:p>
          </table:table-cell>
          <table:table-cell table:style-name="ce13" table:formula="of:=[.$B$6]*(1-EXP(-[.$B$7]*IF([.BS8]&gt;=[.$B$5];0;[.BS8])))^2*([.$E$10]+[.$F$10]*[.$C$10])+[.$G$10]*[.$B$10]*MIN(MAX([.$B$5]-1;0);[.BS$8])+[.$H$10]*[.$D$10]*[.BS$9]" office:value-type="float" office:value="4.215221139" calcext:value-type="float">
            <text:p>4.22</text:p>
          </table:table-cell>
          <table:table-cell table:style-name="ce13" table:formula="of:=[.$B$6]*(1-EXP(-[.$B$7]*IF([.BT8]&gt;=[.$B$5];0;[.BT8])))^2*([.$E$10]+[.$F$10]*[.$C$10])+[.$G$10]*[.$B$10]*MIN(MAX([.$B$5]-1;0);[.BT$8])+[.$H$10]*[.$D$10]*[.BT$9]" office:value-type="float" office:value="4.215221139" calcext:value-type="float">
            <text:p>4.22</text:p>
          </table:table-cell>
          <table:table-cell table:style-name="ce13" table:formula="of:=[.$B$6]*(1-EXP(-[.$B$7]*IF([.BU8]&gt;=[.$B$5];0;[.BU8])))^2*([.$E$10]+[.$F$10]*[.$C$10])+[.$G$10]*[.$B$10]*MIN(MAX([.$B$5]-1;0);[.BU$8])+[.$H$10]*[.$D$10]*[.BU$9]" office:value-type="float" office:value="4.215221139" calcext:value-type="float">
            <text:p>4.22</text:p>
          </table:table-cell>
          <table:table-cell table:style-name="ce13" table:formula="of:=[.$B$6]*(1-EXP(-[.$B$7]*IF([.BV8]&gt;=[.$B$5];0;[.BV8])))^2*([.$E$10]+[.$F$10]*[.$C$10])+[.$G$10]*[.$B$10]*MIN(MAX([.$B$5]-1;0);[.BV$8])+[.$H$10]*[.$D$10]*[.BV$9]" office:value-type="float" office:value="4.215221139" calcext:value-type="float">
            <text:p>4.22</text:p>
          </table:table-cell>
          <table:table-cell table:style-name="ce13" table:formula="of:=[.$B$6]*(1-EXP(-[.$B$7]*IF([.BW8]&gt;=[.$B$5];0;[.BW8])))^2*([.$E$10]+[.$F$10]*[.$C$10])+[.$G$10]*[.$B$10]*MIN(MAX([.$B$5]-1;0);[.BW$8])+[.$H$10]*[.$D$10]*[.BW$9]" office:value-type="float" office:value="4.215221139" calcext:value-type="float">
            <text:p>4.22</text:p>
          </table:table-cell>
          <table:table-cell table:style-name="ce13" table:formula="of:=[.$B$6]*(1-EXP(-[.$B$7]*IF([.BX8]&gt;=[.$B$5];0;[.BX8])))^2*([.$E$10]+[.$F$10]*[.$C$10])+[.$G$10]*[.$B$10]*MIN(MAX([.$B$5]-1;0);[.BX$8])+[.$H$10]*[.$D$10]*[.BX$9]" office:value-type="float" office:value="4.215221139" calcext:value-type="float">
            <text:p>4.22</text:p>
          </table:table-cell>
          <table:table-cell table:style-name="ce13" table:formula="of:=[.$B$6]*(1-EXP(-[.$B$7]*IF([.BY8]&gt;=[.$B$5];0;[.BY8])))^2*([.$E$10]+[.$F$10]*[.$C$10])+[.$G$10]*[.$B$10]*MIN(MAX([.$B$5]-1;0);[.BY$8])+[.$H$10]*[.$D$10]*[.BY$9]" office:value-type="float" office:value="4.215221139" calcext:value-type="float">
            <text:p>4.22</text:p>
          </table:table-cell>
          <table:table-cell table:style-name="ce13" table:formula="of:=[.$B$6]*(1-EXP(-[.$B$7]*IF([.BZ8]&gt;=[.$B$5];0;[.BZ8])))^2*([.$E$10]+[.$F$10]*[.$C$10])+[.$G$10]*[.$B$10]*MIN(MAX([.$B$5]-1;0);[.BZ$8])+[.$H$10]*[.$D$10]*[.BZ$9]" office:value-type="float" office:value="4.215221139" calcext:value-type="float">
            <text:p>4.22</text:p>
          </table:table-cell>
          <table:table-cell table:style-name="ce13" table:formula="of:=[.$B$6]*(1-EXP(-[.$B$7]*IF([.CA8]&gt;=[.$B$5];0;[.CA8])))^2*([.$E$10]+[.$F$10]*[.$C$10])+[.$G$10]*[.$B$10]*MIN(MAX([.$B$5]-1;0);[.CA$8])+[.$H$10]*[.$D$10]*[.CA$9]" office:value-type="float" office:value="4.215221139" calcext:value-type="float">
            <text:p>4.22</text:p>
          </table:table-cell>
          <table:table-cell table:style-name="ce13" table:formula="of:=[.$B$6]*(1-EXP(-[.$B$7]*IF([.CB8]&gt;=[.$B$5];0;[.CB8])))^2*([.$E$10]+[.$F$10]*[.$C$10])+[.$G$10]*[.$B$10]*MIN(MAX([.$B$5]-1;0);[.CB$8])+[.$H$10]*[.$D$10]*[.CB$9]" office:value-type="float" office:value="4.215221139" calcext:value-type="float">
            <text:p>4.22</text:p>
          </table:table-cell>
          <table:table-cell table:style-name="ce13" table:formula="of:=[.$B$6]*(1-EXP(-[.$B$7]*IF([.CC8]&gt;=[.$B$5];0;[.CC8])))^2*([.$E$10]+[.$F$10]*[.$C$10])+[.$G$10]*[.$B$10]*MIN(MAX([.$B$5]-1;0);[.CC$8])+[.$H$10]*[.$D$10]*[.CC$9]" office:value-type="float" office:value="4.215221139" calcext:value-type="float">
            <text:p>4.22</text:p>
          </table:table-cell>
          <table:table-cell table:style-name="ce13" table:formula="of:=[.$B$6]*(1-EXP(-[.$B$7]*IF([.CD8]&gt;=[.$B$5];0;[.CD8])))^2*([.$E$10]+[.$F$10]*[.$C$10])+[.$G$10]*[.$B$10]*MIN(MAX([.$B$5]-1;0);[.CD$8])+[.$H$10]*[.$D$10]*[.CD$9]" office:value-type="float" office:value="4.215221139" calcext:value-type="float">
            <text:p>4.22</text:p>
          </table:table-cell>
          <table:table-cell table:style-name="ce13" table:formula="of:=[.$B$6]*(1-EXP(-[.$B$7]*IF([.CE8]&gt;=[.$B$5];0;[.CE8])))^2*([.$E$10]+[.$F$10]*[.$C$10])+[.$G$10]*[.$B$10]*MIN(MAX([.$B$5]-1;0);[.CE$8])+[.$H$10]*[.$D$10]*[.CE$9]" office:value-type="float" office:value="4.215221139" calcext:value-type="float">
            <text:p>4.22</text:p>
          </table:table-cell>
          <table:table-cell table:style-name="ce13" table:formula="of:=[.$B$6]*(1-EXP(-[.$B$7]*IF([.CF8]&gt;=[.$B$5];0;[.CF8])))^2*([.$E$10]+[.$F$10]*[.$C$10])+[.$G$10]*[.$B$10]*MIN(MAX([.$B$5]-1;0);[.CF$8])+[.$H$10]*[.$D$10]*[.CF$9]" office:value-type="float" office:value="4.215221139" calcext:value-type="float">
            <text:p>4.22</text:p>
          </table:table-cell>
          <table:table-cell table:style-name="ce13" table:formula="of:=[.$B$6]*(1-EXP(-[.$B$7]*IF([.CG8]&gt;=[.$B$5];0;[.CG8])))^2*([.$E$10]+[.$F$10]*[.$C$10])+[.$G$10]*[.$B$10]*MIN(MAX([.$B$5]-1;0);[.CG$8])+[.$H$10]*[.$D$10]*[.CG$9]" office:value-type="float" office:value="4.215221139" calcext:value-type="float">
            <text:p>4.22</text:p>
          </table:table-cell>
          <table:table-cell table:style-name="ce13" table:formula="of:=[.$B$6]*(1-EXP(-[.$B$7]*IF([.CH8]&gt;=[.$B$5];0;[.CH8])))^2*([.$E$10]+[.$F$10]*[.$C$10])+[.$G$10]*[.$B$10]*MIN(MAX([.$B$5]-1;0);[.CH$8])+[.$H$10]*[.$D$10]*[.CH$9]" office:value-type="float" office:value="4.215221139" calcext:value-type="float">
            <text:p>4.22</text:p>
          </table:table-cell>
          <table:table-cell table:style-name="ce13" table:formula="of:=[.$B$6]*(1-EXP(-[.$B$7]*IF([.CI8]&gt;=[.$B$5];0;[.CI8])))^2*([.$E$10]+[.$F$10]*[.$C$10])+[.$G$10]*[.$B$10]*MIN(MAX([.$B$5]-1;0);[.CI$8])+[.$H$10]*[.$D$10]*[.CI$9]" office:value-type="float" office:value="4.215221139" calcext:value-type="float">
            <text:p>4.22</text:p>
          </table:table-cell>
          <table:table-cell table:style-name="ce13" table:formula="of:=[.$B$6]*(1-EXP(-[.$B$7]*IF([.CJ8]&gt;=[.$B$5];0;[.CJ8])))^2*([.$E$10]+[.$F$10]*[.$C$10])+[.$G$10]*[.$B$10]*MIN(MAX([.$B$5]-1;0);[.CJ$8])+[.$H$10]*[.$D$10]*[.CJ$9]" office:value-type="float" office:value="4.215221139" calcext:value-type="float">
            <text:p>4.22</text:p>
          </table:table-cell>
          <table:table-cell table:style-name="ce13" table:formula="of:=[.$B$6]*(1-EXP(-[.$B$7]*IF([.CK8]&gt;=[.$B$5];0;[.CK8])))^2*([.$E$10]+[.$F$10]*[.$C$10])+[.$G$10]*[.$B$10]*MIN(MAX([.$B$5]-1;0);[.CK$8])+[.$H$10]*[.$D$10]*[.CK$9]" office:value-type="float" office:value="4.215221139" calcext:value-type="float">
            <text:p>4.22</text:p>
          </table:table-cell>
          <table:table-cell table:style-name="ce13" table:formula="of:=[.$B$6]*(1-EXP(-[.$B$7]*IF([.CL8]&gt;=[.$B$5];0;[.CL8])))^2*([.$E$10]+[.$F$10]*[.$C$10])+[.$G$10]*[.$B$10]*MIN(MAX([.$B$5]-1;0);[.CL$8])+[.$H$10]*[.$D$10]*[.CL$9]" office:value-type="float" office:value="4.215221139" calcext:value-type="float">
            <text:p>4.22</text:p>
          </table:table-cell>
          <table:table-cell table:style-name="ce13" table:formula="of:=[.$B$6]*(1-EXP(-[.$B$7]*IF([.CM8]&gt;=[.$B$5];0;[.CM8])))^2*([.$E$10]+[.$F$10]*[.$C$10])+[.$G$10]*[.$B$10]*MIN(MAX([.$B$5]-1;0);[.CM$8])+[.$H$10]*[.$D$10]*[.CM$9]" office:value-type="float" office:value="4.215221139" calcext:value-type="float">
            <text:p>4.22</text:p>
          </table:table-cell>
          <table:table-cell table:style-name="ce13" table:formula="of:=[.$B$6]*(1-EXP(-[.$B$7]*IF([.CN8]&gt;=[.$B$5];0;[.CN8])))^2*([.$E$10]+[.$F$10]*[.$C$10])+[.$G$10]*[.$B$10]*MIN(MAX([.$B$5]-1;0);[.CN$8])+[.$H$10]*[.$D$10]*[.CN$9]" office:value-type="float" office:value="4.215221139" calcext:value-type="float">
            <text:p>4.22</text:p>
          </table:table-cell>
          <table:table-cell table:style-name="ce13" table:formula="of:=[.$B$6]*(1-EXP(-[.$B$7]*IF([.CO8]&gt;=[.$B$5];0;[.CO8])))^2*([.$E$10]+[.$F$10]*[.$C$10])+[.$G$10]*[.$B$10]*MIN(MAX([.$B$5]-1;0);[.CO$8])+[.$H$10]*[.$D$10]*[.CO$9]" office:value-type="float" office:value="4.215221139" calcext:value-type="float">
            <text:p>4.22</text:p>
          </table:table-cell>
          <table:table-cell table:style-name="ce13" table:formula="of:=[.$B$6]*(1-EXP(-[.$B$7]*IF([.CP8]&gt;=[.$B$5];0;[.CP8])))^2*([.$E$10]+[.$F$10]*[.$C$10])+[.$G$10]*[.$B$10]*MIN(MAX([.$B$5]-1;0);[.CP$8])+[.$H$10]*[.$D$10]*[.CP$9]" office:value-type="float" office:value="4.215221139" calcext:value-type="float">
            <text:p>4.22</text:p>
          </table:table-cell>
          <table:table-cell table:style-name="ce13" table:formula="of:=[.$B$6]*(1-EXP(-[.$B$7]*IF([.CQ8]&gt;=[.$B$5];0;[.CQ8])))^2*([.$E$10]+[.$F$10]*[.$C$10])+[.$G$10]*[.$B$10]*MIN(MAX([.$B$5]-1;0);[.CQ$8])+[.$H$10]*[.$D$10]*[.CQ$9]" office:value-type="float" office:value="4.215221139" calcext:value-type="float">
            <text:p>4.22</text:p>
          </table:table-cell>
          <table:table-cell table:style-name="ce13" table:formula="of:=[.$B$6]*(1-EXP(-[.$B$7]*IF([.CR8]&gt;=[.$B$5];0;[.CR8])))^2*([.$E$10]+[.$F$10]*[.$C$10])+[.$G$10]*[.$B$10]*MIN(MAX([.$B$5]-1;0);[.CR$8])+[.$H$10]*[.$D$10]*[.CR$9]" office:value-type="float" office:value="4.215221139" calcext:value-type="float">
            <text:p>4.22</text:p>
          </table:table-cell>
          <table:table-cell table:style-name="ce13" table:formula="of:=[.$B$6]*(1-EXP(-[.$B$7]*IF([.CS8]&gt;=[.$B$5];0;[.CS8])))^2*([.$E$10]+[.$F$10]*[.$C$10])+[.$G$10]*[.$B$10]*MIN(MAX([.$B$5]-1;0);[.CS$8])+[.$H$10]*[.$D$10]*[.CS$9]" office:value-type="float" office:value="4.215221139" calcext:value-type="float">
            <text:p>4.22</text:p>
          </table:table-cell>
          <table:table-cell table:style-name="ce13" table:formula="of:=[.$B$6]*(1-EXP(-[.$B$7]*IF([.CT8]&gt;=[.$B$5];0;[.CT8])))^2*([.$E$10]+[.$F$10]*[.$C$10])+[.$G$10]*[.$B$10]*MIN(MAX([.$B$5]-1;0);[.CT$8])+[.$H$10]*[.$D$10]*[.CT$9]" office:value-type="float" office:value="4.215221139" calcext:value-type="float">
            <text:p>4.22</text:p>
          </table:table-cell>
          <table:table-cell table:style-name="ce13" table:formula="of:=[.$B$6]*(1-EXP(-[.$B$7]*IF([.CU8]&gt;=[.$B$5];0;[.CU8])))^2*([.$E$10]+[.$F$10]*[.$C$10])+[.$G$10]*[.$B$10]*MIN(MAX([.$B$5]-1;0);[.CU$8])+[.$H$10]*[.$D$10]*[.CU$9]" office:value-type="float" office:value="4.215221139" calcext:value-type="float">
            <text:p>4.22</text:p>
          </table:table-cell>
          <table:table-cell table:style-name="ce13" table:formula="of:=[.$B$6]*(1-EXP(-[.$B$7]*IF([.CV8]&gt;=[.$B$5];0;[.CV8])))^2*([.$E$10]+[.$F$10]*[.$C$10])+[.$G$10]*[.$B$10]*MIN(MAX([.$B$5]-1;0);[.CV$8])+[.$H$10]*[.$D$10]*[.CV$9]" office:value-type="float" office:value="4.215221139" calcext:value-type="float">
            <text:p>4.22</text:p>
          </table:table-cell>
          <table:table-cell table:style-name="ce13" table:formula="of:=[.$B$6]*(1-EXP(-[.$B$7]*IF([.CW8]&gt;=[.$B$5];0;[.CW8])))^2*([.$E$10]+[.$F$10]*[.$C$10])+[.$G$10]*[.$B$10]*MIN(MAX([.$B$5]-1;0);[.CW$8])+[.$H$10]*[.$D$10]*[.CW$9]" office:value-type="float" office:value="4.215221139" calcext:value-type="float">
            <text:p>4.22</text:p>
          </table:table-cell>
          <table:table-cell table:style-name="ce13" table:formula="of:=[.$B$6]*(1-EXP(-[.$B$7]*IF([.CX8]&gt;=[.$B$5];0;[.CX8])))^2*([.$E$10]+[.$F$10]*[.$C$10])+[.$G$10]*[.$B$10]*MIN(MAX([.$B$5]-1;0);[.CX$8])+[.$H$10]*[.$D$10]*[.CX$9]" office:value-type="float" office:value="4.215221139" calcext:value-type="float">
            <text:p>4.22</text:p>
          </table:table-cell>
          <table:table-cell table:style-name="ce13" table:formula="of:=[.$B$6]*(1-EXP(-[.$B$7]*IF([.CY8]&gt;=[.$B$5];0;[.CY8])))^2*([.$E$10]+[.$F$10]*[.$C$10])+[.$G$10]*[.$B$10]*MIN(MAX([.$B$5]-1;0);[.CY$8])+[.$H$10]*[.$D$10]*[.CY$9]" office:value-type="float" office:value="4.215221139" calcext:value-type="float">
            <text:p>4.22</text:p>
          </table:table-cell>
          <table:table-cell table:style-name="ce13" table:formula="of:=[.$B$6]*(1-EXP(-[.$B$7]*IF([.CZ8]&gt;=[.$B$5];0;[.CZ8])))^2*([.$E$10]+[.$F$10]*[.$C$10])+[.$G$10]*[.$B$10]*MIN(MAX([.$B$5]-1;0);[.CZ$8])+[.$H$10]*[.$D$10]*[.CZ$9]" office:value-type="float" office:value="4.215221139" calcext:value-type="float">
            <text:p>4.22</text:p>
          </table:table-cell>
          <table:table-cell table:style-name="ce13" table:formula="of:=[.$B$6]*(1-EXP(-[.$B$7]*IF([.DA8]&gt;=[.$B$5];0;[.DA8])))^2*([.$E$10]+[.$F$10]*[.$C$10])+[.$G$10]*[.$B$10]*MIN(MAX([.$B$5]-1;0);[.DA$8])+[.$H$10]*[.$D$10]*[.DA$9]" office:value-type="float" office:value="4.215221139" calcext:value-type="float">
            <text:p>4.22</text:p>
          </table:table-cell>
          <table:table-cell table:style-name="ce13" table:formula="of:=[.$B$6]*(1-EXP(-[.$B$7]*IF([.DB8]&gt;=[.$B$5];0;[.DB8])))^2*([.$E$10]+[.$F$10]*[.$C$10])+[.$G$10]*[.$B$10]*MIN(MAX([.$B$5]-1;0);[.DB$8])+[.$H$10]*[.$D$10]*[.DB$9]" office:value-type="float" office:value="4.215221139" calcext:value-type="float">
            <text:p>4.22</text:p>
          </table:table-cell>
          <table:table-cell table:style-name="ce13" table:formula="of:=[.$B$6]*(1-EXP(-[.$B$7]*IF([.DC8]&gt;=[.$B$5];0;[.DC8])))^2*([.$E$10]+[.$F$10]*[.$C$10])+[.$G$10]*[.$B$10]*MIN(MAX([.$B$5]-1;0);[.DC$8])+[.$H$10]*[.$D$10]*[.DC$9]" office:value-type="float" office:value="4.215221139" calcext:value-type="float">
            <text:p>4.22</text:p>
          </table:table-cell>
          <table:table-cell table:style-name="ce13" table:formula="of:=[.$B$6]*(1-EXP(-[.$B$7]*IF([.DD8]&gt;=[.$B$5];0;[.DD8])))^2*([.$E$10]+[.$F$10]*[.$C$10])+[.$G$10]*[.$B$10]*MIN(MAX([.$B$5]-1;0);[.DD$8])+[.$H$10]*[.$D$10]*[.DD$9]" office:value-type="float" office:value="4.215221139" calcext:value-type="float">
            <text:p>4.22</text:p>
          </table:table-cell>
          <table:table-cell table:style-name="ce13" table:formula="of:=[.$B$6]*(1-EXP(-[.$B$7]*IF([.DE8]&gt;=[.$B$5];0;[.DE8])))^2*([.$E$10]+[.$F$10]*[.$C$10])+[.$G$10]*[.$B$10]*MIN(MAX([.$B$5]-1;0);[.DE$8])+[.$H$10]*[.$D$10]*[.DE$9]" office:value-type="float" office:value="4.215221139" calcext:value-type="float">
            <text:p>4.22</text:p>
          </table:table-cell>
          <table:table-cell table:style-name="ce13" table:formula="of:=[.$B$6]*(1-EXP(-[.$B$7]*IF([.DF8]&gt;=[.$B$5];0;[.DF8])))^2*([.$E$10]+[.$F$10]*[.$C$10])+[.$G$10]*[.$B$10]*MIN(MAX([.$B$5]-1;0);[.DF$8])+[.$H$10]*[.$D$10]*[.DF$9]" office:value-type="float" office:value="4.215221139" calcext:value-type="float">
            <text:p>4.22</text:p>
          </table:table-cell>
          <table:table-cell table:style-name="ce13" table:formula="of:=[.$B$6]*(1-EXP(-[.$B$7]*IF([.DG8]&gt;=[.$B$5];0;[.DG8])))^2*([.$E$10]+[.$F$10]*[.$C$10])+[.$G$10]*[.$B$10]*MIN(MAX([.$B$5]-1;0);[.DG$8])+[.$H$10]*[.$D$10]*[.DG$9]" office:value-type="float" office:value="4.215221139" calcext:value-type="float">
            <text:p>4.22</text:p>
          </table:table-cell>
          <table:table-cell table:style-name="ce13" table:formula="of:=[.$B$6]*(1-EXP(-[.$B$7]*IF([.DH8]&gt;=[.$B$5];0;[.DH8])))^2*([.$E$10]+[.$F$10]*[.$C$10])+[.$G$10]*[.$B$10]*MIN(MAX([.$B$5]-1;0);[.DH$8])+[.$H$10]*[.$D$10]*[.DH$9]" office:value-type="float" office:value="4.215221139" calcext:value-type="float">
            <text:p>4.22</text:p>
          </table:table-cell>
          <table:table-cell table:style-name="ce13" table:formula="of:=[.$B$6]*(1-EXP(-[.$B$7]*IF([.DI8]&gt;=[.$B$5];0;[.DI8])))^2*([.$E$10]+[.$F$10]*[.$C$10])+[.$G$10]*[.$B$10]*MIN(MAX([.$B$5]-1;0);[.DI$8])+[.$H$10]*[.$D$10]*[.DI$9]" office:value-type="float" office:value="4.215221139" calcext:value-type="float">
            <text:p>4.22</text:p>
          </table:table-cell>
          <table:table-cell table:style-name="ce13" table:formula="of:=[.$B$6]*(1-EXP(-[.$B$7]*IF([.DJ8]&gt;=[.$B$5];0;[.DJ8])))^2*([.$E$10]+[.$F$10]*[.$C$10])+[.$G$10]*[.$B$10]*MIN(MAX([.$B$5]-1;0);[.DJ$8])+[.$H$10]*[.$D$10]*[.DJ$9]" office:value-type="float" office:value="4.215221139" calcext:value-type="float">
            <text:p>4.22</text:p>
          </table:table-cell>
          <table:table-cell table:style-name="ce13" table:formula="of:=[.$B$6]*(1-EXP(-[.$B$7]*IF([.DK8]&gt;=[.$B$5];0;[.DK8])))^2*([.$E$10]+[.$F$10]*[.$C$10])+[.$G$10]*[.$B$10]*MIN(MAX([.$B$5]-1;0);[.DK$8])+[.$H$10]*[.$D$10]*[.DK$9]" office:value-type="float" office:value="4.215221139" calcext:value-type="float">
            <text:p>4.22</text:p>
          </table:table-cell>
          <table:table-cell table:style-name="ce13" table:formula="of:=[.$B$6]*(1-EXP(-[.$B$7]*IF([.DL8]&gt;=[.$B$5];0;[.DL8])))^2*([.$E$10]+[.$F$10]*[.$C$10])+[.$G$10]*[.$B$10]*MIN(MAX([.$B$5]-1;0);[.DL$8])+[.$H$10]*[.$D$10]*[.DL$9]" office:value-type="float" office:value="4.215221139" calcext:value-type="float">
            <text:p>4.22</text:p>
          </table:table-cell>
          <table:table-cell table:style-name="ce13" table:formula="of:=[.$B$6]*(1-EXP(-[.$B$7]*IF([.DM8]&gt;=[.$B$5];0;[.DM8])))^2*([.$E$10]+[.$F$10]*[.$C$10])+[.$G$10]*[.$B$10]*MIN(MAX([.$B$5]-1;0);[.DM$8])+[.$H$10]*[.$D$10]*[.DM$9]" office:value-type="float" office:value="4.215221139" calcext:value-type="float">
            <text:p>4.22</text:p>
          </table:table-cell>
          <table:table-cell table:style-name="ce13" table:formula="of:=[.$B$6]*(1-EXP(-[.$B$7]*IF([.DN8]&gt;=[.$B$5];0;[.DN8])))^2*([.$E$10]+[.$F$10]*[.$C$10])+[.$G$10]*[.$B$10]*MIN(MAX([.$B$5]-1;0);[.DN$8])+[.$H$10]*[.$D$10]*[.DN$9]" office:value-type="float" office:value="4.215221139" calcext:value-type="float">
            <text:p>4.22</text:p>
          </table:table-cell>
          <table:table-cell table:style-name="ce13" table:formula="of:=[.$B$6]*(1-EXP(-[.$B$7]*IF([.DO8]&gt;=[.$B$5];0;[.DO8])))^2*([.$E$10]+[.$F$10]*[.$C$10])+[.$G$10]*[.$B$10]*MIN(MAX([.$B$5]-1;0);[.DO$8])+[.$H$10]*[.$D$10]*[.DO$9]" office:value-type="float" office:value="4.215221139" calcext:value-type="float">
            <text:p>4.22</text:p>
          </table:table-cell>
          <table:table-cell table:style-name="ce13" table:formula="of:=[.$B$6]*(1-EXP(-[.$B$7]*IF([.DP8]&gt;=[.$B$5];0;[.DP8])))^2*([.$E$10]+[.$F$10]*[.$C$10])+[.$G$10]*[.$B$10]*MIN(MAX([.$B$5]-1;0);[.DP$8])+[.$H$10]*[.$D$10]*[.DP$9]" office:value-type="float" office:value="4.215221139" calcext:value-type="float">
            <text:p>4.22</text:p>
          </table:table-cell>
          <table:table-cell table:style-name="ce13" table:formula="of:=[.$B$6]*(1-EXP(-[.$B$7]*IF([.DQ8]&gt;=[.$B$5];0;[.DQ8])))^2*([.$E$10]+[.$F$10]*[.$C$10])+[.$G$10]*[.$B$10]*MIN(MAX([.$B$5]-1;0);[.DQ$8])+[.$H$10]*[.$D$10]*[.DQ$9]" office:value-type="float" office:value="4.215221139" calcext:value-type="float">
            <text:p>4.22</text:p>
          </table:table-cell>
          <table:table-cell table:style-name="ce13" table:formula="of:=[.$B$6]*(1-EXP(-[.$B$7]*IF([.DR8]&gt;=[.$B$5];0;[.DR8])))^2*([.$E$10]+[.$F$10]*[.$C$10])+[.$G$10]*[.$B$10]*MIN(MAX([.$B$5]-1;0);[.DR$8])+[.$H$10]*[.$D$10]*[.DR$9]" office:value-type="float" office:value="4.215221139" calcext:value-type="float">
            <text:p>4.22</text:p>
          </table:table-cell>
          <table:table-cell table:style-name="ce13" table:formula="of:=[.$B$6]*(1-EXP(-[.$B$7]*IF([.DS8]&gt;=[.$B$5];0;[.DS8])))^2*([.$E$10]+[.$F$10]*[.$C$10])+[.$G$10]*[.$B$10]*MIN(MAX([.$B$5]-1;0);[.DS$8])+[.$H$10]*[.$D$10]*[.DS$9]" office:value-type="float" office:value="4.215221139" calcext:value-type="float">
            <text:p>4.22</text:p>
          </table:table-cell>
          <table:table-cell table:style-name="ce13" table:formula="of:=[.$B$6]*(1-EXP(-[.$B$7]*IF([.DT8]&gt;=[.$B$5];0;[.DT8])))^2*([.$E$10]+[.$F$10]*[.$C$10])+[.$G$10]*[.$B$10]*MIN(MAX([.$B$5]-1;0);[.DT$8])+[.$H$10]*[.$D$10]*[.DT$9]" office:value-type="float" office:value="4.215221139" calcext:value-type="float">
            <text:p>4.22</text:p>
          </table:table-cell>
          <table:table-cell table:style-name="ce13" table:formula="of:=[.$B$6]*(1-EXP(-[.$B$7]*IF([.DU8]&gt;=[.$B$5];0;[.DU8])))^2*([.$E$10]+[.$F$10]*[.$C$10])+[.$G$10]*[.$B$10]*MIN(MAX([.$B$5]-1;0);[.DU$8])+[.$H$10]*[.$D$10]*[.DU$9]" office:value-type="float" office:value="4.215221139" calcext:value-type="float">
            <text:p>4.22</text:p>
          </table:table-cell>
          <table:table-cell table:style-name="ce13" table:formula="of:=[.$B$6]*(1-EXP(-[.$B$7]*IF([.DV8]&gt;=[.$B$5];0;[.DV8])))^2*([.$E$10]+[.$F$10]*[.$C$10])+[.$G$10]*[.$B$10]*MIN(MAX([.$B$5]-1;0);[.DV$8])+[.$H$10]*[.$D$10]*[.DV$9]" office:value-type="float" office:value="4.215221139" calcext:value-type="float">
            <text:p>4.22</text:p>
          </table:table-cell>
          <table:table-cell table:style-name="ce13" table:formula="of:=[.$B$6]*(1-EXP(-[.$B$7]*IF([.DW8]&gt;=[.$B$5];0;[.DW8])))^2*([.$E$10]+[.$F$10]*[.$C$10])+[.$G$10]*[.$B$10]*MIN(MAX([.$B$5]-1;0);[.DW$8])+[.$H$10]*[.$D$10]*[.DW$9]" office:value-type="float" office:value="4.215221139" calcext:value-type="float">
            <text:p>4.22</text:p>
          </table:table-cell>
          <table:table-cell table:style-name="ce13" table:formula="of:=[.$B$6]*(1-EXP(-[.$B$7]*IF([.DX8]&gt;=[.$B$5];0;[.DX8])))^2*([.$E$10]+[.$F$10]*[.$C$10])+[.$G$10]*[.$B$10]*MIN(MAX([.$B$5]-1;0);[.DX$8])+[.$H$10]*[.$D$10]*[.DX$9]" office:value-type="float" office:value="4.215221139" calcext:value-type="float">
            <text:p>4.22</text:p>
          </table:table-cell>
          <table:table-cell table:style-name="ce13" table:formula="of:=[.$B$6]*(1-EXP(-[.$B$7]*IF([.DY8]&gt;=[.$B$5];0;[.DY8])))^2*([.$E$10]+[.$F$10]*[.$C$10])+[.$G$10]*[.$B$10]*MIN(MAX([.$B$5]-1;0);[.DY$8])+[.$H$10]*[.$D$10]*[.DY$9]" office:value-type="float" office:value="4.215221139" calcext:value-type="float">
            <text:p>4.22</text:p>
          </table:table-cell>
          <table:table-cell table:number-columns-repeated="128"/>
          <table:table-cell table:style-name="Default" table:number-columns-repeated="16127"/>
        </table:table-row>
        <table:table-row table:style-name="ro1">
          <table:table-cell table:style-name="Default" table:number-columns-repeated="4"/>
          <table:table-cell table:number-columns-repeated="3"/>
          <table:table-cell table:formula="of:=SUM([.J11:.AN11])" office:value-type="float" office:value="9.175221139" calcext:value-type="float">
            <text:p>9.175221139</text:p>
          </table:table-cell>
          <table:table-cell table:style-name="ce12" office:value-type="string" calcext:value-type="string">
            <text:p>Carbon schedule, annual_pl(t) tC/ha/year</text:p>
          </table:table-cell>
          <table:table-cell table:style-name="ce13" table:formula="of:=[.J$10]" office:value-type="float" office:value="6.39217704287026" calcext:value-type="float">
            <text:p>6.39</text:p>
          </table:table-cell>
          <table:table-cell table:style-name="ce13" table:formula="of:=[.K$10]-[.J$10]" office:value-type="float" office:value="0.0933210691592041" calcext:value-type="float">
            <text:p>0.09</text:p>
          </table:table-cell>
          <table:table-cell table:style-name="ce13" table:formula="of:=[.L$10]-[.K$10]" office:value-type="float" office:value="0.0927490949693555" calcext:value-type="float">
            <text:p>0.09</text:p>
          </table:table-cell>
          <table:table-cell table:style-name="ce13" table:formula="of:=[.M$10]-[.L$10]" office:value-type="float" office:value="0.0927490690011794" calcext:value-type="float">
            <text:p>0.09</text:p>
          </table:table-cell>
          <table:table-cell table:style-name="ce13" table:formula="of:=[.N$10]-[.M$10]" office:value-type="float" office:value="0.0927490690000008" calcext:value-type="float">
            <text:p>0.09</text:p>
          </table:table-cell>
          <table:table-cell table:style-name="ce13" table:formula="of:=[.O$10]-[.N$10]" office:value-type="float" office:value="0.0927490689999999" calcext:value-type="float">
            <text:p>0.09</text:p>
          </table:table-cell>
          <table:table-cell table:style-name="ce13" table:formula="of:=[.P$10]-[.O$10]" office:value-type="float" office:value="0.0927490689999999" calcext:value-type="float">
            <text:p>0.09</text:p>
          </table:table-cell>
          <table:table-cell table:style-name="ce13" table:formula="of:=[.Q$10]-[.P$10]" office:value-type="float" office:value="0.0927490689999999" calcext:value-type="float">
            <text:p>0.09</text:p>
          </table:table-cell>
          <table:table-cell table:style-name="ce13" table:formula="of:=[.R$10]-[.Q$10]" office:value-type="float" office:value="0.0927490689999999" calcext:value-type="float">
            <text:p>0.09</text:p>
          </table:table-cell>
          <table:table-cell table:style-name="ce13" table:formula="of:=[.S$10]-[.R$10]" office:value-type="float" office:value="0.0927490689999999" calcext:value-type="float">
            <text:p>0.09</text:p>
          </table:table-cell>
          <table:table-cell table:style-name="ce13" table:formula="of:=[.T$10]-[.S$10]" office:value-type="float" office:value="0.0927490689999999" calcext:value-type="float">
            <text:p>0.09</text:p>
          </table:table-cell>
          <table:table-cell table:style-name="ce13" table:formula="of:=[.U$10]-[.T$10]" office:value-type="float" office:value="0.0927490689999999" calcext:value-type="float">
            <text:p>0.09</text:p>
          </table:table-cell>
          <table:table-cell table:style-name="ce13" table:formula="of:=[.V$10]-[.U$10]" office:value-type="float" office:value="0.0927490689999999" calcext:value-type="float">
            <text:p>0.09</text:p>
          </table:table-cell>
          <table:table-cell table:style-name="ce13" table:formula="of:=[.W$10]-[.V$10]" office:value-type="float" office:value="0.0927490689999999" calcext:value-type="float">
            <text:p>0.09</text:p>
          </table:table-cell>
          <table:table-cell table:style-name="ce13" table:formula="of:=[.X$10]-[.W$10]" office:value-type="float" office:value="0.0927490690000008" calcext:value-type="float">
            <text:p>0.09</text:p>
          </table:table-cell>
          <table:table-cell table:style-name="ce13" table:formula="of:=[.Y$10]-[.X$10]" office:value-type="float" office:value="0.0927490689999999" calcext:value-type="float">
            <text:p>0.09</text:p>
          </table:table-cell>
          <table:table-cell table:style-name="ce13" table:formula="of:=[.Z$10]-[.Y$10]" office:value-type="float" office:value="0.0927490689999999" calcext:value-type="float">
            <text:p>0.09</text:p>
          </table:table-cell>
          <table:table-cell table:style-name="ce13" table:formula="of:=[.AA$10]-[.Z$10]" office:value-type="float" office:value="0.0927490689999999" calcext:value-type="float">
            <text:p>0.09</text:p>
          </table:table-cell>
          <table:table-cell table:style-name="ce13" table:formula="of:=[.AB$10]-[.AA$10]" office:value-type="float" office:value="0.092749068999999" calcext:value-type="float">
            <text:p>0.09</text:p>
          </table:table-cell>
          <table:table-cell table:style-name="ce13" table:formula="of:=[.AC$10]-[.AB$10]" office:value-type="float" office:value="0.0927490690000017" calcext:value-type="float">
            <text:p>0.09</text:p>
          </table:table-cell>
          <table:table-cell table:style-name="ce13" table:formula="of:=[.AD$10]-[.AC$10]" office:value-type="float" office:value="0.0927490689999999" calcext:value-type="float">
            <text:p>0.09</text:p>
          </table:table-cell>
          <table:table-cell table:style-name="ce13" table:formula="of:=[.AE$10]-[.AD$10]" office:value-type="float" office:value="0.0927490689999999" calcext:value-type="float">
            <text:p>0.09</text:p>
          </table:table-cell>
          <table:table-cell table:style-name="ce13" table:formula="of:=[.AF$10]-[.AE$10]" office:value-type="float" office:value="0.0927490689999999" calcext:value-type="float">
            <text:p>0.09</text:p>
          </table:table-cell>
          <table:table-cell table:style-name="ce13" table:formula="of:=[.AG$10]-[.AF$10]" office:value-type="float" office:value="0.0927490689999999" calcext:value-type="float">
            <text:p>0.09</text:p>
          </table:table-cell>
          <table:table-cell table:style-name="ce13" table:formula="of:=[.AH$10]-[.AG$10]" office:value-type="float" office:value="0.0927490689999999" calcext:value-type="float">
            <text:p>0.09</text:p>
          </table:table-cell>
          <table:table-cell table:style-name="ce13" table:formula="of:=[.AI$10]-[.AH$10]" office:value-type="float" office:value="0.0927490689999999" calcext:value-type="float">
            <text:p>0.09</text:p>
          </table:table-cell>
          <table:table-cell table:style-name="ce13" table:formula="of:=[.AJ$10]-[.AI$10]" office:value-type="float" office:value="0.0927490689999999" calcext:value-type="float">
            <text:p>0.09</text:p>
          </table:table-cell>
          <table:table-cell table:style-name="ce13" table:formula="of:=[.AK$10]-[.AJ$10]" office:value-type="float" office:value="0.0927490689999999" calcext:value-type="float">
            <text:p>0.09</text:p>
          </table:table-cell>
          <table:table-cell table:style-name="ce13" table:formula="of:=[.AL$10]-[.AK$10]" office:value-type="float" office:value="0.0927490689999999" calcext:value-type="float">
            <text:p>0.09</text:p>
          </table:table-cell>
          <table:table-cell table:style-name="ce13" table:formula="of:=[.AM$10]-[.AL$10]" office:value-type="float" office:value="0.0927490689999999" calcext:value-type="float">
            <text:p>0.09</text:p>
          </table:table-cell>
          <table:table-cell table:style-name="ce13" table:formula="of:=[.AN$10]-[.AM$10]" office:value-type="float" office:value="0.0927490689999999" calcext:value-type="float">
            <text:p>0.09</text:p>
          </table:table-cell>
          <table:table-cell table:style-name="ce13" table:formula="of:=[.AO$10]-[.AN$10]" office:value-type="float" office:value="-4.96" calcext:value-type="float">
            <text:p>-4.96</text:p>
          </table:table-cell>
          <table:table-cell table:style-name="ce13" table:formula="of:=[.AP$10]-[.AO$10]" office:value-type="float" office:value="0" calcext:value-type="float">
            <text:p>0.00</text:p>
          </table:table-cell>
          <table:table-cell table:style-name="ce13" table:formula="of:=[.AQ$10]-[.AP$10]" office:value-type="float" office:value="0" calcext:value-type="float">
            <text:p>0.00</text:p>
          </table:table-cell>
          <table:table-cell table:style-name="ce13" table:formula="of:=[.AR$10]-[.AQ$10]" office:value-type="float" office:value="0" calcext:value-type="float">
            <text:p>0.00</text:p>
          </table:table-cell>
          <table:table-cell table:style-name="ce13" table:formula="of:=[.AS$10]-[.AR$10]" office:value-type="float" office:value="0" calcext:value-type="float">
            <text:p>0.00</text:p>
          </table:table-cell>
          <table:table-cell table:style-name="ce13" table:formula="of:=[.AT$10]-[.AS$10]" office:value-type="float" office:value="0" calcext:value-type="float">
            <text:p>0.00</text:p>
          </table:table-cell>
          <table:table-cell table:style-name="ce13" table:formula="of:=[.AU$10]-[.AT$10]" office:value-type="float" office:value="0" calcext:value-type="float">
            <text:p>0.00</text:p>
          </table:table-cell>
          <table:table-cell table:style-name="ce13" table:formula="of:=[.AV$10]-[.AU$10]" office:value-type="float" office:value="0" calcext:value-type="float">
            <text:p>0.00</text:p>
          </table:table-cell>
          <table:table-cell table:style-name="ce13" table:formula="of:=[.AW$10]-[.AV$10]" office:value-type="float" office:value="0" calcext:value-type="float">
            <text:p>0.00</text:p>
          </table:table-cell>
          <table:table-cell table:style-name="ce13" table:formula="of:=[.AX$10]-[.AW$10]" office:value-type="float" office:value="0" calcext:value-type="float">
            <text:p>0.00</text:p>
          </table:table-cell>
          <table:table-cell table:style-name="ce13" table:formula="of:=[.AY$10]-[.AX$10]" office:value-type="float" office:value="0" calcext:value-type="float">
            <text:p>0.00</text:p>
          </table:table-cell>
          <table:table-cell table:style-name="ce13" table:formula="of:=[.AZ$10]-[.AY$10]" office:value-type="float" office:value="0" calcext:value-type="float">
            <text:p>0.00</text:p>
          </table:table-cell>
          <table:table-cell table:style-name="ce13" table:formula="of:=[.BA$10]-[.AZ$10]" office:value-type="float" office:value="0" calcext:value-type="float">
            <text:p>0.00</text:p>
          </table:table-cell>
          <table:table-cell table:style-name="ce13" table:formula="of:=[.BB$10]-[.BA$10]" office:value-type="float" office:value="0" calcext:value-type="float">
            <text:p>0.00</text:p>
          </table:table-cell>
          <table:table-cell table:style-name="ce13" table:formula="of:=[.BC$10]-[.BB$10]" office:value-type="float" office:value="0" calcext:value-type="float">
            <text:p>0.00</text:p>
          </table:table-cell>
          <table:table-cell table:style-name="ce13" table:formula="of:=[.BD$10]-[.BC$10]" office:value-type="float" office:value="0" calcext:value-type="float">
            <text:p>0.00</text:p>
          </table:table-cell>
          <table:table-cell table:style-name="ce13" table:formula="of:=[.BE$10]-[.BD$10]" office:value-type="float" office:value="0" calcext:value-type="float">
            <text:p>0.00</text:p>
          </table:table-cell>
          <table:table-cell table:style-name="ce13" table:formula="of:=[.BF$10]-[.BE$10]" office:value-type="float" office:value="0" calcext:value-type="float">
            <text:p>0.00</text:p>
          </table:table-cell>
          <table:table-cell table:style-name="ce13" table:formula="of:=[.BG$10]-[.BF$10]" office:value-type="float" office:value="0" calcext:value-type="float">
            <text:p>0.00</text:p>
          </table:table-cell>
          <table:table-cell table:style-name="ce13" table:formula="of:=[.BH$10]-[.BG$10]" office:value-type="float" office:value="0" calcext:value-type="float">
            <text:p>0.00</text:p>
          </table:table-cell>
          <table:table-cell table:style-name="ce13" table:formula="of:=[.BI$10]-[.BH$10]" office:value-type="float" office:value="0" calcext:value-type="float">
            <text:p>0.00</text:p>
          </table:table-cell>
          <table:table-cell table:style-name="ce13" table:formula="of:=[.BJ$10]-[.BI$10]" office:value-type="float" office:value="0" calcext:value-type="float">
            <text:p>0.00</text:p>
          </table:table-cell>
          <table:table-cell table:style-name="ce13" table:formula="of:=[.BK$10]-[.BJ$10]" office:value-type="float" office:value="0" calcext:value-type="float">
            <text:p>0.00</text:p>
          </table:table-cell>
          <table:table-cell table:style-name="ce13" table:formula="of:=[.BL$10]-[.BK$10]" office:value-type="float" office:value="0" calcext:value-type="float">
            <text:p>0.00</text:p>
          </table:table-cell>
          <table:table-cell table:style-name="ce13" table:formula="of:=[.BM$10]-[.BL$10]" office:value-type="float" office:value="0" calcext:value-type="float">
            <text:p>0.00</text:p>
          </table:table-cell>
          <table:table-cell table:style-name="ce13" table:formula="of:=[.BN$10]-[.BM$10]" office:value-type="float" office:value="0" calcext:value-type="float">
            <text:p>0.00</text:p>
          </table:table-cell>
          <table:table-cell table:style-name="ce13" table:formula="of:=[.BO$10]-[.BN$10]" office:value-type="float" office:value="0" calcext:value-type="float">
            <text:p>0.00</text:p>
          </table:table-cell>
          <table:table-cell table:style-name="ce13" table:formula="of:=[.BP$10]-[.BO$10]" office:value-type="float" office:value="0" calcext:value-type="float">
            <text:p>0.00</text:p>
          </table:table-cell>
          <table:table-cell table:style-name="ce13" table:formula="of:=[.BQ$10]-[.BP$10]" office:value-type="float" office:value="0" calcext:value-type="float">
            <text:p>0.00</text:p>
          </table:table-cell>
          <table:table-cell table:style-name="ce13" table:formula="of:=[.BR$10]-[.BQ$10]" office:value-type="float" office:value="0" calcext:value-type="float">
            <text:p>0.00</text:p>
          </table:table-cell>
          <table:table-cell table:style-name="ce13" table:formula="of:=[.BS$10]-[.BR$10]" office:value-type="float" office:value="0" calcext:value-type="float">
            <text:p>0.00</text:p>
          </table:table-cell>
          <table:table-cell table:style-name="ce13" table:formula="of:=[.BT$10]-[.BS$10]" office:value-type="float" office:value="0" calcext:value-type="float">
            <text:p>0.00</text:p>
          </table:table-cell>
          <table:table-cell table:style-name="ce13" table:formula="of:=[.BU$10]-[.BT$10]" office:value-type="float" office:value="0" calcext:value-type="float">
            <text:p>0.00</text:p>
          </table:table-cell>
          <table:table-cell table:style-name="ce13" table:formula="of:=[.BV$10]-[.BU$10]" office:value-type="float" office:value="0" calcext:value-type="float">
            <text:p>0.00</text:p>
          </table:table-cell>
          <table:table-cell table:style-name="ce13" table:formula="of:=[.BW$10]-[.BV$10]" office:value-type="float" office:value="0" calcext:value-type="float">
            <text:p>0.00</text:p>
          </table:table-cell>
          <table:table-cell table:style-name="ce13" table:formula="of:=[.BX$10]-[.BW$10]" office:value-type="float" office:value="0" calcext:value-type="float">
            <text:p>0.00</text:p>
          </table:table-cell>
          <table:table-cell table:style-name="ce13" table:formula="of:=[.BY$10]-[.BX$10]" office:value-type="float" office:value="0" calcext:value-type="float">
            <text:p>0.00</text:p>
          </table:table-cell>
          <table:table-cell table:style-name="ce13" table:formula="of:=[.BZ$10]-[.BY$10]" office:value-type="float" office:value="0" calcext:value-type="float">
            <text:p>0.00</text:p>
          </table:table-cell>
          <table:table-cell table:style-name="ce13" table:formula="of:=[.CA$10]-[.BZ$10]" office:value-type="float" office:value="0" calcext:value-type="float">
            <text:p>0.00</text:p>
          </table:table-cell>
          <table:table-cell table:style-name="ce13" table:formula="of:=[.CB$10]-[.CA$10]" office:value-type="float" office:value="0" calcext:value-type="float">
            <text:p>0.00</text:p>
          </table:table-cell>
          <table:table-cell table:style-name="ce13" table:formula="of:=[.CC$10]-[.CB$10]" office:value-type="float" office:value="0" calcext:value-type="float">
            <text:p>0.00</text:p>
          </table:table-cell>
          <table:table-cell table:style-name="ce13" table:formula="of:=[.CD$10]-[.CC$10]" office:value-type="float" office:value="0" calcext:value-type="float">
            <text:p>0.00</text:p>
          </table:table-cell>
          <table:table-cell table:style-name="ce13" table:formula="of:=[.CE$10]-[.CD$10]" office:value-type="float" office:value="0" calcext:value-type="float">
            <text:p>0.00</text:p>
          </table:table-cell>
          <table:table-cell table:style-name="ce13" table:formula="of:=[.CF$10]-[.CE$10]" office:value-type="float" office:value="0" calcext:value-type="float">
            <text:p>0.00</text:p>
          </table:table-cell>
          <table:table-cell table:style-name="ce13" table:formula="of:=[.CG$10]-[.CF$10]" office:value-type="float" office:value="0" calcext:value-type="float">
            <text:p>0.00</text:p>
          </table:table-cell>
          <table:table-cell table:style-name="ce13" table:formula="of:=[.CH$10]-[.CG$10]" office:value-type="float" office:value="0" calcext:value-type="float">
            <text:p>0.00</text:p>
          </table:table-cell>
          <table:table-cell table:style-name="ce13" table:formula="of:=[.CI$10]-[.CH$10]" office:value-type="float" office:value="0" calcext:value-type="float">
            <text:p>0.00</text:p>
          </table:table-cell>
          <table:table-cell table:style-name="ce13" table:formula="of:=[.CJ$10]-[.CI$10]" office:value-type="float" office:value="0" calcext:value-type="float">
            <text:p>0.00</text:p>
          </table:table-cell>
          <table:table-cell table:style-name="ce13" table:formula="of:=[.CK$10]-[.CJ$10]" office:value-type="float" office:value="0" calcext:value-type="float">
            <text:p>0.00</text:p>
          </table:table-cell>
          <table:table-cell table:style-name="ce13" table:formula="of:=[.CL$10]-[.CK$10]" office:value-type="float" office:value="0" calcext:value-type="float">
            <text:p>0.00</text:p>
          </table:table-cell>
          <table:table-cell table:style-name="ce13" table:formula="of:=[.CM$10]-[.CL$10]" office:value-type="float" office:value="0" calcext:value-type="float">
            <text:p>0.00</text:p>
          </table:table-cell>
          <table:table-cell table:style-name="ce13" table:formula="of:=[.CN$10]-[.CM$10]" office:value-type="float" office:value="0" calcext:value-type="float">
            <text:p>0.00</text:p>
          </table:table-cell>
          <table:table-cell table:style-name="ce13" table:formula="of:=[.CO$10]-[.CN$10]" office:value-type="float" office:value="0" calcext:value-type="float">
            <text:p>0.00</text:p>
          </table:table-cell>
          <table:table-cell table:style-name="ce13" table:formula="of:=[.CP$10]-[.CO$10]" office:value-type="float" office:value="0" calcext:value-type="float">
            <text:p>0.00</text:p>
          </table:table-cell>
          <table:table-cell table:style-name="ce13" table:formula="of:=[.CQ$10]-[.CP$10]" office:value-type="float" office:value="0" calcext:value-type="float">
            <text:p>0.00</text:p>
          </table:table-cell>
          <table:table-cell table:style-name="ce13" table:formula="of:=[.CR$10]-[.CQ$10]" office:value-type="float" office:value="0" calcext:value-type="float">
            <text:p>0.00</text:p>
          </table:table-cell>
          <table:table-cell table:style-name="ce13" table:formula="of:=[.CS$10]-[.CR$10]" office:value-type="float" office:value="0" calcext:value-type="float">
            <text:p>0.00</text:p>
          </table:table-cell>
          <table:table-cell table:style-name="ce13" table:formula="of:=[.CT$10]-[.CS$10]" office:value-type="float" office:value="0" calcext:value-type="float">
            <text:p>0.00</text:p>
          </table:table-cell>
          <table:table-cell table:style-name="ce13" table:formula="of:=[.CU$10]-[.CT$10]" office:value-type="float" office:value="0" calcext:value-type="float">
            <text:p>0.00</text:p>
          </table:table-cell>
          <table:table-cell table:style-name="ce13" table:formula="of:=[.CV$10]-[.CU$10]" office:value-type="float" office:value="0" calcext:value-type="float">
            <text:p>0.00</text:p>
          </table:table-cell>
          <table:table-cell table:style-name="ce13" table:formula="of:=[.CW$10]-[.CV$10]" office:value-type="float" office:value="0" calcext:value-type="float">
            <text:p>0.00</text:p>
          </table:table-cell>
          <table:table-cell table:style-name="ce13" table:formula="of:=[.CX$10]-[.CW$10]" office:value-type="float" office:value="0" calcext:value-type="float">
            <text:p>0.00</text:p>
          </table:table-cell>
          <table:table-cell table:style-name="ce13" table:formula="of:=[.CY$10]-[.CX$10]" office:value-type="float" office:value="0" calcext:value-type="float">
            <text:p>0.00</text:p>
          </table:table-cell>
          <table:table-cell table:style-name="ce13" table:formula="of:=[.CZ$10]-[.CY$10]" office:value-type="float" office:value="0" calcext:value-type="float">
            <text:p>0.00</text:p>
          </table:table-cell>
          <table:table-cell table:style-name="ce13" table:formula="of:=[.DA$10]-[.CZ$10]" office:value-type="float" office:value="0" calcext:value-type="float">
            <text:p>0.00</text:p>
          </table:table-cell>
          <table:table-cell table:style-name="ce13" table:formula="of:=[.DB$10]-[.DA$10]" office:value-type="float" office:value="0" calcext:value-type="float">
            <text:p>0.00</text:p>
          </table:table-cell>
          <table:table-cell table:style-name="ce13" table:formula="of:=[.DC$10]-[.DB$10]" office:value-type="float" office:value="0" calcext:value-type="float">
            <text:p>0.00</text:p>
          </table:table-cell>
          <table:table-cell table:style-name="ce13" table:formula="of:=[.DD$10]-[.DC$10]" office:value-type="float" office:value="0" calcext:value-type="float">
            <text:p>0.00</text:p>
          </table:table-cell>
          <table:table-cell table:style-name="ce13" table:formula="of:=[.DE$10]-[.DD$10]" office:value-type="float" office:value="0" calcext:value-type="float">
            <text:p>0.00</text:p>
          </table:table-cell>
          <table:table-cell table:style-name="ce13" table:formula="of:=[.DF$10]-[.DE$10]" office:value-type="float" office:value="0" calcext:value-type="float">
            <text:p>0.00</text:p>
          </table:table-cell>
          <table:table-cell table:style-name="ce13" table:formula="of:=[.DG$10]-[.DF$10]" office:value-type="float" office:value="0" calcext:value-type="float">
            <text:p>0.00</text:p>
          </table:table-cell>
          <table:table-cell table:style-name="ce13" table:formula="of:=[.DH$10]-[.DG$10]" office:value-type="float" office:value="0" calcext:value-type="float">
            <text:p>0.00</text:p>
          </table:table-cell>
          <table:table-cell table:style-name="ce13" table:formula="of:=[.DI$10]-[.DH$10]" office:value-type="float" office:value="0" calcext:value-type="float">
            <text:p>0.00</text:p>
          </table:table-cell>
          <table:table-cell table:style-name="ce13" table:formula="of:=[.DJ$10]-[.DI$10]" office:value-type="float" office:value="0" calcext:value-type="float">
            <text:p>0.00</text:p>
          </table:table-cell>
          <table:table-cell table:style-name="ce13" table:formula="of:=[.DK$10]-[.DJ$10]" office:value-type="float" office:value="0" calcext:value-type="float">
            <text:p>0.00</text:p>
          </table:table-cell>
          <table:table-cell table:style-name="ce13" table:formula="of:=[.DL$10]-[.DK$10]" office:value-type="float" office:value="0" calcext:value-type="float">
            <text:p>0.00</text:p>
          </table:table-cell>
          <table:table-cell table:style-name="ce13" table:formula="of:=[.DM$10]-[.DL$10]" office:value-type="float" office:value="0" calcext:value-type="float">
            <text:p>0.00</text:p>
          </table:table-cell>
          <table:table-cell table:style-name="ce13" table:formula="of:=[.DN$10]-[.DM$10]" office:value-type="float" office:value="0" calcext:value-type="float">
            <text:p>0.00</text:p>
          </table:table-cell>
          <table:table-cell table:style-name="ce13" table:formula="of:=[.DO$10]-[.DN$10]" office:value-type="float" office:value="0" calcext:value-type="float">
            <text:p>0.00</text:p>
          </table:table-cell>
          <table:table-cell table:style-name="ce13" table:formula="of:=[.DP$10]-[.DO$10]" office:value-type="float" office:value="0" calcext:value-type="float">
            <text:p>0.00</text:p>
          </table:table-cell>
          <table:table-cell table:style-name="ce13" table:formula="of:=[.DQ$10]-[.DP$10]" office:value-type="float" office:value="0" calcext:value-type="float">
            <text:p>0.00</text:p>
          </table:table-cell>
          <table:table-cell table:style-name="ce13" table:formula="of:=[.DR$10]-[.DQ$10]" office:value-type="float" office:value="0" calcext:value-type="float">
            <text:p>0.00</text:p>
          </table:table-cell>
          <table:table-cell table:style-name="ce13" table:formula="of:=[.DS$10]-[.DR$10]" office:value-type="float" office:value="0" calcext:value-type="float">
            <text:p>0.00</text:p>
          </table:table-cell>
          <table:table-cell table:style-name="ce13" table:formula="of:=[.DT$10]-[.DS$10]" office:value-type="float" office:value="0" calcext:value-type="float">
            <text:p>0.00</text:p>
          </table:table-cell>
          <table:table-cell table:style-name="ce13" table:formula="of:=[.DU$10]-[.DT$10]" office:value-type="float" office:value="0" calcext:value-type="float">
            <text:p>0.00</text:p>
          </table:table-cell>
          <table:table-cell table:style-name="ce13" table:formula="of:=[.DV$10]-[.DU$10]" office:value-type="float" office:value="0" calcext:value-type="float">
            <text:p>0.00</text:p>
          </table:table-cell>
          <table:table-cell table:style-name="ce13" table:formula="of:=[.DW$10]-[.DV$10]" office:value-type="float" office:value="0" calcext:value-type="float">
            <text:p>0.00</text:p>
          </table:table-cell>
          <table:table-cell table:style-name="ce13" table:formula="of:=[.DX$10]-[.DW$10]" office:value-type="float" office:value="0" calcext:value-type="float">
            <text:p>0.00</text:p>
          </table:table-cell>
          <table:table-cell table:style-name="ce13" table:formula="of:=[.DY$10]-[.DX$10]" office:value-type="float" office:value="0" calcext:value-type="float">
            <text:p>0.00</text:p>
          </table:table-cell>
          <table:table-cell table:number-columns-repeated="128"/>
          <table:table-cell table:style-name="Default" table:number-columns-repeated="16127"/>
        </table:table-row>
        <table:table-row table:style-name="ro1">
          <table:table-cell table:style-name="Default" table:number-columns-repeated="4"/>
          <table:table-cell table:number-columns-repeated="3"/>
          <table:table-cell table:formula="of:=SUM([.J12:.DY12])" office:value-type="float" office:value="2.88094153016186" calcext:value-type="float">
            <text:p>2.88094153016186</text:p>
          </table:table-cell>
          <table:table-cell table:style-name="ce1" office:value-type="string" calcext:value-type="string">
            <text:p>Carbon schedule, annual_pl(t) tC/ha/year, calculus</text:p>
          </table:table-cell>
          <table:table-cell table:style-name="ce13" table:formula="of:=2*[.$B$7]*[.$B$6]*([.$E$10]+[.$F$10]*[.$C$10])*(EXP(-[.$B$7]*[.J8]) - EXP(-2*[.$B$7]*[.J8])) + [.$G$10]*[.$B$10]" office:value-type="float" office:value="0.0984692004447167" calcext:value-type="float">
            <text:p>0.10</text:p>
          </table:table-cell>
          <table:table-cell table:style-name="ce13" table:formula="of:=2*[.$B$7]*[.$B$6]*([.$E$10]+[.$F$10]*[.$C$10])*(EXP(-[.$B$7]*[.K8]) - EXP(-2*[.$B$7]*[.K8])) + [.$G$10]*[.$B$10]" office:value-type="float" office:value="0.0927493287053559" calcext:value-type="float">
            <text:p>0.09</text:p>
          </table:table-cell>
          <table:table-cell table:style-name="ce13" table:formula="of:=2*[.$B$7]*[.$B$6]*([.$E$10]+[.$F$10]*[.$C$10])*(EXP(-[.$B$7]*[.L8]) - EXP(-2*[.$B$7]*[.L8])) + [.$G$10]*[.$B$10]" office:value-type="float" office:value="0.0927490690117906" calcext:value-type="float">
            <text:p>0.09</text:p>
          </table:table-cell>
          <table:table-cell table:style-name="ce13" table:formula="of:=2*[.$B$7]*[.$B$6]*([.$E$10]+[.$F$10]*[.$C$10])*(EXP(-[.$B$7]*[.M8]) - EXP(-2*[.$B$7]*[.M8])) + [.$G$10]*[.$B$10]" office:value-type="float" office:value="0.0927490690000005" calcext:value-type="float">
            <text:p>0.09</text:p>
          </table:table-cell>
          <table:table-cell table:style-name="ce13" table:formula="of:=2*[.$B$7]*[.$B$6]*([.$E$10]+[.$F$10]*[.$C$10])*(EXP(-[.$B$7]*[.N8]) - EXP(-2*[.$B$7]*[.N8])) + [.$G$10]*[.$B$10]" office:value-type="float" office:value="0.092749069" calcext:value-type="float">
            <text:p>0.09</text:p>
          </table:table-cell>
          <table:table-cell table:style-name="ce13" table:formula="of:=2*[.$B$7]*[.$B$6]*([.$E$10]+[.$F$10]*[.$C$10])*(EXP(-[.$B$7]*[.O8]) - EXP(-2*[.$B$7]*[.O8])) + [.$G$10]*[.$B$10]" office:value-type="float" office:value="0.092749069" calcext:value-type="float">
            <text:p>0.09</text:p>
          </table:table-cell>
          <table:table-cell table:style-name="ce13" table:formula="of:=2*[.$B$7]*[.$B$6]*([.$E$10]+[.$F$10]*[.$C$10])*(EXP(-[.$B$7]*[.P8]) - EXP(-2*[.$B$7]*[.P8])) + [.$G$10]*[.$B$10]" office:value-type="float" office:value="0.092749069" calcext:value-type="float">
            <text:p>0.09</text:p>
          </table:table-cell>
          <table:table-cell table:style-name="ce13" table:formula="of:=2*[.$B$7]*[.$B$6]*([.$E$10]+[.$F$10]*[.$C$10])*(EXP(-[.$B$7]*[.Q8]) - EXP(-2*[.$B$7]*[.Q8])) + [.$G$10]*[.$B$10]" office:value-type="float" office:value="0.092749069" calcext:value-type="float">
            <text:p>0.09</text:p>
          </table:table-cell>
          <table:table-cell table:style-name="ce13" table:formula="of:=2*[.$B$7]*[.$B$6]*([.$E$10]+[.$F$10]*[.$C$10])*(EXP(-[.$B$7]*[.R8]) - EXP(-2*[.$B$7]*[.R8])) + [.$G$10]*[.$B$10]" office:value-type="float" office:value="0.092749069" calcext:value-type="float">
            <text:p>0.09</text:p>
          </table:table-cell>
          <table:table-cell table:style-name="ce13" table:formula="of:=2*[.$B$7]*[.$B$6]*([.$E$10]+[.$F$10]*[.$C$10])*(EXP(-[.$B$7]*[.S8]) - EXP(-2*[.$B$7]*[.S8])) + [.$G$10]*[.$B$10]" office:value-type="float" office:value="0.092749069" calcext:value-type="float">
            <text:p>0.09</text:p>
          </table:table-cell>
          <table:table-cell table:style-name="ce13" table:formula="of:=2*[.$B$7]*[.$B$6]*([.$E$10]+[.$F$10]*[.$C$10])*(EXP(-[.$B$7]*[.T8]) - EXP(-2*[.$B$7]*[.T8])) + [.$G$10]*[.$B$10]" office:value-type="float" office:value="0.092749069" calcext:value-type="float">
            <text:p>0.09</text:p>
          </table:table-cell>
          <table:table-cell table:style-name="ce13" table:formula="of:=2*[.$B$7]*[.$B$6]*([.$E$10]+[.$F$10]*[.$C$10])*(EXP(-[.$B$7]*[.U8]) - EXP(-2*[.$B$7]*[.U8])) + [.$G$10]*[.$B$10]" office:value-type="float" office:value="0.092749069" calcext:value-type="float">
            <text:p>0.09</text:p>
          </table:table-cell>
          <table:table-cell table:style-name="ce13" table:formula="of:=2*[.$B$7]*[.$B$6]*([.$E$10]+[.$F$10]*[.$C$10])*(EXP(-[.$B$7]*[.V8]) - EXP(-2*[.$B$7]*[.V8])) + [.$G$10]*[.$B$10]" office:value-type="float" office:value="0.092749069" calcext:value-type="float">
            <text:p>0.09</text:p>
          </table:table-cell>
          <table:table-cell table:style-name="ce13" table:formula="of:=2*[.$B$7]*[.$B$6]*([.$E$10]+[.$F$10]*[.$C$10])*(EXP(-[.$B$7]*[.W8]) - EXP(-2*[.$B$7]*[.W8])) + [.$G$10]*[.$B$10]" office:value-type="float" office:value="0.092749069" calcext:value-type="float">
            <text:p>0.09</text:p>
          </table:table-cell>
          <table:table-cell table:style-name="ce13" table:formula="of:=2*[.$B$7]*[.$B$6]*([.$E$10]+[.$F$10]*[.$C$10])*(EXP(-[.$B$7]*[.X8]) - EXP(-2*[.$B$7]*[.X8])) + [.$G$10]*[.$B$10]" office:value-type="float" office:value="0.092749069" calcext:value-type="float">
            <text:p>0.09</text:p>
          </table:table-cell>
          <table:table-cell table:style-name="ce13" table:formula="of:=2*[.$B$7]*[.$B$6]*([.$E$10]+[.$F$10]*[.$C$10])*(EXP(-[.$B$7]*[.Y8]) - EXP(-2*[.$B$7]*[.Y8])) + [.$G$10]*[.$B$10]" office:value-type="float" office:value="0.092749069" calcext:value-type="float">
            <text:p>0.09</text:p>
          </table:table-cell>
          <table:table-cell table:style-name="ce13" table:formula="of:=2*[.$B$7]*[.$B$6]*([.$E$10]+[.$F$10]*[.$C$10])*(EXP(-[.$B$7]*[.Z8]) - EXP(-2*[.$B$7]*[.Z8])) + [.$G$10]*[.$B$10]" office:value-type="float" office:value="0.092749069" calcext:value-type="float">
            <text:p>0.09</text:p>
          </table:table-cell>
          <table:table-cell table:style-name="ce13" table:formula="of:=2*[.$B$7]*[.$B$6]*([.$E$10]+[.$F$10]*[.$C$10])*(EXP(-[.$B$7]*[.AA8]) - EXP(-2*[.$B$7]*[.AA8])) + [.$G$10]*[.$B$10]" office:value-type="float" office:value="0.092749069" calcext:value-type="float">
            <text:p>0.09</text:p>
          </table:table-cell>
          <table:table-cell table:style-name="ce13" table:formula="of:=2*[.$B$7]*[.$B$6]*([.$E$10]+[.$F$10]*[.$C$10])*(EXP(-[.$B$7]*[.AB8]) - EXP(-2*[.$B$7]*[.AB8])) + [.$G$10]*[.$B$10]" office:value-type="float" office:value="0.092749069" calcext:value-type="float">
            <text:p>0.09</text:p>
          </table:table-cell>
          <table:table-cell table:style-name="ce13" table:formula="of:=2*[.$B$7]*[.$B$6]*([.$E$10]+[.$F$10]*[.$C$10])*(EXP(-[.$B$7]*[.AC8]) - EXP(-2*[.$B$7]*[.AC8])) + [.$G$10]*[.$B$10]" office:value-type="float" office:value="0.092749069" calcext:value-type="float">
            <text:p>0.09</text:p>
          </table:table-cell>
          <table:table-cell table:style-name="ce13" table:formula="of:=2*[.$B$7]*[.$B$6]*([.$E$10]+[.$F$10]*[.$C$10])*(EXP(-[.$B$7]*[.AD8]) - EXP(-2*[.$B$7]*[.AD8])) + [.$G$10]*[.$B$10]" office:value-type="float" office:value="0.092749069" calcext:value-type="float">
            <text:p>0.09</text:p>
          </table:table-cell>
          <table:table-cell table:style-name="ce13" table:formula="of:=2*[.$B$7]*[.$B$6]*([.$E$10]+[.$F$10]*[.$C$10])*(EXP(-[.$B$7]*[.AE8]) - EXP(-2*[.$B$7]*[.AE8])) + [.$G$10]*[.$B$10]" office:value-type="float" office:value="0.092749069" calcext:value-type="float">
            <text:p>0.09</text:p>
          </table:table-cell>
          <table:table-cell table:style-name="ce13" table:formula="of:=2*[.$B$7]*[.$B$6]*([.$E$10]+[.$F$10]*[.$C$10])*(EXP(-[.$B$7]*[.AF8]) - EXP(-2*[.$B$7]*[.AF8])) + [.$G$10]*[.$B$10]" office:value-type="float" office:value="0.092749069" calcext:value-type="float">
            <text:p>0.09</text:p>
          </table:table-cell>
          <table:table-cell table:style-name="ce13" table:formula="of:=2*[.$B$7]*[.$B$6]*([.$E$10]+[.$F$10]*[.$C$10])*(EXP(-[.$B$7]*[.AG8]) - EXP(-2*[.$B$7]*[.AG8])) + [.$G$10]*[.$B$10]" office:value-type="float" office:value="0.092749069" calcext:value-type="float">
            <text:p>0.09</text:p>
          </table:table-cell>
          <table:table-cell table:style-name="ce13" table:formula="of:=2*[.$B$7]*[.$B$6]*([.$E$10]+[.$F$10]*[.$C$10])*(EXP(-[.$B$7]*[.AH8]) - EXP(-2*[.$B$7]*[.AH8])) + [.$G$10]*[.$B$10]" office:value-type="float" office:value="0.092749069" calcext:value-type="float">
            <text:p>0.09</text:p>
          </table:table-cell>
          <table:table-cell table:style-name="ce13" table:formula="of:=2*[.$B$7]*[.$B$6]*([.$E$10]+[.$F$10]*[.$C$10])*(EXP(-[.$B$7]*[.AI8]) - EXP(-2*[.$B$7]*[.AI8])) + [.$G$10]*[.$B$10]" office:value-type="float" office:value="0.092749069" calcext:value-type="float">
            <text:p>0.09</text:p>
          </table:table-cell>
          <table:table-cell table:style-name="ce13" table:formula="of:=2*[.$B$7]*[.$B$6]*([.$E$10]+[.$F$10]*[.$C$10])*(EXP(-[.$B$7]*[.AJ8]) - EXP(-2*[.$B$7]*[.AJ8])) + [.$G$10]*[.$B$10]" office:value-type="float" office:value="0.092749069" calcext:value-type="float">
            <text:p>0.09</text:p>
          </table:table-cell>
          <table:table-cell table:style-name="ce13" table:formula="of:=2*[.$B$7]*[.$B$6]*([.$E$10]+[.$F$10]*[.$C$10])*(EXP(-[.$B$7]*[.AK8]) - EXP(-2*[.$B$7]*[.AK8])) + [.$G$10]*[.$B$10]" office:value-type="float" office:value="0.092749069" calcext:value-type="float">
            <text:p>0.09</text:p>
          </table:table-cell>
          <table:table-cell table:style-name="ce13" table:formula="of:=2*[.$B$7]*[.$B$6]*([.$E$10]+[.$F$10]*[.$C$10])*(EXP(-[.$B$7]*[.AL8]) - EXP(-2*[.$B$7]*[.AL8])) + [.$G$10]*[.$B$10]" office:value-type="float" office:value="0.092749069" calcext:value-type="float">
            <text:p>0.09</text:p>
          </table:table-cell>
          <table:table-cell table:style-name="ce13" table:formula="of:=2*[.$B$7]*[.$B$6]*([.$E$10]+[.$F$10]*[.$C$10])*(EXP(-[.$B$7]*[.AM8]) - EXP(-2*[.$B$7]*[.AM8])) + [.$G$10]*[.$B$10]" office:value-type="float" office:value="0.092749069" calcext:value-type="float">
            <text:p>0.09</text:p>
          </table:table-cell>
          <table:table-cell table:style-name="ce13" table:formula="of:=2*[.$B$7]*[.$B$6]*([.$E$10]+[.$F$10]*[.$C$10])*(EXP(-[.$B$7]*[.AN8]) - EXP(-2*[.$B$7]*[.AN8])) + [.$G$10]*[.$B$10]" office:value-type="float" office:value="0.092749069" calcext:value-type="float">
            <text:p>0.09</text:p>
          </table:table-cell>
          <table:table-cell table:number-columns-repeated="217"/>
          <table:table-cell table:style-name="Default" table:number-columns-repeated="16127"/>
        </table:table-row>
        <table:table-row table:style-name="ro1">
          <table:table-cell/>
          <table:table-cell office:value-type="string" calcext:value-type="string">
            <text:p>Claude</text:p>
          </table:table-cell>
          <table:table-cell office:value-type="string" calcext:value-type="string">
            <text:p>JFR</text:p>
          </table:table-cell>
          <table:table-cell table:number-columns-repeated="254"/>
          <table:table-cell table:style-name="Default" table:number-columns-repeated="16127"/>
        </table:table-row>
        <table:table-row table:style-name="ro1">
          <table:table-cell office:value-type="string" calcext:value-type="string">
            <text:p>cost_inflator_2011_to_2020</text:p>
          </table:table-cell>
          <table:table-cell table:number-columns-repeated="2" table:style-name="ce5" office:value-type="percentage" office:value="1.1577" calcext:value-type="percentage">
            <text:p>115.77%</text:p>
          </table:table-cell>
          <table:table-cell table:number-columns-repeated="254"/>
          <table:table-cell table:style-name="Default" table:number-columns-repeated="16127"/>
        </table:table-row>
        <table:table-row table:style-name="ro1">
          <table:table-cell office:value-type="string" calcext:value-type="string">
            <text:p>ep_cost_2011_USD_per_ha, Exotic plantation establishment cost per hectare in 2020 USD.</text:p>
          </table:table-cell>
          <table:table-cell table:number-columns-repeated="2" table:style-name="ce6" office:value-type="currency" office:currency="USD" office:value="500" calcext:value-type="currency">
            <text:p>$500</text:p>
          </table:table-cell>
          <table:table-cell table:number-columns-repeated="254"/>
          <table:table-cell table:style-name="Default" table:number-columns-repeated="16127"/>
        </table:table-row>
        <table:table-row table:style-name="ro1">
          <table:table-cell office:value-type="string" calcext:value-type="string">
            <text:p>exotic_share, Country-level share of plantations that are exotic species.</text:p>
          </table:table-cell>
          <table:table-cell table:number-columns-repeated="2" table:style-name="ce7" office:value-type="percentage" office:value="0.97" calcext:value-type="percentage">
            <text:p>97%</text:p>
          </table:table-cell>
          <table:table-cell table:number-columns-repeated="254"/>
          <table:table-cell table:style-name="Default" table:number-columns-repeated="16127"/>
        </table:table-row>
        <table:table-row table:style-name="ro1">
          <table:table-cell office:value-type="string" calcext:value-type="string">
            <text:p>np_cost_2011_USD_per_ha, Native plantation establishment cost per hectare in 2020 USD.</text:p>
          </table:table-cell>
          <table:table-cell table:number-columns-repeated="2" table:style-name="ce6" office:value-type="currency" office:currency="USD" office:value="500" calcext:value-type="currency">
            <text:p>$500</text:p>
          </table:table-cell>
          <table:table-cell table:number-columns-repeated="254"/>
          <table:table-cell table:style-name="Default" table:number-columns-repeated="16127"/>
        </table:table-row>
        <table:table-row table:style-name="ro1">
          <table:table-cell office:value-type="string" calcext:value-type="string">
            <text:p>native_share = 1 - exotic_share</text:p>
          </table:table-cell>
          <table:table-cell table:style-name="ce7" table:formula="of:=1-[.B16]" office:value-type="percentage" office:value="0.03" calcext:value-type="percentage">
            <text:p>3%</text:p>
          </table:table-cell>
          <table:table-cell table:number-columns-repeated="255"/>
          <table:table-cell table:style-name="Default" table:number-columns-repeated="16127"/>
        </table:table-row>
        <table:table-row table:style-name="ro1">
          <table:table-cell table:style-name="ce1"/>
          <table:table-cell table:number-columns-repeated="256"/>
          <table:table-cell table:style-name="Default" table:number-columns-repeated="16127"/>
        </table:table-row>
        <table:table-row table:style-name="ro1">
          <table:table-cell office:value-type="string" calcext:value-type="string">
            <text:p>Plantation net present value establishment cost per hectare, pl_npv_estcost_USD_per_ha = init_cost</text:p>
          </table:table-cell>
          <table:table-cell table:style-name="ce8" table:formula="of:=[.B14]*([.B15]*[.B16]+[.B17]*[.B18])" office:value-type="currency" office:currency="USD" office:value="578.85" calcext:value-type="currency">
            <text:p>$579</text:p>
          </table:table-cell>
          <table:table-cell table:style-name="ce8" table:formula="of:=[.C14]*([.C15]*[.C16]+[.C17]*(1-[.C16]))" office:value-type="currency" office:currency="USD" office:value="578.85" calcext:value-type="currency">
            <text:p>$579</text:p>
          </table:table-cell>
          <table:table-cell office:value-type="string" calcext:value-type="string">
            <text:p>Setup cost</text:p>
          </table:table-cell>
          <table:table-cell table:number-columns-repeated="253"/>
          <table:table-cell table:style-name="Default" table:number-columns-repeated="16127"/>
        </table:table-row>
        <table:table-row table:style-name="ro1">
          <table:table-cell office:value-type="string" calcext:value-type="string">
            <text:p>TIME_HORIZON_YEARS</text:p>
          </table:table-cell>
          <table:table-cell office:value-type="float" office:value="120" calcext:value-type="float">
            <text:p>120</text:p>
          </table:table-cell>
          <table:table-cell table:formula="of:=[.B5]" office:value-type="float" office:value="32" calcext:value-type="float">
            <text:p>32</text:p>
          </table:table-cell>
          <table:table-cell table:number-columns-repeated="254"/>
          <table:table-cell table:style-name="Default" table:number-columns-repeated="16127"/>
        </table:table-row>
        <table:table-row table:style-name="ro1">
          <table:table-cell table:style-name="Default" table:number-columns-repeated="3"/>
          <table:table-cell table:number-columns-repeated="254"/>
          <table:table-cell table:style-name="Default" table:number-columns-repeated="16127"/>
        </table:table-row>
        <table:table-row table:style-name="ro1">
          <table:table-cell office:value-type="string" calcext:value-type="string">
            <text:p>Plantation total carbon per hectare without harvest, pl_wohrv_total_tC_per_ha at year 120 (no harvest term)</text:p>
          </table:table-cell>
          <table:table-cell table:style-name="ce9" table:formula="of:=[.$E$10]*[.$B$6]*(1-EXP(-[.$B$7]*[.$B$21]))^2+[.$F$10]*([.$B$6]*(1-EXP(-[.$B$7]*[.$B$21]))^2)*[.$C$10]+[.$G$10]*[.$B$21]*[.$B$10]" office:value-type="float" office:value="17.42988828" calcext:value-type="float">
            <text:p>17.4</text:p>
          </table:table-cell>
          <table:table-cell table:style-name="ce9" table:formula="of:=[.$E$10]*[.$B$6]*(1-EXP(-[.$B$7]*[.$C$21]))^2+[.$F$10]*([.$B$6]*(1-EXP(-[.$B$7]*[.$C$21]))^2)*[.$C$10]+[.$G$10]*[.$C$21]*[.$B$10]" office:value-type="float" office:value="9.267970208" calcext:value-type="float">
            <text:p>9.3</text:p>
          </table:table-cell>
          <table:table-cell office:value-type="string" calcext:value-type="string">
            <text:p>Discard total carbon per hector, because it ignores timing of removal</text:p>
          </table:table-cell>
          <table:table-cell table:number-columns-repeated="253"/>
          <table:table-cell table:style-name="Default" table:number-columns-repeated="16127"/>
        </table:table-row>
        <table:table-row table:style-name="ro1">
          <table:table-cell office:value-type="string" calcext:value-type="string">
            <text:p>tCO2_per_tC</text:p>
          </table:table-cell>
          <table:table-cell table:number-columns-repeated="2" office:value-type="float" office:value="3.67" calcext:value-type="float">
            <text:p>3.67</text:p>
          </table:table-cell>
          <table:table-cell office:value-type="string" calcext:value-type="string">
            <text:p>Unneeded, since we never need tons CO2.</text:p>
          </table:table-cell>
          <table:table-cell table:number-columns-repeated="253"/>
          <table:table-cell table:style-name="Default" table:number-columns-repeated="16127"/>
        </table:table-row>
        <table:table-row table:style-name="ro1">
          <table:table-cell office:value-type="string" calcext:value-type="string">
            <text:p>Opportunity cost of land $/ha/year, crop_va_USD_per_ha_per_year</text:p>
          </table:table-cell>
          <table:table-cell table:number-columns-repeated="2" table:style-name="ce6" office:value-type="currency" office:currency="USD" office:value="50" calcext:value-type="currency">
            <text:p>$50</text:p>
          </table:table-cell>
          <table:table-cell table:number-columns-repeated="254"/>
          <table:table-cell table:style-name="Default" table:number-columns-repeated="16127"/>
        </table:table-row>
        <table:table-row table:style-name="ro1">
          <table:table-cell office:value-type="string" calcext:value-type="string">
            <text:p>Plantation abatement cost-effectiveness without harvest in USD per ton CO2, pl_wohrv_costeff_USD_per_tCO2</text:p>
          </table:table-cell>
          <table:table-cell table:style-name="ce8" table:formula="of:=([.B20]+[.B21]*[.B25])/[.B24]/[.B23]" office:value-type="currency" office:currency="USD" office:value="102.846452658761" calcext:value-type="currency">
            <text:p>$103</text:p>
          </table:table-cell>
          <table:table-cell table:style-name="ce8" table:formula="of:=([.C20]+[.C21]*[.C25])/[.C24]/[.C23]" office:value-type="currency" office:currency="USD" office:value="64.0584814979417" calcext:value-type="currency">
            <text:p>$64</text:p>
          </table:table-cell>
          <table:table-cell office:value-type="string" calcext:value-type="string">
            <text:p>Discard $/tC, because SMDAMAGE cares only about the bid.</text:p>
          </table:table-cell>
          <table:table-cell table:number-columns-repeated="253"/>
          <table:table-cell table:style-name="Default" table:number-columns-repeated="16127"/>
        </table:table-row>
        <table:table-row table:style-name="ro1">
          <table:table-cell table:number-columns-repeated="257"/>
          <table:table-cell table:style-name="Default" table:number-columns-repeated="16127"/>
        </table:table-row>
        <table:table-row table:style-name="ro1">
          <table:table-cell office:value-type="string" calcext:value-type="string">
            <text:p>Plantation abatement cost-effectiveness with harvest, excluding wood product revenue, $/tCO2, pl_whrv0_costeff_USD_per_tCO2</text:p>
          </table:table-cell>
          <table:table-cell table:style-name="ce8" table:formula="of:=([.$B$25]*[.$B$21]+[.$B$20])/([.$B$24]*[.DY$10])" office:value-type="currency" office:currency="USD" office:value="425.26883423767" calcext:value-type="currency">
            <text:p>$425</text:p>
          </table:table-cell>
          <table:table-cell table:style-name="ce8" table:formula="of:=([.$C$25]*[.$C$21]+[.$C$20])/([.$C$24]*[.DY$10])" office:value-type="currency" office:currency="USD" office:value="140.84482842423" calcext:value-type="currency">
            <text:p>$141</text:p>
          </table:table-cell>
          <table:table-cell office:value-type="string" calcext:value-type="string">
            <text:p>Discard $/tC, because SMDAMAGE cares only about the bid.</text:p>
          </table:table-cell>
          <table:table-cell table:number-columns-repeated="253"/>
          <table:table-cell table:style-name="Default" table:number-columns-repeated="16127"/>
        </table:table-row>
        <table:table-row table:style-name="ro1">
          <table:table-cell office:value-type="string" calcext:value-type="string">
            <text:p>Wood-product revenue with harvest, p_USD_per_tC_harvested</text:p>
          </table:table-cell>
          <table:table-cell table:number-columns-repeated="2" table:style-name="ce6" office:value-type="currency" office:currency="USD" office:value="61.04" calcext:value-type="currency">
            <text:p>$61</text:p>
          </table:table-cell>
          <table:table-cell table:number-columns-repeated="254"/>
          <table:table-cell table:style-name="Default" table:number-columns-repeated="16127"/>
        </table:table-row>
        <table:table-row table:style-name="ro1">
          <table:table-cell office:value-type="string" calcext:value-type="string">
            <text:p>Plantation harvested carbon per hectare over the time horizon, pl_harvested_tC_per_ha at year 120, from g_harvested_cum_tC_per_ha</text:p>
          </table:table-cell>
          <table:table-cell table:style-name="ce9" table:formula="of:=[.DY$9]" office:value-type="float" office:value="5" calcext:value-type="float">
            <text:p>5.0</text:p>
          </table:table-cell>
          <table:table-cell table:style-name="ce9" table:formula="of:=[.$B$6]*(1-EXP(-[.$B$7]*[.C21]))^2" office:value-type="float" office:value="5" calcext:value-type="float">
            <text:p>5.0</text:p>
          </table:table-cell>
          <table:table-cell office:value-type="string" calcext:value-type="string">
            <text:p>Needed for bid</text:p>
          </table:table-cell>
          <table:table-cell table:number-columns-repeated="253"/>
          <table:table-cell table:style-name="Default" table:number-columns-repeated="16127"/>
        </table:table-row>
        <table:table-row table:style-name="ro1">
          <table:table-cell office:value-type="string" calcext:value-type="string">
            <text:p>Plantation abatement cost-effectiveness with harvest, including wood product revenue, in USD per ton CO2, pl_whrv_costeff_USD_per_tCO2</text:p>
          </table:table-cell>
          <table:table-cell table:style-name="ce8" table:formula="of:=([.B25]*[.B21]+[.B20]-[.B29]*[.B30])/([.B24]*[.DX$10])" office:value-type="currency" office:currency="USD" office:value="405.540150925338" calcext:value-type="currency">
            <text:p>$406</text:p>
          </table:table-cell>
          <table:table-cell table:style-name="ce8" table:formula="of:=([.C25]*[.C21]+[.C20]-[.C29]*[.C30])/([.C24]*[.DY$10])" office:value-type="currency" office:currency="USD" office:value="121.116145111898" calcext:value-type="currency">
            <text:p>$121</text:p>
          </table:table-cell>
          <table:table-cell office:value-type="string" calcext:value-type="string">
            <text:p>Discard, because SMDAMAGE will price the emission under removal. But the harvest revenue should be part of the bid.</text:p>
          </table:table-cell>
          <table:table-cell table:number-columns-repeated="253"/>
          <table:table-cell table:style-name="Default" table:number-columns-repeated="16127"/>
        </table:table-row>
        <table:table-row table:style-name="ro1">
          <table:table-cell table:number-columns-repeated="257"/>
          <table:table-cell table:style-name="Default" table:number-columns-repeated="16127"/>
        </table:table-row>
        <table:table-row table:style-name="ro1">
          <table:table-cell table:style-name="Default"/>
          <table:table-cell/>
          <table:table-cell table:style-name="ce6"/>
          <table:table-cell table:number-columns-repeated="254"/>
          <table:table-cell table:style-name="Default" table:number-columns-repeated="16127"/>
        </table:table-row>
        <table:table-row table:style-name="ro1">
          <table:table-cell office:value-type="string" calcext:value-type="string">
            <text:p>Discount rate</text:p>
          </table:table-cell>
          <table:table-cell/>
          <table:table-cell table:style-name="ce7" office:value-type="percentage" office:value="0.03" calcext:value-type="percentage">
            <text:p>3%</text:p>
          </table:table-cell>
          <table:table-cell table:number-columns-repeated="254"/>
          <table:table-cell table:style-name="Default" table:number-columns-repeated="16127"/>
        </table:table-row>
        <table:table-row table:style-name="ro1">
          <table:table-cell office:value-type="string" calcext:value-type="string">
            <text:p>Setup cost</text:p>
          </table:table-cell>
          <table:table-cell/>
          <table:table-cell table:style-name="ce8" table:formula="of:=[.C14]*([.C15]*[.C16]+[.C17]*(1-[.C16]))" office:value-type="currency" office:currency="USD" office:value="578.85" calcext:value-type="currency">
            <text:p>$579</text:p>
          </table:table-cell>
          <table:table-cell table:number-columns-repeated="254"/>
          <table:table-cell table:style-name="Default" table:number-columns-repeated="16127"/>
        </table:table-row>
        <table:table-row table:style-name="ro1">
          <table:table-cell office:value-type="string" calcext:value-type="string">
            <text:p>Present value of land opportunity costs, Plantation net present value establishment cost per hectare, pl_npv_estcost_USD_per_ha = init_cost</text:p>
          </table:table-cell>
          <table:table-cell/>
          <table:table-cell table:style-name="ce8" table:formula="of:=[.C25]*(1-(1+[.C34])^(-[.C21]))/[.C34]" office:value-type="currency" office:currency="USD" office:value="1019.43827643839" calcext:value-type="currency">
            <text:p>$1,019</text:p>
          </table:table-cell>
          <table:table-cell office:value-type="string" calcext:value-type="string">
            <text:p>Payments at end of year.</text:p>
          </table:table-cell>
          <table:table-cell table:number-columns-repeated="253"/>
          <table:table-cell table:style-name="Default" table:number-columns-repeated="16127"/>
        </table:table-row>
        <table:table-row table:style-name="ro1">
          <table:table-cell office:value-type="string" calcext:value-type="string">
            <text:p>Present value of wood harvest revenue, from plantation harvested C/ha over the time horizon, pl_harvested_tC_per_ha, from g_harvested_cum_tC_per_ha</text:p>
          </table:table-cell>
          <table:table-cell/>
          <table:table-cell table:style-name="ce8" table:formula="of:=-[.$B$6]*(1-EXP(-[.$B$7]*[.C21]))^2/(1+[.C34])^[.C21]" office:value-type="currency" office:currency="USD" office:value="-1.94168517068483" calcext:value-type="currency">
            <text:p>-$2</text:p>
          </table:table-cell>
          <table:table-cell table:number-columns-repeated="254"/>
          <table:table-cell table:style-name="Default" table:number-columns-repeated="16127"/>
        </table:table-row>
        <table:table-row table:style-name="ro1">
          <table:table-cell table:style-name="ce3" office:value-type="string" calcext:value-type="string">
            <text:p>SMDAMAGE bid $/ha discounted to year 0 of contract </text:p>
          </table:table-cell>
          <table:table-cell/>
          <table:table-cell table:style-name="ce8" table:formula="of:=[.C35]+[.C36]+[.C37]" office:value-type="currency" office:currency="USD" office:value="1596.34659126771" calcext:value-type="currency">
            <text:p>$1,596</text:p>
          </table:table-cell>
          <table:table-cell table:number-columns-repeated="254"/>
          <table:table-cell table:style-name="Default" table:number-columns-repeated="16127"/>
        </table:table-row>
        <table:table-row table:style-name="ro1">
          <table:table-cell table:style-name="ce3" office:value-type="string" calcext:value-type="string">
            <text:p>SMDAMAGE bid $/ha discounted to year 0 of contract, collected terms</text:p>
          </table:table-cell>
          <table:table-cell/>
          <table:table-cell table:style-name="ce8" table:formula="of:=[.C14]*([.C15]*[.C16]+[.C17]*(1-[.C16]))+[.C25]*(1-(1+[.C34])^(-[.C21]))/[.C34]-[.$B$6]*(1-EXP(-[.$B$7]*[.C21]))^2/(1+[.C34])^[.C21]" office:value-type="currency" office:currency="USD" office:value="1596.34659126771" calcext:value-type="currency">
            <text:p>$1,596</text:p>
          </table:table-cell>
          <table:table-cell table:number-columns-repeated="254"/>
          <table:table-cell table:style-name="Default" table:number-columns-repeated="16127"/>
        </table:table-row>
        <table:table-row table:style-name="ro1" table:number-rows-repeated="1048536">
          <table:table-cell table:number-columns-repeated="257"/>
          <table:table-cell table:style-name="Default" table:number-columns-repeated="16127"/>
        </table:table-row>
        <table:table-row table:style-name="ro3">
          <table:table-cell table:number-columns-repeated="257"/>
          <table:table-cell table:style-name="Default" table:number-columns-repeated="16127"/>
        </table:table-row>
      </table:table>
      <table:table table:name="Convolution" table:style-name="ta2">
        <office:forms form:automatic-focus="false" form:apply-design-mode="false"/>
        <table:table-column table:style-name="co5" table:default-cell-style-name="Default"/>
        <table:table-column table:style-name="co6" table:number-columns-repeated="251" table:default-cell-style-name="Default"/>
        <table:table-row table:style-name="ro1" table:number-rows-repeated="4">
          <table:table-cell table:number-columns-repeated="252"/>
        </table:table-row>
        <table:table-row table:style-name="ro1">
          <table:table-cell office:value-type="string" calcext:value-type="string">
            <text:p>Emission yea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table:number-columns-repeated="151"/>
        </table:table-row>
        <table:table-row table:style-name="ro1">
          <table:table-cell office:value-type="string" calcext:value-type="string">
            <text:p>Carbon schedule “signal”, mtons emitted</text:p>
          </table:table-cell>
          <table:table-cell table:number-columns-repeated="100" office:value-type="float" office:value="20" calcext:value-type="float">
            <text:p>20</text:p>
          </table:table-cell>
          <table:table-cell table:number-columns-repeated="151"/>
        </table:table-row>
        <table:table-row table:style-name="ro1">
          <table:table-cell table:number-columns-repeated="252"/>
        </table:table-row>
        <table:table-row table:style-name="ro1">
          <table:table-cell office:value-type="string" calcext:value-type="string">
            <text:p>Warming ye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W[Carbon,u] “kernel”, from a solution for SMDAMAGE FitW</text:p>
          </table:table-cell>
          <table:table-cell office:value-type="float" office:value="0" calcext:value-type="float">
            <text:p>0</text:p>
          </table:table-cell>
          <table:table-cell office:value-type="float" office:value="0.000810628" calcext:value-type="float">
            <text:p>0.000810628</text:p>
          </table:table-cell>
          <table:table-cell office:value-type="float" office:value="0.001371235" calcext:value-type="float">
            <text:p>0.001371235</text:p>
          </table:table-cell>
          <table:table-cell office:value-type="float" office:value="0.001782009" calcext:value-type="float">
            <text:p>0.001782009</text:p>
          </table:table-cell>
          <table:table-cell office:value-type="float" office:value="0.002046314" calcext:value-type="float">
            <text:p>0.002046314</text:p>
          </table:table-cell>
          <table:table-cell office:value-type="float" office:value="0.002224353" calcext:value-type="float">
            <text:p>0.002224353</text:p>
          </table:table-cell>
          <table:table-cell office:value-type="float" office:value="0.002351114" calcext:value-type="float">
            <text:p>0.002351114</text:p>
          </table:table-cell>
          <table:table-cell office:value-type="float" office:value="0.002443458" calcext:value-type="float">
            <text:p>0.002443458</text:p>
          </table:table-cell>
          <table:table-cell office:value-type="float" office:value="0.002509201" calcext:value-type="float">
            <text:p>0.002509201</text:p>
          </table:table-cell>
          <table:table-cell office:value-type="float" office:value="0.002558329" calcext:value-type="float">
            <text:p>0.002558329</text:p>
          </table:table-cell>
          <table:table-cell office:value-type="float" office:value="0.002590824" calcext:value-type="float">
            <text:p>0.002590824</text:p>
          </table:table-cell>
          <table:table-cell office:value-type="float" office:value="0.002611596" calcext:value-type="float">
            <text:p>0.002611596</text:p>
          </table:table-cell>
          <table:table-cell office:value-type="float" office:value="0.002625164" calcext:value-type="float">
            <text:p>0.002625164</text:p>
          </table:table-cell>
          <table:table-cell office:value-type="float" office:value="0.002629826" calcext:value-type="float">
            <text:p>0.002629826</text:p>
          </table:table-cell>
          <table:table-cell office:value-type="float" office:value="0.002629549" calcext:value-type="float">
            <text:p>0.002629549</text:p>
          </table:table-cell>
          <table:table-cell office:value-type="float" office:value="0.002626513" calcext:value-type="float">
            <text:p>0.002626513</text:p>
          </table:table-cell>
          <table:table-cell office:value-type="float" office:value="0.002621047" calcext:value-type="float">
            <text:p>0.002621047</text:p>
          </table:table-cell>
          <table:table-cell office:value-type="float" office:value="0.002608917" calcext:value-type="float">
            <text:p>0.002608917</text:p>
          </table:table-cell>
          <table:table-cell office:value-type="float" office:value="0.002594681" calcext:value-type="float">
            <text:p>0.002594681</text:p>
          </table:table-cell>
          <table:table-cell office:value-type="float" office:value="0.002581921" calcext:value-type="float">
            <text:p>0.002581921</text:p>
          </table:table-cell>
          <table:table-cell office:value-type="float" office:value="0.00256672" calcext:value-type="float">
            <text:p>0.00256672</text:p>
          </table:table-cell>
          <table:table-cell office:value-type="float" office:value="0.002547936" calcext:value-type="float">
            <text:p>0.002547936</text:p>
          </table:table-cell>
          <table:table-cell office:value-type="float" office:value="0.002530647" calcext:value-type="float">
            <text:p>0.002530647</text:p>
          </table:table-cell>
          <table:table-cell office:value-type="float" office:value="0.002513368" calcext:value-type="float">
            <text:p>0.002513368</text:p>
          </table:table-cell>
          <table:table-cell office:value-type="float" office:value="0.00249398" calcext:value-type="float">
            <text:p>0.00249398</text:p>
          </table:table-cell>
          <table:table-cell office:value-type="float" office:value="0.002474633" calcext:value-type="float">
            <text:p>0.002474633</text:p>
          </table:table-cell>
          <table:table-cell office:value-type="float" office:value="0.002454967" calcext:value-type="float">
            <text:p>0.002454967</text:p>
          </table:table-cell>
          <table:table-cell office:value-type="float" office:value="0.002435273" calcext:value-type="float">
            <text:p>0.002435273</text:p>
          </table:table-cell>
          <table:table-cell office:value-type="float" office:value="0.00241557" calcext:value-type="float">
            <text:p>0.00241557</text:p>
          </table:table-cell>
          <table:table-cell office:value-type="float" office:value="0.002397998" calcext:value-type="float">
            <text:p>0.002397998</text:p>
          </table:table-cell>
          <table:table-cell office:value-type="float" office:value="0.002380466" calcext:value-type="float">
            <text:p>0.002380466</text:p>
          </table:table-cell>
          <table:table-cell office:value-type="float" office:value="0.002362705" calcext:value-type="float">
            <text:p>0.002362705</text:p>
          </table:table-cell>
          <table:table-cell office:value-type="float" office:value="0.002345028" calcext:value-type="float">
            <text:p>0.002345028</text:p>
          </table:table-cell>
          <table:table-cell office:value-type="float" office:value="0.002325004" calcext:value-type="float">
            <text:p>0.002325004</text:p>
          </table:table-cell>
          <table:table-cell office:value-type="float" office:value="0.002313421" calcext:value-type="float">
            <text:p>0.002313421</text:p>
          </table:table-cell>
          <table:table-cell office:value-type="float" office:value="0.002298453" calcext:value-type="float">
            <text:p>0.002298453</text:p>
          </table:table-cell>
          <table:table-cell office:value-type="float" office:value="0.002283075" calcext:value-type="float">
            <text:p>0.002283075</text:p>
          </table:table-cell>
          <table:table-cell office:value-type="float" office:value="0.002267619" calcext:value-type="float">
            <text:p>0.002267619</text:p>
          </table:table-cell>
          <table:table-cell office:value-type="float" office:value="0.002249917" calcext:value-type="float">
            <text:p>0.002249917</text:p>
          </table:table-cell>
          <table:table-cell office:value-type="float" office:value="0.002236422" calcext:value-type="float">
            <text:p>0.002236422</text:p>
          </table:table-cell>
          <table:table-cell office:value-type="float" office:value="0.002219432" calcext:value-type="float">
            <text:p>0.002219432</text:p>
          </table:table-cell>
          <table:table-cell office:value-type="float" office:value="0.00220099" calcext:value-type="float">
            <text:p>0.00220099</text:p>
          </table:table-cell>
          <table:table-cell office:value-type="float" office:value="0.002179592" calcext:value-type="float">
            <text:p>0.002179592</text:p>
          </table:table-cell>
          <table:table-cell office:value-type="float" office:value="0.002164619" calcext:value-type="float">
            <text:p>0.002164619</text:p>
          </table:table-cell>
          <table:table-cell office:value-type="float" office:value="0.002147621" calcext:value-type="float">
            <text:p>0.002147621</text:p>
          </table:table-cell>
          <table:table-cell office:value-type="float" office:value="0.002130811" calcext:value-type="float">
            <text:p>0.002130811</text:p>
          </table:table-cell>
          <table:table-cell office:value-type="float" office:value="0.002120102" calcext:value-type="float">
            <text:p>0.002120102</text:p>
          </table:table-cell>
          <table:table-cell office:value-type="float" office:value="0.002102948" calcext:value-type="float">
            <text:p>0.002102948</text:p>
          </table:table-cell>
          <table:table-cell office:value-type="float" office:value="0.002091885" calcext:value-type="float">
            <text:p>0.002091885</text:p>
          </table:table-cell>
          <table:table-cell office:value-type="float" office:value="0.002081073" calcext:value-type="float">
            <text:p>0.002081073</text:p>
          </table:table-cell>
          <table:table-cell office:value-type="float" office:value="0.002066112" calcext:value-type="float">
            <text:p>0.002066112</text:p>
          </table:table-cell>
          <table:table-cell office:value-type="float" office:value="0.00205582" calcext:value-type="float">
            <text:p>0.00205582</text:p>
          </table:table-cell>
          <table:table-cell office:value-type="float" office:value="0.002037398" calcext:value-type="float">
            <text:p>0.002037398</text:p>
          </table:table-cell>
          <table:table-cell office:value-type="float" office:value="0.002026768" calcext:value-type="float">
            <text:p>0.002026768</text:p>
          </table:table-cell>
          <table:table-cell office:value-type="float" office:value="0.002014009" calcext:value-type="float">
            <text:p>0.002014009</text:p>
          </table:table-cell>
          <table:table-cell office:value-type="float" office:value="0.002005162" calcext:value-type="float">
            <text:p>0.002005162</text:p>
          </table:table-cell>
          <table:table-cell office:value-type="float" office:value="0.001998105" calcext:value-type="float">
            <text:p>0.001998105</text:p>
          </table:table-cell>
          <table:table-cell office:value-type="float" office:value="0.001989367" calcext:value-type="float">
            <text:p>0.001989367</text:p>
          </table:table-cell>
          <table:table-cell office:value-type="float" office:value="0.001978528" calcext:value-type="float">
            <text:p>0.001978528</text:p>
          </table:table-cell>
          <table:table-cell office:value-type="float" office:value="0.001968593" calcext:value-type="float">
            <text:p>0.001968593</text:p>
          </table:table-cell>
          <table:table-cell office:value-type="float" office:value="0.001960273" calcext:value-type="float">
            <text:p>0.001960273</text:p>
          </table:table-cell>
          <table:table-cell office:value-type="float" office:value="0.001949699" calcext:value-type="float">
            <text:p>0.001949699</text:p>
          </table:table-cell>
          <table:table-cell office:value-type="float" office:value="0.001941456" calcext:value-type="float">
            <text:p>0.001941456</text:p>
          </table:table-cell>
          <table:table-cell office:value-type="float" office:value="0.001931482" calcext:value-type="float">
            <text:p>0.001931482</text:p>
          </table:table-cell>
          <table:table-cell office:value-type="float" office:value="0.00192284" calcext:value-type="float">
            <text:p>0.00192284</text:p>
          </table:table-cell>
          <table:table-cell office:value-type="float" office:value="0.001914272" calcext:value-type="float">
            <text:p>0.001914272</text:p>
          </table:table-cell>
          <table:table-cell office:value-type="float" office:value="0.001906424" calcext:value-type="float">
            <text:p>0.001906424</text:p>
          </table:table-cell>
          <table:table-cell office:value-type="float" office:value="0.001900075" calcext:value-type="float">
            <text:p>0.001900075</text:p>
          </table:table-cell>
          <table:table-cell office:value-type="float" office:value="0.001892102" calcext:value-type="float">
            <text:p>0.001892102</text:p>
          </table:table-cell>
          <table:table-cell office:value-type="float" office:value="0.001885921" calcext:value-type="float">
            <text:p>0.001885921</text:p>
          </table:table-cell>
          <table:table-cell office:value-type="float" office:value="0.001879774" calcext:value-type="float">
            <text:p>0.001879774</text:p>
          </table:table-cell>
          <table:table-cell office:value-type="float" office:value="0.001869948" calcext:value-type="float">
            <text:p>0.001869948</text:p>
          </table:table-cell>
          <table:table-cell office:value-type="float" office:value="0.001863941" calcext:value-type="float">
            <text:p>0.001863941</text:p>
          </table:table-cell>
          <table:table-cell office:value-type="float" office:value="0.001855957" calcext:value-type="float">
            <text:p>0.001855957</text:p>
          </table:table-cell>
          <table:table-cell office:value-type="float" office:value="0.001851842" calcext:value-type="float">
            <text:p>0.001851842</text:p>
          </table:table-cell>
          <table:table-cell office:value-type="float" office:value="0.001841667" calcext:value-type="float">
            <text:p>0.001841667</text:p>
          </table:table-cell>
          <table:table-cell office:value-type="float" office:value="0.001833609" calcext:value-type="float">
            <text:p>0.001833609</text:p>
          </table:table-cell>
          <table:table-cell office:value-type="float" office:value="0.001829512" calcext:value-type="float">
            <text:p>0.001829512</text:p>
          </table:table-cell>
          <table:table-cell office:value-type="float" office:value="0.001821593" calcext:value-type="float">
            <text:p>0.001821593</text:p>
          </table:table-cell>
          <table:table-cell office:value-type="float" office:value="0.001815792" calcext:value-type="float">
            <text:p>0.001815792</text:p>
          </table:table-cell>
          <table:table-cell office:value-type="float" office:value="0.001809341" calcext:value-type="float">
            <text:p>0.001809341</text:p>
          </table:table-cell>
          <table:table-cell office:value-type="float" office:value="0.001803371" calcext:value-type="float">
            <text:p>0.001803371</text:p>
          </table:table-cell>
          <table:table-cell office:value-type="float" office:value="0.00179802" calcext:value-type="float">
            <text:p>0.00179802</text:p>
          </table:table-cell>
          <table:table-cell office:value-type="float" office:value="0.001789594" calcext:value-type="float">
            <text:p>0.001789594</text:p>
          </table:table-cell>
          <table:table-cell office:value-type="float" office:value="0.001785239" calcext:value-type="float">
            <text:p>0.001785239</text:p>
          </table:table-cell>
          <table:table-cell office:value-type="float" office:value="0.001777986" calcext:value-type="float">
            <text:p>0.001777986</text:p>
          </table:table-cell>
          <table:table-cell office:value-type="float" office:value="0.001771512" calcext:value-type="float">
            <text:p>0.001771512</text:p>
          </table:table-cell>
          <table:table-cell office:value-type="float" office:value="0.001765262" calcext:value-type="float">
            <text:p>0.001765262</text:p>
          </table:table-cell>
          <table:table-cell office:value-type="float" office:value="0.001760534" calcext:value-type="float">
            <text:p>0.001760534</text:p>
          </table:table-cell>
          <table:table-cell office:value-type="float" office:value="0.001754719" calcext:value-type="float">
            <text:p>0.001754719</text:p>
          </table:table-cell>
          <table:table-cell office:value-type="float" office:value="0.001747698" calcext:value-type="float">
            <text:p>0.001747698</text:p>
          </table:table-cell>
          <table:table-cell office:value-type="float" office:value="0.001742777" calcext:value-type="float">
            <text:p>0.001742777</text:p>
          </table:table-cell>
          <table:table-cell office:value-type="float" office:value="0.001737629" calcext:value-type="float">
            <text:p>0.001737629</text:p>
          </table:table-cell>
          <table:table-cell office:value-type="float" office:value="0.001728559" calcext:value-type="float">
            <text:p>0.001728559</text:p>
          </table:table-cell>
          <table:table-cell office:value-type="float" office:value="0.001722733" calcext:value-type="float">
            <text:p>0.001722733</text:p>
          </table:table-cell>
          <table:table-cell office:value-type="float" office:value="0.001712962" calcext:value-type="float">
            <text:p>0.001712962</text:p>
          </table:table-cell>
          <table:table-cell office:value-type="float" office:value="0.001708024" calcext:value-type="float">
            <text:p>0.001708024</text:p>
          </table:table-cell>
          <table:table-cell office:value-type="float" office:value="0.001697598" calcext:value-type="float">
            <text:p>0.001697598</text:p>
          </table:table-cell>
          <table:table-cell office:value-type="float" office:value="0.001691429" calcext:value-type="float">
            <text:p>0.001691429</text:p>
          </table:table-cell>
          <table:table-cell office:value-type="float" office:value="0.001685464" calcext:value-type="float">
            <text:p>0.001685464</text:p>
          </table:table-cell>
          <table:table-cell office:value-type="float" office:value="0.001681741" calcext:value-type="float">
            <text:p>0.001681741</text:p>
          </table:table-cell>
          <table:table-cell office:value-type="float" office:value="0.001676029" calcext:value-type="float">
            <text:p>0.001676029</text:p>
          </table:table-cell>
          <table:table-cell office:value-type="float" office:value="0.001668527" calcext:value-type="float">
            <text:p>0.001668527</text:p>
          </table:table-cell>
          <table:table-cell office:value-type="float" office:value="0.001662831" calcext:value-type="float">
            <text:p>0.001662831</text:p>
          </table:table-cell>
          <table:table-cell office:value-type="float" office:value="0.001657143" calcext:value-type="float">
            <text:p>0.001657143</text:p>
          </table:table-cell>
          <table:table-cell office:value-type="float" office:value="0.00164965" calcext:value-type="float">
            <text:p>0.00164965</text:p>
          </table:table-cell>
          <table:table-cell office:value-type="float" office:value="0.001646093" calcext:value-type="float">
            <text:p>0.001646093</text:p>
          </table:table-cell>
          <table:table-cell office:value-type="float" office:value="0.001638629" calcext:value-type="float">
            <text:p>0.001638629</text:p>
          </table:table-cell>
          <table:table-cell office:value-type="float" office:value="0.001632972" calcext:value-type="float">
            <text:p>0.001632972</text:p>
          </table:table-cell>
          <table:table-cell office:value-type="float" office:value="0.001629437" calcext:value-type="float">
            <text:p>0.001629437</text:p>
          </table:table-cell>
          <table:table-cell office:value-type="float" office:value="0.00162199699999999" calcext:value-type="float">
            <text:p>0.00162199699999999</text:p>
          </table:table-cell>
          <table:table-cell office:value-type="float" office:value="0.001616362" calcext:value-type="float">
            <text:p>0.001616362</text:p>
          </table:table-cell>
          <table:table-cell office:value-type="float" office:value="0.001608937" calcext:value-type="float">
            <text:p>0.001608937</text:p>
          </table:table-cell>
          <table:table-cell office:value-type="float" office:value="0.001603635" calcext:value-type="float">
            <text:p>0.001603635</text:p>
          </table:table-cell>
          <table:table-cell office:value-type="float" office:value="0.001598023" calcext:value-type="float">
            <text:p>0.001598023</text:p>
          </table:table-cell>
          <table:table-cell office:value-type="float" office:value="0.001594534" calcext:value-type="float">
            <text:p>0.001594534</text:p>
          </table:table-cell>
          <table:table-cell office:value-type="float" office:value="0.001589255" calcext:value-type="float">
            <text:p>0.001589255</text:p>
          </table:table-cell>
          <table:table-cell office:value-type="float" office:value="0.001583666" calcext:value-type="float">
            <text:p>0.001583666</text:p>
          </table:table-cell>
          <table:table-cell office:value-type="float" office:value="0.001578084" calcext:value-type="float">
            <text:p>0.001578084</text:p>
          </table:table-cell>
          <table:table-cell office:value-type="float" office:value="0.001572828" calcext:value-type="float">
            <text:p>0.001572828</text:p>
          </table:table-cell>
          <table:table-cell office:value-type="float" office:value="0.001565463" calcext:value-type="float">
            <text:p>0.001565463</text:p>
          </table:table-cell>
          <table:table-cell office:value-type="float" office:value="0.00156202" calcext:value-type="float">
            <text:p>0.00156202</text:p>
          </table:table-cell>
          <table:table-cell office:value-type="float" office:value="0.001556469" calcext:value-type="float">
            <text:p>0.001556469</text:p>
          </table:table-cell>
          <table:table-cell office:value-type="float" office:value="0.001551242" calcext:value-type="float">
            <text:p>0.001551242</text:p>
          </table:table-cell>
          <table:table-cell office:value-type="float" office:value="0.001543907" calcext:value-type="float">
            <text:p>0.001543907</text:p>
          </table:table-cell>
          <table:table-cell office:value-type="float" office:value="0.001538378" calcext:value-type="float">
            <text:p>0.001538378</text:p>
          </table:table-cell>
          <table:table-cell office:value-type="float" office:value="0.00153529" calcext:value-type="float">
            <text:p>0.00153529</text:p>
          </table:table-cell>
          <table:table-cell office:value-type="float" office:value="0.001529776" calcext:value-type="float">
            <text:p>0.001529776</text:p>
          </table:table-cell>
          <table:table-cell office:value-type="float" office:value="0.00152427" calcext:value-type="float">
            <text:p>0.00152427</text:p>
          </table:table-cell>
          <table:table-cell office:value-type="float" office:value="0.001523305" calcext:value-type="float">
            <text:p>0.001523305</text:p>
          </table:table-cell>
          <table:table-cell office:value-type="float" office:value="0.001518089" calcext:value-type="float">
            <text:p>0.001518089</text:p>
          </table:table-cell>
          <table:table-cell office:value-type="float" office:value="0.001510763" calcext:value-type="float">
            <text:p>0.001510763</text:p>
          </table:table-cell>
          <table:table-cell office:value-type="float" office:value="0.001507365" calcext:value-type="float">
            <text:p>0.001507365</text:p>
          </table:table-cell>
          <table:table-cell office:value-type="float" office:value="0.001500057" calcext:value-type="float">
            <text:p>0.001500057</text:p>
          </table:table-cell>
          <table:table-cell office:value-type="float" office:value="0.001496675" calcext:value-type="float">
            <text:p>0.001496675</text:p>
          </table:table-cell>
          <table:table-cell office:value-type="float" office:value="0.001489385" calcext:value-type="float">
            <text:p>0.001489385</text:p>
          </table:table-cell>
          <table:table-cell office:value-type="float" office:value="0.00148422" calcext:value-type="float">
            <text:p>0.00148422</text:p>
          </table:table-cell>
          <table:table-cell office:value-type="float" office:value="0.001480862" calcext:value-type="float">
            <text:p>0.001480862</text:p>
          </table:table-cell>
          <table:table-cell office:value-type="float" office:value="0.001475714" calcext:value-type="float">
            <text:p>0.001475714</text:p>
          </table:table-cell>
          <table:table-cell office:value-type="float" office:value="0.001468133" calcext:value-type="float">
            <text:p>0.001468133</text:p>
          </table:table-cell>
          <table:table-cell office:value-type="float" office:value="0.001463001" calcext:value-type="float">
            <text:p>0.001463001</text:p>
          </table:table-cell>
          <table:table-cell office:value-type="float" office:value="0.001457875" calcext:value-type="float">
            <text:p>0.001457875</text:p>
          </table:table-cell>
          <table:table-cell office:value-type="float" office:value="0.001454554" calcext:value-type="float">
            <text:p>0.001454554</text:p>
          </table:table-cell>
          <table:table-cell office:value-type="float" office:value="0.001445525" calcext:value-type="float">
            <text:p>0.001445525</text:p>
          </table:table-cell>
          <table:table-cell office:value-type="float" office:value="0.001444018" calcext:value-type="float">
            <text:p>0.001444018</text:p>
          </table:table-cell>
          <table:table-cell office:value-type="float" office:value="0.001438922" calcext:value-type="float">
            <text:p>0.001438922</text:p>
          </table:table-cell>
          <table:table-cell office:value-type="float" office:value="0.001431714" calcext:value-type="float">
            <text:p>0.001431714</text:p>
          </table:table-cell>
          <table:table-cell office:value-type="float" office:value="0.001428429" calcext:value-type="float">
            <text:p>0.001428429</text:p>
          </table:table-cell>
          <table:table-cell office:value-type="float" office:value="0.001421234" calcext:value-type="float">
            <text:p>0.001421234</text:p>
          </table:table-cell>
          <table:table-cell office:value-type="float" office:value="0.001414416" calcext:value-type="float">
            <text:p>0.001414416</text:p>
          </table:table-cell>
          <table:table-cell office:value-type="float" office:value="0.001409025" calcext:value-type="float">
            <text:p>0.001409025</text:p>
          </table:table-cell>
          <table:table-cell office:value-type="float" office:value="0.001403961" calcext:value-type="float">
            <text:p>0.001403961</text:p>
          </table:table-cell>
          <table:table-cell office:value-type="float" office:value="0.001398582" calcext:value-type="float">
            <text:p>0.001398582</text:p>
          </table:table-cell>
          <table:table-cell office:value-type="float" office:value="0.00139353" calcext:value-type="float">
            <text:p>0.00139353</text:p>
          </table:table-cell>
          <table:table-cell office:value-type="float" office:value="0.001388486" calcext:value-type="float">
            <text:p>0.001388486</text:p>
          </table:table-cell>
          <table:table-cell office:value-type="float" office:value="0.001383127" calcext:value-type="float">
            <text:p>0.001383127</text:p>
          </table:table-cell>
          <table:table-cell office:value-type="float" office:value="0.001378101" calcext:value-type="float">
            <text:p>0.001378101</text:p>
          </table:table-cell>
          <table:table-cell office:value-type="float" office:value="0.001373081" calcext:value-type="float">
            <text:p>0.001373081</text:p>
          </table:table-cell>
          <table:table-cell office:value-type="float" office:value="0.001365947" calcext:value-type="float">
            <text:p>0.001365947</text:p>
          </table:table-cell>
          <table:table-cell office:value-type="float" office:value="0.001360937" calcext:value-type="float">
            <text:p>0.001360937</text:p>
          </table:table-cell>
          <table:table-cell office:value-type="float" office:value="0.001355637" calcext:value-type="float">
            <text:p>0.001355637</text:p>
          </table:table-cell>
          <table:table-cell office:value-type="float" office:value="0.001350664" calcext:value-type="float">
            <text:p>0.001350664</text:p>
          </table:table-cell>
          <table:table-cell office:value-type="float" office:value="0.00134358" calcext:value-type="float">
            <text:p>0.00134358</text:p>
          </table:table-cell>
          <table:table-cell office:value-type="float" office:value="0.001340419" calcext:value-type="float">
            <text:p>0.001340419</text:p>
          </table:table-cell>
          <table:table-cell office:value-type="float" office:value="0.001333678" calcext:value-type="float">
            <text:p>0.001333678</text:p>
          </table:table-cell>
          <table:table-cell office:value-type="float" office:value="0.001328422" calcext:value-type="float">
            <text:p>0.001328422</text:p>
          </table:table-cell>
          <table:table-cell office:value-type="float" office:value="0.001323499" calcext:value-type="float">
            <text:p>0.001323499</text:p>
          </table:table-cell>
          <table:table-cell office:value-type="float" office:value="0.001322499" calcext:value-type="float">
            <text:p>0.001322499</text:p>
          </table:table-cell>
          <table:table-cell office:value-type="float" office:value="0.001313676" calcext:value-type="float">
            <text:p>0.001313676</text:p>
          </table:table-cell>
          <table:table-cell office:value-type="float" office:value="0.001306657" calcext:value-type="float">
            <text:p>0.001306657</text:p>
          </table:table-cell>
          <table:table-cell office:value-type="float" office:value="0.001303562" calcext:value-type="float">
            <text:p>0.001303562</text:p>
          </table:table-cell>
          <table:table-cell office:value-type="float" office:value="0.001298673" calcext:value-type="float">
            <text:p>0.001298673</text:p>
          </table:table-cell>
          <table:table-cell office:value-type="float" office:value="0.001291687" calcext:value-type="float">
            <text:p>0.001291687</text:p>
          </table:table-cell>
          <table:table-cell office:value-type="float" office:value="0.001286831" calcext:value-type="float">
            <text:p>0.001286831</text:p>
          </table:table-cell>
          <table:table-cell office:value-type="float" office:value="0.001283786" calcext:value-type="float">
            <text:p>0.001283786</text:p>
          </table:table-cell>
          <table:table-cell office:value-type="float" office:value="0.001276838" calcext:value-type="float">
            <text:p>0.001276838</text:p>
          </table:table-cell>
          <table:table-cell office:value-type="float" office:value="0.001272021" calcext:value-type="float">
            <text:p>0.001272021</text:p>
          </table:table-cell>
          <table:table-cell office:value-type="float" office:value="0.001267212" calcext:value-type="float">
            <text:p>0.001267212</text:p>
          </table:table-cell>
          <table:table-cell office:value-type="float" office:value="0.001260293" calcext:value-type="float">
            <text:p>0.001260293</text:p>
          </table:table-cell>
          <table:table-cell office:value-type="float" office:value="0.001259416" calcext:value-type="float">
            <text:p>0.001259416</text:p>
          </table:table-cell>
          <table:table-cell office:value-type="float" office:value="0.001252513" calcext:value-type="float">
            <text:p>0.001252513</text:p>
          </table:table-cell>
          <table:table-cell office:value-type="float" office:value="0.001247736" calcext:value-type="float">
            <text:p>0.001247736</text:p>
          </table:table-cell>
          <table:table-cell office:value-type="float" office:value="0.001242968" calcext:value-type="float">
            <text:p>0.001242968</text:p>
          </table:table-cell>
          <table:table-cell office:value-type="float" office:value="0.001237888" calcext:value-type="float">
            <text:p>0.001237888</text:p>
          </table:table-cell>
          <table:table-cell office:value-type="float" office:value="0.001233457" calcext:value-type="float">
            <text:p>0.001233457</text:p>
          </table:table-cell>
          <table:table-cell office:value-type="float" office:value="0.001226597" calcext:value-type="float">
            <text:p>0.001226597</text:p>
          </table:table-cell>
          <table:table-cell office:value-type="float" office:value="0.001223664" calcext:value-type="float">
            <text:p>0.001223664</text:p>
          </table:table-cell>
          <table:table-cell office:value-type="float" office:value="0.001218938" calcext:value-type="float">
            <text:p>0.001218938</text:p>
          </table:table-cell>
          <table:table-cell office:value-type="float" office:value="0.001212101" calcext:value-type="float">
            <text:p>0.001212101</text:p>
          </table:table-cell>
          <table:table-cell office:value-type="float" office:value="0.001207388" calcext:value-type="float">
            <text:p>0.001207388</text:p>
          </table:table-cell>
          <table:table-cell office:value-type="float" office:value="0.001202681" calcext:value-type="float">
            <text:p>0.001202681</text:p>
          </table:table-cell>
          <table:table-cell office:value-type="float" office:value="0.001197659" calcext:value-type="float">
            <text:p>0.001197659</text:p>
          </table:table-cell>
          <table:table-cell office:value-type="float" office:value="0.001192959" calcext:value-type="float">
            <text:p>0.001192959</text:p>
          </table:table-cell>
          <table:table-cell office:value-type="float" office:value="0.00118646" calcext:value-type="float">
            <text:p>0.00118646</text:p>
          </table:table-cell>
          <table:table-cell office:value-type="float" office:value="0.001181438" calcext:value-type="float">
            <text:p>0.001181438</text:p>
          </table:table-cell>
          <table:table-cell office:value-type="float" office:value="0.001178862" calcext:value-type="float">
            <text:p>0.001178862</text:p>
          </table:table-cell>
          <table:table-cell office:value-type="float" office:value="0.001172053" calcext:value-type="float">
            <text:p>0.001172053</text:p>
          </table:table-cell>
          <table:table-cell office:value-type="float" office:value="0.001169166" calcext:value-type="float">
            <text:p>0.001169166</text:p>
          </table:table-cell>
          <table:table-cell office:value-type="float" office:value="0.00116449" calcext:value-type="float">
            <text:p>0.00116449</text:p>
          </table:table-cell>
          <table:table-cell office:value-type="float" office:value="0.001159228" calcext:value-type="float">
            <text:p>0.001159228</text:p>
          </table:table-cell>
          <table:table-cell office:value-type="float" office:value="0.001156347" calcext:value-type="float">
            <text:p>0.001156347</text:p>
          </table:table-cell>
          <table:table-cell office:value-type="float" office:value="0.001149877" calcext:value-type="float">
            <text:p>0.001149877</text:p>
          </table:table-cell>
          <table:table-cell office:value-type="float" office:value="0.00114489" calcext:value-type="float">
            <text:p>0.00114489</text:p>
          </table:table-cell>
          <table:table-cell office:value-type="float" office:value="0.001138432" calcext:value-type="float">
            <text:p>0.001138432</text:p>
          </table:table-cell>
          <table:table-cell office:value-type="float" office:value="0.001135578" calcext:value-type="float">
            <text:p>0.001135578</text:p>
          </table:table-cell>
          <table:table-cell office:value-type="float" office:value="0.001130933" calcext:value-type="float">
            <text:p>0.001130933</text:p>
          </table:table-cell>
          <table:table-cell office:value-type="float" office:value="0.001124174" calcext:value-type="float">
            <text:p>0.001124174</text:p>
          </table:table-cell>
          <table:table-cell office:value-type="float" office:value="0.001121662" calcext:value-type="float">
            <text:p>0.001121662</text:p>
          </table:table-cell>
          <table:table-cell office:value-type="float" office:value="0.001116715" calcext:value-type="float">
            <text:p>0.001116715</text:p>
          </table:table-cell>
          <table:table-cell office:value-type="float" office:value="0.001112096" calcext:value-type="float">
            <text:p>0.001112096</text:p>
          </table:table-cell>
          <table:table-cell office:value-type="float" office:value="0.001105685" calcext:value-type="float">
            <text:p>0.001105685</text:p>
          </table:table-cell>
          <table:table-cell office:value-type="float" office:value="0.001100759" calcext:value-type="float">
            <text:p>0.001100759</text:p>
          </table:table-cell>
          <table:table-cell office:value-type="float" office:value="0.001094361" calcext:value-type="float">
            <text:p>0.001094361</text:p>
          </table:table-cell>
          <table:table-cell office:value-type="float" office:value="0.001091567" calcext:value-type="float">
            <text:p>0.001091567</text:p>
          </table:table-cell>
          <table:table-cell office:value-type="float" office:value="0.001086981" calcext:value-type="float">
            <text:p>0.001086981</text:p>
          </table:table-cell>
          <table:table-cell office:value-type="float" office:value="0.001082402" calcext:value-type="float">
            <text:p>0.001082402</text:p>
          </table:table-cell>
          <table:table-cell office:value-type="float" office:value="0.001077509" calcext:value-type="float">
            <text:p>0.001077509</text:p>
          </table:table-cell>
          <table:table-cell office:value-type="float" office:value="0.001072943" calcext:value-type="float">
            <text:p>0.001072943</text:p>
          </table:table-cell>
          <table:table-cell office:value-type="float" office:value="0.001066264" calcext:value-type="float">
            <text:p>0.001066264</text:p>
          </table:table-cell>
          <table:table-cell office:value-type="float" office:value="0.001061711" calcext:value-type="float">
            <text:p>0.001061711</text:p>
          </table:table-cell>
          <table:table-cell office:value-type="float" office:value="0.001056843" calcext:value-type="float">
            <text:p>0.001056843</text:p>
          </table:table-cell>
          <table:table-cell office:value-type="float" office:value="0.001052304" calcext:value-type="float">
            <text:p>0.001052304</text:p>
          </table:table-cell>
          <table:table-cell office:value-type="float" office:value="0.001045651" calcext:value-type="float">
            <text:p>0.001045651</text:p>
          </table:table-cell>
          <table:table-cell office:value-type="float" office:value="0.001040803" calcext:value-type="float">
            <text:p>0.001040803</text:p>
          </table:table-cell>
          <table:table-cell office:value-type="float" office:value="0.00103416299999999" calcext:value-type="float">
            <text:p>0.00103416299999999</text:p>
          </table:table-cell>
          <table:table-cell office:value-type="float" office:value="0.00102965" calcext:value-type="float">
            <text:p>0.00102965</text:p>
          </table:table-cell>
          <table:table-cell office:value-type="float" office:value="0.001023023" calcext:value-type="float">
            <text:p>0.001023023</text:p>
          </table:table-cell>
          <table:table-cell office:value-type="float" office:value="0.001020321" calcext:value-type="float">
            <text:p>0.001020321</text:p>
          </table:table-cell>
          <table:table-cell office:value-type="float" office:value="0.001015506" calcext:value-type="float">
            <text:p>0.001015506</text:p>
          </table:table-cell>
          <table:table-cell office:value-type="float" office:value="0.001011018" calcext:value-type="float">
            <text:p>0.001011018</text:p>
          </table:table-cell>
          <table:table-cell office:value-type="float" office:value="0.001004417" calcext:value-type="float">
            <text:p>0.001004417</text:p>
          </table:table-cell>
          <table:table-cell office:value-type="float" office:value="0.000999621" calcext:value-type="float">
            <text:p>0.000999621</text:p>
          </table:table-cell>
          <table:table-cell office:value-type="float" office:value="0.000993033" calcext:value-type="float">
            <text:p>0.000993033</text:p>
          </table:table-cell>
          <table:table-cell office:value-type="float" office:value="0.00098825" calcext:value-type="float">
            <text:p>0.00098825</text:p>
          </table:table-cell>
          <table:table-cell office:value-type="float" office:value="0.000983795" calcext:value-type="float">
            <text:p>0.000983795</text:p>
          </table:table-cell>
          <table:table-cell office:value-type="float" office:value="0.000975107" calcext:value-type="float">
            <text:p>0.000975107</text:p>
          </table:table-cell>
          <table:table-cell office:value-type="float" office:value="0.000972463" calcext:value-type="float">
            <text:p>0.000972463</text:p>
          </table:table-cell>
          <table:table-cell office:value-type="float" office:value="0.000967705" calcext:value-type="float">
            <text:p>0.000967705</text:p>
          </table:table-cell>
          <table:table-cell office:value-type="float" office:value="0.000963276" calcext:value-type="float">
            <text:p>0.000963276</text:p>
          </table:table-cell>
          <table:table-cell office:value-type="float" office:value="0.000954612999999999" calcext:value-type="float">
            <text:p>0.000954612999999999</text:p>
          </table:table-cell>
          <table:table-cell office:value-type="float" office:value="0.000949875" calcext:value-type="float">
            <text:p>0.000949875</text:p>
          </table:table-cell>
          <table:table-cell office:value-type="float" office:value="0.000945464" calcext:value-type="float">
            <text:p>0.000945464</text:p>
          </table:table-cell>
          <table:table-cell office:value-type="float" office:value="0.000940739" calcext:value-type="float">
            <text:p>0.000940739</text:p>
          </table:table-cell>
          <table:table-cell office:value-type="float" office:value="0.000932102" calcext:value-type="float">
            <text:p>0.000932102</text:p>
          </table:table-cell>
          <table:table-cell office:value-type="float" office:value="0.000929509" calcext:value-type="float">
            <text:p>0.000929509</text:p>
          </table:table-cell>
          <table:table-cell office:value-type="float" office:value="0.000923004" calcext:value-type="float">
            <text:p>0.000923004</text:p>
          </table:table-cell>
          <table:table-cell office:value-type="float" office:value="0.000918304" calcext:value-type="float">
            <text:p>0.000918304</text:p>
          </table:table-cell>
          <table:table-cell office:value-type="float" office:value="0.000911812" calcext:value-type="float">
            <text:p>0.000911812</text:p>
          </table:table-cell>
          <table:table-cell office:value-type="float" office:value="0.000907124" calcext:value-type="float">
            <text:p>0.000907124</text:p>
          </table:table-cell>
          <table:table-cell office:value-type="float" office:value="0.000900645" calcext:value-type="float">
            <text:p>0.000900645</text:p>
          </table:table-cell>
          <table:table-cell office:value-type="float" office:value="0.00089597" calcext:value-type="float">
            <text:p>0.00089597</text:p>
          </table:table-cell>
        </table:table-row>
        <table:table-row table:style-name="ro1">
          <table:table-cell office:value-type="string" calcext:value-type="string">
            <text:p>Convolution, total warming in warming year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" calcext:value-type="float">
            <text:p>0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1621256" calcext:value-type="float">
            <text:p>0.01621256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4363726" calcext:value-type="float">
            <text:p>0.04363726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07927744" calcext:value-type="float">
            <text:p>0.07927744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2020372" calcext:value-type="float">
            <text:p>0.12020372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16469078" calcext:value-type="float">
            <text:p>0.16469078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21171306" calcext:value-type="float">
            <text:p>0.21171306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26058222" calcext:value-type="float">
            <text:p>0.26058222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31076624" calcext:value-type="float">
            <text:p>0.31076624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36193282" calcext:value-type="float">
            <text:p>0.36193282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4137493" calcext:value-type="float">
            <text:p>0.4137493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46598122" calcext:value-type="float">
            <text:p>0.46598122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5184845" calcext:value-type="float">
            <text:p>0.5184845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57108102" calcext:value-type="float">
            <text:p>0.57108102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623672" calcext:value-type="float">
            <text:p>0.623672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67620226" calcext:value-type="float">
            <text:p>0.67620226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7286232" calcext:value-type="float">
            <text:p>0.7286232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78080154" calcext:value-type="float">
            <text:p>0.78080154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83269516" calcext:value-type="float">
            <text:p>0.83269516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88433358" calcext:value-type="float">
            <text:p>0.88433358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93566798" calcext:value-type="float">
            <text:p>0.93566798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0.9866267" calcext:value-type="float">
            <text:p>0.9866267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1.03723964" calcext:value-type="float">
            <text:p>1.03723964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1.087507" calcext:value-type="float">
            <text:p>1.087507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1.1373866" calcext:value-type="float">
            <text:p>1.1373866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1.18687926" calcext:value-type="float">
            <text:p>1.18687926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1.2359786" calcext:value-type="float">
            <text:p>1.2359786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1.28468406" calcext:value-type="float">
            <text:p>1.28468406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1.33299546" calcext:value-type="float">
            <text:p>1.33299546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1.38095542" calcext:value-type="float">
            <text:p>1.38095542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1.42856474" calcext:value-type="float">
            <text:p>1.42856474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1.47581884" calcext:value-type="float">
            <text:p>1.47581884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1.5227194" calcext:value-type="float">
            <text:p>1.5227194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1.56921948" calcext:value-type="float">
            <text:p>1.56921948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1.6154879" calcext:value-type="float">
            <text:p>1.6154879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1.66145696" calcext:value-type="float">
            <text:p>1.66145696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1.70711846" calcext:value-type="float">
            <text:p>1.70711846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1.75247084" calcext:value-type="float">
            <text:p>1.75247084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1.79746918" calcext:value-type="float">
            <text:p>1.79746918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1.84219762" calcext:value-type="float">
            <text:p>1.84219762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1.88658626" calcext:value-type="float">
            <text:p>1.88658626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1.93060606" calcext:value-type="float">
            <text:p>1.93060606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1.9741979" calcext:value-type="float">
            <text:p>1.9741979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2.01749028" calcext:value-type="float">
            <text:p>2.01749028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2.0604427" calcext:value-type="float">
            <text:p>2.0604427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2.10305892" calcext:value-type="float">
            <text:p>2.10305892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2.14546096" calcext:value-type="float">
            <text:p>2.14546096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2.18751992" calcext:value-type="float">
            <text:p>2.18751992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2.22935762" calcext:value-type="float">
            <text:p>2.22935762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2.27097908" calcext:value-type="float">
            <text:p>2.27097908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2.31230132" calcext:value-type="float">
            <text:p>2.31230132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2.35341772" calcext:value-type="float">
            <text:p>2.35341772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2.39416568" calcext:value-type="float">
            <text:p>2.39416568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2.43470104" calcext:value-type="float">
            <text:p>2.43470104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2.47498122" calcext:value-type="float">
            <text:p>2.47498122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2.51508446" calcext:value-type="float">
            <text:p>2.51508446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2.55504656" calcext:value-type="float">
            <text:p>2.55504656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2.5948339" calcext:value-type="float">
            <text:p>2.5948339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2.63440446" calcext:value-type="float">
            <text:p>2.63440446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2.67377632" calcext:value-type="float">
            <text:p>2.67377632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2.71298178" calcext:value-type="float">
            <text:p>2.71298178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2.75197576" calcext:value-type="float">
            <text:p>2.75197576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2.79080488" calcext:value-type="float">
            <text:p>2.79080488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2.82943452" calcext:value-type="float">
            <text:p>2.82943452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2.86789132" calcext:value-type="float">
            <text:p>2.86789132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2.90617676" calcext:value-type="float">
            <text:p>2.90617676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2.94430524" calcext:value-type="float">
            <text:p>2.94430524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2.98230674" calcext:value-type="float">
            <text:p>2.98230674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3.02014878" calcext:value-type="float">
            <text:p>3.02014878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3.0578672" calcext:value-type="float">
            <text:p>3.0578672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3.09546268" calcext:value-type="float">
            <text:p>3.09546268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3.13286164" calcext:value-type="float">
            <text:p>3.13286164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3.17014046" calcext:value-type="float">
            <text:p>3.17014046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3.2072596" calcext:value-type="float">
            <text:p>3.2072596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3.24429644" calcext:value-type="float">
            <text:p>3.24429644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3.28112978" calcext:value-type="float">
            <text:p>3.28112978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3.31780196" calcext:value-type="float">
            <text:p>3.31780196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3.3543922" calcext:value-type="float">
            <text:p>3.3543922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3.39082406" calcext:value-type="float">
            <text:p>3.39082406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3.4271399" calcext:value-type="float">
            <text:p>3.4271399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3.46332672" calcext:value-type="float">
            <text:p>3.46332672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3.49939414" calcext:value-type="float">
            <text:p>3.49939414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3.53535454" calcext:value-type="float">
            <text:p>3.53535454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3.57114642" calcext:value-type="float">
            <text:p>3.57114642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3.6068512" calcext:value-type="float">
            <text:p>3.6068512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3.64241092" calcext:value-type="float">
            <text:p>3.64241092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3.67784116" calcext:value-type="float">
            <text:p>3.67784116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3.7131464" calcext:value-type="float">
            <text:p>3.7131464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3.74835708" calcext:value-type="float">
            <text:p>3.74835708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3.78345146" calcext:value-type="float">
            <text:p>3.78345146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3.81840542" calcext:value-type="float">
            <text:p>3.81840542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3.85326096" calcext:value-type="float">
            <text:p>3.85326096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3.88801354" calcext:value-type="float">
            <text:p>3.88801354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3.92258472" calcext:value-type="float">
            <text:p>3.92258472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3.95703938" calcext:value-type="float">
            <text:p>3.95703938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3.99129862" calcext:value-type="float">
            <text:p>3.99129862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4.0254591" calcext:value-type="float">
            <text:p>4.0254591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4.05941106" calcext:value-type="float">
            <text:p>4.05941106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4.09323964" calcext:value-type="float">
            <text:p>4.09323964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4.12694892" calcext:value-type="float">
            <text:p>4.12694892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4.16058374" calcext:value-type="float">
            <text:p>4.16058374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4.17789176" calcext:value-type="float">
            <text:p>4.17789176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4.1838376" calcext:value-type="float">
            <text:p>4.1838376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4.18145404" calcext:value-type="float">
            <text:p>4.18145404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4.17367062" calcext:value-type="float">
            <text:p>4.17367062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4.16217656" calcext:value-type="float">
            <text:p>4.16217656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4.14807614" calcext:value-type="float">
            <text:p>4.14807614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4.13197956" calcext:value-type="float">
            <text:p>4.13197956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4.11445498" calcext:value-type="float">
            <text:p>4.11445498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4.09587714" calcext:value-type="float">
            <text:p>4.09587714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4.0765006" calcext:value-type="float">
            <text:p>4.0765006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4.05659592" calcext:value-type="float">
            <text:p>4.05659592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4.03627138" calcext:value-type="float">
            <text:p>4.03627138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4.01574756" calcext:value-type="float">
            <text:p>4.01574756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3.99511704" calcext:value-type="float">
            <text:p>3.99511704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3.97447746" calcext:value-type="float">
            <text:p>3.97447746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3.95384162" calcext:value-type="float">
            <text:p>3.95384162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3.9333366" calcext:value-type="float">
            <text:p>3.9333366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3.91300466" calcext:value-type="float">
            <text:p>3.91300466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3.8928228" calcext:value-type="float">
            <text:p>3.8928228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3.87279766" calcext:value-type="float">
            <text:p>3.87279766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3.85307934" calcext:value-type="float">
            <text:p>3.85307934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3.83359578" calcext:value-type="float">
            <text:p>3.83359578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3.81435326" calcext:value-type="float">
            <text:p>3.81435326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3.7953518" calcext:value-type="float">
            <text:p>3.7953518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3.7766267" calcext:value-type="float">
            <text:p>3.7766267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3.75823316" calcext:value-type="float">
            <text:p>3.75823316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3.74012322" calcext:value-type="float">
            <text:p>3.74012322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3.72229722" calcext:value-type="float">
            <text:p>3.72229722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3.70480336" calcext:value-type="float">
            <text:p>3.70480336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3.68755582" calcext:value-type="float">
            <text:p>3.68755582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3.67051698" calcext:value-type="float">
            <text:p>3.67051698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3.65376372" calcext:value-type="float">
            <text:p>3.65376372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3.63726478" calcext:value-type="float">
            <text:p>3.63726478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3.62092986" calcext:value-type="float">
            <text:p>3.62092986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3.6047485" calcext:value-type="float">
            <text:p>3.6047485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3.5887714" calcext:value-type="float">
            <text:p>3.5887714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3.57303626" calcext:value-type="float">
            <text:p>3.57303626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3.5575522" calcext:value-type="float">
            <text:p>3.5575522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3.54218642" calcext:value-type="float">
            <text:p>3.54218642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3.5270578" calcext:value-type="float">
            <text:p>3.5270578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3.5121955" calcext:value-type="float">
            <text:p>3.5121955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3.49769474" calcext:value-type="float">
            <text:p>3.49769474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3.48331286" calcext:value-type="float">
            <text:p>3.48331286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3.4692408" calcext:value-type="float">
            <text:p>3.4692408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3.45540302" calcext:value-type="float">
            <text:p>3.45540302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3.44163526" calcext:value-type="float">
            <text:p>3.44163526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3.42814488" calcext:value-type="float">
            <text:p>3.42814488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3.41473186" calcext:value-type="float">
            <text:p>3.41473186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3.40139872" calcext:value-type="float">
            <text:p>3.40139872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3.38825698" calcext:value-type="float">
            <text:p>3.38825698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3.3752198" calcext:value-type="float">
            <text:p>3.3752198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3.36244348" calcext:value-type="float">
            <text:p>3.36244348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3.34977872" calcext:value-type="float">
            <text:p>3.34977872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3.33726826" calcext:value-type="float">
            <text:p>3.33726826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3.32482756" calcext:value-type="float">
            <text:p>3.32482756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3.31242748" calcext:value-type="float">
            <text:p>3.31242748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3.30010176" calcext:value-type="float">
            <text:p>3.30010176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3.28785014" calcext:value-type="float">
            <text:p>3.28785014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3.27569702" calcext:value-type="float">
            <text:p>3.27569702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3.2636043" calcext:value-type="float">
            <text:p>3.2636043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3.2516236" calcext:value-type="float">
            <text:p>3.2516236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3.23966608" calcext:value-type="float">
            <text:p>3.23966608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3.22784482" calcext:value-type="float">
            <text:p>3.22784482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3.21606158" calcext:value-type="float">
            <text:p>3.21606158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3.20434458" calcext:value-type="float">
            <text:p>3.20434458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3.19268608" calcext:value-type="float">
            <text:p>3.19268608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3.18113456" calcext:value-type="float">
            <text:p>3.18113456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3.16956604" calcext:value-type="float">
            <text:p>3.16956604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3.15798076" calcext:value-type="float">
            <text:p>3.15798076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3.14645652" calcext:value-type="float">
            <text:p>3.14645652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3.13503102" calcext:value-type="float">
            <text:p>3.13503102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3.12358594" calcext:value-type="float">
            <text:p>3.12358594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3.11220342" calcext:value-type="float">
            <text:p>3.11220342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3.1008423" calcext:value-type="float">
            <text:p>3.1008423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3.08954572" calcext:value-type="float">
            <text:p>3.08954572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3.07831396" calcext:value-type="float">
            <text:p>3.07831396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3.06706796" calcext:value-type="float">
            <text:p>3.06706796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3.05584196" calcext:value-type="float">
            <text:p>3.05584196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3.04471444" calcext:value-type="float">
            <text:p>3.04471444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3.03357788" calcext:value-type="float">
            <text:p>3.03357788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3.02246518" calcext:value-type="float">
            <text:p>3.02246518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3.01136414" calcext:value-type="float">
            <text:p>3.01136414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3.00033002" calcext:value-type="float">
            <text:p>3.00033002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2.98929438" calcext:value-type="float">
            <text:p>2.98929438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2.9782666" calcext:value-type="float">
            <text:p>2.9782666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2.96730964" calcext:value-type="float">
            <text:p>2.96730964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2.95638316" calcext:value-type="float">
            <text:p>2.95638316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2.9454145" calcext:value-type="float">
            <text:p>2.9454145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2.93446788" calcext:value-type="float">
            <text:p>2.93446788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2.92356754" calcext:value-type="float">
            <text:p>2.92356754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2.91266518" calcext:value-type="float">
            <text:p>2.91266518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2.90177178" calcext:value-type="float">
            <text:p>2.90177178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2.8909298" calcext:value-type="float">
            <text:p>2.8909298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2.8801039" calcext:value-type="float">
            <text:p>2.8801039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2.8694219" calcext:value-type="float">
            <text:p>2.8694219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2.85870248" calcext:value-type="float">
            <text:p>2.85870248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2.84813384" calcext:value-type="float">
            <text:p>2.84813384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2.83759506" calcext:value-type="float">
            <text:p>2.83759506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2.82707034" calcext:value-type="float">
            <text:p>2.82707034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2.81656246" calcext:value-type="float">
            <text:p>2.81656246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2.80603942" calcext:value-type="float">
            <text:p>2.80603942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2.79556668" calcext:value-type="float">
            <text:p>2.79556668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2.7850787" calcext:value-type="float">
            <text:p>2.7850787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2.7746474" calcext:value-type="float">
            <text:p>2.7746474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2.76427306" calcext:value-type="float">
            <text:p>2.76427306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2.75383468" calcext:value-type="float">
            <text:p>2.75383468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2.74349534" calcext:value-type="float">
            <text:p>2.74349534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2.7331702" calcext:value-type="float">
            <text:p>2.7331702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2.72282338" calcext:value-type="float">
            <text:p>2.72282338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2.71249714" calcext:value-type="float">
            <text:p>2.71249714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2.70218508" calcext:value-type="float">
            <text:p>2.70218508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2.69189356" calcext:value-type="float">
            <text:p>2.69189356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2.6816522" calcext:value-type="float">
            <text:p>2.6816522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2.67143136" calcext:value-type="float">
            <text:p>2.67143136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2.66118872" calcext:value-type="float">
            <text:p>2.66118872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2.6509538" calcext:value-type="float">
            <text:p>2.6509538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2.64073934" calcext:value-type="float">
            <text:p>2.64073934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2.63050294" calcext:value-type="float">
            <text:p>2.63050294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2.6202806" calcext:value-type="float">
            <text:p>2.6202806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2.6101082" calcext:value-type="float">
            <text:p>2.6101082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2.59991388" calcext:value-type="float">
            <text:p>2.59991388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2.58969752" calcext:value-type="float">
            <text:p>2.58969752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2.57948874" calcext:value-type="float">
            <text:p>2.57948874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2.56929386" calcext:value-type="float">
            <text:p>2.56929386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2.5591193" calcext:value-type="float">
            <text:p>2.5591193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2.54887396" calcext:value-type="float">
            <text:p>2.54887396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2.53868486" calcext:value-type="float">
            <text:p>2.53868486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2.52850958" calcext:value-type="float">
            <text:p>2.52850958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2.51826384" calcext:value-type="float">
            <text:p>2.51826384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2.5079904" calcext:value-type="float">
            <text:p>2.5079904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2.49776756" calcext:value-type="float">
            <text:p>2.49776756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2.48748092" calcext:value-type="float">
            <text:p>2.48748092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2.47724478" calcext:value-type="float">
            <text:p>2.47724478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2.46698718" calcext:value-type="float">
            <text:p>2.46698718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2.45670162" calcext:value-type="float">
            <text:p>2.45670162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2.44646648" calcext:value-type="float">
            <text:p>2.44646648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2.43620334" calcext:value-type="float">
            <text:p>2.43620334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2.42595458" calcext:value-type="float">
            <text:p>2.42595458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2.41568418" calcext:value-type="float">
            <text:p>2.41568418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2.40542166" calcext:value-type="float">
            <text:p>2.40542166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2.39517344" calcext:value-type="float">
            <text:p>2.39517344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2.38489714" calcext:value-type="float">
            <text:p>2.38489714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2.37462868" calcext:value-type="float">
            <text:p>2.37462868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2.3643385" calcext:value-type="float">
            <text:p>2.3643385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2.35402014" calcext:value-type="float">
            <text:p>2.35402014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2.34375194" calcext:value-type="float">
            <text:p>2.34375194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2.3334196" calcext:value-type="float">
            <text:p>2.3334196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2.3231374" calcext:value-type="float">
            <text:p>2.3231374</text:p>
          </table:table-cell>
          <table:table-cell table:style-name="ce26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2.31286198" calcext:value-type="float">
            <text:p>2.31286198</text:p>
          </table:table-cell>
          <table:table-cell table:style-name="ce27" table:formula="of:=SUMPRODUCT([.$B$6]:INDEX([.$B$6:.$CW$6]; 1; MIN(COLUMN()-COLUMN([.$B$10])+1; 100)); N(OFFSET([.$B$9]; 0; (COLUMN()-COLUMN([.$B$10]))-(COLUMN([.$B$6]:INDEX([.$B$6:.$CW$6]; 1; MIN(COLUMN()-COLUMN([.$B$10])+1; 100)))-COLUMN([.$B$6])))))" office:value-type="float" office:value="2.30260088" calcext:value-type="float">
            <text:p>2.30260088</text:p>
          </table:table-cell>
        </table:table-row>
        <table:table-row table:style-name="ro1" table:number-rows-repeated="1048565">
          <table:table-cell table:number-columns-repeated="252"/>
        </table:table-row>
        <table:table-row table:style-name="ro1">
          <table:table-cell table:number-columns-repeated="25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">
      <number:number number:decimal-places="6" number:min-decimal-places="6" number:min-integer-digits="1"/>
    </number:number-style>
    <number:percentage-style style:name="N134">
      <number:number number:decimal-places="1" number:min-decimal-places="1" number:min-integer-digits="1"/>
      <number:text>%</number:text>
    </number:percentage-style>
    <number:number-style style:name="N135">
      <number:number number:decimal-places="1" number:min-decimal-places="1" number:min-integer-digits="1" number:grouping="true"/>
    </number:number-style>
    <number:number-style style:name="N136">
      <number:number number:decimal-places="14" number:min-decimal-places="14" number:min-integer-digits="1"/>
    </number:number-style>
    <number:currency-style style:name="N137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7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7P0"/>
    </number:currency-style>
    <number:currency-style style:name="N138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8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8P0"/>
    </number:currency-style>
    <number:currency-style style:name="N139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9P0"/>
    </number:currency-style>
    <number:currency-style style:name="N140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40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0P0"/>
    </number:currency-style>
    <number:date-style style:name="N141">
      <number:month/>
      <number:text>/</number:text>
      <number:day/>
      <number:text>/</number:text>
      <number:year number:style="long"/>
    </number:date-style>
    <number:date-style style:name="N142">
      <number:day/>
      <number:text>-</number:text>
      <number:month number:textual="true"/>
      <number:text>-</number:text>
      <number:year/>
    </number:date-style>
    <number:date-style style:name="N143">
      <number:day/>
      <number:text>-</number:text>
      <number:month number:textual="true"/>
    </number:date-style>
    <number:date-style style:name="N144">
      <number:month number:textual="true"/>
      <number:text>-</number:text>
      <number:year/>
    </number:date-style>
    <number:time-style style:name="N145">
      <number:hours/>
      <number:text>:</number:text>
      <number:minutes number:style="long"/>
      <number:text> </number:text>
      <number:am-pm/>
    </number:time-style>
    <number:time-style style:name="N14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7">
      <number:hours/>
      <number:text>:</number:text>
      <number:minutes number:style="long"/>
    </number:time-style>
    <number:time-style style:name="N148">
      <number:hours/>
      <number:text>:</number:text>
      <number:minutes number:style="long"/>
      <number:text>:</number:text>
      <number:seconds number:style="long"/>
    </number:time-style>
    <number:date-style style:name="N14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50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50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5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2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2P2" style:volatile="true">
      <number:text loext:blank-width-char="("> </number:text>
      <number:fill-character> </number:fill-character>
      <number:text loext:blank-width-char=")1">- </number:text>
    </number:number-style>
    <number:text-style style:name="N152">
      <number:text loext:blank-width-char="("> </number:text>
      <number:text-content/>
      <number:text loext:blank-width-char=")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currency-style style:name="N153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53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3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53">
      <number:text loext:blank-width-char="("> </number:text>
      <number:text-content/>
      <number:text loext:blank-width-char=")"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4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4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4">
      <number:text loext:blank-width-char="("> </number:text>
      <number:text-content/>
      <number:text loext:blank-width-char=")"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number number:decimal-places="4" number:min-decimal-places="4" number:min-integer-digits="1"/>
    </number:number-style>
    <number:number-style style:name="N157">
      <number:number number:decimal-places="1" number:min-decimal-places="1" number:min-integer-digits="1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 loext:blank-width-char=")"> </number:text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  <number:text loext:blank-width-char=")"> </number:text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4P0"/>
    </number:currency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number:currency-style style:name="N10149P0" style:volatile="true" number:language="en" number:country="US">
      <number:currency-symbol number:language="en" number:country="US">$</number:currency-symbol>
      <number:number number:decimal-places="1" number:min-decimal-places="1" number:min-integer-digits="1" number:grouping="true"/>
    </number:currency-style>
    <number:currency-style style:name="N10149" number:language="en" number:country="US">
      <style:text-properties fo:color="#ff0000"/>
      <number:text>-</number:text>
      <number:currency-symbol number:language="en" number:country="US">$</number:currency-symbol>
      <number:number number:decimal-places="1" number:min-decimal-places="1" number:min-integer-digits="1" number:grouping="true"/>
      <style:map style:condition="value()&gt;=0" style:apply-style-name="N10149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draw:marker draw:name="Arrowheads_20_2" draw:display-name="Arrowheads 2" svg:viewBox="-100 -100 200 200" svg:d="M100 0c0 18-5 35-13 50-9 15-22 28-37 37-15 8-32 13-50 13s-35-5-50-13c-15-9-28-22-37-37-8-15-13-32-13-50s5-35 13-50c9-15 22-28 37-37 15-8 32-13 50-13s35 5 50 13c15 9 28 22 37 37 8 15 13 32 13 5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6">00/00/0000</text:date>, <text:time style:data-style-name="N2" text:time-value="12:05:43.501125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lantation_20_example" style:display-name="PageStyle_Plantation exampl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John F. Raffensperger</meta:initial-creator>
    <meta:creation-date>2026-07-02T19:58:07</meta:creation-date>
    <dc:date>2026-07-06T14:28:00.819515000</dc:date>
    <meta:editing-cycles>10</meta:editing-cycles>
    <meta:editing-duration>PT17H28M18S</meta:editing-duration>
    <meta:generator>LibreOffice/26.2.4.2$Windows_X86_64 LibreOffice_project/0229ac93fcf0d7cbc6376066c6f35021cef002dc</meta:generator>
    <meta:document-statistic meta:table-count="2" meta:cell-count="1567" meta:object-count="0"/>
  </office:meta>
</office:document-meta>
</file>