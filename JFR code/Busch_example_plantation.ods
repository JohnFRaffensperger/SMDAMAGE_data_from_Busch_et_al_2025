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54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4.0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lantation_20_examp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03P0"/>
    </number:currency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padding="0.028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81">
      <style:table-cell-properties fo:padding="0.028in"/>
    </style:style>
    <style:style style:name="ce1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25" style:family="table-cell" style:parent-style-name="Default">
      <style:table-cell-properties fo:padding="0.028in"/>
      <style:text-properties style:text-underline-style="none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eeeeee" style:diagonal-bl-tr="none" style:diagonal-tl-br="none" fo:border="0.74pt solid #999999" fo:padding="0.028in" style:rotation-align="none"/>
    </style:style>
    <style:style style:name="ce5" style:family="table-cell" style:parent-style-name="Default" style:data-style-name="N11">
      <style:table-cell-properties fo:padding="0.028in"/>
    </style:style>
    <style:style style:name="ce6" style:family="table-cell" style:parent-style-name="Default" style:data-style-name="N10103">
      <style:table-cell-properties fo:padding="0.028in"/>
    </style:style>
    <style:style style:name="ce7" style:family="table-cell" style:parent-style-name="Default" style:data-style-name="N10">
      <style:table-cell-properties fo:padding="0.028in"/>
    </style:style>
    <style:style style:name="ce8" style:family="table-cell" style:parent-style-name="Default" style:data-style-name="N10103">
      <style:table-cell-properties fo:background-color="#eeeeee" style:diagonal-bl-tr="none" style:diagonal-tl-br="none" fo:border="0.74pt solid #999999" fo:padding="0.028in" style:rotation-align="none"/>
    </style:style>
    <style:style style:name="ce9" style:family="table-cell" style:parent-style-name="Default" style:data-style-name="N135">
      <style:table-cell-properties fo:background-color="#eeeeee" style:diagonal-bl-tr="none" style:diagonal-tl-br="none" fo:border="0.74pt solid #999999" fo:padding="0.028in" style:rotation-align="none"/>
    </style:style>
    <style:style style:name="ce30" style:family="table-cell" style:parent-style-name="Default" style:data-style-name="N4">
      <style:table-cell-properties fo:background-color="#eeeeee" style:diagonal-bl-tr="none" style:diagonal-tl-br="none" fo:border="0.74pt solid #999999" fo:padding="0.028in" style:rotation-align="none"/>
      <style:text-properties fo:font-weight="bold" style:font-weight-asian="bold" style:font-weight-complex="bold"/>
    </style:style>
    <style:style style:name="ce31" style:family="table-cell" style:parent-style-name="Default" style:data-style-name="N135">
      <style:table-cell-properties fo:background-color="#eeeeee" style:diagonal-bl-tr="none" style:diagonal-tl-br="none" fo:border="0.74pt solid #999999" fo:padding="0.028in" style:rotation-align="none"/>
      <style:text-properties fo:font-weight="bold" style:font-weight-asian="bold" style:font-weight-complex="bold"/>
    </style:style>
    <style:style style:name="ce32" style:family="table-cell" style:parent-style-name="Default" style:data-style-name="N103">
      <style:table-cell-properties fo:background-color="#eeeeee" style:diagonal-bl-tr="none" style:diagonal-tl-br="none" fo:border="0.74pt solid #999999" fo:padding="0.028in" style:rotation-align="none"/>
    </style:style>
    <style:style style:name="ce33" style:family="table-cell" style:parent-style-name="Default" style:data-style-name="N103"/>
    <style:style style:name="ce3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04"/>
    <style:style style:name="ce57" style:family="table-cell" style:parent-style-name="Default" style:data-style-name="N3">
      <style:table-cell-properties fo:background-color="#eeeeee" style:diagonal-bl-tr="none" style:diagonal-tl-br="none" fo:border="0.74pt solid #999999" fo:padding="0.028in" style:rotation-align="none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ackground-color="#e6e6e6" fo:border="0.54pt solid #a0a0a0"/>
    </style:style>
    <style:style style:name="ce26" style:family="table-cell" style:parent-style-name="Default">
      <style:table-cell-properties fo:background-color="#e6e6e6" fo:border="0.54pt solid #a0a0a0"/>
    </style:style>
    <style:style style:name="ce38" style:family="table-cell" style:parent-style-name="Default" style:data-style-name="N104">
      <style:table-cell-properties fo:background-color="#e6e6e6" fo:border="0.54pt solid #a0a0a0"/>
      <style:text-properties fo:font-weight="normal" style:font-weight-asian="normal" style:font-weight-complex="normal"/>
    </style:style>
    <style:style style:name="ce39" style:family="table-cell" style:parent-style-name="Default" style:data-style-name="N175"/>
    <style:style style:name="ce40" style:family="table-cell" style:parent-style-name="Default" style:data-style-name="N175">
      <style:table-cell-properties fo:background-color="#e6e6e6" fo:border="0.54pt solid #a0a0a0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#e6e6e6" fo:border="0.54pt solid #a0a0a0"/>
      <style:text-properties fo:font-weight="normal" style:font-weight-asian="normal" style:font-weight-complex="normal"/>
    </style:style>
    <style:style style:name="ce44" style:family="table-cell" style:parent-style-name="Default" style:data-style-name="N175">
      <style:text-properties fo:font-weight="normal" style:font-weight-asian="normal" style:font-weight-complex="normal"/>
    </style:style>
    <style:style style:name="ce45" style:family="table-cell" style:parent-style-name="Default" style:data-style-name="N175">
      <style:table-cell-properties fo:background-color="#e6e6e6" fo:border="0.54pt solid #a0a0a0"/>
      <style:text-properties fo:font-weight="normal" style:font-weight-asian="normal" style:font-weight-complex="normal"/>
    </style:style>
    <style:style style:name="ce46" style:family="table-cell" style:parent-style-name="Default" style:data-style-name="N103">
      <style:table-cell-properties fo:background-color="#e6e6e6" fo:border="0.54pt solid #a0a0a0"/>
      <style:text-properties fo:font-weight="normal" style:font-weight-asian="normal" style:font-weight-complex="normal"/>
    </style:style>
    <style:style style:name="ce47" style:family="table-cell" style:parent-style-name="Default" style:data-style-name="N177"/>
    <style:style style:name="ta_extref" style:family="table">
      <style:table-properties table:display="fals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Plantation examp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2" table:default-cell-style-name="ce2"/>
        <table:table-column table:style-name="co2" table:number-columns-repeated="16131"/>
        <table:table-row table:style-name="ro1">
          <table:table-cell table:style-name="ce1" office:value-type="string" calcext:value-type="string">
            <text:p>Busch 2024 plantation example (same baseline pixel assumptions as NR sheet)</text:p>
          </table:table-cell>
          <table:table-cell table:style-name="ce1"/>
          <table:table-cell table:number-columns-repeated="251"/>
          <table:table-cell table:style-name="Default" table:number-columns-repeated="16131"/>
        </table:table-row>
        <table:table-row table:style-name="ro1">
          <table:table-cell table:style-name="Default" table:number-columns-repeated="2"/>
          <table:table-cell/>
          <table:table-cell table:style-name="Default" office:value-type="string" calcext:value-type="string">
            <text:p>omega[2125], $m/000C</text:p>
          </table:table-cell>
          <table:table-cell table:style-name="ce33" office:value-type="currency" office:currency="USD" office:value="10000" calcext:value-type="currency">
            <text:p>$10,000</text:p>
          </table:table-cell>
          <table:table-cell table:number-columns-repeated="248"/>
          <table:table-cell table:style-name="Default" table:number-columns-repeated="16131"/>
        </table:table-row>
        <table:table-row table:style-name="ro1">
          <table:table-cell office:value-type="string" calcext:value-type="string">
            <text:p>iso</text:p>
          </table:table-cell>
          <table:table-cell table:style-name="ce21" office:value-type="string" calcext:value-type="string">
            <text:p>BRA</text:p>
          </table:table-cell>
          <table:table-cell/>
          <table:table-cell table:style-name="ce21" office:value-type="string" calcext:value-type="string">
            <text:p>Bid</text:p>
          </table:table-cell>
          <table:table-cell table:style-name="ce34" office:value-type="string" calcext:value-type="string">
            <text:p>Omega value</text:p>
          </table:table-cell>
          <table:table-cell table:style-name="Default" office:value-type="string" calcext:value-type="string">
            <text:p>Omega_value - bid</text:p>
          </table:table-cell>
          <table:table-cell table:number-columns-repeated="247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_genus</text:p>
          </table:table-cell>
          <table:table-cell table:style-name="ce21" office:value-type="string" calcext:value-type="string">
            <text:p>pinu</text:p>
          </table:table-cell>
          <table:table-cell/>
          <table:table-cell table:style-name="ce32" table:formula="of:=[.C47]" office:value-type="currency" office:currency="USD" office:value="2116.75459826697" calcext:value-type="currency">
            <text:p>$2,117</text:p>
          </table:table-cell>
          <table:table-cell table:style-name="ce32" table:formula="of:=MAX([$Convolution.B11:.CX11])" office:value-type="currency" office:currency="USD" office:value="1990.92762082126" calcext:value-type="currency">
            <text:p>$1,991</text:p>
          </table:table-cell>
          <table:table-cell table:style-name="ce35" table:formula="of:=[.E4]-[.D4]" office:value-type="currency" office:currency="USD" office:value="-125.826977445707" calcext:value-type="currency">
            <text:p>-$125.83</text:p>
          </table:table-cell>
          <table:table-cell table:style-name="Default" table:number-columns-repeated="119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3" office:value-type="string" calcext:value-type="string">
            <text:p>selected_plantation_rotation_year (mapped)</text:p>
          </table:table-cell>
          <table:table-cell table:style-name="ce25" office:value-type="float" office:value="88" calcext:value-type="float">
            <text:p>88</text:p>
          </table:table-cell>
          <table:table-cell table:style-name="ce3" table:number-columns-repeated="2"/>
          <table:table-cell table:style-name="ce55" office:value-type="string" calcext:value-type="string">
            <text:p>Best contract_length, years:</text:p>
          </table:table-cell>
          <table:table-cell table:style-name="ce57" table:formula="of:=MATCH([.E4];[$Convolution.B11:.FM11];0)" office:value-type="float" office:value="89" calcext:value-type="float">
            <text:p>89</text:p>
          </table:table-cell>
          <table:table-cell table:style-name="Default" table:number-columns-repeated="119"/>
          <table:table-cell table:number-columns-repeated="128"/>
          <table:table-cell table:style-name="Default" table:number-columns-repeated="16131"/>
        </table:table-row>
        <table:table-row table:style-name="ro1">
          <table:table-cell office:value-type="string" calcext:value-type="string">
            <text:p>Chapman growth factor, pl_A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22"/>
          <table:table-cell table:number-columns-repeated="128"/>
          <table:table-cell table:style-name="Default" table:number-columns-repeated="16131"/>
        </table:table-row>
        <table:table-row table:style-name="ro1">
          <table:table-cell office:value-type="string" calcext:value-type="string">
            <text:p>Chapman growth factor, pl_k</text:p>
          </table:table-cell>
          <table:table-cell office:value-type="float" office:value="0.03" calcext:value-type="float">
            <text:p>0.03</text:p>
          </table:table-cell>
          <table:table-cell table:style-name="Default"/>
          <table:table-cell/>
          <table:table-cell table:style-name="Default" table:number-columns-repeated="121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4" office:value-type="string" calcext:value-type="string">
            <text:p>PLANTATION_SOIL_C</text:p>
          </table:table-cell>
          <table:table-cell office:value-type="float" office:value="0.092749069" calcext:value-type="float">
            <text:p>0.092749069</text:p>
          </table:table-cell>
          <table:table-cell table:number-columns-repeated="2"/>
          <table:table-cell table:style-name="Default" table:number-columns-repeated="121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0" office:value-type="string" calcext:value-type="string">
            <text:p>pl_rootshoot</text:p>
          </table:table-cell>
          <table:table-cell office:value-type="float" office:value="0.26" calcext:value-type="float">
            <text:p>0.26</text:p>
          </table:table-cell>
          <table:table-cell table:style-name="Default" table:number-columns-repeated="123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0" office:value-type="string" calcext:value-type="string">
            <text:p>w (wood storage share)</text:p>
          </table:table-cell>
          <table:table-cell office:value-type="float" office:value="0.268" calcext:value-type="float">
            <text:p>0.268</text:p>
          </table:table-cell>
          <table:table-cell table:style-name="Default" table:number-columns-repeated="123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1" office:value-type="string" calcext:value-type="string">
            <text:p>AGB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style-name="Default" table:number-columns-repeated="122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1" office:value-type="string" calcext:value-type="string">
            <text:p>BGB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style-name="Default" table:number-columns-repeated="122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1" office:value-type="string" calcext:value-type="string">
            <text:p>SOIL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11" office:value-type="string" calcext:value-type="string">
            <text:p>HARVEST_C_POOL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inary switch, include pool or not</text:p>
          </table:table-cell>
          <table:table-cell table:number-columns-repeated="3"/>
          <table:table-cell office:value-type="string" calcext:value-type="string">
            <text:p>Present value of harvest revenue is small, while the warming impact is large. Never harvest!</text:p>
          </table:table-cell>
          <table:table-cell table:number-columns-repeated="246"/>
          <table:table-cell table:style-name="Default" table:number-columns-repeated="16131"/>
        </table:table-row>
        <table:table-row table:style-name="ro1">
          <table:table-cell table:style-name="ce19"/>
          <table:table-cell table:style-name="Default" table:number-columns-repeated="2"/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style-name="ce12" office:value-type="string" calcext:value-type="string">
            <text:p>g_harvested_cum_tC_per_ha</text:p>
          </table:table-cell>
          <table:table-cell table:style-name="ce13" table:formula="of:=[.$B$6]*(1-EXP(-[.$B$7]*[.B$16]))^2*IF([.B16]=[.$B$5];1;0)" office:value-type="float" office:value="0" calcext:value-type="float">
            <text:p>0.00</text:p>
          </table:table-cell>
          <table:table-cell table:style-name="ce13" table:formula="of:=[.B$17]+[.$B$6]*(1-EXP(-[.$B$7]*[.C$16]))^2*IF([.C16]=[.$B$5];1;0)" office:value-type="float" office:value="0" calcext:value-type="float">
            <text:p>0.00</text:p>
          </table:table-cell>
          <table:table-cell table:style-name="ce13" table:formula="of:=[.C$17]+[.$B$6]*(1-EXP(-[.$B$7]*[.D$16]))^2*IF([.D16]=[.$B$5];1;0)" office:value-type="float" office:value="0" calcext:value-type="float">
            <text:p>0.00</text:p>
          </table:table-cell>
          <table:table-cell table:style-name="ce13" table:formula="of:=[.D$17]+[.$B$6]*(1-EXP(-[.$B$7]*[.E$16]))^2*IF([.E16]=[.$B$5];1;0)" office:value-type="float" office:value="0" calcext:value-type="float">
            <text:p>0.00</text:p>
          </table:table-cell>
          <table:table-cell table:style-name="ce13" table:formula="of:=[.E$17]+[.$B$6]*(1-EXP(-[.$B$7]*[.F$16]))^2*IF([.F16]=[.$B$5];1;0)" office:value-type="float" office:value="0" calcext:value-type="float">
            <text:p>0.00</text:p>
          </table:table-cell>
          <table:table-cell table:style-name="ce13" table:formula="of:=[.F$17]+[.$B$6]*(1-EXP(-[.$B$7]*[.G$16]))^2*IF([.G16]=[.$B$5];1;0)" office:value-type="float" office:value="0" calcext:value-type="float">
            <text:p>0.00</text:p>
          </table:table-cell>
          <table:table-cell table:style-name="ce13" table:formula="of:=[.G$17]+[.$B$6]*(1-EXP(-[.$B$7]*[.H$16]))^2*IF([.H16]=[.$B$5];1;0)" office:value-type="float" office:value="0" calcext:value-type="float">
            <text:p>0.00</text:p>
          </table:table-cell>
          <table:table-cell table:style-name="ce13" table:formula="of:=[.H$17]+[.$B$6]*(1-EXP(-[.$B$7]*[.I$16]))^2*IF([.I16]=[.$B$5];1;0)" office:value-type="float" office:value="0" calcext:value-type="float">
            <text:p>0.00</text:p>
          </table:table-cell>
          <table:table-cell table:style-name="ce13" table:formula="of:=[.I$17]+[.$B$6]*(1-EXP(-[.$B$7]*[.J$16]))^2*IF([.J16]=[.$B$5];1;0)" office:value-type="float" office:value="0" calcext:value-type="float">
            <text:p>0.00</text:p>
          </table:table-cell>
          <table:table-cell table:style-name="ce13" table:formula="of:=[.J$17]+[.$B$6]*(1-EXP(-[.$B$7]*[.K$16]))^2*IF([.K16]=[.$B$5];1;0)" office:value-type="float" office:value="0" calcext:value-type="float">
            <text:p>0.00</text:p>
          </table:table-cell>
          <table:table-cell table:style-name="ce13" table:formula="of:=[.K$17]+[.$B$6]*(1-EXP(-[.$B$7]*[.L$16]))^2*IF([.L16]=[.$B$5];1;0)" office:value-type="float" office:value="0" calcext:value-type="float">
            <text:p>0.00</text:p>
          </table:table-cell>
          <table:table-cell table:style-name="ce13" table:formula="of:=[.L$17]+[.$B$6]*(1-EXP(-[.$B$7]*[.M$16]))^2*IF([.M16]=[.$B$5];1;0)" office:value-type="float" office:value="0" calcext:value-type="float">
            <text:p>0.00</text:p>
          </table:table-cell>
          <table:table-cell table:style-name="ce13" table:formula="of:=[.M$17]+[.$B$6]*(1-EXP(-[.$B$7]*[.N$16]))^2*IF([.N16]=[.$B$5];1;0)" office:value-type="float" office:value="0" calcext:value-type="float">
            <text:p>0.00</text:p>
          </table:table-cell>
          <table:table-cell table:style-name="ce13" table:formula="of:=[.N$17]+[.$B$6]*(1-EXP(-[.$B$7]*[.O$16]))^2*IF([.O16]=[.$B$5];1;0)" office:value-type="float" office:value="0" calcext:value-type="float">
            <text:p>0.00</text:p>
          </table:table-cell>
          <table:table-cell table:style-name="ce13" table:formula="of:=[.O$17]+[.$B$6]*(1-EXP(-[.$B$7]*[.P$16]))^2*IF([.P16]=[.$B$5];1;0)" office:value-type="float" office:value="0" calcext:value-type="float">
            <text:p>0.00</text:p>
          </table:table-cell>
          <table:table-cell table:style-name="ce13" table:formula="of:=[.P$17]+[.$B$6]*(1-EXP(-[.$B$7]*[.Q$16]))^2*IF([.Q16]=[.$B$5];1;0)" office:value-type="float" office:value="0" calcext:value-type="float">
            <text:p>0.00</text:p>
          </table:table-cell>
          <table:table-cell table:style-name="ce13" table:formula="of:=[.Q$17]+[.$B$6]*(1-EXP(-[.$B$7]*[.R$16]))^2*IF([.R16]=[.$B$5];1;0)" office:value-type="float" office:value="0" calcext:value-type="float">
            <text:p>0.00</text:p>
          </table:table-cell>
          <table:table-cell table:style-name="ce13" table:formula="of:=[.R$17]+[.$B$6]*(1-EXP(-[.$B$7]*[.S$16]))^2*IF([.S16]=[.$B$5];1;0)" office:value-type="float" office:value="0" calcext:value-type="float">
            <text:p>0.00</text:p>
          </table:table-cell>
          <table:table-cell table:style-name="ce13" table:formula="of:=[.S$17]+[.$B$6]*(1-EXP(-[.$B$7]*[.T$16]))^2*IF([.T16]=[.$B$5];1;0)" office:value-type="float" office:value="0" calcext:value-type="float">
            <text:p>0.00</text:p>
          </table:table-cell>
          <table:table-cell table:style-name="ce13" table:formula="of:=[.T$17]+[.$B$6]*(1-EXP(-[.$B$7]*[.U$16]))^2*IF([.U16]=[.$B$5];1;0)" office:value-type="float" office:value="0" calcext:value-type="float">
            <text:p>0.00</text:p>
          </table:table-cell>
          <table:table-cell table:style-name="ce13" table:formula="of:=[.U$17]+[.$B$6]*(1-EXP(-[.$B$7]*[.V$16]))^2*IF([.V16]=[.$B$5];1;0)" office:value-type="float" office:value="0" calcext:value-type="float">
            <text:p>0.00</text:p>
          </table:table-cell>
          <table:table-cell table:style-name="ce13" table:formula="of:=[.V$17]+[.$B$6]*(1-EXP(-[.$B$7]*[.W$16]))^2*IF([.W16]=[.$B$5];1;0)" office:value-type="float" office:value="0" calcext:value-type="float">
            <text:p>0.00</text:p>
          </table:table-cell>
          <table:table-cell table:style-name="ce13" table:formula="of:=[.W$17]+[.$B$6]*(1-EXP(-[.$B$7]*[.X$16]))^2*IF([.X16]=[.$B$5];1;0)" office:value-type="float" office:value="0" calcext:value-type="float">
            <text:p>0.00</text:p>
          </table:table-cell>
          <table:table-cell table:style-name="ce13" table:formula="of:=[.X$17]+[.$B$6]*(1-EXP(-[.$B$7]*[.Y$16]))^2*IF([.Y16]=[.$B$5];1;0)" office:value-type="float" office:value="0" calcext:value-type="float">
            <text:p>0.00</text:p>
          </table:table-cell>
          <table:table-cell table:style-name="ce13" table:formula="of:=[.Y$17]+[.$B$6]*(1-EXP(-[.$B$7]*[.Z$16]))^2*IF([.Z16]=[.$B$5];1;0)" office:value-type="float" office:value="0" calcext:value-type="float">
            <text:p>0.00</text:p>
          </table:table-cell>
          <table:table-cell table:style-name="ce13" table:formula="of:=[.Z$17]+[.$B$6]*(1-EXP(-[.$B$7]*[.AA$16]))^2*IF([.AA16]=[.$B$5];1;0)" office:value-type="float" office:value="0" calcext:value-type="float">
            <text:p>0.00</text:p>
          </table:table-cell>
          <table:table-cell table:style-name="ce13" table:formula="of:=[.AA$17]+[.$B$6]*(1-EXP(-[.$B$7]*[.AB$16]))^2*IF([.AB16]=[.$B$5];1;0)" office:value-type="float" office:value="0" calcext:value-type="float">
            <text:p>0.00</text:p>
          </table:table-cell>
          <table:table-cell table:style-name="ce13" table:formula="of:=[.AB$17]+[.$B$6]*(1-EXP(-[.$B$7]*[.AC$16]))^2*IF([.AC16]=[.$B$5];1;0)" office:value-type="float" office:value="0" calcext:value-type="float">
            <text:p>0.00</text:p>
          </table:table-cell>
          <table:table-cell table:style-name="ce13" table:formula="of:=[.AC$17]+[.$B$6]*(1-EXP(-[.$B$7]*[.AD$16]))^2*IF([.AD16]=[.$B$5];1;0)" office:value-type="float" office:value="0" calcext:value-type="float">
            <text:p>0.00</text:p>
          </table:table-cell>
          <table:table-cell table:style-name="ce13" table:formula="of:=[.AD$17]+[.$B$6]*(1-EXP(-[.$B$7]*[.AE$16]))^2*IF([.AE16]=[.$B$5];1;0)" office:value-type="float" office:value="0" calcext:value-type="float">
            <text:p>0.00</text:p>
          </table:table-cell>
          <table:table-cell table:style-name="ce13" table:formula="of:=[.AE$17]+[.$B$6]*(1-EXP(-[.$B$7]*[.AF$16]))^2*IF([.AF16]=[.$B$5];1;0)" office:value-type="float" office:value="0" calcext:value-type="float">
            <text:p>0.00</text:p>
          </table:table-cell>
          <table:table-cell table:style-name="ce13" table:formula="of:=[.$B$6]*(1-EXP(-[.$B$7]*[.AG$16]))^2*IF([.AG16]=[.$B$5];1;0)" office:value-type="float" office:value="0" calcext:value-type="float">
            <text:p>0.00</text:p>
          </table:table-cell>
          <table:table-cell table:style-name="ce13" table:formula="of:=[.AG$17]+[.$B$6]*(1-EXP(-[.$B$7]*[.AH$16]))^2*IF([.AH16]=[.$B$5];1;0)" office:value-type="float" office:value="0" calcext:value-type="float">
            <text:p>0.00</text:p>
          </table:table-cell>
          <table:table-cell table:style-name="ce13" table:formula="of:=[.AH$17]+[.$B$6]*(1-EXP(-[.$B$7]*[.AI$16]))^2*IF([.AI16]=[.$B$5];1;0)" office:value-type="float" office:value="0" calcext:value-type="float">
            <text:p>0.00</text:p>
          </table:table-cell>
          <table:table-cell table:style-name="ce13" table:formula="of:=[.AI$17]+[.$B$6]*(1-EXP(-[.$B$7]*[.AJ$16]))^2*IF([.AJ16]=[.$B$5];1;0)" office:value-type="float" office:value="0" calcext:value-type="float">
            <text:p>0.00</text:p>
          </table:table-cell>
          <table:table-cell table:style-name="ce13" table:formula="of:=[.AJ$17]+[.$B$6]*(1-EXP(-[.$B$7]*[.AK$16]))^2*IF([.AK16]=[.$B$5];1;0)" office:value-type="float" office:value="0" calcext:value-type="float">
            <text:p>0.00</text:p>
          </table:table-cell>
          <table:table-cell table:style-name="ce13" table:formula="of:=[.AK$17]+[.$B$6]*(1-EXP(-[.$B$7]*[.AL$16]))^2*IF([.AL16]=[.$B$5];1;0)" office:value-type="float" office:value="0" calcext:value-type="float">
            <text:p>0.00</text:p>
          </table:table-cell>
          <table:table-cell table:style-name="ce13" table:formula="of:=[.AL$17]+[.$B$6]*(1-EXP(-[.$B$7]*[.AM$16]))^2*IF([.AM16]=[.$B$5];1;0)" office:value-type="float" office:value="0" calcext:value-type="float">
            <text:p>0.00</text:p>
          </table:table-cell>
          <table:table-cell table:style-name="ce13" table:formula="of:=[.AM$17]+[.$B$6]*(1-EXP(-[.$B$7]*[.AN$16]))^2*IF([.AN16]=[.$B$5];1;0)" office:value-type="float" office:value="0" calcext:value-type="float">
            <text:p>0.00</text:p>
          </table:table-cell>
          <table:table-cell table:style-name="ce13" table:formula="of:=[.AN$17]+[.$B$6]*(1-EXP(-[.$B$7]*[.AO$16]))^2*IF([.AO16]=[.$B$5];1;0)" office:value-type="float" office:value="0" calcext:value-type="float">
            <text:p>0.00</text:p>
          </table:table-cell>
          <table:table-cell table:style-name="ce13" table:formula="of:=[.AO$17]+[.$B$6]*(1-EXP(-[.$B$7]*[.AP$16]))^2*IF([.AP16]=[.$B$5];1;0)" office:value-type="float" office:value="0" calcext:value-type="float">
            <text:p>0.00</text:p>
          </table:table-cell>
          <table:table-cell table:style-name="ce13" table:formula="of:=[.AP$17]+[.$B$6]*(1-EXP(-[.$B$7]*[.AQ$16]))^2*IF([.AQ16]=[.$B$5];1;0)" office:value-type="float" office:value="0" calcext:value-type="float">
            <text:p>0.00</text:p>
          </table:table-cell>
          <table:table-cell table:style-name="ce13" table:formula="of:=[.AQ$17]+[.$B$6]*(1-EXP(-[.$B$7]*[.AR$16]))^2*IF([.AR16]=[.$B$5];1;0)" office:value-type="float" office:value="0" calcext:value-type="float">
            <text:p>0.00</text:p>
          </table:table-cell>
          <table:table-cell table:style-name="ce13" table:formula="of:=[.AR$17]+[.$B$6]*(1-EXP(-[.$B$7]*[.AS$16]))^2*IF([.AS16]=[.$B$5];1;0)" office:value-type="float" office:value="0" calcext:value-type="float">
            <text:p>0.00</text:p>
          </table:table-cell>
          <table:table-cell table:style-name="ce13" table:formula="of:=[.AS$17]+[.$B$6]*(1-EXP(-[.$B$7]*[.AT$16]))^2*IF([.AT16]=[.$B$5];1;0)" office:value-type="float" office:value="0" calcext:value-type="float">
            <text:p>0.00</text:p>
          </table:table-cell>
          <table:table-cell table:style-name="ce13" table:formula="of:=[.AT$17]+[.$B$6]*(1-EXP(-[.$B$7]*[.AU$16]))^2*IF([.AU16]=[.$B$5];1;0)" office:value-type="float" office:value="0" calcext:value-type="float">
            <text:p>0.00</text:p>
          </table:table-cell>
          <table:table-cell table:style-name="ce13" table:formula="of:=[.AU$17]+[.$B$6]*(1-EXP(-[.$B$7]*[.AV$16]))^2*IF([.AV16]=[.$B$5];1;0)" office:value-type="float" office:value="0" calcext:value-type="float">
            <text:p>0.00</text:p>
          </table:table-cell>
          <table:table-cell table:style-name="ce13" table:formula="of:=[.AV$17]+[.$B$6]*(1-EXP(-[.$B$7]*[.AW$16]))^2*IF([.AW16]=[.$B$5];1;0)" office:value-type="float" office:value="0" calcext:value-type="float">
            <text:p>0.00</text:p>
          </table:table-cell>
          <table:table-cell table:style-name="ce13" table:formula="of:=[.AW$17]+[.$B$6]*(1-EXP(-[.$B$7]*[.AX$16]))^2*IF([.AX16]=[.$B$5];1;0)" office:value-type="float" office:value="0" calcext:value-type="float">
            <text:p>0.00</text:p>
          </table:table-cell>
          <table:table-cell table:style-name="ce13" table:formula="of:=[.AX$17]+[.$B$6]*(1-EXP(-[.$B$7]*[.AY$16]))^2*IF([.AY16]=[.$B$5];1;0)" office:value-type="float" office:value="0" calcext:value-type="float">
            <text:p>0.00</text:p>
          </table:table-cell>
          <table:table-cell table:style-name="ce13" table:formula="of:=[.AY$17]+[.$B$6]*(1-EXP(-[.$B$7]*[.AZ$16]))^2*IF([.AZ16]=[.$B$5];1;0)" office:value-type="float" office:value="0" calcext:value-type="float">
            <text:p>0.00</text:p>
          </table:table-cell>
          <table:table-cell table:style-name="ce13" table:formula="of:=[.AZ$17]+[.$B$6]*(1-EXP(-[.$B$7]*[.BA$16]))^2*IF([.BA16]=[.$B$5];1;0)" office:value-type="float" office:value="0" calcext:value-type="float">
            <text:p>0.00</text:p>
          </table:table-cell>
          <table:table-cell table:style-name="ce13" table:formula="of:=[.BA$17]+[.$B$6]*(1-EXP(-[.$B$7]*[.BB$16]))^2*IF([.BB16]=[.$B$5];1;0)" office:value-type="float" office:value="0" calcext:value-type="float">
            <text:p>0.00</text:p>
          </table:table-cell>
          <table:table-cell table:style-name="ce13" table:formula="of:=[.BB$17]+[.$B$6]*(1-EXP(-[.$B$7]*[.BC$16]))^2*IF([.BC16]=[.$B$5];1;0)" office:value-type="float" office:value="0" calcext:value-type="float">
            <text:p>0.00</text:p>
          </table:table-cell>
          <table:table-cell table:style-name="ce13" table:formula="of:=[.BC$17]+[.$B$6]*(1-EXP(-[.$B$7]*[.BD$16]))^2*IF([.BD16]=[.$B$5];1;0)" office:value-type="float" office:value="0" calcext:value-type="float">
            <text:p>0.00</text:p>
          </table:table-cell>
          <table:table-cell table:style-name="ce13" table:formula="of:=[.BD$17]+[.$B$6]*(1-EXP(-[.$B$7]*[.BE$16]))^2*IF([.BE16]=[.$B$5];1;0)" office:value-type="float" office:value="0" calcext:value-type="float">
            <text:p>0.00</text:p>
          </table:table-cell>
          <table:table-cell table:style-name="ce13" table:formula="of:=[.BE$17]+[.$B$6]*(1-EXP(-[.$B$7]*[.BF$16]))^2*IF([.BF16]=[.$B$5];1;0)" office:value-type="float" office:value="0" calcext:value-type="float">
            <text:p>0.00</text:p>
          </table:table-cell>
          <table:table-cell table:style-name="ce13" table:formula="of:=[.BF$17]+[.$B$6]*(1-EXP(-[.$B$7]*[.BG$16]))^2*IF([.BG16]=[.$B$5];1;0)" office:value-type="float" office:value="0" calcext:value-type="float">
            <text:p>0.00</text:p>
          </table:table-cell>
          <table:table-cell table:style-name="ce13" table:formula="of:=[.BG$17]+[.$B$6]*(1-EXP(-[.$B$7]*[.BH$16]))^2*IF([.BH16]=[.$B$5];1;0)" office:value-type="float" office:value="0" calcext:value-type="float">
            <text:p>0.00</text:p>
          </table:table-cell>
          <table:table-cell table:style-name="ce13" table:formula="of:=[.BH$17]+[.$B$6]*(1-EXP(-[.$B$7]*[.BI$16]))^2*IF([.BI16]=[.$B$5];1;0)" office:value-type="float" office:value="0" calcext:value-type="float">
            <text:p>0.00</text:p>
          </table:table-cell>
          <table:table-cell table:style-name="ce13" table:formula="of:=[.BI$17]+[.$B$6]*(1-EXP(-[.$B$7]*[.BJ$16]))^2*IF([.BJ16]=[.$B$5];1;0)" office:value-type="float" office:value="0" calcext:value-type="float">
            <text:p>0.00</text:p>
          </table:table-cell>
          <table:table-cell table:style-name="ce13" table:formula="of:=[.BJ$17]+[.$B$6]*(1-EXP(-[.$B$7]*[.BK$16]))^2*IF([.BK16]=[.$B$5];1;0)" office:value-type="float" office:value="0" calcext:value-type="float">
            <text:p>0.00</text:p>
          </table:table-cell>
          <table:table-cell table:style-name="ce13" table:formula="of:=[.BK$17]+[.$B$6]*(1-EXP(-[.$B$7]*[.BL$16]))^2*IF([.BL16]=[.$B$5];1;0)" office:value-type="float" office:value="0" calcext:value-type="float">
            <text:p>0.00</text:p>
          </table:table-cell>
          <table:table-cell table:style-name="ce13" table:formula="of:=[.BL$17]+[.$B$6]*(1-EXP(-[.$B$7]*[.BM$16]))^2*IF([.BM16]=[.$B$5];1;0)" office:value-type="float" office:value="0" calcext:value-type="float">
            <text:p>0.00</text:p>
          </table:table-cell>
          <table:table-cell table:style-name="ce13" table:formula="of:=[.BM$17]+[.$B$6]*(1-EXP(-[.$B$7]*[.BN$16]))^2*IF([.BN16]=[.$B$5];1;0)" office:value-type="float" office:value="0" calcext:value-type="float">
            <text:p>0.00</text:p>
          </table:table-cell>
          <table:table-cell table:style-name="ce13" table:formula="of:=[.BN$17]+[.$B$6]*(1-EXP(-[.$B$7]*[.BO$16]))^2*IF([.BO16]=[.$B$5];1;0)" office:value-type="float" office:value="0" calcext:value-type="float">
            <text:p>0.00</text:p>
          </table:table-cell>
          <table:table-cell table:style-name="ce13" table:formula="of:=[.BO$17]+[.$B$6]*(1-EXP(-[.$B$7]*[.BP$16]))^2*IF([.BP16]=[.$B$5];1;0)" office:value-type="float" office:value="0" calcext:value-type="float">
            <text:p>0.00</text:p>
          </table:table-cell>
          <table:table-cell table:style-name="ce13" table:formula="of:=[.BP$17]+[.$B$6]*(1-EXP(-[.$B$7]*[.BQ$16]))^2*IF([.BQ16]=[.$B$5];1;0)" office:value-type="float" office:value="0" calcext:value-type="float">
            <text:p>0.00</text:p>
          </table:table-cell>
          <table:table-cell table:style-name="ce13" table:formula="of:=[.BQ$17]+[.$B$6]*(1-EXP(-[.$B$7]*[.BR$16]))^2*IF([.BR16]=[.$B$5];1;0)" office:value-type="float" office:value="0" calcext:value-type="float">
            <text:p>0.00</text:p>
          </table:table-cell>
          <table:table-cell table:style-name="ce13" table:formula="of:=[.BR$17]+[.$B$6]*(1-EXP(-[.$B$7]*[.BS$16]))^2*IF([.BS16]=[.$B$5];1;0)" office:value-type="float" office:value="0" calcext:value-type="float">
            <text:p>0.00</text:p>
          </table:table-cell>
          <table:table-cell table:style-name="ce13" table:formula="of:=[.BS$17]+[.$B$6]*(1-EXP(-[.$B$7]*[.BT$16]))^2*IF([.BT16]=[.$B$5];1;0)" office:value-type="float" office:value="0" calcext:value-type="float">
            <text:p>0.00</text:p>
          </table:table-cell>
          <table:table-cell table:style-name="ce13" table:formula="of:=[.BT$17]+[.$B$6]*(1-EXP(-[.$B$7]*[.BU$16]))^2*IF([.BU16]=[.$B$5];1;0)" office:value-type="float" office:value="0" calcext:value-type="float">
            <text:p>0.00</text:p>
          </table:table-cell>
          <table:table-cell table:style-name="ce13" table:formula="of:=[.BU$17]+[.$B$6]*(1-EXP(-[.$B$7]*[.BV$16]))^2*IF([.BV16]=[.$B$5];1;0)" office:value-type="float" office:value="0" calcext:value-type="float">
            <text:p>0.00</text:p>
          </table:table-cell>
          <table:table-cell table:style-name="ce13" table:formula="of:=[.BV$17]+[.$B$6]*(1-EXP(-[.$B$7]*[.BW$16]))^2*IF([.BW16]=[.$B$5];1;0)" office:value-type="float" office:value="0" calcext:value-type="float">
            <text:p>0.00</text:p>
          </table:table-cell>
          <table:table-cell table:style-name="ce13" table:formula="of:=[.BW$17]+[.$B$6]*(1-EXP(-[.$B$7]*[.BX$16]))^2*IF([.BX16]=[.$B$5];1;0)" office:value-type="float" office:value="0" calcext:value-type="float">
            <text:p>0.00</text:p>
          </table:table-cell>
          <table:table-cell table:style-name="ce13" table:formula="of:=[.BX$17]+[.$B$6]*(1-EXP(-[.$B$7]*[.BY$16]))^2*IF([.BY16]=[.$B$5];1;0)" office:value-type="float" office:value="0" calcext:value-type="float">
            <text:p>0.00</text:p>
          </table:table-cell>
          <table:table-cell table:style-name="ce13" table:formula="of:=[.BY$17]+[.$B$6]*(1-EXP(-[.$B$7]*[.BZ$16]))^2*IF([.BZ16]=[.$B$5];1;0)" office:value-type="float" office:value="0" calcext:value-type="float">
            <text:p>0.00</text:p>
          </table:table-cell>
          <table:table-cell table:style-name="ce13" table:formula="of:=[.BZ$17]+[.$B$6]*(1-EXP(-[.$B$7]*[.CA$16]))^2*IF([.CA16]=[.$B$5];1;0)" office:value-type="float" office:value="0" calcext:value-type="float">
            <text:p>0.00</text:p>
          </table:table-cell>
          <table:table-cell table:style-name="ce13" table:formula="of:=[.CA$17]+[.$B$6]*(1-EXP(-[.$B$7]*[.CB$16]))^2*IF([.CB16]=[.$B$5];1;0)" office:value-type="float" office:value="0" calcext:value-type="float">
            <text:p>0.00</text:p>
          </table:table-cell>
          <table:table-cell table:style-name="ce13" table:formula="of:=[.CB$17]+[.$B$6]*(1-EXP(-[.$B$7]*[.CC$16]))^2*IF([.CC16]=[.$B$5];1;0)" office:value-type="float" office:value="0" calcext:value-type="float">
            <text:p>0.00</text:p>
          </table:table-cell>
          <table:table-cell table:style-name="ce13" table:formula="of:=[.CC$17]+[.$B$6]*(1-EXP(-[.$B$7]*[.CD$16]))^2*IF([.CD16]=[.$B$5];1;0)" office:value-type="float" office:value="0" calcext:value-type="float">
            <text:p>0.00</text:p>
          </table:table-cell>
          <table:table-cell table:style-name="ce13" table:formula="of:=[.CD$17]+[.$B$6]*(1-EXP(-[.$B$7]*[.CE$16]))^2*IF([.CE16]=[.$B$5];1;0)" office:value-type="float" office:value="0" calcext:value-type="float">
            <text:p>0.00</text:p>
          </table:table-cell>
          <table:table-cell table:style-name="ce13" table:formula="of:=[.CE$17]+[.$B$6]*(1-EXP(-[.$B$7]*[.CF$16]))^2*IF([.CF16]=[.$B$5];1;0)" office:value-type="float" office:value="0" calcext:value-type="float">
            <text:p>0.00</text:p>
          </table:table-cell>
          <table:table-cell table:style-name="ce13" table:formula="of:=[.CF$17]+[.$B$6]*(1-EXP(-[.$B$7]*[.CG$16]))^2*IF([.CG16]=[.$B$5];1;0)" office:value-type="float" office:value="0" calcext:value-type="float">
            <text:p>0.00</text:p>
          </table:table-cell>
          <table:table-cell table:style-name="ce13" table:formula="of:=[.CG$17]+[.$B$6]*(1-EXP(-[.$B$7]*[.CH$16]))^2*IF([.CH16]=[.$B$5];1;0)" office:value-type="float" office:value="0" calcext:value-type="float">
            <text:p>0.00</text:p>
          </table:table-cell>
          <table:table-cell table:style-name="ce13" table:formula="of:=[.CH$17]+[.$B$6]*(1-EXP(-[.$B$7]*[.CI$16]))^2*IF([.CI16]=[.$B$5];1;0)" office:value-type="float" office:value="0" calcext:value-type="float">
            <text:p>0.00</text:p>
          </table:table-cell>
          <table:table-cell table:style-name="ce13" table:formula="of:=[.CI$17]+[.$B$6]*(1-EXP(-[.$B$7]*[.CJ$16]))^2*IF([.CJ16]=[.$B$5];1;0)" office:value-type="float" office:value="0" calcext:value-type="float">
            <text:p>0.00</text:p>
          </table:table-cell>
          <table:table-cell table:style-name="ce13" table:formula="of:=[.CJ$17]+[.$B$6]*(1-EXP(-[.$B$7]*[.CK$16]))^2*IF([.CK16]=[.$B$5];1;0)" office:value-type="float" office:value="68.9895913343942" calcext:value-type="float">
            <text:p>68.99</text:p>
          </table:table-cell>
          <table:table-cell table:style-name="ce13" table:formula="of:=[.CK$17]+[.$B$6]*(1-EXP(-[.$B$7]*[.CL$16]))^2*IF([.CL16]=[.$B$5];1;0)" office:value-type="float" office:value="68.9895913343942" calcext:value-type="float">
            <text:p>68.99</text:p>
          </table:table-cell>
          <table:table-cell table:style-name="ce13" table:formula="of:=[.CL$17]+[.$B$6]*(1-EXP(-[.$B$7]*[.CM$16]))^2*IF([.CM16]=[.$B$5];1;0)" office:value-type="float" office:value="68.9895913343942" calcext:value-type="float">
            <text:p>68.99</text:p>
          </table:table-cell>
          <table:table-cell table:style-name="ce13" table:formula="of:=[.CM$17]+[.$B$6]*(1-EXP(-[.$B$7]*[.CN$16]))^2*IF([.CN16]=[.$B$5];1;0)" office:value-type="float" office:value="68.9895913343942" calcext:value-type="float">
            <text:p>68.99</text:p>
          </table:table-cell>
          <table:table-cell table:style-name="ce13" table:formula="of:=[.CN$17]+[.$B$6]*(1-EXP(-[.$B$7]*[.CO$16]))^2*IF([.CO16]=[.$B$5];1;0)" office:value-type="float" office:value="68.9895913343942" calcext:value-type="float">
            <text:p>68.99</text:p>
          </table:table-cell>
          <table:table-cell table:style-name="ce13" table:formula="of:=[.CO$17]+[.$B$6]*(1-EXP(-[.$B$7]*[.CP$16]))^2*IF([.CP16]=[.$B$5];1;0)" office:value-type="float" office:value="68.9895913343942" calcext:value-type="float">
            <text:p>68.99</text:p>
          </table:table-cell>
          <table:table-cell table:style-name="ce13" table:formula="of:=[.CP$17]+[.$B$6]*(1-EXP(-[.$B$7]*[.CQ$16]))^2*IF([.CQ16]=[.$B$5];1;0)" office:value-type="float" office:value="68.9895913343942" calcext:value-type="float">
            <text:p>68.99</text:p>
          </table:table-cell>
          <table:table-cell table:style-name="ce13" table:formula="of:=[.CQ$17]+[.$B$6]*(1-EXP(-[.$B$7]*[.CR$16]))^2*IF([.CR16]=[.$B$5];1;0)" office:value-type="float" office:value="68.9895913343942" calcext:value-type="float">
            <text:p>68.99</text:p>
          </table:table-cell>
          <table:table-cell table:style-name="ce13" table:formula="of:=[.CR$17]+[.$B$6]*(1-EXP(-[.$B$7]*[.CS$16]))^2*IF([.CS16]=[.$B$5];1;0)" office:value-type="float" office:value="68.9895913343942" calcext:value-type="float">
            <text:p>68.99</text:p>
          </table:table-cell>
          <table:table-cell table:style-name="ce13" table:formula="of:=[.CS$17]+[.$B$6]*(1-EXP(-[.$B$7]*[.CT$16]))^2*IF([.CT16]=[.$B$5];1;0)" office:value-type="float" office:value="68.9895913343942" calcext:value-type="float">
            <text:p>68.99</text:p>
          </table:table-cell>
          <table:table-cell table:style-name="ce13" table:formula="of:=[.CT$17]+[.$B$6]*(1-EXP(-[.$B$7]*[.CU$16]))^2*IF([.CU16]=[.$B$5];1;0)" office:value-type="float" office:value="68.9895913343942" calcext:value-type="float">
            <text:p>68.99</text:p>
          </table:table-cell>
          <table:table-cell table:style-name="ce13" table:formula="of:=[.CU$17]+[.$B$6]*(1-EXP(-[.$B$7]*[.CV$16]))^2*IF([.CV16]=[.$B$5];1;0)" office:value-type="float" office:value="68.9895913343942" calcext:value-type="float">
            <text:p>68.99</text:p>
          </table:table-cell>
          <table:table-cell table:style-name="ce13" table:formula="of:=[.CV$17]+[.$B$6]*(1-EXP(-[.$B$7]*[.CW$16]))^2*IF([.CW16]=[.$B$5];1;0)" office:value-type="float" office:value="68.9895913343942" calcext:value-type="float">
            <text:p>68.99</text:p>
          </table:table-cell>
          <table:table-cell table:style-name="ce13" table:formula="of:=[.CW$17]+[.$B$6]*(1-EXP(-[.$B$7]*[.CX$16]))^2*IF([.CX16]=[.$B$5];1;0)" office:value-type="float" office:value="68.9895913343942" calcext:value-type="float">
            <text:p>68.99</text:p>
          </table:table-cell>
          <table:table-cell table:style-name="ce13" table:formula="of:=[.CX$17]+[.$B$6]*(1-EXP(-[.$B$7]*[.CY$16]))^2*IF([.CY16]=[.$B$5];1;0)" office:value-type="float" office:value="68.9895913343942" calcext:value-type="float">
            <text:p>68.99</text:p>
          </table:table-cell>
          <table:table-cell table:style-name="ce13" table:formula="of:=[.CY$17]+[.$B$6]*(1-EXP(-[.$B$7]*[.CZ$16]))^2*IF([.CZ16]=[.$B$5];1;0)" office:value-type="float" office:value="68.9895913343942" calcext:value-type="float">
            <text:p>68.99</text:p>
          </table:table-cell>
          <table:table-cell table:style-name="ce13" table:formula="of:=[.CZ$17]+[.$B$6]*(1-EXP(-[.$B$7]*[.DA$16]))^2*IF([.DA16]=[.$B$5];1;0)" office:value-type="float" office:value="68.9895913343942" calcext:value-type="float">
            <text:p>68.99</text:p>
          </table:table-cell>
          <table:table-cell table:style-name="ce13" table:formula="of:=[.DA$17]+[.$B$6]*(1-EXP(-[.$B$7]*[.DB$16]))^2*IF([.DB16]=[.$B$5];1;0)" office:value-type="float" office:value="68.9895913343942" calcext:value-type="float">
            <text:p>68.99</text:p>
          </table:table-cell>
          <table:table-cell table:style-name="ce13" table:formula="of:=[.DB$17]+[.$B$6]*(1-EXP(-[.$B$7]*[.DC$16]))^2*IF([.DC16]=[.$B$5];1;0)" office:value-type="float" office:value="68.9895913343942" calcext:value-type="float">
            <text:p>68.99</text:p>
          </table:table-cell>
          <table:table-cell table:style-name="ce13" table:formula="of:=[.DC$17]+[.$B$6]*(1-EXP(-[.$B$7]*[.DD$16]))^2*IF([.DD16]=[.$B$5];1;0)" office:value-type="float" office:value="68.9895913343942" calcext:value-type="float">
            <text:p>68.99</text:p>
          </table:table-cell>
          <table:table-cell table:style-name="ce13" table:formula="of:=[.DD$17]+[.$B$6]*(1-EXP(-[.$B$7]*[.DE$16]))^2*IF([.DE16]=[.$B$5];1;0)" office:value-type="float" office:value="68.9895913343942" calcext:value-type="float">
            <text:p>68.99</text:p>
          </table:table-cell>
          <table:table-cell table:style-name="ce13" table:formula="of:=[.DE$17]+[.$B$6]*(1-EXP(-[.$B$7]*[.DF$16]))^2*IF([.DF16]=[.$B$5];1;0)" office:value-type="float" office:value="68.9895913343942" calcext:value-type="float">
            <text:p>68.99</text:p>
          </table:table-cell>
          <table:table-cell table:style-name="ce13" table:formula="of:=[.DF$17]+[.$B$6]*(1-EXP(-[.$B$7]*[.DG$16]))^2*IF([.DG16]=[.$B$5];1;0)" office:value-type="float" office:value="68.9895913343942" calcext:value-type="float">
            <text:p>68.99</text:p>
          </table:table-cell>
          <table:table-cell table:style-name="ce13" table:formula="of:=[.DG$17]+[.$B$6]*(1-EXP(-[.$B$7]*[.DH$16]))^2*IF([.DH16]=[.$B$5];1;0)" office:value-type="float" office:value="68.9895913343942" calcext:value-type="float">
            <text:p>68.99</text:p>
          </table:table-cell>
          <table:table-cell table:style-name="ce13" table:formula="of:=[.DH$17]+[.$B$6]*(1-EXP(-[.$B$7]*[.DI$16]))^2*IF([.DI16]=[.$B$5];1;0)" office:value-type="float" office:value="68.9895913343942" calcext:value-type="float">
            <text:p>68.99</text:p>
          </table:table-cell>
          <table:table-cell table:style-name="ce13" table:formula="of:=[.DI$17]+[.$B$6]*(1-EXP(-[.$B$7]*[.DJ$16]))^2*IF([.DJ16]=[.$B$5];1;0)" office:value-type="float" office:value="68.9895913343942" calcext:value-type="float">
            <text:p>68.99</text:p>
          </table:table-cell>
          <table:table-cell table:style-name="ce13" table:formula="of:=[.DJ$17]+[.$B$6]*(1-EXP(-[.$B$7]*[.DK$16]))^2*IF([.DK16]=[.$B$5];1;0)" office:value-type="float" office:value="68.9895913343942" calcext:value-type="float">
            <text:p>68.99</text:p>
          </table:table-cell>
          <table:table-cell table:style-name="ce13" table:formula="of:=[.DK$17]+[.$B$6]*(1-EXP(-[.$B$7]*[.DL$16]))^2*IF([.DL16]=[.$B$5];1;0)" office:value-type="float" office:value="68.9895913343942" calcext:value-type="float">
            <text:p>68.99</text:p>
          </table:table-cell>
          <table:table-cell table:style-name="ce13" table:formula="of:=[.DL$17]+[.$B$6]*(1-EXP(-[.$B$7]*[.DM$16]))^2*IF([.DM16]=[.$B$5];1;0)" office:value-type="float" office:value="68.9895913343942" calcext:value-type="float">
            <text:p>68.99</text:p>
          </table:table-cell>
          <table:table-cell table:style-name="ce13" table:formula="of:=[.DM$17]+[.$B$6]*(1-EXP(-[.$B$7]*[.DN$16]))^2*IF([.DN16]=[.$B$5];1;0)" office:value-type="float" office:value="68.9895913343942" calcext:value-type="float">
            <text:p>68.99</text:p>
          </table:table-cell>
          <table:table-cell table:style-name="ce13" table:formula="of:=[.DN$17]+[.$B$6]*(1-EXP(-[.$B$7]*[.DO$16]))^2*IF([.DO16]=[.$B$5];1;0)" office:value-type="float" office:value="68.9895913343942" calcext:value-type="float">
            <text:p>68.99</text:p>
          </table:table-cell>
          <table:table-cell table:style-name="ce13" table:formula="of:=[.DO$17]+[.$B$6]*(1-EXP(-[.$B$7]*[.DP$16]))^2*IF([.DP16]=[.$B$5];1;0)" office:value-type="float" office:value="68.9895913343942" calcext:value-type="float">
            <text:p>68.99</text:p>
          </table:table-cell>
          <table:table-cell table:style-name="ce13" table:formula="of:=[.DP$17]+[.$B$6]*(1-EXP(-[.$B$7]*[.DQ$16]))^2*IF([.DQ16]=[.$B$5];1;0)" office:value-type="float" office:value="68.9895913343942" calcext:value-type="float">
            <text:p>68.99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style-name="ce12" office:value-type="string" calcext:value-type="string">
            <text:p>C_pl(t) cumulative tC/ha</text:p>
          </table:table-cell>
          <table:table-cell table:style-name="ce13" table:formula="of:=[.$B$6]*(1-EXP(-[.$B$7]*IF([.B16]&gt;=[.$B$5];0;[.B16])))^2*([.$B$11]+[.$B$12]*[.$B$9])+[.$B$13]*[.$B$8]*MIN(MAX([.$B$5]-1;0);[.B$16])+[.$B$14]*[.$B$10]*[.B$17]" office:value-type="float" office:value="0.180794490913022" calcext:value-type="float">
            <text:p>0.18</text:p>
          </table:table-cell>
          <table:table-cell table:style-name="ce13" table:formula="of:=[.$B$6]*(1-EXP(-[.$B$7]*IF([.C16]&gt;=[.$B$5];0;[.C16])))^2*([.$B$11]+[.$B$12]*[.$B$9])+[.$B$13]*[.$B$8]*MIN(MAX([.$B$5]-1;0);[.C$16])+[.$B$14]*[.$B$10]*[.C$17]" office:value-type="float" office:value="0.527348188504938" calcext:value-type="float">
            <text:p>0.53</text:p>
          </table:table-cell>
          <table:table-cell table:style-name="ce13" table:formula="of:=[.$B$6]*(1-EXP(-[.$B$7]*IF([.D16]&gt;=[.$B$5];0;[.D16])))^2*([.$B$11]+[.$B$12]*[.$B$9])+[.$B$13]*[.$B$8]*MIN(MAX([.$B$5]-1;0);[.D$16])+[.$B$14]*[.$B$10]*[.D$17]" office:value-type="float" office:value="1.02495756657662" calcext:value-type="float">
            <text:p>1.02</text:p>
          </table:table-cell>
          <table:table-cell table:style-name="ce13" table:formula="of:=[.$B$6]*(1-EXP(-[.$B$7]*IF([.E16]&gt;=[.$B$5];0;[.E16])))^2*([.$B$11]+[.$B$12]*[.$B$9])+[.$B$13]*[.$B$8]*MIN(MAX([.$B$5]-1;0);[.E$16])+[.$B$14]*[.$B$10]*[.E$17]" office:value-type="float" office:value="1.65992462932963" calcext:value-type="float">
            <text:p>1.66</text:p>
          </table:table-cell>
          <table:table-cell table:style-name="ce13" table:formula="of:=[.$B$6]*(1-EXP(-[.$B$7]*IF([.F16]&gt;=[.$B$5];0;[.F16])))^2*([.$B$11]+[.$B$12]*[.$B$9])+[.$B$13]*[.$B$8]*MIN(MAX([.$B$5]-1;0);[.F$16])+[.$B$14]*[.$B$10]*[.F$17]" office:value-type="float" office:value="2.41949394242551" calcext:value-type="float">
            <text:p>2.42</text:p>
          </table:table-cell>
          <table:table-cell table:style-name="ce13" table:formula="of:=[.$B$6]*(1-EXP(-[.$B$7]*IF([.G16]&gt;=[.$B$5];0;[.G16])))^2*([.$B$11]+[.$B$12]*[.$B$9])+[.$B$13]*[.$B$8]*MIN(MAX([.$B$5]-1;0);[.G$16])+[.$B$14]*[.$B$10]*[.G$17]" office:value-type="float" office:value="3.29179346144749" calcext:value-type="float">
            <text:p>3.29</text:p>
          </table:table-cell>
          <table:table-cell table:style-name="ce13" table:formula="of:=[.$B$6]*(1-EXP(-[.$B$7]*IF([.H16]&gt;=[.$B$5];0;[.H16])))^2*([.$B$11]+[.$B$12]*[.$B$9])+[.$B$13]*[.$B$8]*MIN(MAX([.$B$5]-1;0);[.H$16])+[.$B$14]*[.$B$10]*[.H$17]" office:value-type="float" office:value="4.26577893276801" calcext:value-type="float">
            <text:p>4.27</text:p>
          </table:table-cell>
          <table:table-cell table:style-name="ce13" table:formula="of:=[.$B$6]*(1-EXP(-[.$B$7]*IF([.I16]&gt;=[.$B$5];0;[.I16])))^2*([.$B$11]+[.$B$12]*[.$B$9])+[.$B$13]*[.$B$8]*MIN(MAX([.$B$5]-1;0);[.I$16])+[.$B$14]*[.$B$10]*[.I$17]" office:value-type="float" office:value="5.33118165504183" calcext:value-type="float">
            <text:p>5.33</text:p>
          </table:table-cell>
          <table:table-cell table:style-name="ce13" table:formula="of:=[.$B$6]*(1-EXP(-[.$B$7]*IF([.J16]&gt;=[.$B$5];0;[.J16])))^2*([.$B$11]+[.$B$12]*[.$B$9])+[.$B$13]*[.$B$8]*MIN(MAX([.$B$5]-1;0);[.J$16])+[.$B$14]*[.$B$10]*[.J$17]" office:value-type="float" office:value="6.47845940198856" calcext:value-type="float">
            <text:p>6.48</text:p>
          </table:table-cell>
          <table:table-cell table:style-name="ce13" table:formula="of:=[.$B$6]*(1-EXP(-[.$B$7]*IF([.K16]&gt;=[.$B$5];0;[.K16])))^2*([.$B$11]+[.$B$12]*[.$B$9])+[.$B$13]*[.$B$8]*MIN(MAX([.$B$5]-1;0);[.K$16])+[.$B$14]*[.$B$10]*[.K$17]" office:value-type="float" office:value="7.69875031884354" calcext:value-type="float">
            <text:p>7.70</text:p>
          </table:table-cell>
          <table:table-cell table:style-name="ce13" table:formula="of:=[.$B$6]*(1-EXP(-[.$B$7]*IF([.L16]&gt;=[.$B$5];0;[.L16])))^2*([.$B$11]+[.$B$12]*[.$B$9])+[.$B$13]*[.$B$8]*MIN(MAX([.$B$5]-1;0);[.L$16])+[.$B$14]*[.$B$10]*[.L$17]" office:value-type="float" office:value="8.98382961588697" calcext:value-type="float">
            <text:p>8.98</text:p>
          </table:table-cell>
          <table:table-cell table:style-name="ce13" table:formula="of:=[.$B$6]*(1-EXP(-[.$B$7]*IF([.M16]&gt;=[.$B$5];0;[.M16])))^2*([.$B$11]+[.$B$12]*[.$B$9])+[.$B$13]*[.$B$8]*MIN(MAX([.$B$5]-1;0);[.M$16])+[.$B$14]*[.$B$10]*[.M$17]" office:value-type="float" office:value="10.3260688928453" calcext:value-type="float">
            <text:p>10.33</text:p>
          </table:table-cell>
          <table:table-cell table:style-name="ce13" table:formula="of:=[.$B$6]*(1-EXP(-[.$B$7]*IF([.N16]&gt;=[.$B$5];0;[.N16])))^2*([.$B$11]+[.$B$12]*[.$B$9])+[.$B$13]*[.$B$8]*MIN(MAX([.$B$5]-1;0);[.N$16])+[.$B$14]*[.$B$10]*[.N$17]" office:value-type="float" office:value="11.7183979377365" calcext:value-type="float">
            <text:p>11.72</text:p>
          </table:table-cell>
          <table:table-cell table:style-name="ce13" table:formula="of:=[.$B$6]*(1-EXP(-[.$B$7]*IF([.O16]&gt;=[.$B$5];0;[.O16])))^2*([.$B$11]+[.$B$12]*[.$B$9])+[.$B$13]*[.$B$8]*MIN(MAX([.$B$5]-1;0);[.O$16])+[.$B$14]*[.$B$10]*[.O$17]" office:value-type="float" office:value="13.1542688529358" calcext:value-type="float">
            <text:p>13.15</text:p>
          </table:table-cell>
          <table:table-cell table:style-name="ce13" table:formula="of:=[.$B$6]*(1-EXP(-[.$B$7]*IF([.P16]&gt;=[.$B$5];0;[.P16])))^2*([.$B$11]+[.$B$12]*[.$B$9])+[.$B$13]*[.$B$8]*MIN(MAX([.$B$5]-1;0);[.P$16])+[.$B$14]*[.$B$10]*[.P$17]" office:value-type="float" office:value="14.6276223699029" calcext:value-type="float">
            <text:p>14.63</text:p>
          </table:table-cell>
          <table:table-cell table:style-name="ce13" table:formula="of:=[.$B$6]*(1-EXP(-[.$B$7]*IF([.Q16]&gt;=[.$B$5];0;[.Q16])))^2*([.$B$11]+[.$B$12]*[.$B$9])+[.$B$13]*[.$B$8]*MIN(MAX([.$B$5]-1;0);[.Q$16])+[.$B$14]*[.$B$10]*[.Q$17]" office:value-type="float" office:value="16.1328562221733" calcext:value-type="float">
            <text:p>16.13</text:p>
          </table:table-cell>
          <table:table-cell table:style-name="ce13" table:formula="of:=[.$B$6]*(1-EXP(-[.$B$7]*IF([.R16]&gt;=[.$B$5];0;[.R16])))^2*([.$B$11]+[.$B$12]*[.$B$9])+[.$B$13]*[.$B$8]*MIN(MAX([.$B$5]-1;0);[.R$16])+[.$B$14]*[.$B$10]*[.R$17]" office:value-type="float" office:value="17.6647954538935" calcext:value-type="float">
            <text:p>17.66</text:p>
          </table:table-cell>
          <table:table-cell table:style-name="ce13" table:formula="of:=[.$B$6]*(1-EXP(-[.$B$7]*IF([.S16]&gt;=[.$B$5];0;[.S16])))^2*([.$B$11]+[.$B$12]*[.$B$9])+[.$B$13]*[.$B$8]*MIN(MAX([.$B$5]-1;0);[.S$16])+[.$B$14]*[.$B$10]*[.S$17]" office:value-type="float" office:value="19.2186645484136" calcext:value-type="float">
            <text:p>19.22</text:p>
          </table:table-cell>
          <table:table-cell table:style-name="ce13" table:formula="of:=[.$B$6]*(1-EXP(-[.$B$7]*IF([.T16]&gt;=[.$B$5];0;[.T16])))^2*([.$B$11]+[.$B$12]*[.$B$9])+[.$B$13]*[.$B$8]*MIN(MAX([.$B$5]-1;0);[.T$16])+[.$B$14]*[.$B$10]*[.T$17]" office:value-type="float" office:value="20.7900612682568" calcext:value-type="float">
            <text:p>20.79</text:p>
          </table:table-cell>
          <table:table-cell table:style-name="ce13" table:formula="of:=[.$B$6]*(1-EXP(-[.$B$7]*IF([.U16]&gt;=[.$B$5];0;[.U16])))^2*([.$B$11]+[.$B$12]*[.$B$9])+[.$B$13]*[.$B$8]*MIN(MAX([.$B$5]-1;0);[.U$16])+[.$B$14]*[.$B$10]*[.U$17]" office:value-type="float" office:value="22.3749321041942" calcext:value-type="float">
            <text:p>22.37</text:p>
          </table:table-cell>
          <table:table-cell table:style-name="ce13" table:formula="of:=[.$B$6]*(1-EXP(-[.$B$7]*IF([.V16]&gt;=[.$B$5];0;[.V16])))^2*([.$B$11]+[.$B$12]*[.$B$9])+[.$B$13]*[.$B$8]*MIN(MAX([.$B$5]-1;0);[.V$16])+[.$B$14]*[.$B$10]*[.V$17]" office:value-type="float" office:value="23.9695492371864" calcext:value-type="float">
            <text:p>23.97</text:p>
          </table:table-cell>
          <table:table-cell table:style-name="ce13" table:formula="of:=[.$B$6]*(1-EXP(-[.$B$7]*IF([.W16]&gt;=[.$B$5];0;[.W16])))^2*([.$B$11]+[.$B$12]*[.$B$9])+[.$B$13]*[.$B$8]*MIN(MAX([.$B$5]-1;0);[.W$16])+[.$B$14]*[.$B$10]*[.W$17]" office:value-type="float" office:value="25.5704889226311" calcext:value-type="float">
            <text:p>25.57</text:p>
          </table:table-cell>
          <table:table-cell table:style-name="ce13" table:formula="of:=[.$B$6]*(1-EXP(-[.$B$7]*IF([.X16]&gt;=[.$B$5];0;[.X16])))^2*([.$B$11]+[.$B$12]*[.$B$9])+[.$B$13]*[.$B$8]*MIN(MAX([.$B$5]-1;0);[.X$16])+[.$B$14]*[.$B$10]*[.X$17]" office:value-type="float" office:value="27.1746112117067" calcext:value-type="float">
            <text:p>27.17</text:p>
          </table:table-cell>
          <table:table-cell table:style-name="ce13" table:formula="of:=[.$B$6]*(1-EXP(-[.$B$7]*IF([.Y16]&gt;=[.$B$5];0;[.Y16])))^2*([.$B$11]+[.$B$12]*[.$B$9])+[.$B$13]*[.$B$8]*MIN(MAX([.$B$5]-1;0);[.Y$16])+[.$B$14]*[.$B$10]*[.Y$17]" office:value-type="float" office:value="28.7790409296276" calcext:value-type="float">
            <text:p>28.78</text:p>
          </table:table-cell>
          <table:table-cell table:style-name="ce13" table:formula="of:=[.$B$6]*(1-EXP(-[.$B$7]*IF([.Z16]&gt;=[.$B$5];0;[.Z16])))^2*([.$B$11]+[.$B$12]*[.$B$9])+[.$B$13]*[.$B$8]*MIN(MAX([.$B$5]-1;0);[.Z$16])+[.$B$14]*[.$B$10]*[.Z$17]" office:value-type="float" office:value="30.3811498353732" calcext:value-type="float">
            <text:p>30.38</text:p>
          </table:table-cell>
          <table:table-cell table:style-name="ce13" table:formula="of:=[.$B$6]*(1-EXP(-[.$B$7]*IF([.AA16]&gt;=[.$B$5];0;[.AA16])))^2*([.$B$11]+[.$B$12]*[.$B$9])+[.$B$13]*[.$B$8]*MIN(MAX([.$B$5]-1;0);[.AA$16])+[.$B$14]*[.$B$10]*[.AA$17]" office:value-type="float" office:value="31.978539891904" calcext:value-type="float">
            <text:p>31.98</text:p>
          </table:table-cell>
          <table:table-cell table:style-name="ce13" table:formula="of:=[.$B$6]*(1-EXP(-[.$B$7]*IF([.AB16]&gt;=[.$B$5];0;[.AB16])))^2*([.$B$11]+[.$B$12]*[.$B$9])+[.$B$13]*[.$B$8]*MIN(MAX([.$B$5]-1;0);[.AB$16])+[.$B$14]*[.$B$10]*[.AB$17]" office:value-type="float" office:value="33.5690275800834" calcext:value-type="float">
            <text:p>33.57</text:p>
          </table:table-cell>
          <table:table-cell table:style-name="ce13" table:formula="of:=[.$B$6]*(1-EXP(-[.$B$7]*IF([.AC16]&gt;=[.$B$5];0;[.AC16])))^2*([.$B$11]+[.$B$12]*[.$B$9])+[.$B$13]*[.$B$8]*MIN(MAX([.$B$5]-1;0);[.AC$16])+[.$B$14]*[.$B$10]*[.AC$17]" office:value-type="float" office:value="35.1506291934701" calcext:value-type="float">
            <text:p>35.15</text:p>
          </table:table-cell>
          <table:table-cell table:style-name="ce13" table:formula="of:=[.$B$6]*(1-EXP(-[.$B$7]*IF([.AD16]&gt;=[.$B$5];0;[.AD16])))^2*([.$B$11]+[.$B$12]*[.$B$9])+[.$B$13]*[.$B$8]*MIN(MAX([.$B$5]-1;0);[.AD$16])+[.$B$14]*[.$B$10]*[.AD$17]" office:value-type="float" office:value="36.7215470548693" calcext:value-type="float">
            <text:p>36.72</text:p>
          </table:table-cell>
          <table:table-cell table:style-name="ce13" table:formula="of:=[.$B$6]*(1-EXP(-[.$B$7]*IF([.AE16]&gt;=[.$B$5];0;[.AE16])))^2*([.$B$11]+[.$B$12]*[.$B$9])+[.$B$13]*[.$B$8]*MIN(MAX([.$B$5]-1;0);[.AE$16])+[.$B$14]*[.$B$10]*[.AE$17]" office:value-type="float" office:value="38.2801565990311" calcext:value-type="float">
            <text:p>38.28</text:p>
          </table:table-cell>
          <table:table-cell table:style-name="ce13" table:formula="of:=[.$B$6]*(1-EXP(-[.$B$7]*IF([.AF16]&gt;=[.$B$5];0;[.AF16])))^2*([.$B$11]+[.$B$12]*[.$B$9])+[.$B$13]*[.$B$8]*MIN(MAX([.$B$5]-1;0);[.AF$16])+[.$B$14]*[.$B$10]*[.AF$17]" office:value-type="float" office:value="39.8249942691793" calcext:value-type="float">
            <text:p>39.82</text:p>
          </table:table-cell>
          <table:table-cell table:style-name="ce13" table:formula="of:=[.$B$6]*(1-EXP(-[.$B$7]*IF([.AG16]&gt;=[.$B$5];0;[.AG16])))^2*([.$B$11]+[.$B$12]*[.$B$9])+[.$B$13]*[.$B$8]*MIN(MAX([.$B$5]-1;0);[.AG$16])+[.$B$14]*[.$B$10]*[.AG$17]" office:value-type="float" office:value="41.3547461781567" calcext:value-type="float">
            <text:p>41.35</text:p>
          </table:table-cell>
          <table:table-cell table:style-name="ce13" table:formula="of:=[.$B$6]*(1-EXP(-[.$B$7]*IF([.AH16]&gt;=[.$B$5];0;[.AH16])))^2*([.$B$11]+[.$B$12]*[.$B$9])+[.$B$13]*[.$B$8]*MIN(MAX([.$B$5]-1;0);[.AH$16])+[.$B$14]*[.$B$10]*[.AH$17]" office:value-type="float" office:value="42.8682374878936" calcext:value-type="float">
            <text:p>42.87</text:p>
          </table:table-cell>
          <table:table-cell table:style-name="ce13" table:formula="of:=[.$B$6]*(1-EXP(-[.$B$7]*IF([.AI16]&gt;=[.$B$5];0;[.AI16])))^2*([.$B$11]+[.$B$12]*[.$B$9])+[.$B$13]*[.$B$8]*MIN(MAX([.$B$5]-1;0);[.AI$16])+[.$B$14]*[.$B$10]*[.AI$17]" office:value-type="float" office:value="44.3644224636527" calcext:value-type="float">
            <text:p>44.36</text:p>
          </table:table-cell>
          <table:table-cell table:style-name="ce13" table:formula="of:=[.$B$6]*(1-EXP(-[.$B$7]*IF([.AJ16]&gt;=[.$B$5];0;[.AJ16])))^2*([.$B$11]+[.$B$12]*[.$B$9])+[.$B$13]*[.$B$8]*MIN(MAX([.$B$5]-1;0);[.AJ$16])+[.$B$14]*[.$B$10]*[.AJ$17]" office:value-type="float" office:value="45.8423751620917" calcext:value-type="float">
            <text:p>45.84</text:p>
          </table:table-cell>
          <table:table-cell table:style-name="ce13" table:formula="of:=[.$B$6]*(1-EXP(-[.$B$7]*IF([.AK16]&gt;=[.$B$5];0;[.AK16])))^2*([.$B$11]+[.$B$12]*[.$B$9])+[.$B$13]*[.$B$8]*MIN(MAX([.$B$5]-1;0);[.AK$16])+[.$B$14]*[.$B$10]*[.AK$17]" office:value-type="float" office:value="47.301280714617" calcext:value-type="float">
            <text:p>47.30</text:p>
          </table:table-cell>
          <table:table-cell table:style-name="ce13" table:formula="of:=[.$B$6]*(1-EXP(-[.$B$7]*IF([.AL16]&gt;=[.$B$5];0;[.AL16])))^2*([.$B$11]+[.$B$12]*[.$B$9])+[.$B$13]*[.$B$8]*MIN(MAX([.$B$5]-1;0);[.AL$16])+[.$B$14]*[.$B$10]*[.AL$17]" office:value-type="float" office:value="48.7404271697976" calcext:value-type="float">
            <text:p>48.74</text:p>
          </table:table-cell>
          <table:table-cell table:style-name="ce13" table:formula="of:=[.$B$6]*(1-EXP(-[.$B$7]*IF([.AM16]&gt;=[.$B$5];0;[.AM16])))^2*([.$B$11]+[.$B$12]*[.$B$9])+[.$B$13]*[.$B$8]*MIN(MAX([.$B$5]-1;0);[.AM$16])+[.$B$14]*[.$B$10]*[.AM$17]" office:value-type="float" office:value="50.1591978607593" calcext:value-type="float">
            <text:p>50.16</text:p>
          </table:table-cell>
          <table:table-cell table:style-name="ce13" table:formula="of:=[.$B$6]*(1-EXP(-[.$B$7]*IF([.AN16]&gt;=[.$B$5];0;[.AN16])))^2*([.$B$11]+[.$B$12]*[.$B$9])+[.$B$13]*[.$B$8]*MIN(MAX([.$B$5]-1;0);[.AN$16])+[.$B$14]*[.$B$10]*[.AN$17]" office:value-type="float" office:value="51.5570642655119" calcext:value-type="float">
            <text:p>51.56</text:p>
          </table:table-cell>
          <table:table-cell table:style-name="ce13" table:formula="of:=[.$B$6]*(1-EXP(-[.$B$7]*IF([.AO16]&gt;=[.$B$5];0;[.AO16])))^2*([.$B$11]+[.$B$12]*[.$B$9])+[.$B$13]*[.$B$8]*MIN(MAX([.$B$5]-1;0);[.AO$16])+[.$B$14]*[.$B$10]*[.AO$17]" office:value-type="float" office:value="52.9335793300728" calcext:value-type="float">
            <text:p>52.93</text:p>
          </table:table-cell>
          <table:table-cell table:style-name="ce13" table:formula="of:=[.$B$6]*(1-EXP(-[.$B$7]*IF([.AP16]&gt;=[.$B$5];0;[.AP16])))^2*([.$B$11]+[.$B$12]*[.$B$9])+[.$B$13]*[.$B$8]*MIN(MAX([.$B$5]-1;0);[.AP$16])+[.$B$14]*[.$B$10]*[.AP$17]" office:value-type="float" office:value="54.2883712260447" calcext:value-type="float">
            <text:p>54.29</text:p>
          </table:table-cell>
          <table:table-cell table:style-name="ce13" table:formula="of:=[.$B$6]*(1-EXP(-[.$B$7]*IF([.AQ16]&gt;=[.$B$5];0;[.AQ16])))^2*([.$B$11]+[.$B$12]*[.$B$9])+[.$B$13]*[.$B$8]*MIN(MAX([.$B$5]-1;0);[.AQ$16])+[.$B$14]*[.$B$10]*[.AQ$17]" office:value-type="float" office:value="55.6211375159991" calcext:value-type="float">
            <text:p>55.62</text:p>
          </table:table-cell>
          <table:table-cell table:style-name="ce13" table:formula="of:=[.$B$6]*(1-EXP(-[.$B$7]*IF([.AR16]&gt;=[.$B$5];0;[.AR16])))^2*([.$B$11]+[.$B$12]*[.$B$9])+[.$B$13]*[.$B$8]*MIN(MAX([.$B$5]-1;0);[.AR$16])+[.$B$14]*[.$B$10]*[.AR$17]" office:value-type="float" office:value="56.9316397016088" calcext:value-type="float">
            <text:p>56.93</text:p>
          </table:table-cell>
          <table:table-cell table:style-name="ce13" table:formula="of:=[.$B$6]*(1-EXP(-[.$B$7]*IF([.AS16]&gt;=[.$B$5];0;[.AS16])))^2*([.$B$11]+[.$B$12]*[.$B$9])+[.$B$13]*[.$B$8]*MIN(MAX([.$B$5]-1;0);[.AS$16])+[.$B$14]*[.$B$10]*[.AS$17]" office:value-type="float" office:value="58.2196981309683" calcext:value-type="float">
            <text:p>58.22</text:p>
          </table:table-cell>
          <table:table-cell table:style-name="ce13" table:formula="of:=[.$B$6]*(1-EXP(-[.$B$7]*IF([.AT16]&gt;=[.$B$5];0;[.AT16])))^2*([.$B$11]+[.$B$12]*[.$B$9])+[.$B$13]*[.$B$8]*MIN(MAX([.$B$5]-1;0);[.AT$16])+[.$B$14]*[.$B$10]*[.AT$17]" office:value-type="float" office:value="59.4851872429551" calcext:value-type="float">
            <text:p>59.49</text:p>
          </table:table-cell>
          <table:table-cell table:style-name="ce13" table:formula="of:=[.$B$6]*(1-EXP(-[.$B$7]*IF([.AU16]&gt;=[.$B$5];0;[.AU16])))^2*([.$B$11]+[.$B$12]*[.$B$9])+[.$B$13]*[.$B$8]*MIN(MAX([.$B$5]-1;0);[.AU$16])+[.$B$14]*[.$B$10]*[.AU$17]" office:value-type="float" office:value="60.7280311278049" calcext:value-type="float">
            <text:p>60.73</text:p>
          </table:table-cell>
          <table:table-cell table:style-name="ce13" table:formula="of:=[.$B$6]*(1-EXP(-[.$B$7]*IF([.AV16]&gt;=[.$B$5];0;[.AV16])))^2*([.$B$11]+[.$B$12]*[.$B$9])+[.$B$13]*[.$B$8]*MIN(MAX([.$B$5]-1;0);[.AV$16])+[.$B$14]*[.$B$10]*[.AV$17]" office:value-type="float" office:value="61.9481993843282" calcext:value-type="float">
            <text:p>61.95</text:p>
          </table:table-cell>
          <table:table-cell table:style-name="ce13" table:formula="of:=[.$B$6]*(1-EXP(-[.$B$7]*IF([.AW16]&gt;=[.$B$5];0;[.AW16])))^2*([.$B$11]+[.$B$12]*[.$B$9])+[.$B$13]*[.$B$8]*MIN(MAX([.$B$5]-1;0);[.AW$16])+[.$B$14]*[.$B$10]*[.AW$17]" office:value-type="float" office:value="63.1457032553649" calcext:value-type="float">
            <text:p>63.15</text:p>
          </table:table-cell>
          <table:table-cell table:style-name="ce13" table:formula="of:=[.$B$6]*(1-EXP(-[.$B$7]*IF([.AX16]&gt;=[.$B$5];0;[.AX16])))^2*([.$B$11]+[.$B$12]*[.$B$9])+[.$B$13]*[.$B$8]*MIN(MAX([.$B$5]-1;0);[.AX$16])+[.$B$14]*[.$B$10]*[.AX$17]" office:value-type="float" office:value="64.3205920241822" calcext:value-type="float">
            <text:p>64.32</text:p>
          </table:table-cell>
          <table:table-cell table:style-name="ce13" table:formula="of:=[.$B$6]*(1-EXP(-[.$B$7]*IF([.AY16]&gt;=[.$B$5];0;[.AY16])))^2*([.$B$11]+[.$B$12]*[.$B$9])+[.$B$13]*[.$B$8]*MIN(MAX([.$B$5]-1;0);[.AY$16])+[.$B$14]*[.$B$10]*[.AY$17]" office:value-type="float" office:value="65.4729496555572" calcext:value-type="float">
            <text:p>65.47</text:p>
          </table:table-cell>
          <table:table-cell table:style-name="ce13" table:formula="of:=[.$B$6]*(1-EXP(-[.$B$7]*IF([.AZ16]&gt;=[.$B$5];0;[.AZ16])))^2*([.$B$11]+[.$B$12]*[.$B$9])+[.$B$13]*[.$B$8]*MIN(MAX([.$B$5]-1;0);[.AZ$16])+[.$B$14]*[.$B$10]*[.AZ$17]" office:value-type="float" office:value="66.6028916662678" calcext:value-type="float">
            <text:p>66.60</text:p>
          </table:table-cell>
          <table:table-cell table:style-name="ce13" table:formula="of:=[.$B$6]*(1-EXP(-[.$B$7]*IF([.BA16]&gt;=[.$B$5];0;[.BA16])))^2*([.$B$11]+[.$B$12]*[.$B$9])+[.$B$13]*[.$B$8]*MIN(MAX([.$B$5]-1;0);[.BA$16])+[.$B$14]*[.$B$10]*[.BA$17]" office:value-type="float" office:value="67.7105622106309" calcext:value-type="float">
            <text:p>67.71</text:p>
          </table:table-cell>
          <table:table-cell table:style-name="ce13" table:formula="of:=[.$B$6]*(1-EXP(-[.$B$7]*IF([.BB16]&gt;=[.$B$5];0;[.BB16])))^2*([.$B$11]+[.$B$12]*[.$B$9])+[.$B$13]*[.$B$8]*MIN(MAX([.$B$5]-1;0);[.BB$16])+[.$B$14]*[.$B$10]*[.BB$17]" office:value-type="float" office:value="68.7961313675968" calcext:value-type="float">
            <text:p>68.80</text:p>
          </table:table-cell>
          <table:table-cell table:style-name="ce13" table:formula="of:=[.$B$6]*(1-EXP(-[.$B$7]*IF([.BC16]&gt;=[.$B$5];0;[.BC16])))^2*([.$B$11]+[.$B$12]*[.$B$9])+[.$B$13]*[.$B$8]*MIN(MAX([.$B$5]-1;0);[.BC$16])+[.$B$14]*[.$B$10]*[.BC$17]" office:value-type="float" office:value="69.8597926167212" calcext:value-type="float">
            <text:p>69.86</text:p>
          </table:table-cell>
          <table:table-cell table:style-name="ce13" table:formula="of:=[.$B$6]*(1-EXP(-[.$B$7]*IF([.BD16]&gt;=[.$B$5];0;[.BD16])))^2*([.$B$11]+[.$B$12]*[.$B$9])+[.$B$13]*[.$B$8]*MIN(MAX([.$B$5]-1;0);[.BD$16])+[.$B$14]*[.$B$10]*[.BD$17]" office:value-type="float" office:value="70.901760491101" calcext:value-type="float">
            <text:p>70.90</text:p>
          </table:table-cell>
          <table:table-cell table:style-name="ce13" table:formula="of:=[.$B$6]*(1-EXP(-[.$B$7]*IF([.BE16]&gt;=[.$B$5];0;[.BE16])))^2*([.$B$11]+[.$B$12]*[.$B$9])+[.$B$13]*[.$B$8]*MIN(MAX([.$B$5]-1;0);[.BE$16])+[.$B$14]*[.$B$10]*[.BE$17]" office:value-type="float" office:value="71.9222683960846" calcext:value-type="float">
            <text:p>71.92</text:p>
          </table:table-cell>
          <table:table-cell table:style-name="ce13" table:formula="of:=[.$B$6]*(1-EXP(-[.$B$7]*IF([.BF16]&gt;=[.$B$5];0;[.BF16])))^2*([.$B$11]+[.$B$12]*[.$B$9])+[.$B$13]*[.$B$8]*MIN(MAX([.$B$5]-1;0);[.BF$16])+[.$B$14]*[.$B$10]*[.BF$17]" office:value-type="float" office:value="72.9215665832414" calcext:value-type="float">
            <text:p>72.92</text:p>
          </table:table-cell>
          <table:table-cell table:style-name="ce13" table:formula="of:=[.$B$6]*(1-EXP(-[.$B$7]*IF([.BG16]&gt;=[.$B$5];0;[.BG16])))^2*([.$B$11]+[.$B$12]*[.$B$9])+[.$B$13]*[.$B$8]*MIN(MAX([.$B$5]-1;0);[.BG$16])+[.$B$14]*[.$B$10]*[.BG$17]" office:value-type="float" office:value="73.8999202697148" calcext:value-type="float">
            <text:p>73.90</text:p>
          </table:table-cell>
          <table:table-cell table:style-name="ce13" table:formula="of:=[.$B$6]*(1-EXP(-[.$B$7]*IF([.BH16]&gt;=[.$B$5];0;[.BH16])))^2*([.$B$11]+[.$B$12]*[.$B$9])+[.$B$13]*[.$B$8]*MIN(MAX([.$B$5]-1;0);[.BH$16])+[.$B$14]*[.$B$10]*[.BH$17]" office:value-type="float" office:value="74.8576078936829" calcext:value-type="float">
            <text:p>74.86</text:p>
          </table:table-cell>
          <table:table-cell table:style-name="ce13" table:formula="of:=[.$B$6]*(1-EXP(-[.$B$7]*IF([.BI16]&gt;=[.$B$5];0;[.BI16])))^2*([.$B$11]+[.$B$12]*[.$B$9])+[.$B$13]*[.$B$8]*MIN(MAX([.$B$5]-1;0);[.BI$16])+[.$B$14]*[.$B$10]*[.BI$17]" office:value-type="float" office:value="75.7949194972152" calcext:value-type="float">
            <text:p>75.79</text:p>
          </table:table-cell>
          <table:table-cell table:style-name="ce13" table:formula="of:=[.$B$6]*(1-EXP(-[.$B$7]*IF([.BJ16]&gt;=[.$B$5];0;[.BJ16])))^2*([.$B$11]+[.$B$12]*[.$B$9])+[.$B$13]*[.$B$8]*MIN(MAX([.$B$5]-1;0);[.BJ$16])+[.$B$14]*[.$B$10]*[.BJ$17]" office:value-type="float" office:value="76.7121552283422" calcext:value-type="float">
            <text:p>76.71</text:p>
          </table:table-cell>
          <table:table-cell table:style-name="ce13" table:formula="of:=[.$B$6]*(1-EXP(-[.$B$7]*IF([.BK16]&gt;=[.$B$5];0;[.BK16])))^2*([.$B$11]+[.$B$12]*[.$B$9])+[.$B$13]*[.$B$8]*MIN(MAX([.$B$5]-1;0);[.BK$16])+[.$B$14]*[.$B$10]*[.BK$17]" office:value-type="float" office:value="77.6096239546574" calcext:value-type="float">
            <text:p>77.61</text:p>
          </table:table-cell>
          <table:table-cell table:style-name="ce13" table:formula="of:=[.$B$6]*(1-EXP(-[.$B$7]*IF([.BL16]&gt;=[.$B$5];0;[.BL16])))^2*([.$B$11]+[.$B$12]*[.$B$9])+[.$B$13]*[.$B$8]*MIN(MAX([.$B$5]-1;0);[.BL$16])+[.$B$14]*[.$B$10]*[.BL$17]" office:value-type="float" office:value="78.487641981237" calcext:value-type="float">
            <text:p>78.49</text:p>
          </table:table-cell>
          <table:table-cell table:style-name="ce13" table:formula="of:=[.$B$6]*(1-EXP(-[.$B$7]*IF([.BM16]&gt;=[.$B$5];0;[.BM16])))^2*([.$B$11]+[.$B$12]*[.$B$9])+[.$B$13]*[.$B$8]*MIN(MAX([.$B$5]-1;0);[.BM$16])+[.$B$14]*[.$B$10]*[.BM$17]" office:value-type="float" office:value="79.3465318661065" calcext:value-type="float">
            <text:p>79.35</text:p>
          </table:table-cell>
          <table:table-cell table:style-name="ce13" table:formula="of:=[.$B$6]*(1-EXP(-[.$B$7]*IF([.BN16]&gt;=[.$B$5];0;[.BN16])))^2*([.$B$11]+[.$B$12]*[.$B$9])+[.$B$13]*[.$B$8]*MIN(MAX([.$B$5]-1;0);[.BN$16])+[.$B$14]*[.$B$10]*[.BN$17]" office:value-type="float" office:value="80.186621326896" calcext:value-type="float">
            <text:p>80.19</text:p>
          </table:table-cell>
          <table:table-cell table:style-name="ce13" table:formula="of:=[.$B$6]*(1-EXP(-[.$B$7]*IF([.BO16]&gt;=[.$B$5];0;[.BO16])))^2*([.$B$11]+[.$B$12]*[.$B$9])+[.$B$13]*[.$B$8]*MIN(MAX([.$B$5]-1;0);[.BO$16])+[.$B$14]*[.$B$10]*[.BO$17]" office:value-type="float" office:value="81.0082422327185" calcext:value-type="float">
            <text:p>81.01</text:p>
          </table:table-cell>
          <table:table-cell table:style-name="ce13" table:formula="of:=[.$B$6]*(1-EXP(-[.$B$7]*IF([.BP16]&gt;=[.$B$5];0;[.BP16])))^2*([.$B$11]+[.$B$12]*[.$B$9])+[.$B$13]*[.$B$8]*MIN(MAX([.$B$5]-1;0);[.BP$16])+[.$B$14]*[.$B$10]*[.BP$17]" office:value-type="float" office:value="81.8117296756708" calcext:value-type="float">
            <text:p>81.81</text:p>
          </table:table-cell>
          <table:table-cell table:style-name="ce13" table:formula="of:=[.$B$6]*(1-EXP(-[.$B$7]*IF([.BQ16]&gt;=[.$B$5];0;[.BQ16])))^2*([.$B$11]+[.$B$12]*[.$B$9])+[.$B$13]*[.$B$8]*MIN(MAX([.$B$5]-1;0);[.BQ$16])+[.$B$14]*[.$B$10]*[.BQ$17]" office:value-type="float" office:value="82.597421116702" calcext:value-type="float">
            <text:p>82.60</text:p>
          </table:table-cell>
          <table:table-cell table:style-name="ce13" table:formula="of:=[.$B$6]*(1-EXP(-[.$B$7]*IF([.BR16]&gt;=[.$B$5];0;[.BR16])))^2*([.$B$11]+[.$B$12]*[.$B$9])+[.$B$13]*[.$B$8]*MIN(MAX([.$B$5]-1;0);[.BR$16])+[.$B$14]*[.$B$10]*[.BR$17]" office:value-type="float" office:value="83.365655600919" calcext:value-type="float">
            <text:p>83.37</text:p>
          </table:table-cell>
          <table:table-cell table:style-name="ce13" table:formula="of:=[.$B$6]*(1-EXP(-[.$B$7]*IF([.BS16]&gt;=[.$B$5];0;[.BS16])))^2*([.$B$11]+[.$B$12]*[.$B$9])+[.$B$13]*[.$B$8]*MIN(MAX([.$B$5]-1;0);[.BS$16])+[.$B$14]*[.$B$10]*[.BS$17]" office:value-type="float" office:value="84.116773037703" calcext:value-type="float">
            <text:p>84.12</text:p>
          </table:table-cell>
          <table:table-cell table:style-name="ce13" table:formula="of:=[.$B$6]*(1-EXP(-[.$B$7]*IF([.BT16]&gt;=[.$B$5];0;[.BT16])))^2*([.$B$11]+[.$B$12]*[.$B$9])+[.$B$13]*[.$B$8]*MIN(MAX([.$B$5]-1;0);[.BT$16])+[.$B$14]*[.$B$10]*[.BT$17]" office:value-type="float" office:value="84.8511135412988" calcext:value-type="float">
            <text:p>84.85</text:p>
          </table:table-cell>
          <table:table-cell table:style-name="ce13" table:formula="of:=[.$B$6]*(1-EXP(-[.$B$7]*IF([.BU16]&gt;=[.$B$5];0;[.BU16])))^2*([.$B$11]+[.$B$12]*[.$B$9])+[.$B$13]*[.$B$8]*MIN(MAX([.$B$5]-1;0);[.BU$16])+[.$B$14]*[.$B$10]*[.BU$17]" office:value-type="float" office:value="85.5690168278049" calcext:value-type="float">
            <text:p>85.57</text:p>
          </table:table-cell>
          <table:table-cell table:style-name="ce13" table:formula="of:=[.$B$6]*(1-EXP(-[.$B$7]*IF([.BV16]&gt;=[.$B$5];0;[.BV16])))^2*([.$B$11]+[.$B$12]*[.$B$9])+[.$B$13]*[.$B$8]*MIN(MAX([.$B$5]-1;0);[.BV$16])+[.$B$14]*[.$B$10]*[.BV$17]" office:value-type="float" office:value="86.2708216647508" calcext:value-type="float">
            <text:p>86.27</text:p>
          </table:table-cell>
          <table:table-cell table:style-name="ce13" table:formula="of:=[.$B$6]*(1-EXP(-[.$B$7]*IF([.BW16]&gt;=[.$B$5];0;[.BW16])))^2*([.$B$11]+[.$B$12]*[.$B$9])+[.$B$13]*[.$B$8]*MIN(MAX([.$B$5]-1;0);[.BW$16])+[.$B$14]*[.$B$10]*[.BW$17]" office:value-type="float" office:value="86.9568653696794" calcext:value-type="float">
            <text:p>86.96</text:p>
          </table:table-cell>
          <table:table-cell table:style-name="ce13" table:formula="of:=[.$B$6]*(1-EXP(-[.$B$7]*IF([.BX16]&gt;=[.$B$5];0;[.BX16])))^2*([.$B$11]+[.$B$12]*[.$B$9])+[.$B$13]*[.$B$8]*MIN(MAX([.$B$5]-1;0);[.BX$16])+[.$B$14]*[.$B$10]*[.BX$17]" office:value-type="float" office:value="87.627483354383" calcext:value-type="float">
            <text:p>87.63</text:p>
          </table:table-cell>
          <table:table-cell table:style-name="ce13" table:formula="of:=[.$B$6]*(1-EXP(-[.$B$7]*IF([.BY16]&gt;=[.$B$5];0;[.BY16])))^2*([.$B$11]+[.$B$12]*[.$B$9])+[.$B$13]*[.$B$8]*MIN(MAX([.$B$5]-1;0);[.BY$16])+[.$B$14]*[.$B$10]*[.BY$17]" office:value-type="float" office:value="88.2830087116451" calcext:value-type="float">
            <text:p>88.28</text:p>
          </table:table-cell>
          <table:table-cell table:style-name="ce13" table:formula="of:=[.$B$6]*(1-EXP(-[.$B$7]*IF([.BZ16]&gt;=[.$B$5];0;[.BZ16])))^2*([.$B$11]+[.$B$12]*[.$B$9])+[.$B$13]*[.$B$8]*MIN(MAX([.$B$5]-1;0);[.BZ$16])+[.$B$14]*[.$B$10]*[.BZ$17]" office:value-type="float" office:value="88.9237718415431" calcext:value-type="float">
            <text:p>88.92</text:p>
          </table:table-cell>
          <table:table-cell table:style-name="ce13" table:formula="of:=[.$B$6]*(1-EXP(-[.$B$7]*IF([.CA16]&gt;=[.$B$5];0;[.CA16])))^2*([.$B$11]+[.$B$12]*[.$B$9])+[.$B$13]*[.$B$8]*MIN(MAX([.$B$5]-1;0);[.CA$16])+[.$B$14]*[.$B$10]*[.CA$17]" office:value-type="float" office:value="89.5501001145487" calcext:value-type="float">
            <text:p>89.55</text:p>
          </table:table-cell>
          <table:table-cell table:style-name="ce13" table:formula="of:=[.$B$6]*(1-EXP(-[.$B$7]*IF([.CB16]&gt;=[.$B$5];0;[.CB16])))^2*([.$B$11]+[.$B$12]*[.$B$9])+[.$B$13]*[.$B$8]*MIN(MAX([.$B$5]-1;0);[.CB$16])+[.$B$14]*[.$B$10]*[.CB$17]" office:value-type="float" office:value="90.1623175688391" calcext:value-type="float">
            <text:p>90.16</text:p>
          </table:table-cell>
          <table:table-cell table:style-name="ce13" table:formula="of:=[.$B$6]*(1-EXP(-[.$B$7]*IF([.CC16]&gt;=[.$B$5];0;[.CC16])))^2*([.$B$11]+[.$B$12]*[.$B$9])+[.$B$13]*[.$B$8]*MIN(MAX([.$B$5]-1;0);[.CC$16])+[.$B$14]*[.$B$10]*[.CC$17]" office:value-type="float" office:value="90.7607446393957" calcext:value-type="float">
            <text:p>90.76</text:p>
          </table:table-cell>
          <table:table-cell table:style-name="ce13" table:formula="of:=[.$B$6]*(1-EXP(-[.$B$7]*IF([.CD16]&gt;=[.$B$5];0;[.CD16])))^2*([.$B$11]+[.$B$12]*[.$B$9])+[.$B$13]*[.$B$8]*MIN(MAX([.$B$5]-1;0);[.CD$16])+[.$B$14]*[.$B$10]*[.CD$17]" office:value-type="float" office:value="91.3456979166203" calcext:value-type="float">
            <text:p>91.35</text:p>
          </table:table-cell>
          <table:table-cell table:style-name="ce13" table:formula="of:=[.$B$6]*(1-EXP(-[.$B$7]*IF([.CE16]&gt;=[.$B$5];0;[.CE16])))^2*([.$B$11]+[.$B$12]*[.$B$9])+[.$B$13]*[.$B$8]*MIN(MAX([.$B$5]-1;0);[.CE$16])+[.$B$14]*[.$B$10]*[.CE$17]" office:value-type="float" office:value="91.9174899323443" calcext:value-type="float">
            <text:p>91.92</text:p>
          </table:table-cell>
          <table:table-cell table:style-name="ce13" table:formula="of:=[.$B$6]*(1-EXP(-[.$B$7]*IF([.CF16]&gt;=[.$B$5];0;[.CF16])))^2*([.$B$11]+[.$B$12]*[.$B$9])+[.$B$13]*[.$B$8]*MIN(MAX([.$B$5]-1;0);[.CF$16])+[.$B$14]*[.$B$10]*[.CF$17]" office:value-type="float" office:value="92.4764289712408" calcext:value-type="float">
            <text:p>92.48</text:p>
          </table:table-cell>
          <table:table-cell table:style-name="ce13" table:formula="of:=[.$B$6]*(1-EXP(-[.$B$7]*IF([.CG16]&gt;=[.$B$5];0;[.CG16])))^2*([.$B$11]+[.$B$12]*[.$B$9])+[.$B$13]*[.$B$8]*MIN(MAX([.$B$5]-1;0);[.CG$16])+[.$B$14]*[.$B$10]*[.CG$17]" office:value-type="float" office:value="93.0228189057778" calcext:value-type="float">
            <text:p>93.02</text:p>
          </table:table-cell>
          <table:table-cell table:style-name="ce13" table:formula="of:=[.$B$6]*(1-EXP(-[.$B$7]*IF([.CH16]&gt;=[.$B$5];0;[.CH16])))^2*([.$B$11]+[.$B$12]*[.$B$9])+[.$B$13]*[.$B$8]*MIN(MAX([.$B$5]-1;0);[.CH$16])+[.$B$14]*[.$B$10]*[.CH$17]" office:value-type="float" office:value="93.5569590529715" calcext:value-type="float">
            <text:p>93.56</text:p>
          </table:table-cell>
          <table:table-cell table:style-name="ce13" table:formula="of:=[.$B$6]*(1-EXP(-[.$B$7]*IF([.CI16]&gt;=[.$B$5];0;[.CI16])))^2*([.$B$11]+[.$B$12]*[.$B$9])+[.$B$13]*[.$B$8]*MIN(MAX([.$B$5]-1;0);[.CI$16])+[.$B$14]*[.$B$10]*[.CI$17]" office:value-type="float" office:value="94.0791440513083" calcext:value-type="float">
            <text:p>94.08</text:p>
          </table:table-cell>
          <table:table-cell table:style-name="ce13" table:formula="of:=[.$B$6]*(1-EXP(-[.$B$7]*IF([.CJ16]&gt;=[.$B$5];0;[.CJ16])))^2*([.$B$11]+[.$B$12]*[.$B$9])+[.$B$13]*[.$B$8]*MIN(MAX([.$B$5]-1;0);[.CJ$16])+[.$B$14]*[.$B$10]*[.CJ$17]" office:value-type="float" office:value="94.5896637563129" calcext:value-type="float">
            <text:p>94.59</text:p>
          </table:table-cell>
          <table:table-cell table:style-name="ce13" table:formula="of:=[.$B$6]*(1-EXP(-[.$B$7]*IF([.CK16]&gt;=[.$B$5];0;[.CK16])))^2*([.$B$11]+[.$B$12]*[.$B$9])+[.$B$13]*[.$B$8]*MIN(MAX([.$B$5]-1;0);[.CK$16])+[.$B$14]*[.$B$10]*[.CK$17]" office:value-type="float" office:value="8.069169003" calcext:value-type="float">
            <text:p>8.07</text:p>
          </table:table-cell>
          <table:table-cell table:style-name="ce13" table:formula="of:=[.$B$6]*(1-EXP(-[.$B$7]*IF([.CL16]&gt;=[.$B$5];0;[.CL16])))^2*([.$B$11]+[.$B$12]*[.$B$9])+[.$B$13]*[.$B$8]*MIN(MAX([.$B$5]-1;0);[.CL$16])+[.$B$14]*[.$B$10]*[.CL$17]" office:value-type="float" office:value="8.069169003" calcext:value-type="float">
            <text:p>8.07</text:p>
          </table:table-cell>
          <table:table-cell table:style-name="ce13" table:formula="of:=[.$B$6]*(1-EXP(-[.$B$7]*IF([.CM16]&gt;=[.$B$5];0;[.CM16])))^2*([.$B$11]+[.$B$12]*[.$B$9])+[.$B$13]*[.$B$8]*MIN(MAX([.$B$5]-1;0);[.CM$16])+[.$B$14]*[.$B$10]*[.CM$17]" office:value-type="float" office:value="8.069169003" calcext:value-type="float">
            <text:p>8.07</text:p>
          </table:table-cell>
          <table:table-cell table:style-name="ce13" table:formula="of:=[.$B$6]*(1-EXP(-[.$B$7]*IF([.CN16]&gt;=[.$B$5];0;[.CN16])))^2*([.$B$11]+[.$B$12]*[.$B$9])+[.$B$13]*[.$B$8]*MIN(MAX([.$B$5]-1;0);[.CN$16])+[.$B$14]*[.$B$10]*[.CN$17]" office:value-type="float" office:value="8.069169003" calcext:value-type="float">
            <text:p>8.07</text:p>
          </table:table-cell>
          <table:table-cell table:style-name="ce13" table:formula="of:=[.$B$6]*(1-EXP(-[.$B$7]*IF([.CO16]&gt;=[.$B$5];0;[.CO16])))^2*([.$B$11]+[.$B$12]*[.$B$9])+[.$B$13]*[.$B$8]*MIN(MAX([.$B$5]-1;0);[.CO$16])+[.$B$14]*[.$B$10]*[.CO$17]" office:value-type="float" office:value="8.069169003" calcext:value-type="float">
            <text:p>8.07</text:p>
          </table:table-cell>
          <table:table-cell table:style-name="ce13" table:formula="of:=[.$B$6]*(1-EXP(-[.$B$7]*IF([.CP16]&gt;=[.$B$5];0;[.CP16])))^2*([.$B$11]+[.$B$12]*[.$B$9])+[.$B$13]*[.$B$8]*MIN(MAX([.$B$5]-1;0);[.CP$16])+[.$B$14]*[.$B$10]*[.CP$17]" office:value-type="float" office:value="8.069169003" calcext:value-type="float">
            <text:p>8.07</text:p>
          </table:table-cell>
          <table:table-cell table:style-name="ce13" table:formula="of:=[.$B$6]*(1-EXP(-[.$B$7]*IF([.CQ16]&gt;=[.$B$5];0;[.CQ16])))^2*([.$B$11]+[.$B$12]*[.$B$9])+[.$B$13]*[.$B$8]*MIN(MAX([.$B$5]-1;0);[.CQ$16])+[.$B$14]*[.$B$10]*[.CQ$17]" office:value-type="float" office:value="8.069169003" calcext:value-type="float">
            <text:p>8.07</text:p>
          </table:table-cell>
          <table:table-cell table:style-name="ce13" table:formula="of:=[.$B$6]*(1-EXP(-[.$B$7]*IF([.CR16]&gt;=[.$B$5];0;[.CR16])))^2*([.$B$11]+[.$B$12]*[.$B$9])+[.$B$13]*[.$B$8]*MIN(MAX([.$B$5]-1;0);[.CR$16])+[.$B$14]*[.$B$10]*[.CR$17]" office:value-type="float" office:value="8.069169003" calcext:value-type="float">
            <text:p>8.07</text:p>
          </table:table-cell>
          <table:table-cell table:style-name="ce13" table:formula="of:=[.$B$6]*(1-EXP(-[.$B$7]*IF([.CS16]&gt;=[.$B$5];0;[.CS16])))^2*([.$B$11]+[.$B$12]*[.$B$9])+[.$B$13]*[.$B$8]*MIN(MAX([.$B$5]-1;0);[.CS$16])+[.$B$14]*[.$B$10]*[.CS$17]" office:value-type="float" office:value="8.069169003" calcext:value-type="float">
            <text:p>8.07</text:p>
          </table:table-cell>
          <table:table-cell table:style-name="ce13" table:formula="of:=[.$B$6]*(1-EXP(-[.$B$7]*IF([.CT16]&gt;=[.$B$5];0;[.CT16])))^2*([.$B$11]+[.$B$12]*[.$B$9])+[.$B$13]*[.$B$8]*MIN(MAX([.$B$5]-1;0);[.CT$16])+[.$B$14]*[.$B$10]*[.CT$17]" office:value-type="float" office:value="8.069169003" calcext:value-type="float">
            <text:p>8.07</text:p>
          </table:table-cell>
          <table:table-cell table:style-name="ce13" table:formula="of:=[.$B$6]*(1-EXP(-[.$B$7]*IF([.CU16]&gt;=[.$B$5];0;[.CU16])))^2*([.$B$11]+[.$B$12]*[.$B$9])+[.$B$13]*[.$B$8]*MIN(MAX([.$B$5]-1;0);[.CU$16])+[.$B$14]*[.$B$10]*[.CU$17]" office:value-type="float" office:value="8.069169003" calcext:value-type="float">
            <text:p>8.07</text:p>
          </table:table-cell>
          <table:table-cell table:style-name="ce13" table:formula="of:=[.$B$6]*(1-EXP(-[.$B$7]*IF([.CV16]&gt;=[.$B$5];0;[.CV16])))^2*([.$B$11]+[.$B$12]*[.$B$9])+[.$B$13]*[.$B$8]*MIN(MAX([.$B$5]-1;0);[.CV$16])+[.$B$14]*[.$B$10]*[.CV$17]" office:value-type="float" office:value="8.069169003" calcext:value-type="float">
            <text:p>8.07</text:p>
          </table:table-cell>
          <table:table-cell table:style-name="ce13" table:formula="of:=[.$B$6]*(1-EXP(-[.$B$7]*IF([.CW16]&gt;=[.$B$5];0;[.CW16])))^2*([.$B$11]+[.$B$12]*[.$B$9])+[.$B$13]*[.$B$8]*MIN(MAX([.$B$5]-1;0);[.CW$16])+[.$B$14]*[.$B$10]*[.CW$17]" office:value-type="float" office:value="8.069169003" calcext:value-type="float">
            <text:p>8.07</text:p>
          </table:table-cell>
          <table:table-cell table:style-name="ce13" table:formula="of:=[.$B$6]*(1-EXP(-[.$B$7]*IF([.CX16]&gt;=[.$B$5];0;[.CX16])))^2*([.$B$11]+[.$B$12]*[.$B$9])+[.$B$13]*[.$B$8]*MIN(MAX([.$B$5]-1;0);[.CX$16])+[.$B$14]*[.$B$10]*[.CX$17]" office:value-type="float" office:value="8.069169003" calcext:value-type="float">
            <text:p>8.07</text:p>
          </table:table-cell>
          <table:table-cell table:style-name="ce13" table:formula="of:=[.$B$6]*(1-EXP(-[.$B$7]*IF([.CY16]&gt;=[.$B$5];0;[.CY16])))^2*([.$B$11]+[.$B$12]*[.$B$9])+[.$B$13]*[.$B$8]*MIN(MAX([.$B$5]-1;0);[.CY$16])+[.$B$14]*[.$B$10]*[.CY$17]" office:value-type="float" office:value="8.069169003" calcext:value-type="float">
            <text:p>8.07</text:p>
          </table:table-cell>
          <table:table-cell table:style-name="ce13" table:formula="of:=[.$B$6]*(1-EXP(-[.$B$7]*IF([.CZ16]&gt;=[.$B$5];0;[.CZ16])))^2*([.$B$11]+[.$B$12]*[.$B$9])+[.$B$13]*[.$B$8]*MIN(MAX([.$B$5]-1;0);[.CZ$16])+[.$B$14]*[.$B$10]*[.CZ$17]" office:value-type="float" office:value="8.069169003" calcext:value-type="float">
            <text:p>8.07</text:p>
          </table:table-cell>
          <table:table-cell table:style-name="ce13" table:formula="of:=[.$B$6]*(1-EXP(-[.$B$7]*IF([.DA16]&gt;=[.$B$5];0;[.DA16])))^2*([.$B$11]+[.$B$12]*[.$B$9])+[.$B$13]*[.$B$8]*MIN(MAX([.$B$5]-1;0);[.DA$16])+[.$B$14]*[.$B$10]*[.DA$17]" office:value-type="float" office:value="8.069169003" calcext:value-type="float">
            <text:p>8.07</text:p>
          </table:table-cell>
          <table:table-cell table:style-name="ce13" table:formula="of:=[.$B$6]*(1-EXP(-[.$B$7]*IF([.DB16]&gt;=[.$B$5];0;[.DB16])))^2*([.$B$11]+[.$B$12]*[.$B$9])+[.$B$13]*[.$B$8]*MIN(MAX([.$B$5]-1;0);[.DB$16])+[.$B$14]*[.$B$10]*[.DB$17]" office:value-type="float" office:value="8.069169003" calcext:value-type="float">
            <text:p>8.07</text:p>
          </table:table-cell>
          <table:table-cell table:style-name="ce13" table:formula="of:=[.$B$6]*(1-EXP(-[.$B$7]*IF([.DC16]&gt;=[.$B$5];0;[.DC16])))^2*([.$B$11]+[.$B$12]*[.$B$9])+[.$B$13]*[.$B$8]*MIN(MAX([.$B$5]-1;0);[.DC$16])+[.$B$14]*[.$B$10]*[.DC$17]" office:value-type="float" office:value="8.069169003" calcext:value-type="float">
            <text:p>8.07</text:p>
          </table:table-cell>
          <table:table-cell table:style-name="ce13" table:formula="of:=[.$B$6]*(1-EXP(-[.$B$7]*IF([.DD16]&gt;=[.$B$5];0;[.DD16])))^2*([.$B$11]+[.$B$12]*[.$B$9])+[.$B$13]*[.$B$8]*MIN(MAX([.$B$5]-1;0);[.DD$16])+[.$B$14]*[.$B$10]*[.DD$17]" office:value-type="float" office:value="8.069169003" calcext:value-type="float">
            <text:p>8.07</text:p>
          </table:table-cell>
          <table:table-cell table:style-name="ce13" table:formula="of:=[.$B$6]*(1-EXP(-[.$B$7]*IF([.DE16]&gt;=[.$B$5];0;[.DE16])))^2*([.$B$11]+[.$B$12]*[.$B$9])+[.$B$13]*[.$B$8]*MIN(MAX([.$B$5]-1;0);[.DE$16])+[.$B$14]*[.$B$10]*[.DE$17]" office:value-type="float" office:value="8.069169003" calcext:value-type="float">
            <text:p>8.07</text:p>
          </table:table-cell>
          <table:table-cell table:style-name="ce13" table:formula="of:=[.$B$6]*(1-EXP(-[.$B$7]*IF([.DF16]&gt;=[.$B$5];0;[.DF16])))^2*([.$B$11]+[.$B$12]*[.$B$9])+[.$B$13]*[.$B$8]*MIN(MAX([.$B$5]-1;0);[.DF$16])+[.$B$14]*[.$B$10]*[.DF$17]" office:value-type="float" office:value="8.069169003" calcext:value-type="float">
            <text:p>8.07</text:p>
          </table:table-cell>
          <table:table-cell table:style-name="ce13" table:formula="of:=[.$B$6]*(1-EXP(-[.$B$7]*IF([.DG16]&gt;=[.$B$5];0;[.DG16])))^2*([.$B$11]+[.$B$12]*[.$B$9])+[.$B$13]*[.$B$8]*MIN(MAX([.$B$5]-1;0);[.DG$16])+[.$B$14]*[.$B$10]*[.DG$17]" office:value-type="float" office:value="8.069169003" calcext:value-type="float">
            <text:p>8.07</text:p>
          </table:table-cell>
          <table:table-cell table:style-name="ce13" table:formula="of:=[.$B$6]*(1-EXP(-[.$B$7]*IF([.DH16]&gt;=[.$B$5];0;[.DH16])))^2*([.$B$11]+[.$B$12]*[.$B$9])+[.$B$13]*[.$B$8]*MIN(MAX([.$B$5]-1;0);[.DH$16])+[.$B$14]*[.$B$10]*[.DH$17]" office:value-type="float" office:value="8.069169003" calcext:value-type="float">
            <text:p>8.07</text:p>
          </table:table-cell>
          <table:table-cell table:style-name="ce13" table:formula="of:=[.$B$6]*(1-EXP(-[.$B$7]*IF([.DI16]&gt;=[.$B$5];0;[.DI16])))^2*([.$B$11]+[.$B$12]*[.$B$9])+[.$B$13]*[.$B$8]*MIN(MAX([.$B$5]-1;0);[.DI$16])+[.$B$14]*[.$B$10]*[.DI$17]" office:value-type="float" office:value="8.069169003" calcext:value-type="float">
            <text:p>8.07</text:p>
          </table:table-cell>
          <table:table-cell table:style-name="ce13" table:formula="of:=[.$B$6]*(1-EXP(-[.$B$7]*IF([.DJ16]&gt;=[.$B$5];0;[.DJ16])))^2*([.$B$11]+[.$B$12]*[.$B$9])+[.$B$13]*[.$B$8]*MIN(MAX([.$B$5]-1;0);[.DJ$16])+[.$B$14]*[.$B$10]*[.DJ$17]" office:value-type="float" office:value="8.069169003" calcext:value-type="float">
            <text:p>8.07</text:p>
          </table:table-cell>
          <table:table-cell table:style-name="ce13" table:formula="of:=[.$B$6]*(1-EXP(-[.$B$7]*IF([.DK16]&gt;=[.$B$5];0;[.DK16])))^2*([.$B$11]+[.$B$12]*[.$B$9])+[.$B$13]*[.$B$8]*MIN(MAX([.$B$5]-1;0);[.DK$16])+[.$B$14]*[.$B$10]*[.DK$17]" office:value-type="float" office:value="8.069169003" calcext:value-type="float">
            <text:p>8.07</text:p>
          </table:table-cell>
          <table:table-cell table:style-name="ce13" table:formula="of:=[.$B$6]*(1-EXP(-[.$B$7]*IF([.DL16]&gt;=[.$B$5];0;[.DL16])))^2*([.$B$11]+[.$B$12]*[.$B$9])+[.$B$13]*[.$B$8]*MIN(MAX([.$B$5]-1;0);[.DL$16])+[.$B$14]*[.$B$10]*[.DL$17]" office:value-type="float" office:value="8.069169003" calcext:value-type="float">
            <text:p>8.07</text:p>
          </table:table-cell>
          <table:table-cell table:style-name="ce13" table:formula="of:=[.$B$6]*(1-EXP(-[.$B$7]*IF([.DM16]&gt;=[.$B$5];0;[.DM16])))^2*([.$B$11]+[.$B$12]*[.$B$9])+[.$B$13]*[.$B$8]*MIN(MAX([.$B$5]-1;0);[.DM$16])+[.$B$14]*[.$B$10]*[.DM$17]" office:value-type="float" office:value="8.069169003" calcext:value-type="float">
            <text:p>8.07</text:p>
          </table:table-cell>
          <table:table-cell table:style-name="ce13" table:formula="of:=[.$B$6]*(1-EXP(-[.$B$7]*IF([.DN16]&gt;=[.$B$5];0;[.DN16])))^2*([.$B$11]+[.$B$12]*[.$B$9])+[.$B$13]*[.$B$8]*MIN(MAX([.$B$5]-1;0);[.DN$16])+[.$B$14]*[.$B$10]*[.DN$17]" office:value-type="float" office:value="8.069169003" calcext:value-type="float">
            <text:p>8.07</text:p>
          </table:table-cell>
          <table:table-cell table:style-name="ce13" table:formula="of:=[.$B$6]*(1-EXP(-[.$B$7]*IF([.DO16]&gt;=[.$B$5];0;[.DO16])))^2*([.$B$11]+[.$B$12]*[.$B$9])+[.$B$13]*[.$B$8]*MIN(MAX([.$B$5]-1;0);[.DO$16])+[.$B$14]*[.$B$10]*[.DO$17]" office:value-type="float" office:value="8.069169003" calcext:value-type="float">
            <text:p>8.07</text:p>
          </table:table-cell>
          <table:table-cell table:style-name="ce13" table:formula="of:=[.$B$6]*(1-EXP(-[.$B$7]*IF([.DP16]&gt;=[.$B$5];0;[.DP16])))^2*([.$B$11]+[.$B$12]*[.$B$9])+[.$B$13]*[.$B$8]*MIN(MAX([.$B$5]-1;0);[.DP$16])+[.$B$14]*[.$B$10]*[.DP$17]" office:value-type="float" office:value="8.069169003" calcext:value-type="float">
            <text:p>8.07</text:p>
          </table:table-cell>
          <table:table-cell table:style-name="ce13" table:formula="of:=[.$B$6]*(1-EXP(-[.$B$7]*IF([.DQ16]&gt;=[.$B$5];0;[.DQ16])))^2*([.$B$11]+[.$B$12]*[.$B$9])+[.$B$13]*[.$B$8]*MIN(MAX([.$B$5]-1;0);[.DQ$16])+[.$B$14]*[.$B$10]*[.DQ$17]" office:value-type="float" office:value="8.069169003" calcext:value-type="float">
            <text:p>8.07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style-name="ce12" office:value-type="string" calcext:value-type="string">
            <text:p>Carbon schedule, annual_pl(t) tC/ha/year</text:p>
          </table:table-cell>
          <table:table-cell table:style-name="ce13" table:formula="of:=[.B$18]" office:value-type="float" office:value="0.180794490913022" calcext:value-type="float">
            <text:p>0.18</text:p>
          </table:table-cell>
          <table:table-cell table:style-name="ce13" table:formula="of:=[.C$18]-[.B$18]" office:value-type="float" office:value="0.346553697591916" calcext:value-type="float">
            <text:p>0.35</text:p>
          </table:table-cell>
          <table:table-cell table:style-name="ce13" table:formula="of:=[.D$18]-[.C$18]" office:value-type="float" office:value="0.49760937807168" calcext:value-type="float">
            <text:p>0.50</text:p>
          </table:table-cell>
          <table:table-cell table:style-name="ce13" table:formula="of:=[.E$18]-[.D$18]" office:value-type="float" office:value="0.634967062753012" calcext:value-type="float">
            <text:p>0.63</text:p>
          </table:table-cell>
          <table:table-cell table:style-name="ce13" table:formula="of:=[.F$18]-[.E$18]" office:value-type="float" office:value="0.759569313095877" calcext:value-type="float">
            <text:p>0.76</text:p>
          </table:table-cell>
          <table:table-cell table:style-name="ce13" table:formula="of:=[.G$18]-[.F$18]" office:value-type="float" office:value="0.872299519021985" calcext:value-type="float">
            <text:p>0.87</text:p>
          </table:table-cell>
          <table:table-cell table:style-name="ce13" table:formula="of:=[.H$18]-[.G$18]" office:value-type="float" office:value="0.973985471320514" calcext:value-type="float">
            <text:p>0.97</text:p>
          </table:table-cell>
          <table:table-cell table:style-name="ce13" table:formula="of:=[.I$18]-[.H$18]" office:value-type="float" office:value="1.06540272227382" calcext:value-type="float">
            <text:p>1.07</text:p>
          </table:table-cell>
          <table:table-cell table:style-name="ce13" table:formula="of:=[.J$18]-[.I$18]" office:value-type="float" office:value="1.14727774694673" calcext:value-type="float">
            <text:p>1.15</text:p>
          </table:table-cell>
          <table:table-cell table:style-name="ce13" table:formula="of:=[.K$18]-[.J$18]" office:value-type="float" office:value="1.22029091685498" calcext:value-type="float">
            <text:p>1.22</text:p>
          </table:table-cell>
          <table:table-cell table:style-name="ce13" table:formula="of:=[.L$18]-[.K$18]" office:value-type="float" office:value="1.28507929704342" calcext:value-type="float">
            <text:p>1.29</text:p>
          </table:table-cell>
          <table:table-cell table:style-name="ce13" table:formula="of:=[.M$18]-[.L$18]" office:value-type="float" office:value="1.34223927695832" calcext:value-type="float">
            <text:p>1.34</text:p>
          </table:table-cell>
          <table:table-cell table:style-name="ce13" table:formula="of:=[.N$18]-[.M$18]" office:value-type="float" office:value="1.39232904489125" calcext:value-type="float">
            <text:p>1.39</text:p>
          </table:table-cell>
          <table:table-cell table:style-name="ce13" table:formula="of:=[.O$18]-[.N$18]" office:value-type="float" office:value="1.43587091519926" calcext:value-type="float">
            <text:p>1.44</text:p>
          </table:table-cell>
          <table:table-cell table:style-name="ce13" table:formula="of:=[.P$18]-[.O$18]" office:value-type="float" office:value="1.47335351696711" calcext:value-type="float">
            <text:p>1.47</text:p>
          </table:table-cell>
          <table:table-cell table:style-name="ce13" table:formula="of:=[.Q$18]-[.P$18]" office:value-type="float" office:value="1.5052338522704" calcext:value-type="float">
            <text:p>1.51</text:p>
          </table:table-cell>
          <table:table-cell table:style-name="ce13" table:formula="of:=[.R$18]-[.Q$18]" office:value-type="float" office:value="1.53193923172019" calcext:value-type="float">
            <text:p>1.53</text:p>
          </table:table-cell>
          <table:table-cell table:style-name="ce13" table:formula="of:=[.S$18]-[.R$18]" office:value-type="float" office:value="1.55386909452007" calcext:value-type="float">
            <text:p>1.55</text:p>
          </table:table-cell>
          <table:table-cell table:style-name="ce13" table:formula="of:=[.T$18]-[.S$18]" office:value-type="float" office:value="1.5713967198432" calcext:value-type="float">
            <text:p>1.57</text:p>
          </table:table-cell>
          <table:table-cell table:style-name="ce13" table:formula="of:=[.U$18]-[.T$18]" office:value-type="float" office:value="1.58487083593749" calcext:value-type="float">
            <text:p>1.58</text:p>
          </table:table-cell>
          <table:table-cell table:style-name="ce13" table:formula="of:=[.V$18]-[.U$18]" office:value-type="float" office:value="1.59461713299214" calcext:value-type="float">
            <text:p>1.59</text:p>
          </table:table-cell>
          <table:table-cell table:style-name="ce13" table:formula="of:=[.W$18]-[.V$18]" office:value-type="float" office:value="1.60093968544476" calcext:value-type="float">
            <text:p>1.60</text:p>
          </table:table-cell>
          <table:table-cell table:style-name="ce13" table:formula="of:=[.X$18]-[.W$18]" office:value-type="float" office:value="1.60412228907552" calcext:value-type="float">
            <text:p>1.60</text:p>
          </table:table-cell>
          <table:table-cell table:style-name="ce13" table:formula="of:=[.Y$18]-[.X$18]" office:value-type="float" office:value="1.60442971792092" calcext:value-type="float">
            <text:p>1.60</text:p>
          </table:table-cell>
          <table:table-cell table:style-name="ce13" table:formula="of:=[.Z$18]-[.Y$18]" office:value-type="float" office:value="1.60210890574558" calcext:value-type="float">
            <text:p>1.60</text:p>
          </table:table-cell>
          <table:table-cell table:style-name="ce13" table:formula="of:=[.AA$18]-[.Z$18]" office:value-type="float" office:value="1.59739005653086" calcext:value-type="float">
            <text:p>1.60</text:p>
          </table:table-cell>
          <table:table-cell table:style-name="ce13" table:formula="of:=[.AB$18]-[.AA$18]" office:value-type="float" office:value="1.59048768817941" calcext:value-type="float">
            <text:p>1.59</text:p>
          </table:table-cell>
          <table:table-cell table:style-name="ce13" table:formula="of:=[.AC$18]-[.AB$18]" office:value-type="float" office:value="1.58160161338662" calcext:value-type="float">
            <text:p>1.58</text:p>
          </table:table-cell>
          <table:table-cell table:style-name="ce13" table:formula="of:=[.AD$18]-[.AC$18]" office:value-type="float" office:value="1.5709178613992" calcext:value-type="float">
            <text:p>1.57</text:p>
          </table:table-cell>
          <table:table-cell table:style-name="ce13" table:formula="of:=[.AE$18]-[.AD$18]" office:value-type="float" office:value="1.55860954416187" calcext:value-type="float">
            <text:p>1.56</text:p>
          </table:table-cell>
          <table:table-cell table:style-name="ce13" table:formula="of:=[.AF$18]-[.AE$18]" office:value-type="float" office:value="1.54483767014822" calcext:value-type="float">
            <text:p>1.54</text:p>
          </table:table-cell>
          <table:table-cell table:style-name="ce13" table:formula="of:=[.AG$18]-[.AF$18]" office:value-type="float" office:value="1.52975190897736" calcext:value-type="float">
            <text:p>1.53</text:p>
          </table:table-cell>
          <table:table-cell table:style-name="ce13" table:formula="of:=[.AH$18]-[.AG$18]" office:value-type="float" office:value="1.51349130973688" calcext:value-type="float">
            <text:p>1.51</text:p>
          </table:table-cell>
          <table:table-cell table:style-name="ce13" table:formula="of:=[.AI$18]-[.AH$18]" office:value-type="float" office:value="1.49618497575915" calcext:value-type="float">
            <text:p>1.50</text:p>
          </table:table-cell>
          <table:table-cell table:style-name="ce13" table:formula="of:=[.AJ$18]-[.AI$18]" office:value-type="float" office:value="1.47795269843894" calcext:value-type="float">
            <text:p>1.48</text:p>
          </table:table-cell>
          <table:table-cell table:style-name="ce13" table:formula="of:=[.AK$18]-[.AJ$18]" office:value-type="float" office:value="1.45890555252529" calcext:value-type="float">
            <text:p>1.46</text:p>
          </table:table-cell>
          <table:table-cell table:style-name="ce13" table:formula="of:=[.AL$18]-[.AK$18]" office:value-type="float" office:value="1.43914645518068" calcext:value-type="float">
            <text:p>1.44</text:p>
          </table:table-cell>
          <table:table-cell table:style-name="ce13" table:formula="of:=[.AM$18]-[.AL$18]" office:value-type="float" office:value="1.41877069096167" calcext:value-type="float">
            <text:p>1.42</text:p>
          </table:table-cell>
          <table:table-cell table:style-name="ce13" table:formula="of:=[.AN$18]-[.AM$18]" office:value-type="float" office:value="1.39786640475261" calcext:value-type="float">
            <text:p>1.40</text:p>
          </table:table-cell>
          <table:table-cell table:style-name="ce13" table:formula="of:=[.AO$18]-[.AN$18]" office:value-type="float" office:value="1.37651506456091" calcext:value-type="float">
            <text:p>1.38</text:p>
          </table:table-cell>
          <table:table-cell table:style-name="ce13" table:formula="of:=[.AP$18]-[.AO$18]" office:value-type="float" office:value="1.35479189597191" calcext:value-type="float">
            <text:p>1.35</text:p>
          </table:table-cell>
          <table:table-cell table:style-name="ce13" table:formula="of:=[.AQ$18]-[.AP$18]" office:value-type="float" office:value="1.33276628995441" calcext:value-type="float">
            <text:p>1.33</text:p>
          </table:table-cell>
          <table:table-cell table:style-name="ce13" table:formula="of:=[.AR$18]-[.AQ$18]" office:value-type="float" office:value="1.31050218560962" calcext:value-type="float">
            <text:p>1.31</text:p>
          </table:table-cell>
          <table:table-cell table:style-name="ce13" table:formula="of:=[.AS$18]-[.AR$18]" office:value-type="float" office:value="1.28805842935951" calcext:value-type="float">
            <text:p>1.29</text:p>
          </table:table-cell>
          <table:table-cell table:style-name="ce13" table:formula="of:=[.AT$18]-[.AS$18]" office:value-type="float" office:value="1.26548911198677" calcext:value-type="float">
            <text:p>1.27</text:p>
          </table:table-cell>
          <table:table-cell table:style-name="ce13" table:formula="of:=[.AU$18]-[.AT$18]" office:value-type="float" office:value="1.24284388484982" calcext:value-type="float">
            <text:p>1.24</text:p>
          </table:table-cell>
          <table:table-cell table:style-name="ce13" table:formula="of:=[.AV$18]-[.AU$18]" office:value-type="float" office:value="1.22016825652329" calcext:value-type="float">
            <text:p>1.22</text:p>
          </table:table-cell>
          <table:table-cell table:style-name="ce13" table:formula="of:=[.AW$18]-[.AV$18]" office:value-type="float" office:value="1.19750387103677" calcext:value-type="float">
            <text:p>1.20</text:p>
          </table:table-cell>
          <table:table-cell table:style-name="ce13" table:formula="of:=[.AX$18]-[.AW$18]" office:value-type="float" office:value="1.17488876881725" calcext:value-type="float">
            <text:p>1.17</text:p>
          </table:table-cell>
          <table:table-cell table:style-name="ce13" table:formula="of:=[.AY$18]-[.AX$18]" office:value-type="float" office:value="1.15235763137505" calcext:value-type="float">
            <text:p>1.15</text:p>
          </table:table-cell>
          <table:table-cell table:style-name="ce13" table:formula="of:=[.AZ$18]-[.AY$18]" office:value-type="float" office:value="1.12994201071058" calcext:value-type="float">
            <text:p>1.13</text:p>
          </table:table-cell>
          <table:table-cell table:style-name="ce13" table:formula="of:=[.BA$18]-[.AZ$18]" office:value-type="float" office:value="1.10767054436305" calcext:value-type="float">
            <text:p>1.11</text:p>
          </table:table-cell>
          <table:table-cell table:style-name="ce13" table:formula="of:=[.BB$18]-[.BA$18]" office:value-type="float" office:value="1.08556915696596" calcext:value-type="float">
            <text:p>1.09</text:p>
          </table:table-cell>
          <table:table-cell table:style-name="ce13" table:formula="of:=[.BC$18]-[.BB$18]" office:value-type="float" office:value="1.06366124912435" calcext:value-type="float">
            <text:p>1.06</text:p>
          </table:table-cell>
          <table:table-cell table:style-name="ce13" table:formula="of:=[.BD$18]-[.BC$18]" office:value-type="float" office:value="1.04196787437978" calcext:value-type="float">
            <text:p>1.04</text:p>
          </table:table-cell>
          <table:table-cell table:style-name="ce13" table:formula="of:=[.BE$18]-[.BD$18]" office:value-type="float" office:value="1.02050790498365" calcext:value-type="float">
            <text:p>1.02</text:p>
          </table:table-cell>
          <table:table-cell table:style-name="ce13" table:formula="of:=[.BF$18]-[.BE$18]" office:value-type="float" office:value="0.999298187156782" calcext:value-type="float">
            <text:p>1.00</text:p>
          </table:table-cell>
          <table:table-cell table:style-name="ce13" table:formula="of:=[.BG$18]-[.BF$18]" office:value-type="float" office:value="0.978353686473369" calcext:value-type="float">
            <text:p>0.98</text:p>
          </table:table-cell>
          <table:table-cell table:style-name="ce13" table:formula="of:=[.BH$18]-[.BG$18]" office:value-type="float" office:value="0.95768762396817" calcext:value-type="float">
            <text:p>0.96</text:p>
          </table:table-cell>
          <table:table-cell table:style-name="ce13" table:formula="of:=[.BI$18]-[.BH$18]" office:value-type="float" office:value="0.937311603532308" calcext:value-type="float">
            <text:p>0.94</text:p>
          </table:table-cell>
          <table:table-cell table:style-name="ce13" table:formula="of:=[.BJ$18]-[.BI$18]" office:value-type="float" office:value="0.917235731127008" calcext:value-type="float">
            <text:p>0.92</text:p>
          </table:table-cell>
          <table:table-cell table:style-name="ce13" table:formula="of:=[.BK$18]-[.BJ$18]" office:value-type="float" office:value="0.897468726315154" calcext:value-type="float">
            <text:p>0.90</text:p>
          </table:table-cell>
          <table:table-cell table:style-name="ce13" table:formula="of:=[.BL$18]-[.BK$18]" office:value-type="float" office:value="0.878018026579625" calcext:value-type="float">
            <text:p>0.88</text:p>
          </table:table-cell>
          <table:table-cell table:style-name="ce13" table:formula="of:=[.BM$18]-[.BL$18]" office:value-type="float" office:value="0.858889884869441" calcext:value-type="float">
            <text:p>0.86</text:p>
          </table:table-cell>
          <table:table-cell table:style-name="ce13" table:formula="of:=[.BN$18]-[.BM$18]" office:value-type="float" office:value="0.840089460789486" calcext:value-type="float">
            <text:p>0.84</text:p>
          </table:table-cell>
          <table:table-cell table:style-name="ce13" table:formula="of:=[.BO$18]-[.BN$18]" office:value-type="float" office:value="0.821620905822513" calcext:value-type="float">
            <text:p>0.82</text:p>
          </table:table-cell>
          <table:table-cell table:style-name="ce13" table:formula="of:=[.BP$18]-[.BO$18]" office:value-type="float" office:value="0.803487442952331" calcext:value-type="float">
            <text:p>0.80</text:p>
          </table:table-cell>
          <table:table-cell table:style-name="ce13" table:formula="of:=[.BQ$18]-[.BP$18]" office:value-type="float" office:value="0.785691441031219" calcext:value-type="float">
            <text:p>0.79</text:p>
          </table:table-cell>
          <table:table-cell table:style-name="ce13" table:formula="of:=[.BR$18]-[.BQ$18]" office:value-type="float" office:value="0.768234484216947" calcext:value-type="float">
            <text:p>0.77</text:p>
          </table:table-cell>
          <table:table-cell table:style-name="ce13" table:formula="of:=[.BS$18]-[.BR$18]" office:value-type="float" office:value="0.751117436784057" calcext:value-type="float">
            <text:p>0.75</text:p>
          </table:table-cell>
          <table:table-cell table:style-name="ce13" table:formula="of:=[.BT$18]-[.BS$18]" office:value-type="float" office:value="0.734340503595746" calcext:value-type="float">
            <text:p>0.73</text:p>
          </table:table-cell>
          <table:table-cell table:style-name="ce13" table:formula="of:=[.BU$18]-[.BT$18]" office:value-type="float" office:value="0.717903286506186" calcext:value-type="float">
            <text:p>0.72</text:p>
          </table:table-cell>
          <table:table-cell table:style-name="ce13" table:formula="of:=[.BV$18]-[.BU$18]" office:value-type="float" office:value="0.70180483694584" calcext:value-type="float">
            <text:p>0.70</text:p>
          </table:table-cell>
          <table:table-cell table:style-name="ce13" table:formula="of:=[.BW$18]-[.BV$18]" office:value-type="float" office:value="0.68604370492865" calcext:value-type="float">
            <text:p>0.69</text:p>
          </table:table-cell>
          <table:table-cell table:style-name="ce13" table:formula="of:=[.BX$18]-[.BW$18]" office:value-type="float" office:value="0.670617984703526" calcext:value-type="float">
            <text:p>0.67</text:p>
          </table:table-cell>
          <table:table-cell table:style-name="ce13" table:formula="of:=[.BY$18]-[.BX$18]" office:value-type="float" office:value="0.655525357262107" calcext:value-type="float">
            <text:p>0.66</text:p>
          </table:table-cell>
          <table:table-cell table:style-name="ce13" table:formula="of:=[.BZ$18]-[.BY$18]" office:value-type="float" office:value="0.640763129898062" calcext:value-type="float">
            <text:p>0.64</text:p>
          </table:table-cell>
          <table:table-cell table:style-name="ce13" table:formula="of:=[.CA$18]-[.BZ$18]" office:value-type="float" office:value="0.626328273005612" calcext:value-type="float">
            <text:p>0.63</text:p>
          </table:table-cell>
          <table:table-cell table:style-name="ce13" table:formula="of:=[.CB$18]-[.CA$18]" office:value-type="float" office:value="0.612217454290374" calcext:value-type="float">
            <text:p>0.61</text:p>
          </table:table-cell>
          <table:table-cell table:style-name="ce13" table:formula="of:=[.CC$18]-[.CB$18]" office:value-type="float" office:value="0.598427070556554" calcext:value-type="float">
            <text:p>0.60</text:p>
          </table:table-cell>
          <table:table-cell table:style-name="ce13" table:formula="of:=[.CD$18]-[.CC$18]" office:value-type="float" office:value="0.584953277224614" calcext:value-type="float">
            <text:p>0.58</text:p>
          </table:table-cell>
          <table:table-cell table:style-name="ce13" table:formula="of:=[.CE$18]-[.CD$18]" office:value-type="float" office:value="0.571792015724057" calcext:value-type="float">
            <text:p>0.57</text:p>
          </table:table-cell>
          <table:table-cell table:style-name="ce13" table:formula="of:=[.CF$18]-[.CE$18]" office:value-type="float" office:value="0.558939038896469" calcext:value-type="float">
            <text:p>0.56</text:p>
          </table:table-cell>
          <table:table-cell table:style-name="ce13" table:formula="of:=[.CG$18]-[.CF$18]" office:value-type="float" office:value="0.546389934537032" calcext:value-type="float">
            <text:p>0.55</text:p>
          </table:table-cell>
          <table:table-cell table:style-name="ce13" table:formula="of:=[.CH$18]-[.CG$18]" office:value-type="float" office:value="0.534140147193654" calcext:value-type="float">
            <text:p>0.53</text:p>
          </table:table-cell>
          <table:table-cell table:style-name="ce13" table:formula="of:=[.CI$18]-[.CH$18]" office:value-type="float" office:value="0.522184998336797" calcext:value-type="float">
            <text:p>0.52</text:p>
          </table:table-cell>
          <table:table-cell table:style-name="ce13" table:formula="of:=[.CJ$18]-[.CI$18]" office:value-type="float" office:value="0.510519705004654" calcext:value-type="float">
            <text:p>0.51</text:p>
          </table:table-cell>
          <table:table-cell table:style-name="ce13" table:formula="of:=[.CK$18]-[.CJ$18]" office:value-type="float" office:value="-86.520494753313" calcext:value-type="float">
            <text:p>-86.52</text:p>
          </table:table-cell>
          <table:table-cell table:style-name="ce13" table:formula="of:=[.CL$18]-[.CK$18]" office:value-type="float" office:value="0" calcext:value-type="float">
            <text:p>0.00</text:p>
          </table:table-cell>
          <table:table-cell table:style-name="ce13" table:formula="of:=[.CM$18]-[.CL$18]" office:value-type="float" office:value="0" calcext:value-type="float">
            <text:p>0.00</text:p>
          </table:table-cell>
          <table:table-cell table:style-name="ce13" table:formula="of:=[.CN$18]-[.CM$18]" office:value-type="float" office:value="0" calcext:value-type="float">
            <text:p>0.00</text:p>
          </table:table-cell>
          <table:table-cell table:style-name="ce13" table:formula="of:=[.CO$18]-[.CN$18]" office:value-type="float" office:value="0" calcext:value-type="float">
            <text:p>0.00</text:p>
          </table:table-cell>
          <table:table-cell table:style-name="ce13" table:formula="of:=[.CP$18]-[.CO$18]" office:value-type="float" office:value="0" calcext:value-type="float">
            <text:p>0.00</text:p>
          </table:table-cell>
          <table:table-cell table:style-name="ce13" table:formula="of:=[.CQ$18]-[.CP$18]" office:value-type="float" office:value="0" calcext:value-type="float">
            <text:p>0.00</text:p>
          </table:table-cell>
          <table:table-cell table:style-name="ce13" table:formula="of:=[.CR$18]-[.CQ$18]" office:value-type="float" office:value="0" calcext:value-type="float">
            <text:p>0.00</text:p>
          </table:table-cell>
          <table:table-cell table:style-name="ce13" table:formula="of:=[.CS$18]-[.CR$18]" office:value-type="float" office:value="0" calcext:value-type="float">
            <text:p>0.00</text:p>
          </table:table-cell>
          <table:table-cell table:style-name="ce13" table:formula="of:=[.CT$18]-[.CS$18]" office:value-type="float" office:value="0" calcext:value-type="float">
            <text:p>0.00</text:p>
          </table:table-cell>
          <table:table-cell table:style-name="ce13" table:formula="of:=[.CU$18]-[.CT$18]" office:value-type="float" office:value="0" calcext:value-type="float">
            <text:p>0.00</text:p>
          </table:table-cell>
          <table:table-cell table:style-name="ce13" table:formula="of:=[.CV$18]-[.CU$18]" office:value-type="float" office:value="0" calcext:value-type="float">
            <text:p>0.00</text:p>
          </table:table-cell>
          <table:table-cell table:style-name="ce13" table:formula="of:=[.CW$18]-[.CV$18]" office:value-type="float" office:value="0" calcext:value-type="float">
            <text:p>0.00</text:p>
          </table:table-cell>
          <table:table-cell table:style-name="ce13" table:formula="of:=[.CX$18]-[.CW$18]" office:value-type="float" office:value="0" calcext:value-type="float">
            <text:p>0.00</text:p>
          </table:table-cell>
          <table:table-cell table:style-name="ce13" table:formula="of:=[.CY$18]-[.CX$18]" office:value-type="float" office:value="0" calcext:value-type="float">
            <text:p>0.00</text:p>
          </table:table-cell>
          <table:table-cell table:style-name="ce13" table:formula="of:=[.CZ$18]-[.CY$18]" office:value-type="float" office:value="0" calcext:value-type="float">
            <text:p>0.00</text:p>
          </table:table-cell>
          <table:table-cell table:style-name="ce13" table:formula="of:=[.DA$18]-[.CZ$18]" office:value-type="float" office:value="0" calcext:value-type="float">
            <text:p>0.00</text:p>
          </table:table-cell>
          <table:table-cell table:style-name="ce13" table:formula="of:=[.DB$18]-[.DA$18]" office:value-type="float" office:value="0" calcext:value-type="float">
            <text:p>0.00</text:p>
          </table:table-cell>
          <table:table-cell table:style-name="ce13" table:formula="of:=[.DC$18]-[.DB$18]" office:value-type="float" office:value="0" calcext:value-type="float">
            <text:p>0.00</text:p>
          </table:table-cell>
          <table:table-cell table:style-name="ce13" table:formula="of:=[.DD$18]-[.DC$18]" office:value-type="float" office:value="0" calcext:value-type="float">
            <text:p>0.00</text:p>
          </table:table-cell>
          <table:table-cell table:style-name="ce13" table:formula="of:=[.DE$18]-[.DD$18]" office:value-type="float" office:value="0" calcext:value-type="float">
            <text:p>0.00</text:p>
          </table:table-cell>
          <table:table-cell table:style-name="ce13" table:formula="of:=[.DF$18]-[.DE$18]" office:value-type="float" office:value="0" calcext:value-type="float">
            <text:p>0.00</text:p>
          </table:table-cell>
          <table:table-cell table:style-name="ce13" table:formula="of:=[.DG$18]-[.DF$18]" office:value-type="float" office:value="0" calcext:value-type="float">
            <text:p>0.00</text:p>
          </table:table-cell>
          <table:table-cell table:style-name="ce13" table:formula="of:=[.DH$18]-[.DG$18]" office:value-type="float" office:value="0" calcext:value-type="float">
            <text:p>0.00</text:p>
          </table:table-cell>
          <table:table-cell table:style-name="ce13" table:formula="of:=[.DI$18]-[.DH$18]" office:value-type="float" office:value="0" calcext:value-type="float">
            <text:p>0.00</text:p>
          </table:table-cell>
          <table:table-cell table:style-name="ce13" table:formula="of:=[.DJ$18]-[.DI$18]" office:value-type="float" office:value="0" calcext:value-type="float">
            <text:p>0.00</text:p>
          </table:table-cell>
          <table:table-cell table:style-name="ce13" table:formula="of:=[.DK$18]-[.DJ$18]" office:value-type="float" office:value="0" calcext:value-type="float">
            <text:p>0.00</text:p>
          </table:table-cell>
          <table:table-cell table:style-name="ce13" table:formula="of:=[.DL$18]-[.DK$18]" office:value-type="float" office:value="0" calcext:value-type="float">
            <text:p>0.00</text:p>
          </table:table-cell>
          <table:table-cell table:style-name="ce13" table:formula="of:=[.DM$18]-[.DL$18]" office:value-type="float" office:value="0" calcext:value-type="float">
            <text:p>0.00</text:p>
          </table:table-cell>
          <table:table-cell table:style-name="ce13" table:formula="of:=[.DN$18]-[.DM$18]" office:value-type="float" office:value="0" calcext:value-type="float">
            <text:p>0.00</text:p>
          </table:table-cell>
          <table:table-cell table:style-name="ce13" table:formula="of:=[.DO$18]-[.DN$18]" office:value-type="float" office:value="0" calcext:value-type="float">
            <text:p>0.00</text:p>
          </table:table-cell>
          <table:table-cell table:style-name="ce13" table:formula="of:=[.DP$18]-[.DO$18]" office:value-type="float" office:value="0" calcext:value-type="float">
            <text:p>0.00</text:p>
          </table:table-cell>
          <table:table-cell table:style-name="ce13" table:formula="of:=[.DQ$18]-[.DP$18]" office:value-type="float" office:value="0" calcext:value-type="float">
            <text:p>0.00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style-name="ce1" office:value-type="string" calcext:value-type="string">
            <text:p>Carbon schedule, annual_pl(t) tC/ha/year, calculus</text:p>
          </table:table-cell>
          <table:table-cell table:style-name="ce13" table:formula="of:=IF([.B16]&lt;=[.$B$5]-[.$B$14];2*[.$B$7]*[.$B$6]*([.$B$11]+[.$B$12]*[.$B$9])*(EXP(-[.$B$7]*[.B16]) - EXP(-2*[.$B$7]*[.B16])) + [.$B$13]*[.$B$8];- [.$B$6]*(1-EXP(-[.$B$7]*[.B$16]))^2*IF([.B16]=[.$B$5];1;0))" office:value-type="float" office:value="0.266211756783841" calcext:value-type="float">
            <text:p>0.27</text:p>
          </table:table-cell>
          <table:table-cell table:style-name="ce13" table:formula="of:=IF([.C16]&lt;=[.$B$5]-[.$B$14];2*[.$B$7]*[.$B$6]*([.$B$11]+[.$B$12]*[.$B$9])*(EXP(-[.$B$7]*[.C16]) - EXP(-2*[.$B$7]*[.C16])) + [.$B$13]*[.$B$8];- [.$B$6]*(1-EXP(-[.$B$7]*[.C$16]))^2*IF([.C16]=[.$B$5];1;0))" office:value-type="float" office:value="0.424446166852168" calcext:value-type="float">
            <text:p>0.42</text:p>
          </table:table-cell>
          <table:table-cell table:style-name="ce13" table:formula="of:=IF([.D16]&lt;=[.$B$5]-[.$B$14];2*[.$B$7]*[.$B$6]*([.$B$11]+[.$B$12]*[.$B$9])*(EXP(-[.$B$7]*[.D16]) - EXP(-2*[.$B$7]*[.D16])) + [.$B$13]*[.$B$8];- [.$B$6]*(1-EXP(-[.$B$7]*[.D$16]))^2*IF([.D16]=[.$B$5];1;0))" office:value-type="float" office:value="0.568490638905015" calcext:value-type="float">
            <text:p>0.57</text:p>
          </table:table-cell>
          <table:table-cell table:style-name="ce13" table:formula="of:=IF([.E16]&lt;=[.$B$5]-[.$B$14];2*[.$B$7]*[.$B$6]*([.$B$11]+[.$B$12]*[.$B$9])*(EXP(-[.$B$7]*[.E16]) - EXP(-2*[.$B$7]*[.E16])) + [.$B$13]*[.$B$8];- [.$B$6]*(1-EXP(-[.$B$7]*[.E$16]))^2*IF([.E16]=[.$B$5];1;0))" office:value-type="float" office:value="0.699318566534853" calcext:value-type="float">
            <text:p>0.70</text:p>
          </table:table-cell>
          <table:table-cell table:style-name="ce13" table:formula="of:=IF([.F16]&lt;=[.$B$5]-[.$B$14];2*[.$B$7]*[.$B$6]*([.$B$11]+[.$B$12]*[.$B$9])*(EXP(-[.$B$7]*[.F16]) - EXP(-2*[.$B$7]*[.F16])) + [.$B$13]*[.$B$8];- [.$B$6]*(1-EXP(-[.$B$7]*[.F$16]))^2*IF([.F16]=[.$B$5];1;0))" office:value-type="float" office:value="0.81784231173572" calcext:value-type="float">
            <text:p>0.82</text:p>
          </table:table-cell>
          <table:table-cell table:style-name="ce13" table:formula="of:=IF([.G16]&lt;=[.$B$5]-[.$B$14];2*[.$B$7]*[.$B$6]*([.$B$11]+[.$B$12]*[.$B$9])*(EXP(-[.$B$7]*[.G16]) - EXP(-2*[.$B$7]*[.G16])) + [.$B$13]*[.$B$8];- [.$B$6]*(1-EXP(-[.$B$7]*[.G$16]))^2*IF([.G16]=[.$B$5];1;0))" office:value-type="float" office:value="0.924916887537778" calcext:value-type="float">
            <text:p>0.92</text:p>
          </table:table-cell>
          <table:table-cell table:style-name="ce13" table:formula="of:=IF([.H16]&lt;=[.$B$5]-[.$B$14];2*[.$B$7]*[.$B$6]*([.$B$11]+[.$B$12]*[.$B$9])*(EXP(-[.$B$7]*[.H16]) - EXP(-2*[.$B$7]*[.H16])) + [.$B$13]*[.$B$8];- [.$B$6]*(1-EXP(-[.$B$7]*[.H$16]))^2*IF([.H16]=[.$B$5];1;0))" office:value-type="float" office:value="1.02134342238623" calcext:value-type="float">
            <text:p>1.02</text:p>
          </table:table-cell>
          <table:table-cell table:style-name="ce13" table:formula="of:=IF([.I16]&lt;=[.$B$5]-[.$B$14];2*[.$B$7]*[.$B$6]*([.$B$11]+[.$B$12]*[.$B$9])*(EXP(-[.$B$7]*[.I16]) - EXP(-2*[.$B$7]*[.I16])) + [.$B$13]*[.$B$8];- [.$B$6]*(1-EXP(-[.$B$7]*[.I$16]))^2*IF([.I16]=[.$B$5];1;0))" office:value-type="float" office:value="1.10787241908698" calcext:value-type="float">
            <text:p>1.11</text:p>
          </table:table-cell>
          <table:table-cell table:style-name="ce13" table:formula="of:=IF([.J16]&lt;=[.$B$5]-[.$B$14];2*[.$B$7]*[.$B$6]*([.$B$11]+[.$B$12]*[.$B$9])*(EXP(-[.$B$7]*[.J16]) - EXP(-2*[.$B$7]*[.J16])) + [.$B$13]*[.$B$8];- [.$B$6]*(1-EXP(-[.$B$7]*[.J$16]))^2*IF([.J16]=[.$B$5];1;0))" office:value-type="float" office:value="1.1852068203914" calcext:value-type="float">
            <text:p>1.19</text:p>
          </table:table-cell>
          <table:table-cell table:style-name="ce13" table:formula="of:=IF([.K16]&lt;=[.$B$5]-[.$B$14];2*[.$B$7]*[.$B$6]*([.$B$11]+[.$B$12]*[.$B$9])*(EXP(-[.$B$7]*[.K16]) - EXP(-2*[.$B$7]*[.K16])) + [.$B$13]*[.$B$8];- [.$B$6]*(1-EXP(-[.$B$7]*[.K$16]))^2*IF([.K16]=[.$B$5];1;0))" office:value-type="float" office:value="1.25400489258636" calcext:value-type="float">
            <text:p>1.25</text:p>
          </table:table-cell>
          <table:table-cell table:style-name="ce13" table:formula="of:=IF([.L16]&lt;=[.$B$5]-[.$B$14];2*[.$B$7]*[.$B$6]*([.$B$11]+[.$B$12]*[.$B$9])*(EXP(-[.$B$7]*[.L16]) - EXP(-2*[.$B$7]*[.L16])) + [.$B$13]*[.$B$8];- [.$B$6]*(1-EXP(-[.$B$7]*[.L$16]))^2*IF([.L16]=[.$B$5];1;0))" office:value-type="float" office:value="1.31488293779049" calcext:value-type="float">
            <text:p>1.31</text:p>
          </table:table-cell>
          <table:table-cell table:style-name="ce13" table:formula="of:=IF([.M16]&lt;=[.$B$5]-[.$B$14];2*[.$B$7]*[.$B$6]*([.$B$11]+[.$B$12]*[.$B$9])*(EXP(-[.$B$7]*[.M16]) - EXP(-2*[.$B$7]*[.M16])) + [.$B$13]*[.$B$8];- [.$B$6]*(1-EXP(-[.$B$7]*[.M$16]))^2*IF([.M16]=[.$B$5];1;0))" office:value-type="float" office:value="1.36841784503169" calcext:value-type="float">
            <text:p>1.37</text:p>
          </table:table-cell>
          <table:table-cell table:style-name="ce13" table:formula="of:=IF([.N16]&lt;=[.$B$5]-[.$B$14];2*[.$B$7]*[.$B$6]*([.$B$11]+[.$B$12]*[.$B$9])*(EXP(-[.$B$7]*[.N16]) - EXP(-2*[.$B$7]*[.N16])) + [.$B$13]*[.$B$8];- [.$B$6]*(1-EXP(-[.$B$7]*[.N$16]))^2*IF([.N16]=[.$B$5];1;0))" office:value-type="float" office:value="1.41514948959091" calcext:value-type="float">
            <text:p>1.42</text:p>
          </table:table-cell>
          <table:table-cell table:style-name="ce13" table:formula="of:=IF([.O16]&lt;=[.$B$5]-[.$B$14];2*[.$B$7]*[.$B$6]*([.$B$11]+[.$B$12]*[.$B$9])*(EXP(-[.$B$7]*[.O16]) - EXP(-2*[.$B$7]*[.O16])) + [.$B$13]*[.$B$8];- [.$B$6]*(1-EXP(-[.$B$7]*[.O$16]))^2*IF([.O16]=[.$B$5];1;0))" office:value-type="float" office:value="1.45558298954239" calcext:value-type="float">
            <text:p>1.46</text:p>
          </table:table-cell>
          <table:table-cell table:style-name="ce13" table:formula="of:=IF([.P16]&lt;=[.$B$5]-[.$B$14];2*[.$B$7]*[.$B$6]*([.$B$11]+[.$B$12]*[.$B$9])*(EXP(-[.$B$7]*[.P16]) - EXP(-2*[.$B$7]*[.P16])) + [.$B$13]*[.$B$8];- [.$B$6]*(1-EXP(-[.$B$7]*[.P$16]))^2*IF([.P16]=[.$B$5];1;0))" office:value-type="float" office:value="1.49019082789734" calcext:value-type="float">
            <text:p>1.49</text:p>
          </table:table-cell>
          <table:table-cell table:style-name="ce13" table:formula="of:=IF([.Q16]&lt;=[.$B$5]-[.$B$14];2*[.$B$7]*[.$B$6]*([.$B$11]+[.$B$12]*[.$B$9])*(EXP(-[.$B$7]*[.Q16]) - EXP(-2*[.$B$7]*[.Q16])) + [.$B$13]*[.$B$8];- [.$B$6]*(1-EXP(-[.$B$7]*[.Q$16]))^2*IF([.Q16]=[.$B$5];1;0))" office:value-type="float" office:value="1.51941484826606" calcext:value-type="float">
            <text:p>1.52</text:p>
          </table:table-cell>
          <table:table-cell table:style-name="ce13" table:formula="of:=IF([.R16]&lt;=[.$B$5]-[.$B$14];2*[.$B$7]*[.$B$6]*([.$B$11]+[.$B$12]*[.$B$9])*(EXP(-[.$B$7]*[.R16]) - EXP(-2*[.$B$7]*[.R16])) + [.$B$13]*[.$B$8];- [.$B$6]*(1-EXP(-[.$B$7]*[.R$16]))^2*IF([.R16]=[.$B$5];1;0))" office:value-type="float" office:value="1.54366813148981" calcext:value-type="float">
            <text:p>1.54</text:p>
          </table:table-cell>
          <table:table-cell table:style-name="ce13" table:formula="of:=IF([.S16]&lt;=[.$B$5]-[.$B$14];2*[.$B$7]*[.$B$6]*([.$B$11]+[.$B$12]*[.$B$9])*(EXP(-[.$B$7]*[.S16]) - EXP(-2*[.$B$7]*[.S16])) + [.$B$13]*[.$B$8];- [.$B$6]*(1-EXP(-[.$B$7]*[.S$16]))^2*IF([.S16]=[.$B$5];1;0))" office:value-type="float" office:value="1.5633367602573" calcext:value-type="float">
            <text:p>1.56</text:p>
          </table:table-cell>
          <table:table-cell table:style-name="ce13" table:formula="of:=IF([.T16]&lt;=[.$B$5]-[.$B$14];2*[.$B$7]*[.$B$6]*([.$B$11]+[.$B$12]*[.$B$9])*(EXP(-[.$B$7]*[.T16]) - EXP(-2*[.$B$7]*[.T16])) + [.$B$13]*[.$B$8];- [.$B$6]*(1-EXP(-[.$B$7]*[.T$16]))^2*IF([.T16]=[.$B$5];1;0))" office:value-type="float" office:value="1.57878147830979" calcext:value-type="float">
            <text:p>1.58</text:p>
          </table:table-cell>
          <table:table-cell table:style-name="ce13" table:formula="of:=IF([.U16]&lt;=[.$B$5]-[.$B$14];2*[.$B$7]*[.$B$6]*([.$B$11]+[.$B$12]*[.$B$9])*(EXP(-[.$B$7]*[.U16]) - EXP(-2*[.$B$7]*[.U16])) + [.$B$13]*[.$B$8];- [.$B$6]*(1-EXP(-[.$B$7]*[.U$16]))^2*IF([.U16]=[.$B$5];1;0))" office:value-type="float" office:value="1.59033925045167" calcext:value-type="float">
            <text:p>1.59</text:p>
          </table:table-cell>
          <table:table-cell table:style-name="ce13" table:formula="of:=IF([.V16]&lt;=[.$B$5]-[.$B$14];2*[.$B$7]*[.$B$6]*([.$B$11]+[.$B$12]*[.$B$9])*(EXP(-[.$B$7]*[.V16]) - EXP(-2*[.$B$7]*[.V16])) + [.$B$13]*[.$B$8];- [.$B$6]*(1-EXP(-[.$B$7]*[.V$16]))^2*IF([.V16]=[.$B$5];1;0))" office:value-type="float" office:value="1.5983247292191" calcext:value-type="float">
            <text:p>1.60</text:p>
          </table:table-cell>
          <table:table-cell table:style-name="ce13" table:formula="of:=IF([.W16]&lt;=[.$B$5]-[.$B$14];2*[.$B$7]*[.$B$6]*([.$B$11]+[.$B$12]*[.$B$9])*(EXP(-[.$B$7]*[.W16]) - EXP(-2*[.$B$7]*[.W16])) + [.$B$13]*[.$B$8];- [.$B$6]*(1-EXP(-[.$B$7]*[.W$16]))^2*IF([.W16]=[.$B$5];1;0))" office:value-type="float" office:value="1.60303163371633" calcext:value-type="float">
            <text:p>1.60</text:p>
          </table:table-cell>
          <table:table-cell table:style-name="ce13" table:formula="of:=IF([.X16]&lt;=[.$B$5]-[.$B$14];2*[.$B$7]*[.$B$6]*([.$B$11]+[.$B$12]*[.$B$9])*(EXP(-[.$B$7]*[.X16]) - EXP(-2*[.$B$7]*[.X16])) + [.$B$13]*[.$B$8];- [.$B$6]*(1-EXP(-[.$B$7]*[.X$16]))^2*IF([.X16]=[.$B$5];1;0))" office:value-type="float" office:value="1.6047340458061" calcext:value-type="float">
            <text:p>1.60</text:p>
          </table:table-cell>
          <table:table-cell table:style-name="ce13" table:formula="of:=IF([.Y16]&lt;=[.$B$5]-[.$B$14];2*[.$B$7]*[.$B$6]*([.$B$11]+[.$B$12]*[.$B$9])*(EXP(-[.$B$7]*[.Y16]) - EXP(-2*[.$B$7]*[.Y16])) + [.$B$13]*[.$B$8];- [.$B$6]*(1-EXP(-[.$B$7]*[.Y$16]))^2*IF([.Y16]=[.$B$5];1;0))" office:value-type="float" office:value="1.60368762853644" calcext:value-type="float">
            <text:p>1.60</text:p>
          </table:table-cell>
          <table:table-cell table:style-name="ce13" table:formula="of:=IF([.Z16]&lt;=[.$B$5]-[.$B$14];2*[.$B$7]*[.$B$6]*([.$B$11]+[.$B$12]*[.$B$9])*(EXP(-[.$B$7]*[.Z16]) - EXP(-2*[.$B$7]*[.Z16])) + [.$B$13]*[.$B$8];- [.$B$6]*(1-EXP(-[.$B$7]*[.Z$16]))^2*IF([.Z16]=[.$B$5];1;0))" office:value-type="float" office:value="1.60013077139995" calcext:value-type="float">
            <text:p>1.60</text:p>
          </table:table-cell>
          <table:table-cell table:style-name="ce13" table:formula="of:=IF([.AA16]&lt;=[.$B$5]-[.$B$14];2*[.$B$7]*[.$B$6]*([.$B$11]+[.$B$12]*[.$B$9])*(EXP(-[.$B$7]*[.AA16]) - EXP(-2*[.$B$7]*[.AA16])) + [.$B$13]*[.$B$8];- [.$B$6]*(1-EXP(-[.$B$7]*[.AA$16]))^2*IF([.AA16]=[.$B$5];1;0))" office:value-type="float" office:value="1.59428566675177" calcext:value-type="float">
            <text:p>1.59</text:p>
          </table:table-cell>
          <table:table-cell table:style-name="ce13" table:formula="of:=IF([.AB16]&lt;=[.$B$5]-[.$B$14];2*[.$B$7]*[.$B$6]*([.$B$11]+[.$B$12]*[.$B$9])*(EXP(-[.$B$7]*[.AB16]) - EXP(-2*[.$B$7]*[.AB16])) + [.$B$13]*[.$B$8];- [.$B$6]*(1-EXP(-[.$B$7]*[.AB$16]))^2*IF([.AB16]=[.$B$5];1;0))" office:value-type="float" office:value="1.58635932145865" calcext:value-type="float">
            <text:p>1.59</text:p>
          </table:table-cell>
          <table:table-cell table:style-name="ce13" table:formula="of:=IF([.AC16]&lt;=[.$B$5]-[.$B$14];2*[.$B$7]*[.$B$6]*([.$B$11]+[.$B$12]*[.$B$9])*(EXP(-[.$B$7]*[.AC16]) - EXP(-2*[.$B$7]*[.AC16])) + [.$B$13]*[.$B$8];- [.$B$6]*(1-EXP(-[.$B$7]*[.AC$16]))^2*IF([.AC16]=[.$B$5];1;0))" office:value-type="float" office:value="1.57654450761272" calcext:value-type="float">
            <text:p>1.58</text:p>
          </table:table-cell>
          <table:table-cell table:style-name="ce13" table:formula="of:=IF([.AD16]&lt;=[.$B$5]-[.$B$14];2*[.$B$7]*[.$B$6]*([.$B$11]+[.$B$12]*[.$B$9])*(EXP(-[.$B$7]*[.AD16]) - EXP(-2*[.$B$7]*[.AD16])) + [.$B$13]*[.$B$8];- [.$B$6]*(1-EXP(-[.$B$7]*[.AD$16]))^2*IF([.AD16]=[.$B$5];1;0))" office:value-type="float" office:value="1.56502065591812" calcext:value-type="float">
            <text:p>1.57</text:p>
          </table:table-cell>
          <table:table-cell table:style-name="ce13" table:formula="of:=IF([.AE16]&lt;=[.$B$5]-[.$B$14];2*[.$B$7]*[.$B$6]*([.$B$11]+[.$B$12]*[.$B$9])*(EXP(-[.$B$7]*[.AE16]) - EXP(-2*[.$B$7]*[.AE16])) + [.$B$13]*[.$B$8];- [.$B$6]*(1-EXP(-[.$B$7]*[.AE$16]))^2*IF([.AE16]=[.$B$5];1;0))" office:value-type="float" office:value="1.55195469514699" calcext:value-type="float">
            <text:p>1.55</text:p>
          </table:table-cell>
          <table:table-cell table:style-name="ce13" table:formula="of:=IF([.AF16]&lt;=[.$B$5]-[.$B$14];2*[.$B$7]*[.$B$6]*([.$B$11]+[.$B$12]*[.$B$9])*(EXP(-[.$B$7]*[.AF16]) - EXP(-2*[.$B$7]*[.AF16])) + [.$B$13]*[.$B$8];- [.$B$6]*(1-EXP(-[.$B$7]*[.AF$16]))^2*IF([.AF16]=[.$B$5];1;0))" office:value-type="float" office:value="1.5375018408618" calcext:value-type="float">
            <text:p>1.54</text:p>
          </table:table-cell>
          <table:table-cell table:style-name="ce13" table:formula="of:=IF([.AG16]&lt;=[.$B$5]-[.$B$14];2*[.$B$7]*[.$B$6]*([.$B$11]+[.$B$12]*[.$B$9])*(EXP(-[.$B$7]*[.AG16]) - EXP(-2*[.$B$7]*[.AG16])) + [.$B$13]*[.$B$8];- [.$B$6]*(1-EXP(-[.$B$7]*[.AG$16]))^2*IF([.AG16]=[.$B$5];1;0))" office:value-type="float" office:value="1.52180633641312" calcext:value-type="float">
            <text:p>1.52</text:p>
          </table:table-cell>
          <table:table-cell table:style-name="ce13" table:formula="of:=IF([.AH16]&lt;=[.$B$5]-[.$B$14];2*[.$B$7]*[.$B$6]*([.$B$11]+[.$B$12]*[.$B$9])*(EXP(-[.$B$7]*[.AH16]) - EXP(-2*[.$B$7]*[.AH16])) + [.$B$13]*[.$B$8];- [.$B$6]*(1-EXP(-[.$B$7]*[.AH$16]))^2*IF([.AH16]=[.$B$5];1;0))" office:value-type="float" office:value="1.50500214904505" calcext:value-type="float">
            <text:p>1.51</text:p>
          </table:table-cell>
          <table:table-cell table:style-name="ce13" table:formula="of:=IF([.AI16]&lt;=[.$B$5]-[.$B$14];2*[.$B$7]*[.$B$6]*([.$B$11]+[.$B$12]*[.$B$9])*(EXP(-[.$B$7]*[.AI16]) - EXP(-2*[.$B$7]*[.AI16])) + [.$B$13]*[.$B$8];- [.$B$6]*(1-EXP(-[.$B$7]*[.AI$16]))^2*IF([.AI16]=[.$B$5];1;0))" office:value-type="float" office:value="1.48721362377406" calcext:value-type="float">
            <text:p>1.49</text:p>
          </table:table-cell>
          <table:table-cell table:style-name="ce13" table:formula="of:=IF([.AJ16]&lt;=[.$B$5]-[.$B$14];2*[.$B$7]*[.$B$6]*([.$B$11]+[.$B$12]*[.$B$9])*(EXP(-[.$B$7]*[.AJ16]) - EXP(-2*[.$B$7]*[.AJ16])) + [.$B$13]*[.$B$8];- [.$B$6]*(1-EXP(-[.$B$7]*[.AJ$16]))^2*IF([.AJ16]=[.$B$5];1;0))" office:value-type="float" office:value="1.46855609755023" calcext:value-type="float">
            <text:p>1.47</text:p>
          </table:table-cell>
          <table:table-cell table:style-name="ce13" table:formula="of:=IF([.AK16]&lt;=[.$B$5]-[.$B$14];2*[.$B$7]*[.$B$6]*([.$B$11]+[.$B$12]*[.$B$9])*(EXP(-[.$B$7]*[.AK16]) - EXP(-2*[.$B$7]*[.AK16])) + [.$B$13]*[.$B$8];- [.$B$6]*(1-EXP(-[.$B$7]*[.AK$16]))^2*IF([.AK16]=[.$B$5];1;0))" office:value-type="float" office:value="1.44913647606239" calcext:value-type="float">
            <text:p>1.45</text:p>
          </table:table-cell>
          <table:table-cell table:style-name="ce13" table:formula="of:=IF([.AL16]&lt;=[.$B$5]-[.$B$14];2*[.$B$7]*[.$B$6]*([.$B$11]+[.$B$12]*[.$B$9])*(EXP(-[.$B$7]*[.AL16]) - EXP(-2*[.$B$7]*[.AL16])) + [.$B$13]*[.$B$8];- [.$B$6]*(1-EXP(-[.$B$7]*[.AL$16]))^2*IF([.AL16]=[.$B$5];1;0))" office:value-type="float" office:value="1.4290537754094" calcext:value-type="float">
            <text:p>1.43</text:p>
          </table:table-cell>
          <table:table-cell table:style-name="ce13" table:formula="of:=IF([.AM16]&lt;=[.$B$5]-[.$B$14];2*[.$B$7]*[.$B$6]*([.$B$11]+[.$B$12]*[.$B$9])*(EXP(-[.$B$7]*[.AM16]) - EXP(-2*[.$B$7]*[.AM16])) + [.$B$13]*[.$B$8];- [.$B$6]*(1-EXP(-[.$B$7]*[.AM$16]))^2*IF([.AM16]=[.$B$5];1;0))" office:value-type="float" office:value="1.40839963072944" calcext:value-type="float">
            <text:p>1.41</text:p>
          </table:table-cell>
          <table:table-cell table:style-name="ce13" table:formula="of:=IF([.AN16]&lt;=[.$B$5]-[.$B$14];2*[.$B$7]*[.$B$6]*([.$B$11]+[.$B$12]*[.$B$9])*(EXP(-[.$B$7]*[.AN16]) - EXP(-2*[.$B$7]*[.AN16])) + [.$B$13]*[.$B$8];- [.$B$6]*(1-EXP(-[.$B$7]*[.AN$16]))^2*IF([.AN16]=[.$B$5];1;0))" office:value-type="float" office:value="1.38725877375563" calcext:value-type="float">
            <text:p>1.39</text:p>
          </table:table-cell>
          <table:table-cell table:style-name="ce13" table:formula="of:=IF([.AO16]&lt;=[.$B$5]-[.$B$14];2*[.$B$7]*[.$B$6]*([.$B$11]+[.$B$12]*[.$B$9])*(EXP(-[.$B$7]*[.AO16]) - EXP(-2*[.$B$7]*[.AO16])) + [.$B$13]*[.$B$8];- [.$B$6]*(1-EXP(-[.$B$7]*[.AO$16]))^2*IF([.AO16]=[.$B$5];1;0))" office:value-type="float" office:value="1.36570948115063" calcext:value-type="float">
            <text:p>1.37</text:p>
          </table:table-cell>
          <table:table-cell table:style-name="ce13" table:formula="of:=IF([.AP16]&lt;=[.$B$5]-[.$B$14];2*[.$B$7]*[.$B$6]*([.$B$11]+[.$B$12]*[.$B$9])*(EXP(-[.$B$7]*[.AP16]) - EXP(-2*[.$B$7]*[.AP16])) + [.$B$13]*[.$B$8];- [.$B$6]*(1-EXP(-[.$B$7]*[.AP$16]))^2*IF([.AP16]=[.$B$5];1;0))" office:value-type="float" office:value="1.34382399536348" calcext:value-type="float">
            <text:p>1.34</text:p>
          </table:table-cell>
          <table:table-cell table:style-name="ce13" table:formula="of:=IF([.AQ16]&lt;=[.$B$5]-[.$B$14];2*[.$B$7]*[.$B$6]*([.$B$11]+[.$B$12]*[.$B$9])*(EXP(-[.$B$7]*[.AQ16]) - EXP(-2*[.$B$7]*[.AQ16])) + [.$B$13]*[.$B$8];- [.$B$6]*(1-EXP(-[.$B$7]*[.AQ$16]))^2*IF([.AQ16]=[.$B$5];1;0))" office:value-type="float" office:value="1.32166891964944" calcext:value-type="float">
            <text:p>1.32</text:p>
          </table:table-cell>
          <table:table-cell table:style-name="ce13" table:formula="of:=IF([.AR16]&lt;=[.$B$5]-[.$B$14];2*[.$B$7]*[.$B$6]*([.$B$11]+[.$B$12]*[.$B$9])*(EXP(-[.$B$7]*[.AR16]) - EXP(-2*[.$B$7]*[.AR16])) + [.$B$13]*[.$B$8];- [.$B$6]*(1-EXP(-[.$B$7]*[.AR$16]))^2*IF([.AR16]=[.$B$5];1;0))" office:value-type="float" office:value="1.29930558879665" calcext:value-type="float">
            <text:p>1.30</text:p>
          </table:table-cell>
          <table:table-cell table:style-name="ce13" table:formula="of:=IF([.AS16]&lt;=[.$B$5]-[.$B$14];2*[.$B$7]*[.$B$6]*([.$B$11]+[.$B$12]*[.$B$9])*(EXP(-[.$B$7]*[.AS16]) - EXP(-2*[.$B$7]*[.AS16])) + [.$B$13]*[.$B$8];- [.$B$6]*(1-EXP(-[.$B$7]*[.AS$16]))^2*IF([.AS16]=[.$B$5];1;0))" office:value-type="float" office:value="1.27679041701244" calcext:value-type="float">
            <text:p>1.28</text:p>
          </table:table-cell>
          <table:table-cell table:style-name="ce13" table:formula="of:=IF([.AT16]&lt;=[.$B$5]-[.$B$14];2*[.$B$7]*[.$B$6]*([.$B$11]+[.$B$12]*[.$B$9])*(EXP(-[.$B$7]*[.AT16]) - EXP(-2*[.$B$7]*[.AT16])) + [.$B$13]*[.$B$8];- [.$B$6]*(1-EXP(-[.$B$7]*[.AT$16]))^2*IF([.AT16]=[.$B$5];1;0))" office:value-type="float" office:value="1.25417522433635" calcext:value-type="float">
            <text:p>1.25</text:p>
          </table:table-cell>
          <table:table-cell table:style-name="ce13" table:formula="of:=IF([.AU16]&lt;=[.$B$5]-[.$B$14];2*[.$B$7]*[.$B$6]*([.$B$11]+[.$B$12]*[.$B$9])*(EXP(-[.$B$7]*[.AU16]) - EXP(-2*[.$B$7]*[.AU16])) + [.$B$13]*[.$B$8];- [.$B$6]*(1-EXP(-[.$B$7]*[.AU$16]))^2*IF([.AU16]=[.$B$5];1;0))" office:value-type="float" office:value="1.2315075428663" calcext:value-type="float">
            <text:p>1.23</text:p>
          </table:table-cell>
          <table:table-cell table:style-name="ce13" table:formula="of:=IF([.AV16]&lt;=[.$B$5]-[.$B$14];2*[.$B$7]*[.$B$6]*([.$B$11]+[.$B$12]*[.$B$9])*(EXP(-[.$B$7]*[.AV16]) - EXP(-2*[.$B$7]*[.AV16])) + [.$B$13]*[.$B$8];- [.$B$6]*(1-EXP(-[.$B$7]*[.AV$16]))^2*IF([.AV16]=[.$B$5];1;0))" office:value-type="float" office:value="1.20883090400832" calcext:value-type="float">
            <text:p>1.21</text:p>
          </table:table-cell>
          <table:table-cell table:style-name="ce13" table:formula="of:=IF([.AW16]&lt;=[.$B$5]-[.$B$14];2*[.$B$7]*[.$B$6]*([.$B$11]+[.$B$12]*[.$B$9])*(EXP(-[.$B$7]*[.AW16]) - EXP(-2*[.$B$7]*[.AW16])) + [.$B$13]*[.$B$8];- [.$B$6]*(1-EXP(-[.$B$7]*[.AW$16]))^2*IF([.AW16]=[.$B$5];1;0))" office:value-type="float" office:value="1.18618510788863" calcext:value-type="float">
            <text:p>1.19</text:p>
          </table:table-cell>
          <table:table-cell table:style-name="ce13" table:formula="of:=IF([.AX16]&lt;=[.$B$5]-[.$B$14];2*[.$B$7]*[.$B$6]*([.$B$11]+[.$B$12]*[.$B$9])*(EXP(-[.$B$7]*[.AX16]) - EXP(-2*[.$B$7]*[.AX16])) + [.$B$13]*[.$B$8];- [.$B$6]*(1-EXP(-[.$B$7]*[.AX$16]))^2*IF([.AX16]=[.$B$5];1;0))" office:value-type="float" office:value="1.16360647599976" calcext:value-type="float">
            <text:p>1.16</text:p>
          </table:table-cell>
          <table:table-cell table:style-name="ce13" table:formula="of:=IF([.AY16]&lt;=[.$B$5]-[.$B$14];2*[.$B$7]*[.$B$6]*([.$B$11]+[.$B$12]*[.$B$9])*(EXP(-[.$B$7]*[.AY16]) - EXP(-2*[.$B$7]*[.AY16])) + [.$B$13]*[.$B$8];- [.$B$6]*(1-EXP(-[.$B$7]*[.AY$16]))^2*IF([.AY16]=[.$B$5];1;0))" office:value-type="float" office:value="1.14112808808886" calcext:value-type="float">
            <text:p>1.14</text:p>
          </table:table-cell>
          <table:table-cell table:style-name="ce13" table:formula="of:=IF([.AZ16]&lt;=[.$B$5]-[.$B$14];2*[.$B$7]*[.$B$6]*([.$B$11]+[.$B$12]*[.$B$9])*(EXP(-[.$B$7]*[.AZ16]) - EXP(-2*[.$B$7]*[.AZ16])) + [.$B$13]*[.$B$8];- [.$B$6]*(1-EXP(-[.$B$7]*[.AZ$16]))^2*IF([.AZ16]=[.$B$5];1;0))" office:value-type="float" office:value="1.11878000423672" calcext:value-type="float">
            <text:p>1.12</text:p>
          </table:table-cell>
          <table:table-cell table:style-name="ce13" table:formula="of:=IF([.BA16]&lt;=[.$B$5]-[.$B$14];2*[.$B$7]*[.$B$6]*([.$B$11]+[.$B$12]*[.$B$9])*(EXP(-[.$B$7]*[.BA16]) - EXP(-2*[.$B$7]*[.BA16])) + [.$B$13]*[.$B$8];- [.$B$6]*(1-EXP(-[.$B$7]*[.BA$16]))^2*IF([.BA16]=[.$B$5];1;0))" office:value-type="float" office:value="1.09658947301992" calcext:value-type="float">
            <text:p>1.10</text:p>
          </table:table-cell>
          <table:table-cell table:style-name="ce13" table:formula="of:=IF([.BB16]&lt;=[.$B$5]-[.$B$14];2*[.$B$7]*[.$B$6]*([.$B$11]+[.$B$12]*[.$B$9])*(EXP(-[.$B$7]*[.BB16]) - EXP(-2*[.$B$7]*[.BB16])) + [.$B$13]*[.$B$8];- [.$B$6]*(1-EXP(-[.$B$7]*[.BB$16]))^2*IF([.BB16]=[.$B$5];1;0))" office:value-type="float" office:value="1.07458112659567" calcext:value-type="float">
            <text:p>1.07</text:p>
          </table:table-cell>
          <table:table-cell table:style-name="ce13" table:formula="of:=IF([.BC16]&lt;=[.$B$5]-[.$B$14];2*[.$B$7]*[.$B$6]*([.$B$11]+[.$B$12]*[.$B$9])*(EXP(-[.$B$7]*[.BC16]) - EXP(-2*[.$B$7]*[.BC16])) + [.$B$13]*[.$B$8];- [.$B$6]*(1-EXP(-[.$B$7]*[.BC$16]))^2*IF([.BC16]=[.$B$5];1;0))" office:value-type="float" office:value="1.05277716349903" calcext:value-type="float">
            <text:p>1.05</text:p>
          </table:table-cell>
          <table:table-cell table:style-name="ce13" table:formula="of:=IF([.BD16]&lt;=[.$B$5]-[.$B$14];2*[.$B$7]*[.$B$6]*([.$B$11]+[.$B$12]*[.$B$9])*(EXP(-[.$B$7]*[.BD16]) - EXP(-2*[.$B$7]*[.BD16])) + [.$B$13]*[.$B$8];- [.$B$6]*(1-EXP(-[.$B$7]*[.BD$16]))^2*IF([.BD16]=[.$B$5];1;0))" office:value-type="float" office:value="1.03119751989562" calcext:value-type="float">
            <text:p>1.03</text:p>
          </table:table-cell>
          <table:table-cell table:style-name="ce13" table:formula="of:=IF([.BE16]&lt;=[.$B$5]-[.$B$14];2*[.$B$7]*[.$B$6]*([.$B$11]+[.$B$12]*[.$B$9])*(EXP(-[.$B$7]*[.BE16]) - EXP(-2*[.$B$7]*[.BE16])) + [.$B$13]*[.$B$8];- [.$B$6]*(1-EXP(-[.$B$7]*[.BE$16]))^2*IF([.BE16]=[.$B$5];1;0))" office:value-type="float" office:value="1.00986002998857" calcext:value-type="float">
            <text:p>1.01</text:p>
          </table:table-cell>
          <table:table-cell table:style-name="ce13" table:formula="of:=IF([.BF16]&lt;=[.$B$5]-[.$B$14];2*[.$B$7]*[.$B$6]*([.$B$11]+[.$B$12]*[.$B$9])*(EXP(-[.$B$7]*[.BF16]) - EXP(-2*[.$B$7]*[.BF16])) + [.$B$13]*[.$B$8];- [.$B$6]*(1-EXP(-[.$B$7]*[.BF$16]))^2*IF([.BF16]=[.$B$5];1;0))" office:value-type="float" office:value="0.988780576237163" calcext:value-type="float">
            <text:p>0.99</text:p>
          </table:table-cell>
          <table:table-cell table:style-name="ce13" table:formula="of:=IF([.BG16]&lt;=[.$B$5]-[.$B$14];2*[.$B$7]*[.$B$6]*([.$B$11]+[.$B$12]*[.$B$9])*(EXP(-[.$B$7]*[.BG16]) - EXP(-2*[.$B$7]*[.BG16])) + [.$B$13]*[.$B$8];- [.$B$6]*(1-EXP(-[.$B$7]*[.BG$16]))^2*IF([.BG16]=[.$B$5];1;0))" office:value-type="float" office:value="0.967973230005519" calcext:value-type="float">
            <text:p>0.97</text:p>
          </table:table-cell>
          <table:table-cell table:style-name="ce13" table:formula="of:=IF([.BH16]&lt;=[.$B$5]-[.$B$14];2*[.$B$7]*[.$B$6]*([.$B$11]+[.$B$12]*[.$B$9])*(EXP(-[.$B$7]*[.BH16]) - EXP(-2*[.$B$7]*[.BH16])) + [.$B$13]*[.$B$8];- [.$B$6]*(1-EXP(-[.$B$7]*[.BH$16]))^2*IF([.BH16]=[.$B$5];1;0))" office:value-type="float" office:value="0.947450383222948" calcext:value-type="float">
            <text:p>0.95</text:p>
          </table:table-cell>
          <table:table-cell table:style-name="ce13" table:formula="of:=IF([.BI16]&lt;=[.$B$5]-[.$B$14];2*[.$B$7]*[.$B$6]*([.$B$11]+[.$B$12]*[.$B$9])*(EXP(-[.$B$7]*[.BI16]) - EXP(-2*[.$B$7]*[.BI16])) + [.$B$13]*[.$B$8];- [.$B$6]*(1-EXP(-[.$B$7]*[.BI$16]))^2*IF([.BI16]=[.$B$5];1;0))" office:value-type="float" office:value="0.92722287160293" calcext:value-type="float">
            <text:p>0.93</text:p>
          </table:table-cell>
          <table:table-cell table:style-name="ce13" table:formula="of:=IF([.BJ16]&lt;=[.$B$5]-[.$B$14];2*[.$B$7]*[.$B$6]*([.$B$11]+[.$B$12]*[.$B$9])*(EXP(-[.$B$7]*[.BJ16]) - EXP(-2*[.$B$7]*[.BJ16])) + [.$B$13]*[.$B$8];- [.$B$6]*(1-EXP(-[.$B$7]*[.BJ$16]))^2*IF([.BJ16]=[.$B$5];1;0))" office:value-type="float" office:value="0.90730008993522" calcext:value-type="float">
            <text:p>0.91</text:p>
          </table:table-cell>
          <table:table-cell table:style-name="ce13" table:formula="of:=IF([.BK16]&lt;=[.$B$5]-[.$B$14];2*[.$B$7]*[.$B$6]*([.$B$11]+[.$B$12]*[.$B$9])*(EXP(-[.$B$7]*[.BK16]) - EXP(-2*[.$B$7]*[.BK16])) + [.$B$13]*[.$B$8];- [.$B$6]*(1-EXP(-[.$B$7]*[.BK$16]))^2*IF([.BK16]=[.$B$5];1;0))" office:value-type="float" office:value="0.887690099934908" calcext:value-type="float">
            <text:p>0.89</text:p>
          </table:table-cell>
          <table:table-cell table:style-name="ce13" table:formula="of:=IF([.BL16]&lt;=[.$B$5]-[.$B$14];2*[.$B$7]*[.$B$6]*([.$B$11]+[.$B$12]*[.$B$9])*(EXP(-[.$B$7]*[.BL16]) - EXP(-2*[.$B$7]*[.BL16])) + [.$B$13]*[.$B$8];- [.$B$6]*(1-EXP(-[.$B$7]*[.BL$16]))^2*IF([.BL16]=[.$B$5];1;0))" office:value-type="float" office:value="0.868399731103409" calcext:value-type="float">
            <text:p>0.87</text:p>
          </table:table-cell>
          <table:table-cell table:style-name="ce13" table:formula="of:=IF([.BM16]&lt;=[.$B$5]-[.$B$14];2*[.$B$7]*[.$B$6]*([.$B$11]+[.$B$12]*[.$B$9])*(EXP(-[.$B$7]*[.BM16]) - EXP(-2*[.$B$7]*[.BM16])) + [.$B$13]*[.$B$8];- [.$B$6]*(1-EXP(-[.$B$7]*[.BM$16]))^2*IF([.BM16]=[.$B$5];1;0))" office:value-type="float" office:value="0.849434675029254" calcext:value-type="float">
            <text:p>0.85</text:p>
          </table:table-cell>
          <table:table-cell table:style-name="ce13" table:formula="of:=IF([.BN16]&lt;=[.$B$5]-[.$B$14];2*[.$B$7]*[.$B$6]*([.$B$11]+[.$B$12]*[.$B$9])*(EXP(-[.$B$7]*[.BN16]) - EXP(-2*[.$B$7]*[.BN16])) + [.$B$13]*[.$B$8];- [.$B$6]*(1-EXP(-[.$B$7]*[.BN$16]))^2*IF([.BN16]=[.$B$5];1;0))" office:value-type="float" office:value="0.830799573531009" calcext:value-type="float">
            <text:p>0.83</text:p>
          </table:table-cell>
          <table:table-cell table:style-name="ce13" table:formula="of:=IF([.BO16]&lt;=[.$B$5]-[.$B$14];2*[.$B$7]*[.$B$6]*([.$B$11]+[.$B$12]*[.$B$9])*(EXP(-[.$B$7]*[.BO16]) - EXP(-2*[.$B$7]*[.BO16])) + [.$B$13]*[.$B$8];- [.$B$6]*(1-EXP(-[.$B$7]*[.BO$16]))^2*IF([.BO16]=[.$B$5];1;0))" office:value-type="float" office:value="0.812498101020613" calcext:value-type="float">
            <text:p>0.81</text:p>
          </table:table-cell>
          <table:table-cell table:style-name="ce13" table:formula="of:=IF([.BP16]&lt;=[.$B$5]-[.$B$14];2*[.$B$7]*[.$B$6]*([.$B$11]+[.$B$12]*[.$B$9])*(EXP(-[.$B$7]*[.BP16]) - EXP(-2*[.$B$7]*[.BP16])) + [.$B$13]*[.$B$8];- [.$B$6]*(1-EXP(-[.$B$7]*[.BP$16]))^2*IF([.BP16]=[.$B$5];1;0))" office:value-type="float" office:value="0.794533041442819" calcext:value-type="float">
            <text:p>0.79</text:p>
          </table:table-cell>
          <table:table-cell table:style-name="ce13" table:formula="of:=IF([.BQ16]&lt;=[.$B$5]-[.$B$14];2*[.$B$7]*[.$B$6]*([.$B$11]+[.$B$12]*[.$B$9])*(EXP(-[.$B$7]*[.BQ16]) - EXP(-2*[.$B$7]*[.BQ16])) + [.$B$13]*[.$B$8];- [.$B$6]*(1-EXP(-[.$B$7]*[.BQ$16]))^2*IF([.BQ16]=[.$B$5];1;0))" office:value-type="float" office:value="0.776906360125159" calcext:value-type="float">
            <text:p>0.78</text:p>
          </table:table-cell>
          <table:table-cell table:style-name="ce13" table:formula="of:=IF([.BR16]&lt;=[.$B$5]-[.$B$14];2*[.$B$7]*[.$B$6]*([.$B$11]+[.$B$12]*[.$B$9])*(EXP(-[.$B$7]*[.BR16]) - EXP(-2*[.$B$7]*[.BR16])) + [.$B$13]*[.$B$8];- [.$B$6]*(1-EXP(-[.$B$7]*[.BR$16]))^2*IF([.BR16]=[.$B$5];1;0))" office:value-type="float" office:value="0.759619270852788" calcext:value-type="float">
            <text:p>0.76</text:p>
          </table:table-cell>
          <table:table-cell table:style-name="ce13" table:formula="of:=IF([.BS16]&lt;=[.$B$5]-[.$B$14];2*[.$B$7]*[.$B$6]*([.$B$11]+[.$B$12]*[.$B$9])*(EXP(-[.$B$7]*[.BS16]) - EXP(-2*[.$B$7]*[.BS16])) + [.$B$13]*[.$B$8];- [.$B$6]*(1-EXP(-[.$B$7]*[.BS$16]))^2*IF([.BS16]=[.$B$5];1;0))" office:value-type="float" office:value="0.742672298463785" calcext:value-type="float">
            <text:p>0.74</text:p>
          </table:table-cell>
          <table:table-cell table:style-name="ce13" table:formula="of:=IF([.BT16]&lt;=[.$B$5]-[.$B$14];2*[.$B$7]*[.$B$6]*([.$B$11]+[.$B$12]*[.$B$9])*(EXP(-[.$B$7]*[.BT16]) - EXP(-2*[.$B$7]*[.BT16])) + [.$B$13]*[.$B$8];- [.$B$6]*(1-EXP(-[.$B$7]*[.BT$16]))^2*IF([.BT16]=[.$B$5];1;0))" office:value-type="float" office:value="0.726065337242702" calcext:value-type="float">
            <text:p>0.73</text:p>
          </table:table-cell>
          <table:table-cell table:style-name="ce13" table:formula="of:=IF([.BU16]&lt;=[.$B$5]-[.$B$14];2*[.$B$7]*[.$B$6]*([.$B$11]+[.$B$12]*[.$B$9])*(EXP(-[.$B$7]*[.BU16]) - EXP(-2*[.$B$7]*[.BU16])) + [.$B$13]*[.$B$8];- [.$B$6]*(1-EXP(-[.$B$7]*[.BU$16]))^2*IF([.BU16]=[.$B$5];1;0))" office:value-type="float" office:value="0.709797705373502" calcext:value-type="float">
            <text:p>0.71</text:p>
          </table:table-cell>
          <table:table-cell table:style-name="ce13" table:formula="of:=IF([.BV16]&lt;=[.$B$5]-[.$B$14];2*[.$B$7]*[.$B$6]*([.$B$11]+[.$B$12]*[.$B$9])*(EXP(-[.$B$7]*[.BV16]) - EXP(-2*[.$B$7]*[.BV16])) + [.$B$13]*[.$B$8];- [.$B$6]*(1-EXP(-[.$B$7]*[.BV$16]))^2*IF([.BV16]=[.$B$5];1;0))" office:value-type="float" office:value="0.693868195697347" calcext:value-type="float">
            <text:p>0.69</text:p>
          </table:table-cell>
          <table:table-cell table:style-name="ce13" table:formula="of:=IF([.BW16]&lt;=[.$B$5]-[.$B$14];2*[.$B$7]*[.$B$6]*([.$B$11]+[.$B$12]*[.$B$9])*(EXP(-[.$B$7]*[.BW16]) - EXP(-2*[.$B$7]*[.BW16])) + [.$B$13]*[.$B$8];- [.$B$6]*(1-EXP(-[.$B$7]*[.BW$16]))^2*IF([.BW16]=[.$B$5];1;0))" office:value-type="float" office:value="0.678275123005889" calcext:value-type="float">
            <text:p>0.68</text:p>
          </table:table-cell>
          <table:table-cell table:style-name="ce13" table:formula="of:=IF([.BX16]&lt;=[.$B$5]-[.$B$14];2*[.$B$7]*[.$B$6]*([.$B$11]+[.$B$12]*[.$B$9])*(EXP(-[.$B$7]*[.BX16]) - EXP(-2*[.$B$7]*[.BX16])) + [.$B$13]*[.$B$8];- [.$B$6]*(1-EXP(-[.$B$7]*[.BX$16]))^2*IF([.BX16]=[.$B$5];1;0))" office:value-type="float" office:value="0.663016368086866" calcext:value-type="float">
            <text:p>0.66</text:p>
          </table:table-cell>
          <table:table-cell table:style-name="ce13" table:formula="of:=IF([.BY16]&lt;=[.$B$5]-[.$B$14];2*[.$B$7]*[.$B$6]*([.$B$11]+[.$B$12]*[.$B$9])*(EXP(-[.$B$7]*[.BY16]) - EXP(-2*[.$B$7]*[.BY16])) + [.$B$13]*[.$B$8];- [.$B$6]*(1-EXP(-[.$B$7]*[.BY$16]))^2*IF([.BY16]=[.$B$5];1;0))" office:value-type="float" office:value="0.648089418725725" calcext:value-type="float">
            <text:p>0.65</text:p>
          </table:table-cell>
          <table:table-cell table:style-name="ce13" table:formula="of:=IF([.BZ16]&lt;=[.$B$5]-[.$B$14];2*[.$B$7]*[.$B$6]*([.$B$11]+[.$B$12]*[.$B$9])*(EXP(-[.$B$7]*[.BZ16]) - EXP(-2*[.$B$7]*[.BZ16])) + [.$B$13]*[.$B$8];- [.$B$6]*(1-EXP(-[.$B$7]*[.BZ$16]))^2*IF([.BZ16]=[.$B$5];1;0))" office:value-type="float" office:value="0.633491407854676" calcext:value-type="float">
            <text:p>0.63</text:p>
          </table:table-cell>
          <table:table-cell table:style-name="ce13" table:formula="of:=IF([.CA16]&lt;=[.$B$5]-[.$B$14];2*[.$B$7]*[.$B$6]*([.$B$11]+[.$B$12]*[.$B$9])*(EXP(-[.$B$7]*[.CA16]) - EXP(-2*[.$B$7]*[.CA16])) + [.$B$13]*[.$B$8];- [.$B$6]*(1-EXP(-[.$B$7]*[.CA$16]))^2*IF([.CA16]=[.$B$5];1;0))" office:value-type="float" office:value="0.619219149029054" calcext:value-type="float">
            <text:p>0.62</text:p>
          </table:table-cell>
          <table:table-cell table:style-name="ce13" table:formula="of:=IF([.CB16]&lt;=[.$B$5]-[.$B$14];2*[.$B$7]*[.$B$6]*([.$B$11]+[.$B$12]*[.$B$9])*(EXP(-[.$B$7]*[.CB16]) - EXP(-2*[.$B$7]*[.CB16])) + [.$B$13]*[.$B$8];- [.$B$6]*(1-EXP(-[.$B$7]*[.CB$16]))^2*IF([.CB16]=[.$B$5];1;0))" office:value-type="float" office:value="0.605269169399955" calcext:value-type="float">
            <text:p>0.61</text:p>
          </table:table-cell>
          <table:table-cell table:style-name="ce13" table:formula="of:=IF([.CC16]&lt;=[.$B$5]-[.$B$14];2*[.$B$7]*[.$B$6]*([.$B$11]+[.$B$12]*[.$B$9])*(EXP(-[.$B$7]*[.CC16]) - EXP(-2*[.$B$7]*[.CC16])) + [.$B$13]*[.$B$8];- [.$B$6]*(1-EXP(-[.$B$7]*[.CC$16]))^2*IF([.CC16]=[.$B$5];1;0))" office:value-type="float" office:value="0.591637740341894" calcext:value-type="float">
            <text:p>0.59</text:p>
          </table:table-cell>
          <table:table-cell table:style-name="ce13" table:formula="of:=IF([.CD16]&lt;=[.$B$5]-[.$B$14];2*[.$B$7]*[.$B$6]*([.$B$11]+[.$B$12]*[.$B$9])*(EXP(-[.$B$7]*[.CD16]) - EXP(-2*[.$B$7]*[.CD16])) + [.$B$13]*[.$B$8];- [.$B$6]*(1-EXP(-[.$B$7]*[.CD$16]))^2*IF([.CD16]=[.$B$5];1;0))" office:value-type="float" office:value="0.578320905884595" calcext:value-type="float">
            <text:p>0.58</text:p>
          </table:table-cell>
          <table:table-cell table:style-name="ce13" table:formula="of:=IF([.CE16]&lt;=[.$B$5]-[.$B$14];2*[.$B$7]*[.$B$6]*([.$B$11]+[.$B$12]*[.$B$9])*(EXP(-[.$B$7]*[.CE16]) - EXP(-2*[.$B$7]*[.CE16])) + [.$B$13]*[.$B$8];- [.$B$6]*(1-EXP(-[.$B$7]*[.CE$16]))^2*IF([.CE16]=[.$B$5];1;0))" office:value-type="float" office:value="0.565314509088981" calcext:value-type="float">
            <text:p>0.57</text:p>
          </table:table-cell>
          <table:table-cell table:style-name="ce13" table:formula="of:=IF([.CF16]&lt;=[.$B$5]-[.$B$14];2*[.$B$7]*[.$B$6]*([.$B$11]+[.$B$12]*[.$B$9])*(EXP(-[.$B$7]*[.CF16]) - EXP(-2*[.$B$7]*[.CF16])) + [.$B$13]*[.$B$8];- [.$B$6]*(1-EXP(-[.$B$7]*[.CF$16]))^2*IF([.CF16]=[.$B$5];1;0))" office:value-type="float" office:value="0.552614216498907" calcext:value-type="float">
            <text:p>0.55</text:p>
          </table:table-cell>
          <table:table-cell table:style-name="ce13" table:formula="of:=IF([.CG16]&lt;=[.$B$5]-[.$B$14];2*[.$B$7]*[.$B$6]*([.$B$11]+[.$B$12]*[.$B$9])*(EXP(-[.$B$7]*[.CG16]) - EXP(-2*[.$B$7]*[.CG16])) + [.$B$13]*[.$B$8];- [.$B$6]*(1-EXP(-[.$B$7]*[.CG$16]))^2*IF([.CG16]=[.$B$5];1;0))" office:value-type="float" office:value="0.540215540792158" calcext:value-type="float">
            <text:p>0.54</text:p>
          </table:table-cell>
          <table:table-cell table:style-name="ce13" table:formula="of:=IF([.CH16]&lt;=[.$B$5]-[.$B$14];2*[.$B$7]*[.$B$6]*([.$B$11]+[.$B$12]*[.$B$9])*(EXP(-[.$B$7]*[.CH16]) - EXP(-2*[.$B$7]*[.CH16])) + [.$B$13]*[.$B$8];- [.$B$6]*(1-EXP(-[.$B$7]*[.CH$16]))^2*IF([.CH16]=[.$B$5];1;0))" office:value-type="float" office:value="0.528113861746736" calcext:value-type="float">
            <text:p>0.53</text:p>
          </table:table-cell>
          <table:table-cell table:style-name="ce13" table:formula="of:=IF([.CI16]&lt;=[.$B$5]-[.$B$14];2*[.$B$7]*[.$B$6]*([.$B$11]+[.$B$12]*[.$B$9])*(EXP(-[.$B$7]*[.CI16]) - EXP(-2*[.$B$7]*[.CI16])) + [.$B$13]*[.$B$8];- [.$B$6]*(1-EXP(-[.$B$7]*[.CI$16]))^2*IF([.CI16]=[.$B$5];1;0))" office:value-type="float" office:value="0.516304445631333" calcext:value-type="float">
            <text:p>0.52</text:p>
          </table:table-cell>
          <table:table-cell table:style-name="ce13" table:formula="of:=IF([.CJ16]&lt;=[.$B$5]-[.$B$14];2*[.$B$7]*[.$B$6]*([.$B$11]+[.$B$12]*[.$B$9])*(EXP(-[.$B$7]*[.CJ16]) - EXP(-2*[.$B$7]*[.CJ16])) + [.$B$13]*[.$B$8];- [.$B$6]*(1-EXP(-[.$B$7]*[.CJ$16]))^2*IF([.CJ16]=[.$B$5];1;0))" office:value-type="float" office:value="0.504782463122254" calcext:value-type="float">
            <text:p>0.50</text:p>
          </table:table-cell>
          <table:table-cell table:style-name="ce13" table:formula="of:=IF([.CK16]&lt;=[.$B$5]-[.$B$14];2*[.$B$7]*[.$B$6]*([.$B$11]+[.$B$12]*[.$B$9])*(EXP(-[.$B$7]*[.CK16]) - EXP(-2*[.$B$7]*[.CK16])) + [.$B$13]*[.$B$8];- [.$B$6]*(1-EXP(-[.$B$7]*[.CK$16]))^2*IF([.CK16]=[.$B$5];1;0))" office:value-type="float" office:value="0.493543005842778" calcext:value-type="float">
            <text:p>0.49</text:p>
          </table:table-cell>
          <table:table-cell table:style-name="ce13" table:formula="of:=IF([.CL16]&lt;=[.$B$5]-[.$B$14];2*[.$B$7]*[.$B$6]*([.$B$11]+[.$B$12]*[.$B$9])*(EXP(-[.$B$7]*[.CL16]) - EXP(-2*[.$B$7]*[.CL16])) + [.$B$13]*[.$B$8];- [.$B$6]*(1-EXP(-[.$B$7]*[.CL$16]))^2*IF([.CL16]=[.$B$5];1;0))" office:value-type="float" office:value="-0" calcext:value-type="float">
            <text:p>0.00</text:p>
          </table:table-cell>
          <table:table-cell table:style-name="ce13" table:formula="of:=IF([.CM16]&lt;=[.$B$5]-[.$B$14];2*[.$B$7]*[.$B$6]*([.$B$11]+[.$B$12]*[.$B$9])*(EXP(-[.$B$7]*[.CM16]) - EXP(-2*[.$B$7]*[.CM16])) + [.$B$13]*[.$B$8];- [.$B$6]*(1-EXP(-[.$B$7]*[.CM$16]))^2*IF([.CM16]=[.$B$5];1;0))" office:value-type="float" office:value="-0" calcext:value-type="float">
            <text:p>0.00</text:p>
          </table:table-cell>
          <table:table-cell table:style-name="ce13" table:formula="of:=IF([.CN16]&lt;=[.$B$5]-[.$B$14];2*[.$B$7]*[.$B$6]*([.$B$11]+[.$B$12]*[.$B$9])*(EXP(-[.$B$7]*[.CN16]) - EXP(-2*[.$B$7]*[.CN16])) + [.$B$13]*[.$B$8];- [.$B$6]*(1-EXP(-[.$B$7]*[.CN$16]))^2*IF([.CN16]=[.$B$5];1;0))" office:value-type="float" office:value="-0" calcext:value-type="float">
            <text:p>0.00</text:p>
          </table:table-cell>
          <table:table-cell table:style-name="ce13" table:formula="of:=IF([.CO16]&lt;=[.$B$5]-[.$B$14];2*[.$B$7]*[.$B$6]*([.$B$11]+[.$B$12]*[.$B$9])*(EXP(-[.$B$7]*[.CO16]) - EXP(-2*[.$B$7]*[.CO16])) + [.$B$13]*[.$B$8];- [.$B$6]*(1-EXP(-[.$B$7]*[.CO$16]))^2*IF([.CO16]=[.$B$5];1;0))" office:value-type="float" office:value="-0" calcext:value-type="float">
            <text:p>0.00</text:p>
          </table:table-cell>
          <table:table-cell table:style-name="ce13" table:formula="of:=IF([.CP16]&lt;=[.$B$5]-[.$B$14];2*[.$B$7]*[.$B$6]*([.$B$11]+[.$B$12]*[.$B$9])*(EXP(-[.$B$7]*[.CP16]) - EXP(-2*[.$B$7]*[.CP16])) + [.$B$13]*[.$B$8];- [.$B$6]*(1-EXP(-[.$B$7]*[.CP$16]))^2*IF([.CP16]=[.$B$5];1;0))" office:value-type="float" office:value="-0" calcext:value-type="float">
            <text:p>0.00</text:p>
          </table:table-cell>
          <table:table-cell table:style-name="ce13" table:formula="of:=IF([.CQ16]&lt;=[.$B$5]-[.$B$14];2*[.$B$7]*[.$B$6]*([.$B$11]+[.$B$12]*[.$B$9])*(EXP(-[.$B$7]*[.CQ16]) - EXP(-2*[.$B$7]*[.CQ16])) + [.$B$13]*[.$B$8];- [.$B$6]*(1-EXP(-[.$B$7]*[.CQ$16]))^2*IF([.CQ16]=[.$B$5];1;0))" office:value-type="float" office:value="-0" calcext:value-type="float">
            <text:p>0.00</text:p>
          </table:table-cell>
          <table:table-cell table:style-name="ce13" table:formula="of:=IF([.CR16]&lt;=[.$B$5]-[.$B$14];2*[.$B$7]*[.$B$6]*([.$B$11]+[.$B$12]*[.$B$9])*(EXP(-[.$B$7]*[.CR16]) - EXP(-2*[.$B$7]*[.CR16])) + [.$B$13]*[.$B$8];- [.$B$6]*(1-EXP(-[.$B$7]*[.CR$16]))^2*IF([.CR16]=[.$B$5];1;0))" office:value-type="float" office:value="-0" calcext:value-type="float">
            <text:p>0.00</text:p>
          </table:table-cell>
          <table:table-cell table:style-name="ce13" table:formula="of:=IF([.CS16]&lt;=[.$B$5]-[.$B$14];2*[.$B$7]*[.$B$6]*([.$B$11]+[.$B$12]*[.$B$9])*(EXP(-[.$B$7]*[.CS16]) - EXP(-2*[.$B$7]*[.CS16])) + [.$B$13]*[.$B$8];- [.$B$6]*(1-EXP(-[.$B$7]*[.CS$16]))^2*IF([.CS16]=[.$B$5];1;0))" office:value-type="float" office:value="-0" calcext:value-type="float">
            <text:p>0.00</text:p>
          </table:table-cell>
          <table:table-cell table:style-name="ce13" table:formula="of:=IF([.CT16]&lt;=[.$B$5]-[.$B$14];2*[.$B$7]*[.$B$6]*([.$B$11]+[.$B$12]*[.$B$9])*(EXP(-[.$B$7]*[.CT16]) - EXP(-2*[.$B$7]*[.CT16])) + [.$B$13]*[.$B$8];- [.$B$6]*(1-EXP(-[.$B$7]*[.CT$16]))^2*IF([.CT16]=[.$B$5];1;0))" office:value-type="float" office:value="-0" calcext:value-type="float">
            <text:p>0.00</text:p>
          </table:table-cell>
          <table:table-cell table:style-name="ce13" table:formula="of:=IF([.CU16]&lt;=[.$B$5]-[.$B$14];2*[.$B$7]*[.$B$6]*([.$B$11]+[.$B$12]*[.$B$9])*(EXP(-[.$B$7]*[.CU16]) - EXP(-2*[.$B$7]*[.CU16])) + [.$B$13]*[.$B$8];- [.$B$6]*(1-EXP(-[.$B$7]*[.CU$16]))^2*IF([.CU16]=[.$B$5];1;0))" office:value-type="float" office:value="-0" calcext:value-type="float">
            <text:p>0.00</text:p>
          </table:table-cell>
          <table:table-cell table:style-name="ce13" table:formula="of:=IF([.CV16]&lt;=[.$B$5]-[.$B$14];2*[.$B$7]*[.$B$6]*([.$B$11]+[.$B$12]*[.$B$9])*(EXP(-[.$B$7]*[.CV16]) - EXP(-2*[.$B$7]*[.CV16])) + [.$B$13]*[.$B$8];- [.$B$6]*(1-EXP(-[.$B$7]*[.CV$16]))^2*IF([.CV16]=[.$B$5];1;0))" office:value-type="float" office:value="-0" calcext:value-type="float">
            <text:p>0.00</text:p>
          </table:table-cell>
          <table:table-cell table:style-name="ce13" table:formula="of:=IF([.CW16]&lt;=[.$B$5]-[.$B$14];2*[.$B$7]*[.$B$6]*([.$B$11]+[.$B$12]*[.$B$9])*(EXP(-[.$B$7]*[.CW16]) - EXP(-2*[.$B$7]*[.CW16])) + [.$B$13]*[.$B$8];- [.$B$6]*(1-EXP(-[.$B$7]*[.CW$16]))^2*IF([.CW16]=[.$B$5];1;0))" office:value-type="float" office:value="-0" calcext:value-type="float">
            <text:p>0.00</text:p>
          </table:table-cell>
          <table:table-cell table:style-name="ce13" table:formula="of:=IF([.CX16]&lt;=[.$B$5]-[.$B$14];2*[.$B$7]*[.$B$6]*([.$B$11]+[.$B$12]*[.$B$9])*(EXP(-[.$B$7]*[.CX16]) - EXP(-2*[.$B$7]*[.CX16])) + [.$B$13]*[.$B$8];- [.$B$6]*(1-EXP(-[.$B$7]*[.CX$16]))^2*IF([.CX16]=[.$B$5];1;0))" office:value-type="float" office:value="-0" calcext:value-type="float">
            <text:p>0.00</text:p>
          </table:table-cell>
          <table:table-cell table:style-name="ce13" table:formula="of:=IF([.CY16]&lt;=[.$B$5]-[.$B$14];2*[.$B$7]*[.$B$6]*([.$B$11]+[.$B$12]*[.$B$9])*(EXP(-[.$B$7]*[.CY16]) - EXP(-2*[.$B$7]*[.CY16])) + [.$B$13]*[.$B$8];- [.$B$6]*(1-EXP(-[.$B$7]*[.CY$16]))^2*IF([.CY16]=[.$B$5];1;0))" office:value-type="float" office:value="-0" calcext:value-type="float">
            <text:p>0.00</text:p>
          </table:table-cell>
          <table:table-cell table:style-name="ce13" table:formula="of:=IF([.CZ16]&lt;=[.$B$5]-[.$B$14];2*[.$B$7]*[.$B$6]*([.$B$11]+[.$B$12]*[.$B$9])*(EXP(-[.$B$7]*[.CZ16]) - EXP(-2*[.$B$7]*[.CZ16])) + [.$B$13]*[.$B$8];- [.$B$6]*(1-EXP(-[.$B$7]*[.CZ$16]))^2*IF([.CZ16]=[.$B$5];1;0))" office:value-type="float" office:value="-0" calcext:value-type="float">
            <text:p>0.00</text:p>
          </table:table-cell>
          <table:table-cell table:style-name="ce13" table:formula="of:=IF([.DA16]&lt;=[.$B$5]-[.$B$14];2*[.$B$7]*[.$B$6]*([.$B$11]+[.$B$12]*[.$B$9])*(EXP(-[.$B$7]*[.DA16]) - EXP(-2*[.$B$7]*[.DA16])) + [.$B$13]*[.$B$8];- [.$B$6]*(1-EXP(-[.$B$7]*[.DA$16]))^2*IF([.DA16]=[.$B$5];1;0))" office:value-type="float" office:value="-0" calcext:value-type="float">
            <text:p>0.00</text:p>
          </table:table-cell>
          <table:table-cell table:style-name="ce13" table:formula="of:=IF([.DB16]&lt;=[.$B$5]-[.$B$14];2*[.$B$7]*[.$B$6]*([.$B$11]+[.$B$12]*[.$B$9])*(EXP(-[.$B$7]*[.DB16]) - EXP(-2*[.$B$7]*[.DB16])) + [.$B$13]*[.$B$8];- [.$B$6]*(1-EXP(-[.$B$7]*[.DB$16]))^2*IF([.DB16]=[.$B$5];1;0))" office:value-type="float" office:value="-0" calcext:value-type="float">
            <text:p>0.00</text:p>
          </table:table-cell>
          <table:table-cell table:style-name="ce13" table:formula="of:=IF([.DC16]&lt;=[.$B$5]-[.$B$14];2*[.$B$7]*[.$B$6]*([.$B$11]+[.$B$12]*[.$B$9])*(EXP(-[.$B$7]*[.DC16]) - EXP(-2*[.$B$7]*[.DC16])) + [.$B$13]*[.$B$8];- [.$B$6]*(1-EXP(-[.$B$7]*[.DC$16]))^2*IF([.DC16]=[.$B$5];1;0))" office:value-type="float" office:value="-0" calcext:value-type="float">
            <text:p>0.00</text:p>
          </table:table-cell>
          <table:table-cell table:style-name="ce13" table:formula="of:=IF([.DD16]&lt;=[.$B$5]-[.$B$14];2*[.$B$7]*[.$B$6]*([.$B$11]+[.$B$12]*[.$B$9])*(EXP(-[.$B$7]*[.DD16]) - EXP(-2*[.$B$7]*[.DD16])) + [.$B$13]*[.$B$8];- [.$B$6]*(1-EXP(-[.$B$7]*[.DD$16]))^2*IF([.DD16]=[.$B$5];1;0))" office:value-type="float" office:value="-0" calcext:value-type="float">
            <text:p>0.00</text:p>
          </table:table-cell>
          <table:table-cell table:style-name="ce13" table:formula="of:=IF([.DE16]&lt;=[.$B$5]-[.$B$14];2*[.$B$7]*[.$B$6]*([.$B$11]+[.$B$12]*[.$B$9])*(EXP(-[.$B$7]*[.DE16]) - EXP(-2*[.$B$7]*[.DE16])) + [.$B$13]*[.$B$8];- [.$B$6]*(1-EXP(-[.$B$7]*[.DE$16]))^2*IF([.DE16]=[.$B$5];1;0))" office:value-type="float" office:value="-0" calcext:value-type="float">
            <text:p>0.00</text:p>
          </table:table-cell>
          <table:table-cell table:style-name="ce13" table:formula="of:=IF([.DF16]&lt;=[.$B$5]-[.$B$14];2*[.$B$7]*[.$B$6]*([.$B$11]+[.$B$12]*[.$B$9])*(EXP(-[.$B$7]*[.DF16]) - EXP(-2*[.$B$7]*[.DF16])) + [.$B$13]*[.$B$8];- [.$B$6]*(1-EXP(-[.$B$7]*[.DF$16]))^2*IF([.DF16]=[.$B$5];1;0))" office:value-type="float" office:value="-0" calcext:value-type="float">
            <text:p>0.00</text:p>
          </table:table-cell>
          <table:table-cell table:style-name="ce13" table:formula="of:=IF([.DG16]&lt;=[.$B$5]-[.$B$14];2*[.$B$7]*[.$B$6]*([.$B$11]+[.$B$12]*[.$B$9])*(EXP(-[.$B$7]*[.DG16]) - EXP(-2*[.$B$7]*[.DG16])) + [.$B$13]*[.$B$8];- [.$B$6]*(1-EXP(-[.$B$7]*[.DG$16]))^2*IF([.DG16]=[.$B$5];1;0))" office:value-type="float" office:value="-0" calcext:value-type="float">
            <text:p>0.00</text:p>
          </table:table-cell>
          <table:table-cell table:style-name="ce13" table:formula="of:=IF([.DH16]&lt;=[.$B$5]-[.$B$14];2*[.$B$7]*[.$B$6]*([.$B$11]+[.$B$12]*[.$B$9])*(EXP(-[.$B$7]*[.DH16]) - EXP(-2*[.$B$7]*[.DH16])) + [.$B$13]*[.$B$8];- [.$B$6]*(1-EXP(-[.$B$7]*[.DH$16]))^2*IF([.DH16]=[.$B$5];1;0))" office:value-type="float" office:value="-0" calcext:value-type="float">
            <text:p>0.00</text:p>
          </table:table-cell>
          <table:table-cell table:style-name="ce13" table:formula="of:=IF([.DI16]&lt;=[.$B$5]-[.$B$14];2*[.$B$7]*[.$B$6]*([.$B$11]+[.$B$12]*[.$B$9])*(EXP(-[.$B$7]*[.DI16]) - EXP(-2*[.$B$7]*[.DI16])) + [.$B$13]*[.$B$8];- [.$B$6]*(1-EXP(-[.$B$7]*[.DI$16]))^2*IF([.DI16]=[.$B$5];1;0))" office:value-type="float" office:value="-0" calcext:value-type="float">
            <text:p>0.00</text:p>
          </table:table-cell>
          <table:table-cell table:style-name="ce13" table:formula="of:=IF([.DJ16]&lt;=[.$B$5]-[.$B$14];2*[.$B$7]*[.$B$6]*([.$B$11]+[.$B$12]*[.$B$9])*(EXP(-[.$B$7]*[.DJ16]) - EXP(-2*[.$B$7]*[.DJ16])) + [.$B$13]*[.$B$8];- [.$B$6]*(1-EXP(-[.$B$7]*[.DJ$16]))^2*IF([.DJ16]=[.$B$5];1;0))" office:value-type="float" office:value="-0" calcext:value-type="float">
            <text:p>0.00</text:p>
          </table:table-cell>
          <table:table-cell table:style-name="ce13" table:formula="of:=IF([.DK16]&lt;=[.$B$5]-[.$B$14];2*[.$B$7]*[.$B$6]*([.$B$11]+[.$B$12]*[.$B$9])*(EXP(-[.$B$7]*[.DK16]) - EXP(-2*[.$B$7]*[.DK16])) + [.$B$13]*[.$B$8];- [.$B$6]*(1-EXP(-[.$B$7]*[.DK$16]))^2*IF([.DK16]=[.$B$5];1;0))" office:value-type="float" office:value="-0" calcext:value-type="float">
            <text:p>0.00</text:p>
          </table:table-cell>
          <table:table-cell table:style-name="ce13" table:formula="of:=IF([.DL16]&lt;=[.$B$5]-[.$B$14];2*[.$B$7]*[.$B$6]*([.$B$11]+[.$B$12]*[.$B$9])*(EXP(-[.$B$7]*[.DL16]) - EXP(-2*[.$B$7]*[.DL16])) + [.$B$13]*[.$B$8];- [.$B$6]*(1-EXP(-[.$B$7]*[.DL$16]))^2*IF([.DL16]=[.$B$5];1;0))" office:value-type="float" office:value="-0" calcext:value-type="float">
            <text:p>0.00</text:p>
          </table:table-cell>
          <table:table-cell table:style-name="ce13" table:formula="of:=IF([.DM16]&lt;=[.$B$5]-[.$B$14];2*[.$B$7]*[.$B$6]*([.$B$11]+[.$B$12]*[.$B$9])*(EXP(-[.$B$7]*[.DM16]) - EXP(-2*[.$B$7]*[.DM16])) + [.$B$13]*[.$B$8];- [.$B$6]*(1-EXP(-[.$B$7]*[.DM$16]))^2*IF([.DM16]=[.$B$5];1;0))" office:value-type="float" office:value="-0" calcext:value-type="float">
            <text:p>0.00</text:p>
          </table:table-cell>
          <table:table-cell table:style-name="ce13" table:formula="of:=IF([.DN16]&lt;=[.$B$5]-[.$B$14];2*[.$B$7]*[.$B$6]*([.$B$11]+[.$B$12]*[.$B$9])*(EXP(-[.$B$7]*[.DN16]) - EXP(-2*[.$B$7]*[.DN16])) + [.$B$13]*[.$B$8];- [.$B$6]*(1-EXP(-[.$B$7]*[.DN$16]))^2*IF([.DN16]=[.$B$5];1;0))" office:value-type="float" office:value="-0" calcext:value-type="float">
            <text:p>0.00</text:p>
          </table:table-cell>
          <table:table-cell table:style-name="ce13" table:formula="of:=IF([.DO16]&lt;=[.$B$5]-[.$B$14];2*[.$B$7]*[.$B$6]*([.$B$11]+[.$B$12]*[.$B$9])*(EXP(-[.$B$7]*[.DO16]) - EXP(-2*[.$B$7]*[.DO16])) + [.$B$13]*[.$B$8];- [.$B$6]*(1-EXP(-[.$B$7]*[.DO$16]))^2*IF([.DO16]=[.$B$5];1;0))" office:value-type="float" office:value="-0" calcext:value-type="float">
            <text:p>0.00</text:p>
          </table:table-cell>
          <table:table-cell table:style-name="ce13" table:formula="of:=IF([.DP16]&lt;=[.$B$5]-[.$B$14];2*[.$B$7]*[.$B$6]*([.$B$11]+[.$B$12]*[.$B$9])*(EXP(-[.$B$7]*[.DP16]) - EXP(-2*[.$B$7]*[.DP16])) + [.$B$13]*[.$B$8];- [.$B$6]*(1-EXP(-[.$B$7]*[.DP$16]))^2*IF([.DP16]=[.$B$5];1;0))" office:value-type="float" office:value="-0" calcext:value-type="float">
            <text:p>0.00</text:p>
          </table:table-cell>
          <table:table-cell table:style-name="ce13" table:formula="of:=IF([.DQ16]&lt;=[.$B$5]-[.$B$14];2*[.$B$7]*[.$B$6]*([.$B$11]+[.$B$12]*[.$B$9])*(EXP(-[.$B$7]*[.DQ16]) - EXP(-2*[.$B$7]*[.DQ16])) + [.$B$13]*[.$B$8];- [.$B$6]*(1-EXP(-[.$B$7]*[.DQ$16]))^2*IF([.DQ16]=[.$B$5];1;0))" office:value-type="float" office:value="-0" calcext:value-type="float">
            <text:p>0.00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number-columns-repeated="253"/>
          <table:table-cell table:style-name="Default" table:number-columns-repeated="16131"/>
        </table:table-row>
        <table:table-row table:style-name="ro1">
          <table:table-cell/>
          <table:table-cell table:style-name="ce21" office:value-type="string" calcext:value-type="string">
            <text:p>Claude</text:p>
          </table:table-cell>
          <table:table-cell table:style-name="ce21" office:value-type="string" calcext:value-type="string">
            <text:p>JFR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cost_inflator_2011_to_2020</text:p>
          </table:table-cell>
          <table:table-cell table:number-columns-repeated="2" table:style-name="ce5" office:value-type="percentage" office:value="1.1577" calcext:value-type="percentage">
            <text:p>115.77%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ep_cost_2011_USD_per_ha, Exotic plantation establishment cost per hectare in 2020 USD.</text:p>
          </table:table-cell>
          <table:table-cell table:number-columns-repeated="2" table:style-name="ce6" office:value-type="currency" office:currency="USD" office:value="500" calcext:value-type="currency">
            <text:p>$500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exotic_share, Country-level share of plantations that are exotic species.</text:p>
          </table:table-cell>
          <table:table-cell table:number-columns-repeated="2" table:style-name="ce7" office:value-type="percentage" office:value="0.97" calcext:value-type="percentage">
            <text:p>97%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np_cost_2011_USD_per_ha, Native plantation establishment cost per hectare in 2020 USD.</text:p>
          </table:table-cell>
          <table:table-cell table:number-columns-repeated="2" table:style-name="ce6" office:value-type="currency" office:currency="USD" office:value="500" calcext:value-type="currency">
            <text:p>$500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native_share = 1 - exotic_share</text:p>
          </table:table-cell>
          <table:table-cell table:style-name="ce7" table:formula="of:=1-[.B25]" office:value-type="percentage" office:value="0.03" calcext:value-type="percentage">
            <text:p>3%</text:p>
          </table:table-cell>
          <table:table-cell table:number-columns-repeated="251"/>
          <table:table-cell table:style-name="Default" table:number-columns-repeated="16131"/>
        </table:table-row>
        <table:table-row table:style-name="ro1">
          <table:table-cell table:style-name="ce1"/>
          <table:table-cell table:number-columns-repeated="252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net present value establishment cost per hectare, pl_npv_estcost_USD_per_ha = init_cost</text:p>
          </table:table-cell>
          <table:table-cell table:style-name="ce8" table:formula="of:=[.B23]*([.B24]*[.B25]+[.B26]*[.B27])" office:value-type="currency" office:currency="USD" office:value="578.85" calcext:value-type="currency">
            <text:p>$579</text:p>
          </table:table-cell>
          <table:table-cell table:style-name="ce8" table:formula="of:=[.C23]*([.C24]*[.C25]+[.C26]*(1-[.C25]))" office:value-type="currency" office:currency="USD" office:value="578.85" calcext:value-type="currency">
            <text:p>$579</text:p>
          </table:table-cell>
          <table:table-cell office:value-type="string" calcext:value-type="string">
            <text:p>Setup cost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office:value-type="string" calcext:value-type="string">
            <text:p>TIME_HORIZON_YEARS</text:p>
          </table:table-cell>
          <table:table-cell office:value-type="float" office:value="120" calcext:value-type="float">
            <text:p>120</text:p>
          </table:table-cell>
          <table:table-cell table:number-columns-repeated="251"/>
          <table:table-cell table:style-name="Default" table:number-columns-repeated="16131"/>
        </table:table-row>
        <table:table-row table:style-name="ro1">
          <table:table-cell table:style-name="Default" table:number-columns-repeated="3"/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total carbon per hectare without harvest, pl_wohrv_total_tC_per_ha at year 120 (no harvest term)</text:p>
          </table:table-cell>
          <table:table-cell table:style-name="ce9" table:formula="of:=[.$B$11]*[.$B$6]*(1-EXP(-[.$B$7]*[.$B$30]))^2+[.$B$12]*([.$B$6]*(1-EXP(-[.$B$7]*[.$B$30]))^2)*[.$B$9]+[.$B$13]*[.$B$30]*[.$B$8]" office:value-type="float" office:value="106.49668168411" calcext:value-type="float">
            <text:p>106.5</text:p>
          </table:table-cell>
          <table:table-cell table:style-name="ce9" table:formula="of:=[.$B$11]*[.$B$6]*(1-EXP(-[.$B$7]*[.$B$5]))^2+[.$B$12]*([.$B$6]*(1-EXP(-[.$B$7]*[.$B$5]))^2)*[.$B$9]+[.$B$13]*[.$B$5]*[.$B$8]" office:value-type="float" office:value="95.0888031533367" calcext:value-type="float">
            <text:p>95.1</text:p>
          </table:table-cell>
          <table:table-cell office:value-type="string" calcext:value-type="string">
            <text:p>Discard total carbon per hector, because it ignores timing of removal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office:value-type="string" calcext:value-type="string">
            <text:p>tCO2_per_tC</text:p>
          </table:table-cell>
          <table:table-cell table:number-columns-repeated="2" office:value-type="float" office:value="3.67" calcext:value-type="float">
            <text:p>3.67</text:p>
          </table:table-cell>
          <table:table-cell office:value-type="string" calcext:value-type="string">
            <text:p>Unneeded, since we never need tons CO2.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office:value-type="string" calcext:value-type="string">
            <text:p>Opportunity cost of land $/ha/year, crop_va_USD_per_ha_per_year</text:p>
          </table:table-cell>
          <table:table-cell table:number-columns-repeated="2" table:style-name="ce6" office:value-type="currency" office:currency="USD" office:value="50" calcext:value-type="currency">
            <text:p>$50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abatement cost-effectiveness without harvest in USD per ton CO2, pl_wohrv_costeff_USD_per_tCO2</text:p>
          </table:table-cell>
          <table:table-cell table:style-name="ce8" table:formula="of:=([.B29]+[.B30]*[.B34])/[.B33]/[.B32]" office:value-type="currency" office:currency="USD" office:value="16.8324698149161" calcext:value-type="currency">
            <text:p>$17</text:p>
          </table:table-cell>
          <table:table-cell table:style-name="ce8" table:formula="of:=([.C29]+[.$B$5]*[.C34])/[.C33]/[.C32]" office:value-type="currency" office:currency="USD" office:value="14.2670307375363" calcext:value-type="currency">
            <text:p>$14</text:p>
          </table:table-cell>
          <table:table-cell office:value-type="string" calcext:value-type="string">
            <text:p>Discard $/tC, because SMDAMAGE cares only about the bid.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table:number-columns-repeated="253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abatement cost-effectiveness with harvest, excluding wood product revenue, $/tCO2, pl_whrv0_costeff_USD_per_tCO2</text:p>
          </table:table-cell>
          <table:table-cell table:style-name="ce8" table:formula="of:=([.$B$34]*[.$B$30]+[.$B$29])/([.$B$33]*[.DQ$18])" office:value-type="currency" office:currency="USD" office:value="222.154496847203" calcext:value-type="currency">
            <text:p>$222</text:p>
          </table:table-cell>
          <table:table-cell table:style-name="ce8" table:formula="of:=([.$C$34]*[.$B$5]+[.$C$29])/([.$C$33]*[.DQ$18])" office:value-type="currency" office:currency="USD" office:value="168.125723588119" calcext:value-type="currency">
            <text:p>$168</text:p>
          </table:table-cell>
          <table:table-cell office:value-type="string" calcext:value-type="string">
            <text:p>Discard $/tC, because SMDAMAGE cares only about the bid.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office:value-type="string" calcext:value-type="string">
            <text:p>Wood-product revenue with harvest, p_USD_per_tC_harvested</text:p>
          </table:table-cell>
          <table:table-cell table:number-columns-repeated="2" table:style-name="ce6" office:value-type="currency" office:currency="USD" office:value="61.04" calcext:value-type="currency">
            <text:p>$61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3" office:value-type="string" calcext:value-type="string">
            <text:p>Plantation harvested carbon per hectare over the time horizon, pl_harvested_tC_per_ha at year 120, from g_harvested_cum_tC_per_ha</text:p>
          </table:table-cell>
          <table:table-cell table:style-name="ce30" table:formula="of:=[.DQ$17]" office:value-type="float" office:value="68.9895913343942" calcext:value-type="float">
            <text:p>68.99</text:p>
          </table:table-cell>
          <table:table-cell table:style-name="ce31" table:formula="of:=[.$B$6]*(1-EXP(-[.$B$7]*[.$B$5]))^2" office:value-type="float" office:value="68.9895913343942" calcext:value-type="float">
            <text:p>69.0</text:p>
          </table:table-cell>
          <table:table-cell table:style-name="ce3" office:value-type="string" calcext:value-type="string">
            <text:p>Needed for bid</text:p>
          </table:table-cell>
          <table:table-cell table:style-name="ce3" table:number-columns-repeated="29"/>
          <table:table-cell table:number-columns-repeated="22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abatement cost-effectiveness with harvest, including wood product revenue, in USD per ton CO2, pl_whrv_costeff_USD_per_tCO2</text:p>
          </table:table-cell>
          <table:table-cell table:style-name="ce8" table:formula="of:=([.B34]*[.B30]+[.B29]-[.B38]*[.B39])/([.B33]*[.DP$18])" office:value-type="currency" office:currency="USD" office:value="79.9533098762583" calcext:value-type="currency">
            <text:p>$80</text:p>
          </table:table-cell>
          <table:table-cell table:style-name="ce8" table:formula="of:=([.C34]*[.$B$5]+[.C29]-[.C38]*[.C39])/([.C33]*[.DQ$18])" office:value-type="currency" office:currency="USD" office:value="25.9245366171743" calcext:value-type="currency">
            <text:p>$26</text:p>
          </table:table-cell>
          <table:table-cell office:value-type="string" calcext:value-type="string">
            <text:p>Discard, because SMDAMAGE will price the emission under removal. But the harvest revenue should be part of the bid.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table:number-columns-repeated="253"/>
          <table:table-cell table:style-name="Default" table:number-columns-repeated="16131"/>
        </table:table-row>
        <table:table-row table:style-name="ro1">
          <table:table-cell office:value-type="string" calcext:value-type="string">
            <text:p>Discount_rate</text:p>
          </table:table-cell>
          <table:table-cell/>
          <table:table-cell table:style-name="ce7" office:value-type="percentage" office:value="0.03" calcext:value-type="percentage">
            <text:p>3%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Setup cost</text:p>
          </table:table-cell>
          <table:table-cell/>
          <table:table-cell table:style-name="ce8" table:formula="of:=[.C23]*([.C24]*[.C25]+[.C26]*(1-[.C25]))" office:value-type="currency" office:currency="USD" office:value="578.85" calcext:value-type="currency">
            <text:p>$579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resent value of land opportunity costs, Plantation net present value establishment cost per hectare, pl_npv_estcost_USD_per_ha = init_cost</text:p>
          </table:table-cell>
          <table:table-cell/>
          <table:table-cell table:style-name="ce8" table:formula="of:=[.C34]*(1-(1+[.C42])^(-[.$B$5]))/[.C42]" office:value-type="currency" office:currency="USD" office:value="1543.02268685007" calcext:value-type="currency">
            <text:p>$1,543</text:p>
          </table:table-cell>
          <table:table-cell office:value-type="string" calcext:value-type="string">
            <text:p>Payments at end of year.</text:p>
          </table:table-cell>
          <table:table-cell table:number-columns-repeated="2"/>
          <table:table-cell office:value-type="string" calcext:value-type="string">
            <text:p><text:span text:style-name="T1">'=</text:span><text:span text:style-name="T2">crop_va</text:span><text:span text:style-name="T3">*(1-(1+</text:span><text:span text:style-name="T4">discount_rate</text:span><text:span text:style-name="T3">)^(-</text:span><text:span text:style-name="T5">contract_length</text:span><text:span text:style-name="T3">))/</text:span><text:span text:style-name="T4">discount_rate</text:span></text:p>
          </table:table-cell>
          <table:table-cell table:number-columns-repeated="246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resent value of wood harvest revenue, from plantation harvested C/ha over the time horizon, pl_harvested_tC_per_ha, from g_harvested_cum_tC_per_ha</text:p>
          </table:table-cell>
          <table:table-cell/>
          <table:table-cell table:style-name="ce8" table:formula="of:=-[.$B$6]*(1-EXP(-[.$B$7]*[.$B$5]))^2/(1+[.C42])^[.$B$5]" office:value-type="currency" office:currency="USD" office:value="-5.11808858310313" calcext:value-type="currency">
            <text:p>-$5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3" office:value-type="string" calcext:value-type="string">
            <text:p>SMDAMAGE bid $/ha discounted to year 0 of contract </text:p>
          </table:table-cell>
          <table:table-cell/>
          <table:table-cell table:style-name="ce8" table:formula="of:=[.C43]+[.C44]+[.C45]" office:value-type="currency" office:currency="USD" office:value="2116.75459826697" calcext:value-type="currency">
            <text:p>$2,117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3" office:value-type="string" calcext:value-type="string">
            <text:p>SMDAMAGE bid $/ha discounted to year 0 of contract, collected terms</text:p>
          </table:table-cell>
          <table:table-cell/>
          <table:table-cell table:style-name="ce8" table:formula="of:=[.C23]*([.C24]*[.C25]+[.C26]*(1-[.C25]))+[.C34]*(1-(1+[.C42])^(-[.$B$5]))/[.C42]-[.$B$6]*(1-EXP(-[.$B$7]*[.$B$5]))^2/(1+[.C42])^[.$B$5]" office:value-type="currency" office:currency="USD" office:value="2116.75459826697" calcext:value-type="currency">
            <text:p>$2,117</text:p>
          </table:table-cell>
          <table:table-cell table:number-columns-repeated="250"/>
          <table:table-cell table:style-name="Default" table:number-columns-repeated="16131"/>
        </table:table-row>
        <table:table-row table:style-name="ro1" table:number-rows-repeated="1048527">
          <table:table-cell table:number-columns-repeated="253"/>
          <table:table-cell table:style-name="Default" table:number-columns-repeated="16131"/>
        </table:table-row>
        <table:table-row table:style-name="ro2">
          <table:table-cell table:number-columns-repeated="253"/>
          <table:table-cell table:style-name="Default" table:number-columns-repeated="16131"/>
        </table:table-row>
        <table:table-row table:style-name="ro2">
          <table:table-cell table:number-columns-repeated="253"/>
          <table:table-cell table:style-name="Default" table:number-columns-repeated="16131"/>
        </table:table-row>
      </table:table>
      <table:table table:name="Convolution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294" table:default-cell-style-name="Default"/>
        <table:table-row table:style-name="ro1">
          <table:table-cell office:value-type="string" calcext:value-type="string">
            <text:p>Hand-compared with the Python convolution code.</text:p>
          </table:table-cell>
          <table:table-cell table:number-columns-repeated="294"/>
        </table:table-row>
        <table:table-row table:style-name="ro1">
          <table:table-cell table:number-columns-repeated="295"/>
        </table:table-row>
        <table:table-row table:style-name="ro1" table:number-rows-repeated="2">
          <table:table-cell table:number-columns-repeated="101"/>
          <table:table-cell table:style-name="ce42"/>
          <table:table-cell table:number-columns-repeated="193"/>
        </table:table-row>
        <table:table-row table:style-name="ro1">
          <table:table-cell office:value-type="string" calcext:value-type="string">
            <text:p>Emission 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41" table:formula="of:=[.CW5]+1" office:value-type="float" office:value="101" calcext:value-type="float">
            <text:p>101</text:p>
          </table:table-cell>
          <table:table-cell table:formula="of:=[.CX5]+1" office:value-type="float" office:value="102" calcext:value-type="float">
            <text:p>102</text:p>
          </table:table-cell>
          <table:table-cell table:formula="of:=[.CY5]+1" office:value-type="float" office:value="103" calcext:value-type="float">
            <text:p>103</text:p>
          </table:table-cell>
          <table:table-cell table:formula="of:=[.CZ5]+1" office:value-type="float" office:value="104" calcext:value-type="float">
            <text:p>104</text:p>
          </table:table-cell>
          <table:table-cell table:formula="of:=[.DA5]+1" office:value-type="float" office:value="105" calcext:value-type="float">
            <text:p>105</text:p>
          </table:table-cell>
          <table:table-cell table:formula="of:=[.DB5]+1" office:value-type="float" office:value="106" calcext:value-type="float">
            <text:p>106</text:p>
          </table:table-cell>
          <table:table-cell table:formula="of:=[.DC5]+1" office:value-type="float" office:value="107" calcext:value-type="float">
            <text:p>107</text:p>
          </table:table-cell>
          <table:table-cell table:formula="of:=[.DD5]+1" office:value-type="float" office:value="108" calcext:value-type="float">
            <text:p>108</text:p>
          </table:table-cell>
          <table:table-cell table:formula="of:=[.DE5]+1" office:value-type="float" office:value="109" calcext:value-type="float">
            <text:p>109</text:p>
          </table:table-cell>
          <table:table-cell table:formula="of:=[.DF5]+1" office:value-type="float" office:value="110" calcext:value-type="float">
            <text:p>110</text:p>
          </table:table-cell>
          <table:table-cell table:formula="of:=[.DG5]+1" office:value-type="float" office:value="111" calcext:value-type="float">
            <text:p>111</text:p>
          </table:table-cell>
          <table:table-cell table:formula="of:=[.DH5]+1" office:value-type="float" office:value="112" calcext:value-type="float">
            <text:p>112</text:p>
          </table:table-cell>
          <table:table-cell table:formula="of:=[.DI5]+1" office:value-type="float" office:value="113" calcext:value-type="float">
            <text:p>113</text:p>
          </table:table-cell>
          <table:table-cell table:formula="of:=[.DJ5]+1" office:value-type="float" office:value="114" calcext:value-type="float">
            <text:p>114</text:p>
          </table:table-cell>
          <table:table-cell table:formula="of:=[.DK5]+1" office:value-type="float" office:value="115" calcext:value-type="float">
            <text:p>115</text:p>
          </table:table-cell>
          <table:table-cell table:formula="of:=[.DL5]+1" office:value-type="float" office:value="116" calcext:value-type="float">
            <text:p>116</text:p>
          </table:table-cell>
          <table:table-cell table:formula="of:=[.DM5]+1" office:value-type="float" office:value="117" calcext:value-type="float">
            <text:p>117</text:p>
          </table:table-cell>
          <table:table-cell table:formula="of:=[.DN5]+1" office:value-type="float" office:value="118" calcext:value-type="float">
            <text:p>118</text:p>
          </table:table-cell>
          <table:table-cell table:formula="of:=[.DO5]+1" office:value-type="float" office:value="119" calcext:value-type="float">
            <text:p>119</text:p>
          </table:table-cell>
          <table:table-cell table:formula="of:=[.DP5]+1" office:value-type="float" office:value="120" calcext:value-type="float">
            <text:p>120</text:p>
          </table:table-cell>
          <table:table-cell table:formula="of:=[.DQ5]+1" office:value-type="float" office:value="121" calcext:value-type="float">
            <text:p>121</text:p>
          </table:table-cell>
          <table:table-cell table:formula="of:=[.DR5]+1" office:value-type="float" office:value="122" calcext:value-type="float">
            <text:p>122</text:p>
          </table:table-cell>
          <table:table-cell table:formula="of:=[.DS5]+1" office:value-type="float" office:value="123" calcext:value-type="float">
            <text:p>123</text:p>
          </table:table-cell>
          <table:table-cell table:formula="of:=[.DT5]+1" office:value-type="float" office:value="124" calcext:value-type="float">
            <text:p>124</text:p>
          </table:table-cell>
          <table:table-cell table:formula="of:=[.DU5]+1" office:value-type="float" office:value="125" calcext:value-type="float">
            <text:p>125</text:p>
          </table:table-cell>
          <table:table-cell table:formula="of:=[.DV5]+1" office:value-type="float" office:value="126" calcext:value-type="float">
            <text:p>126</text:p>
          </table:table-cell>
          <table:table-cell table:formula="of:=[.DW5]+1" office:value-type="float" office:value="127" calcext:value-type="float">
            <text:p>127</text:p>
          </table:table-cell>
          <table:table-cell table:formula="of:=[.DX5]+1" office:value-type="float" office:value="128" calcext:value-type="float">
            <text:p>128</text:p>
          </table:table-cell>
          <table:table-cell table:formula="of:=[.DY5]+1" office:value-type="float" office:value="129" calcext:value-type="float">
            <text:p>129</text:p>
          </table:table-cell>
          <table:table-cell table:formula="of:=[.DZ5]+1" office:value-type="float" office:value="130" calcext:value-type="float">
            <text:p>130</text:p>
          </table:table-cell>
          <table:table-cell table:formula="of:=[.EA5]+1" office:value-type="float" office:value="131" calcext:value-type="float">
            <text:p>131</text:p>
          </table:table-cell>
          <table:table-cell table:formula="of:=[.EB5]+1" office:value-type="float" office:value="132" calcext:value-type="float">
            <text:p>132</text:p>
          </table:table-cell>
          <table:table-cell table:formula="of:=[.EC5]+1" office:value-type="float" office:value="133" calcext:value-type="float">
            <text:p>133</text:p>
          </table:table-cell>
          <table:table-cell table:formula="of:=[.ED5]+1" office:value-type="float" office:value="134" calcext:value-type="float">
            <text:p>134</text:p>
          </table:table-cell>
          <table:table-cell table:formula="of:=[.EE5]+1" office:value-type="float" office:value="135" calcext:value-type="float">
            <text:p>135</text:p>
          </table:table-cell>
          <table:table-cell table:formula="of:=[.EF5]+1" office:value-type="float" office:value="136" calcext:value-type="float">
            <text:p>136</text:p>
          </table:table-cell>
          <table:table-cell table:formula="of:=[.EG5]+1" office:value-type="float" office:value="137" calcext:value-type="float">
            <text:p>137</text:p>
          </table:table-cell>
          <table:table-cell table:formula="of:=[.EH5]+1" office:value-type="float" office:value="138" calcext:value-type="float">
            <text:p>138</text:p>
          </table:table-cell>
          <table:table-cell table:formula="of:=[.EI5]+1" office:value-type="float" office:value="139" calcext:value-type="float">
            <text:p>139</text:p>
          </table:table-cell>
          <table:table-cell table:formula="of:=[.EJ5]+1" office:value-type="float" office:value="140" calcext:value-type="float">
            <text:p>140</text:p>
          </table:table-cell>
          <table:table-cell table:formula="of:=[.EK5]+1" office:value-type="float" office:value="141" calcext:value-type="float">
            <text:p>141</text:p>
          </table:table-cell>
          <table:table-cell table:formula="of:=[.EL5]+1" office:value-type="float" office:value="142" calcext:value-type="float">
            <text:p>142</text:p>
          </table:table-cell>
          <table:table-cell table:formula="of:=[.EM5]+1" office:value-type="float" office:value="143" calcext:value-type="float">
            <text:p>143</text:p>
          </table:table-cell>
          <table:table-cell table:formula="of:=[.EN5]+1" office:value-type="float" office:value="144" calcext:value-type="float">
            <text:p>144</text:p>
          </table:table-cell>
          <table:table-cell table:formula="of:=[.EO5]+1" office:value-type="float" office:value="145" calcext:value-type="float">
            <text:p>14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Carbon schedule, mtons emitted</text:p>
          </table:table-cell>
          <table:table-cell table:style-name="ce36" table:formula="of:=[$'Plantation example'.B20]" office:value-type="float" office:value="0.266211756783841" calcext:value-type="float">
            <text:p>0.27</text:p>
          </table:table-cell>
          <table:table-cell table:style-name="ce36" table:formula="of:=[$'Plantation example'.C20]" office:value-type="float" office:value="0.424446166852168" calcext:value-type="float">
            <text:p>0.42</text:p>
          </table:table-cell>
          <table:table-cell table:style-name="ce36" table:formula="of:=[$'Plantation example'.D20]" office:value-type="float" office:value="0.568490638905015" calcext:value-type="float">
            <text:p>0.57</text:p>
          </table:table-cell>
          <table:table-cell table:style-name="ce36" table:formula="of:=[$'Plantation example'.E20]" office:value-type="float" office:value="0.699318566534853" calcext:value-type="float">
            <text:p>0.70</text:p>
          </table:table-cell>
          <table:table-cell table:style-name="ce36" table:formula="of:=[$'Plantation example'.F20]" office:value-type="float" office:value="0.81784231173572" calcext:value-type="float">
            <text:p>0.82</text:p>
          </table:table-cell>
          <table:table-cell table:style-name="ce36" table:formula="of:=[$'Plantation example'.G20]" office:value-type="float" office:value="0.924916887537778" calcext:value-type="float">
            <text:p>0.92</text:p>
          </table:table-cell>
          <table:table-cell table:style-name="ce36" table:formula="of:=[$'Plantation example'.H20]" office:value-type="float" office:value="1.02134342238623" calcext:value-type="float">
            <text:p>1.02</text:p>
          </table:table-cell>
          <table:table-cell table:style-name="ce36" table:formula="of:=[$'Plantation example'.I20]" office:value-type="float" office:value="1.10787241908698" calcext:value-type="float">
            <text:p>1.11</text:p>
          </table:table-cell>
          <table:table-cell table:style-name="ce36" table:formula="of:=[$'Plantation example'.J20]" office:value-type="float" office:value="1.1852068203914" calcext:value-type="float">
            <text:p>1.19</text:p>
          </table:table-cell>
          <table:table-cell table:style-name="ce36" table:formula="of:=[$'Plantation example'.K20]" office:value-type="float" office:value="1.25400489258636" calcext:value-type="float">
            <text:p>1.25</text:p>
          </table:table-cell>
          <table:table-cell table:style-name="ce36" table:formula="of:=[$'Plantation example'.L20]" office:value-type="float" office:value="1.31488293779049" calcext:value-type="float">
            <text:p>1.31</text:p>
          </table:table-cell>
          <table:table-cell table:style-name="ce36" table:formula="of:=[$'Plantation example'.M20]" office:value-type="float" office:value="1.36841784503169" calcext:value-type="float">
            <text:p>1.37</text:p>
          </table:table-cell>
          <table:table-cell table:style-name="ce36" table:formula="of:=[$'Plantation example'.N20]" office:value-type="float" office:value="1.41514948959091" calcext:value-type="float">
            <text:p>1.42</text:p>
          </table:table-cell>
          <table:table-cell table:style-name="ce36" table:formula="of:=[$'Plantation example'.O20]" office:value-type="float" office:value="1.45558298954239" calcext:value-type="float">
            <text:p>1.46</text:p>
          </table:table-cell>
          <table:table-cell table:style-name="ce36" table:formula="of:=[$'Plantation example'.P20]" office:value-type="float" office:value="1.49019082789734" calcext:value-type="float">
            <text:p>1.49</text:p>
          </table:table-cell>
          <table:table-cell table:style-name="ce36" table:formula="of:=[$'Plantation example'.Q20]" office:value-type="float" office:value="1.51941484826606" calcext:value-type="float">
            <text:p>1.52</text:p>
          </table:table-cell>
          <table:table-cell table:style-name="ce36" table:formula="of:=[$'Plantation example'.R20]" office:value-type="float" office:value="1.54366813148981" calcext:value-type="float">
            <text:p>1.54</text:p>
          </table:table-cell>
          <table:table-cell table:style-name="ce36" table:formula="of:=[$'Plantation example'.S20]" office:value-type="float" office:value="1.5633367602573" calcext:value-type="float">
            <text:p>1.56</text:p>
          </table:table-cell>
          <table:table-cell table:style-name="ce36" table:formula="of:=[$'Plantation example'.T20]" office:value-type="float" office:value="1.57878147830979" calcext:value-type="float">
            <text:p>1.58</text:p>
          </table:table-cell>
          <table:table-cell table:style-name="ce36" table:formula="of:=[$'Plantation example'.U20]" office:value-type="float" office:value="1.59033925045167" calcext:value-type="float">
            <text:p>1.59</text:p>
          </table:table-cell>
          <table:table-cell table:style-name="ce36" table:formula="of:=[$'Plantation example'.V20]" office:value-type="float" office:value="1.5983247292191" calcext:value-type="float">
            <text:p>1.60</text:p>
          </table:table-cell>
          <table:table-cell table:style-name="ce36" table:formula="of:=[$'Plantation example'.W20]" office:value-type="float" office:value="1.60303163371633" calcext:value-type="float">
            <text:p>1.60</text:p>
          </table:table-cell>
          <table:table-cell table:style-name="ce36" table:formula="of:=[$'Plantation example'.X20]" office:value-type="float" office:value="1.6047340458061" calcext:value-type="float">
            <text:p>1.60</text:p>
          </table:table-cell>
          <table:table-cell table:style-name="ce36" table:formula="of:=[$'Plantation example'.Y20]" office:value-type="float" office:value="1.60368762853644" calcext:value-type="float">
            <text:p>1.60</text:p>
          </table:table-cell>
          <table:table-cell table:style-name="ce36" table:formula="of:=[$'Plantation example'.Z20]" office:value-type="float" office:value="1.60013077139995" calcext:value-type="float">
            <text:p>1.60</text:p>
          </table:table-cell>
          <table:table-cell table:style-name="ce36" table:formula="of:=[$'Plantation example'.AA20]" office:value-type="float" office:value="1.59428566675177" calcext:value-type="float">
            <text:p>1.59</text:p>
          </table:table-cell>
          <table:table-cell table:style-name="ce36" table:formula="of:=[$'Plantation example'.AB20]" office:value-type="float" office:value="1.58635932145865" calcext:value-type="float">
            <text:p>1.59</text:p>
          </table:table-cell>
          <table:table-cell table:style-name="ce36" table:formula="of:=[$'Plantation example'.AC20]" office:value-type="float" office:value="1.57654450761272" calcext:value-type="float">
            <text:p>1.58</text:p>
          </table:table-cell>
          <table:table-cell table:style-name="ce36" table:formula="of:=[$'Plantation example'.AD20]" office:value-type="float" office:value="1.56502065591812" calcext:value-type="float">
            <text:p>1.57</text:p>
          </table:table-cell>
          <table:table-cell table:style-name="ce36" table:formula="of:=[$'Plantation example'.AE20]" office:value-type="float" office:value="1.55195469514699" calcext:value-type="float">
            <text:p>1.55</text:p>
          </table:table-cell>
          <table:table-cell table:style-name="ce36" table:formula="of:=[$'Plantation example'.AF20]" office:value-type="float" office:value="1.5375018408618" calcext:value-type="float">
            <text:p>1.54</text:p>
          </table:table-cell>
          <table:table-cell table:style-name="ce36" table:formula="of:=[$'Plantation example'.AG20]" office:value-type="float" office:value="1.52180633641312" calcext:value-type="float">
            <text:p>1.52</text:p>
          </table:table-cell>
          <table:table-cell table:style-name="ce36" table:formula="of:=[$'Plantation example'.AH20]" office:value-type="float" office:value="1.50500214904505" calcext:value-type="float">
            <text:p>1.51</text:p>
          </table:table-cell>
          <table:table-cell table:style-name="ce36" table:formula="of:=[$'Plantation example'.AI20]" office:value-type="float" office:value="1.48721362377406" calcext:value-type="float">
            <text:p>1.49</text:p>
          </table:table-cell>
          <table:table-cell table:style-name="ce36" table:formula="of:=[$'Plantation example'.AJ20]" office:value-type="float" office:value="1.46855609755023" calcext:value-type="float">
            <text:p>1.47</text:p>
          </table:table-cell>
          <table:table-cell table:style-name="ce36" table:formula="of:=[$'Plantation example'.AK20]" office:value-type="float" office:value="1.44913647606239" calcext:value-type="float">
            <text:p>1.45</text:p>
          </table:table-cell>
          <table:table-cell table:style-name="ce36" table:formula="of:=[$'Plantation example'.AL20]" office:value-type="float" office:value="1.4290537754094" calcext:value-type="float">
            <text:p>1.43</text:p>
          </table:table-cell>
          <table:table-cell table:style-name="ce36" table:formula="of:=[$'Plantation example'.AM20]" office:value-type="float" office:value="1.40839963072944" calcext:value-type="float">
            <text:p>1.41</text:p>
          </table:table-cell>
          <table:table-cell table:style-name="ce36" table:formula="of:=[$'Plantation example'.AN20]" office:value-type="float" office:value="1.38725877375563" calcext:value-type="float">
            <text:p>1.39</text:p>
          </table:table-cell>
          <table:table-cell table:style-name="ce36" table:formula="of:=[$'Plantation example'.AO20]" office:value-type="float" office:value="1.36570948115063" calcext:value-type="float">
            <text:p>1.37</text:p>
          </table:table-cell>
          <table:table-cell table:style-name="ce36" table:formula="of:=[$'Plantation example'.AP20]" office:value-type="float" office:value="1.34382399536348" calcext:value-type="float">
            <text:p>1.34</text:p>
          </table:table-cell>
          <table:table-cell table:style-name="ce36" table:formula="of:=[$'Plantation example'.AQ20]" office:value-type="float" office:value="1.32166891964944" calcext:value-type="float">
            <text:p>1.32</text:p>
          </table:table-cell>
          <table:table-cell table:style-name="ce36" table:formula="of:=[$'Plantation example'.AR20]" office:value-type="float" office:value="1.29930558879665" calcext:value-type="float">
            <text:p>1.30</text:p>
          </table:table-cell>
          <table:table-cell table:style-name="ce36" table:formula="of:=[$'Plantation example'.AS20]" office:value-type="float" office:value="1.27679041701244" calcext:value-type="float">
            <text:p>1.28</text:p>
          </table:table-cell>
          <table:table-cell table:style-name="ce36" table:formula="of:=[$'Plantation example'.AT20]" office:value-type="float" office:value="1.25417522433635" calcext:value-type="float">
            <text:p>1.25</text:p>
          </table:table-cell>
          <table:table-cell table:style-name="ce36" table:formula="of:=[$'Plantation example'.AU20]" office:value-type="float" office:value="1.2315075428663" calcext:value-type="float">
            <text:p>1.23</text:p>
          </table:table-cell>
          <table:table-cell table:style-name="ce36" table:formula="of:=[$'Plantation example'.AV20]" office:value-type="float" office:value="1.20883090400832" calcext:value-type="float">
            <text:p>1.21</text:p>
          </table:table-cell>
          <table:table-cell table:style-name="ce36" table:formula="of:=[$'Plantation example'.AW20]" office:value-type="float" office:value="1.18618510788863" calcext:value-type="float">
            <text:p>1.19</text:p>
          </table:table-cell>
          <table:table-cell table:style-name="ce36" table:formula="of:=[$'Plantation example'.AX20]" office:value-type="float" office:value="1.16360647599976" calcext:value-type="float">
            <text:p>1.16</text:p>
          </table:table-cell>
          <table:table-cell table:style-name="ce36" table:formula="of:=[$'Plantation example'.AY20]" office:value-type="float" office:value="1.14112808808886" calcext:value-type="float">
            <text:p>1.14</text:p>
          </table:table-cell>
          <table:table-cell table:style-name="ce36" table:formula="of:=[$'Plantation example'.AZ20]" office:value-type="float" office:value="1.11878000423672" calcext:value-type="float">
            <text:p>1.12</text:p>
          </table:table-cell>
          <table:table-cell table:style-name="ce36" table:formula="of:=[$'Plantation example'.BA20]" office:value-type="float" office:value="1.09658947301992" calcext:value-type="float">
            <text:p>1.10</text:p>
          </table:table-cell>
          <table:table-cell table:style-name="ce36" table:formula="of:=[$'Plantation example'.BB20]" office:value-type="float" office:value="1.07458112659567" calcext:value-type="float">
            <text:p>1.07</text:p>
          </table:table-cell>
          <table:table-cell table:style-name="ce36" table:formula="of:=[$'Plantation example'.BC20]" office:value-type="float" office:value="1.05277716349903" calcext:value-type="float">
            <text:p>1.05</text:p>
          </table:table-cell>
          <table:table-cell table:style-name="ce36" table:formula="of:=[$'Plantation example'.BD20]" office:value-type="float" office:value="1.03119751989562" calcext:value-type="float">
            <text:p>1.03</text:p>
          </table:table-cell>
          <table:table-cell table:style-name="ce36" table:formula="of:=[$'Plantation example'.BE20]" office:value-type="float" office:value="1.00986002998857" calcext:value-type="float">
            <text:p>1.01</text:p>
          </table:table-cell>
          <table:table-cell table:style-name="ce36" table:formula="of:=[$'Plantation example'.BF20]" office:value-type="float" office:value="0.988780576237163" calcext:value-type="float">
            <text:p>0.99</text:p>
          </table:table-cell>
          <table:table-cell table:style-name="ce36" table:formula="of:=[$'Plantation example'.BG20]" office:value-type="float" office:value="0.967973230005519" calcext:value-type="float">
            <text:p>0.97</text:p>
          </table:table-cell>
          <table:table-cell table:style-name="ce36" table:formula="of:=[$'Plantation example'.BH20]" office:value-type="float" office:value="0.947450383222948" calcext:value-type="float">
            <text:p>0.95</text:p>
          </table:table-cell>
          <table:table-cell table:style-name="ce36" table:formula="of:=[$'Plantation example'.BI20]" office:value-type="float" office:value="0.92722287160293" calcext:value-type="float">
            <text:p>0.93</text:p>
          </table:table-cell>
          <table:table-cell table:style-name="ce36" table:formula="of:=[$'Plantation example'.BJ20]" office:value-type="float" office:value="0.90730008993522" calcext:value-type="float">
            <text:p>0.91</text:p>
          </table:table-cell>
          <table:table-cell table:style-name="ce36" table:formula="of:=[$'Plantation example'.BK20]" office:value-type="float" office:value="0.887690099934908" calcext:value-type="float">
            <text:p>0.89</text:p>
          </table:table-cell>
          <table:table-cell table:style-name="ce36" table:formula="of:=[$'Plantation example'.BL20]" office:value-type="float" office:value="0.868399731103409" calcext:value-type="float">
            <text:p>0.87</text:p>
          </table:table-cell>
          <table:table-cell table:style-name="ce36" table:formula="of:=[$'Plantation example'.BM20]" office:value-type="float" office:value="0.849434675029254" calcext:value-type="float">
            <text:p>0.85</text:p>
          </table:table-cell>
          <table:table-cell table:style-name="ce36" table:formula="of:=[$'Plantation example'.BN20]" office:value-type="float" office:value="0.830799573531009" calcext:value-type="float">
            <text:p>0.83</text:p>
          </table:table-cell>
          <table:table-cell table:style-name="ce36" table:formula="of:=[$'Plantation example'.BO20]" office:value-type="float" office:value="0.812498101020613" calcext:value-type="float">
            <text:p>0.81</text:p>
          </table:table-cell>
          <table:table-cell table:style-name="ce36" table:formula="of:=[$'Plantation example'.BP20]" office:value-type="float" office:value="0.794533041442819" calcext:value-type="float">
            <text:p>0.79</text:p>
          </table:table-cell>
          <table:table-cell table:style-name="ce36" table:formula="of:=[$'Plantation example'.BQ20]" office:value-type="float" office:value="0.776906360125159" calcext:value-type="float">
            <text:p>0.78</text:p>
          </table:table-cell>
          <table:table-cell table:style-name="ce36" table:formula="of:=[$'Plantation example'.BR20]" office:value-type="float" office:value="0.759619270852788" calcext:value-type="float">
            <text:p>0.76</text:p>
          </table:table-cell>
          <table:table-cell table:style-name="ce36" table:formula="of:=[$'Plantation example'.BS20]" office:value-type="float" office:value="0.742672298463785" calcext:value-type="float">
            <text:p>0.74</text:p>
          </table:table-cell>
          <table:table-cell table:style-name="ce36" table:formula="of:=[$'Plantation example'.BT20]" office:value-type="float" office:value="0.726065337242702" calcext:value-type="float">
            <text:p>0.73</text:p>
          </table:table-cell>
          <table:table-cell table:style-name="ce36" table:formula="of:=[$'Plantation example'.BU20]" office:value-type="float" office:value="0.709797705373502" calcext:value-type="float">
            <text:p>0.71</text:p>
          </table:table-cell>
          <table:table-cell table:style-name="ce36" table:formula="of:=[$'Plantation example'.BV20]" office:value-type="float" office:value="0.693868195697347" calcext:value-type="float">
            <text:p>0.69</text:p>
          </table:table-cell>
          <table:table-cell table:style-name="ce36" table:formula="of:=[$'Plantation example'.BW20]" office:value-type="float" office:value="0.678275123005889" calcext:value-type="float">
            <text:p>0.68</text:p>
          </table:table-cell>
          <table:table-cell table:style-name="ce36" table:formula="of:=[$'Plantation example'.BX20]" office:value-type="float" office:value="0.663016368086866" calcext:value-type="float">
            <text:p>0.66</text:p>
          </table:table-cell>
          <table:table-cell table:style-name="ce36" table:formula="of:=[$'Plantation example'.BY20]" office:value-type="float" office:value="0.648089418725725" calcext:value-type="float">
            <text:p>0.65</text:p>
          </table:table-cell>
          <table:table-cell table:style-name="ce36" table:formula="of:=[$'Plantation example'.BZ20]" office:value-type="float" office:value="0.633491407854676" calcext:value-type="float">
            <text:p>0.63</text:p>
          </table:table-cell>
          <table:table-cell table:style-name="ce36" table:formula="of:=[$'Plantation example'.CA20]" office:value-type="float" office:value="0.619219149029054" calcext:value-type="float">
            <text:p>0.62</text:p>
          </table:table-cell>
          <table:table-cell table:style-name="ce36" table:formula="of:=[$'Plantation example'.CB20]" office:value-type="float" office:value="0.605269169399955" calcext:value-type="float">
            <text:p>0.61</text:p>
          </table:table-cell>
          <table:table-cell table:style-name="ce36" table:formula="of:=[$'Plantation example'.CC20]" office:value-type="float" office:value="0.591637740341894" calcext:value-type="float">
            <text:p>0.59</text:p>
          </table:table-cell>
          <table:table-cell table:style-name="ce36" table:formula="of:=[$'Plantation example'.CD20]" office:value-type="float" office:value="0.578320905884595" calcext:value-type="float">
            <text:p>0.58</text:p>
          </table:table-cell>
          <table:table-cell table:style-name="ce36" table:formula="of:=[$'Plantation example'.CE20]" office:value-type="float" office:value="0.565314509088981" calcext:value-type="float">
            <text:p>0.57</text:p>
          </table:table-cell>
          <table:table-cell table:style-name="ce36" table:formula="of:=[$'Plantation example'.CF20]" office:value-type="float" office:value="0.552614216498907" calcext:value-type="float">
            <text:p>0.55</text:p>
          </table:table-cell>
          <table:table-cell table:style-name="ce36" table:formula="of:=[$'Plantation example'.CG20]" office:value-type="float" office:value="0.540215540792158" calcext:value-type="float">
            <text:p>0.54</text:p>
          </table:table-cell>
          <table:table-cell table:style-name="ce36" table:formula="of:=[$'Plantation example'.CH20]" office:value-type="float" office:value="0.528113861746736" calcext:value-type="float">
            <text:p>0.53</text:p>
          </table:table-cell>
          <table:table-cell table:style-name="ce36" table:formula="of:=[$'Plantation example'.CI20]" office:value-type="float" office:value="0.516304445631333" calcext:value-type="float">
            <text:p>0.52</text:p>
          </table:table-cell>
          <table:table-cell table:style-name="ce36" table:formula="of:=[$'Plantation example'.CJ20]" office:value-type="float" office:value="0.504782463122254" calcext:value-type="float">
            <text:p>0.50</text:p>
          </table:table-cell>
          <table:table-cell table:style-name="ce36" table:formula="of:=[$'Plantation example'.CK20]" office:value-type="float" office:value="0.493543005842778" calcext:value-type="float">
            <text:p>0.49</text:p>
          </table:table-cell>
          <table:table-cell table:style-name="ce36" table:formula="of:=[$'Plantation example'.CL20]" office:value-type="float" office:value="-0" calcext:value-type="float">
            <text:p>0.00</text:p>
          </table:table-cell>
          <table:table-cell table:style-name="ce36" table:formula="of:=[$'Plantation example'.CM20]" office:value-type="float" office:value="-0" calcext:value-type="float">
            <text:p>0.00</text:p>
          </table:table-cell>
          <table:table-cell table:style-name="ce36" table:formula="of:=[$'Plantation example'.CN20]" office:value-type="float" office:value="-0" calcext:value-type="float">
            <text:p>0.00</text:p>
          </table:table-cell>
          <table:table-cell table:style-name="ce36" table:formula="of:=[$'Plantation example'.CO20]" office:value-type="float" office:value="-0" calcext:value-type="float">
            <text:p>0.00</text:p>
          </table:table-cell>
          <table:table-cell table:style-name="ce36" table:formula="of:=[$'Plantation example'.CP20]" office:value-type="float" office:value="-0" calcext:value-type="float">
            <text:p>0.00</text:p>
          </table:table-cell>
          <table:table-cell table:style-name="ce36" table:formula="of:=[$'Plantation example'.CQ20]" office:value-type="float" office:value="-0" calcext:value-type="float">
            <text:p>0.00</text:p>
          </table:table-cell>
          <table:table-cell table:style-name="ce36" table:formula="of:=[$'Plantation example'.CR20]" office:value-type="float" office:value="-0" calcext:value-type="float">
            <text:p>0.00</text:p>
          </table:table-cell>
          <table:table-cell table:style-name="ce36" table:formula="of:=[$'Plantation example'.CS20]" office:value-type="float" office:value="-0" calcext:value-type="float">
            <text:p>0.00</text:p>
          </table:table-cell>
          <table:table-cell table:style-name="ce36" table:formula="of:=[$'Plantation example'.CT20]" office:value-type="float" office:value="-0" calcext:value-type="float">
            <text:p>0.00</text:p>
          </table:table-cell>
          <table:table-cell table:style-name="ce36" table:formula="of:=[$'Plantation example'.CU20]" office:value-type="float" office:value="-0" calcext:value-type="float">
            <text:p>0.00</text:p>
          </table:table-cell>
          <table:table-cell table:style-name="ce36" table:formula="of:=[$'Plantation example'.CV20]" office:value-type="float" office:value="-0" calcext:value-type="float">
            <text:p>0.00</text:p>
          </table:table-cell>
          <table:table-cell table:style-name="ce36" table:formula="of:=[$'Plantation example'.CW20]" office:value-type="float" office:value="-0" calcext:value-type="float">
            <text:p>0.00</text:p>
          </table:table-cell>
          <table:table-cell table:style-name="ce43" table:formula="of:=[$'Plantation example'.CX20]" office:value-type="float" office:value="-0" calcext:value-type="float">
            <text:p>0.00</text:p>
          </table:table-cell>
          <table:table-cell table:style-name="ce36" table:formula="of:=[$'Plantation example'.CY20]" office:value-type="float" office:value="-0" calcext:value-type="float">
            <text:p>0.00</text:p>
          </table:table-cell>
          <table:table-cell table:style-name="ce36" table:formula="of:=[$'Plantation example'.CZ20]" office:value-type="float" office:value="-0" calcext:value-type="float">
            <text:p>0.00</text:p>
          </table:table-cell>
          <table:table-cell table:style-name="ce36" table:formula="of:=[$'Plantation example'.DA20]" office:value-type="float" office:value="-0" calcext:value-type="float">
            <text:p>0.00</text:p>
          </table:table-cell>
          <table:table-cell table:style-name="ce36" table:formula="of:=[$'Plantation example'.DB20]" office:value-type="float" office:value="-0" calcext:value-type="float">
            <text:p>0.00</text:p>
          </table:table-cell>
          <table:table-cell table:style-name="ce36" table:formula="of:=[$'Plantation example'.DC20]" office:value-type="float" office:value="-0" calcext:value-type="float">
            <text:p>0.00</text:p>
          </table:table-cell>
          <table:table-cell table:style-name="ce36" table:formula="of:=[$'Plantation example'.DD20]" office:value-type="float" office:value="-0" calcext:value-type="float">
            <text:p>0.00</text:p>
          </table:table-cell>
          <table:table-cell table:style-name="ce36" table:formula="of:=[$'Plantation example'.DE20]" office:value-type="float" office:value="-0" calcext:value-type="float">
            <text:p>0.00</text:p>
          </table:table-cell>
          <table:table-cell table:style-name="ce36" table:formula="of:=[$'Plantation example'.DF20]" office:value-type="float" office:value="-0" calcext:value-type="float">
            <text:p>0.00</text:p>
          </table:table-cell>
          <table:table-cell table:style-name="ce36" table:formula="of:=[$'Plantation example'.DG20]" office:value-type="float" office:value="-0" calcext:value-type="float">
            <text:p>0.00</text:p>
          </table:table-cell>
          <table:table-cell table:style-name="ce36" table:formula="of:=[$'Plantation example'.DH20]" office:value-type="float" office:value="-0" calcext:value-type="float">
            <text:p>0.00</text:p>
          </table:table-cell>
          <table:table-cell table:style-name="ce36" table:formula="of:=[$'Plantation example'.DI20]" office:value-type="float" office:value="-0" calcext:value-type="float">
            <text:p>0.00</text:p>
          </table:table-cell>
          <table:table-cell table:style-name="ce36" table:formula="of:=[$'Plantation example'.DJ20]" office:value-type="float" office:value="-0" calcext:value-type="float">
            <text:p>0.00</text:p>
          </table:table-cell>
          <table:table-cell table:style-name="ce36" table:formula="of:=[$'Plantation example'.DK20]" office:value-type="float" office:value="-0" calcext:value-type="float">
            <text:p>0.00</text:p>
          </table:table-cell>
          <table:table-cell table:style-name="ce36" table:formula="of:=[$'Plantation example'.DL20]" office:value-type="float" office:value="-0" calcext:value-type="float">
            <text:p>0.00</text:p>
          </table:table-cell>
          <table:table-cell table:style-name="ce36" table:formula="of:=[$'Plantation example'.DM20]" office:value-type="float" office:value="-0" calcext:value-type="float">
            <text:p>0.00</text:p>
          </table:table-cell>
          <table:table-cell table:style-name="ce36" table:formula="of:=[$'Plantation example'.DN20]" office:value-type="float" office:value="-0" calcext:value-type="float">
            <text:p>0.00</text:p>
          </table:table-cell>
          <table:table-cell table:style-name="ce36" table:formula="of:=[$'Plantation example'.DO20]" office:value-type="float" office:value="-0" calcext:value-type="float">
            <text:p>0.00</text:p>
          </table:table-cell>
          <table:table-cell table:style-name="ce36" table:formula="of:=[$'Plantation example'.DP20]" office:value-type="float" office:value="-0" calcext:value-type="float">
            <text:p>0.00</text:p>
          </table:table-cell>
          <table:table-cell table:style-name="ce36" table:formula="of:=[$'Plantation example'.DQ20]" office:value-type="float" office:value="-0" calcext:value-type="float">
            <text:p>0.00</text:p>
          </table:table-cell>
          <table:table-cell table:style-name="ce36" table:formula="of:=[$'Plantation example'.DR20]" office:value-type="float" office:value="0" calcext:value-type="float">
            <text:p>0.00</text:p>
          </table:table-cell>
          <table:table-cell table:style-name="ce36" table:formula="of:=[$'Plantation example'.DS20]" office:value-type="float" office:value="0" calcext:value-type="float">
            <text:p>0.00</text:p>
          </table:table-cell>
          <table:table-cell table:style-name="ce36" table:formula="of:=[$'Plantation example'.DT20]" office:value-type="float" office:value="0" calcext:value-type="float">
            <text:p>0.00</text:p>
          </table:table-cell>
          <table:table-cell table:style-name="ce36" table:formula="of:=[$'Plantation example'.DU20]" office:value-type="float" office:value="0" calcext:value-type="float">
            <text:p>0.00</text:p>
          </table:table-cell>
          <table:table-cell table:style-name="ce36" table:formula="of:=[$'Plantation example'.DV20]" office:value-type="float" office:value="0" calcext:value-type="float">
            <text:p>0.00</text:p>
          </table:table-cell>
          <table:table-cell table:style-name="ce36" table:formula="of:=[$'Plantation example'.DW20]" office:value-type="float" office:value="0" calcext:value-type="float">
            <text:p>0.00</text:p>
          </table:table-cell>
          <table:table-cell table:style-name="ce36" table:formula="of:=[$'Plantation example'.DX20]" office:value-type="float" office:value="0" calcext:value-type="float">
            <text:p>0.00</text:p>
          </table:table-cell>
          <table:table-cell table:style-name="ce36" table:formula="of:=[$'Plantation example'.DY20]" office:value-type="float" office:value="0" calcext:value-type="float">
            <text:p>0.00</text:p>
          </table:table-cell>
          <table:table-cell table:style-name="ce36" table:formula="of:=[$'Plantation example'.DZ20]" office:value-type="float" office:value="0" calcext:value-type="float">
            <text:p>0.00</text:p>
          </table:table-cell>
          <table:table-cell table:style-name="ce36" table:formula="of:=[$'Plantation example'.EA20]" office:value-type="float" office:value="0" calcext:value-type="float">
            <text:p>0.00</text:p>
          </table:table-cell>
          <table:table-cell table:style-name="ce36" table:formula="of:=[$'Plantation example'.EB20]" office:value-type="float" office:value="0" calcext:value-type="float">
            <text:p>0.00</text:p>
          </table:table-cell>
          <table:table-cell table:style-name="ce36" table:formula="of:=[$'Plantation example'.EC20]" office:value-type="float" office:value="0" calcext:value-type="float">
            <text:p>0.00</text:p>
          </table:table-cell>
          <table:table-cell table:style-name="ce36" table:formula="of:=[$'Plantation example'.ED20]" office:value-type="float" office:value="0" calcext:value-type="float">
            <text:p>0.00</text:p>
          </table:table-cell>
          <table:table-cell table:style-name="ce36" table:formula="of:=[$'Plantation example'.EE20]" office:value-type="float" office:value="0" calcext:value-type="float">
            <text:p>0.00</text:p>
          </table:table-cell>
          <table:table-cell table:style-name="ce36" table:formula="of:=[$'Plantation example'.EF20]" office:value-type="float" office:value="0" calcext:value-type="float">
            <text:p>0.00</text:p>
          </table:table-cell>
          <table:table-cell table:style-name="ce36" table:formula="of:=[$'Plantation example'.EG20]" office:value-type="float" office:value="0" calcext:value-type="float">
            <text:p>0.00</text:p>
          </table:table-cell>
          <table:table-cell table:style-name="ce36" table:formula="of:=[$'Plantation example'.EH20]" office:value-type="float" office:value="0" calcext:value-type="float">
            <text:p>0.00</text:p>
          </table:table-cell>
          <table:table-cell table:style-name="ce36" table:formula="of:=[$'Plantation example'.EI20]" office:value-type="float" office:value="0" calcext:value-type="float">
            <text:p>0.00</text:p>
          </table:table-cell>
          <table:table-cell table:style-name="ce36" table:formula="of:=[$'Plantation example'.EJ20]" office:value-type="float" office:value="0" calcext:value-type="float">
            <text:p>0.00</text:p>
          </table:table-cell>
          <table:table-cell table:style-name="ce36" table:formula="of:=[$'Plantation example'.EK20]" office:value-type="float" office:value="0" calcext:value-type="float">
            <text:p>0.00</text:p>
          </table:table-cell>
          <table:table-cell table:style-name="ce36" table:formula="of:=[$'Plantation example'.EL20]" office:value-type="float" office:value="0" calcext:value-type="float">
            <text:p>0.00</text:p>
          </table:table-cell>
          <table:table-cell table:style-name="ce36" table:formula="of:=[$'Plantation example'.EM20]" office:value-type="float" office:value="0" calcext:value-type="float">
            <text:p>0.00</text:p>
          </table:table-cell>
          <table:table-cell table:style-name="ce36" table:formula="of:=[$'Plantation example'.EN20]" office:value-type="float" office:value="0" calcext:value-type="float">
            <text:p>0.00</text:p>
          </table:table-cell>
          <table:table-cell table:style-name="ce36" table:formula="of:=[$'Plantation example'.EO20]" office:value-type="float" office:value="0" calcext:value-type="float">
            <text:p>0.00</text:p>
          </table:table-cell>
          <table:table-cell table:style-name="ce36" table:formula="of:=[$'Plantation example'.EP20]" office:value-type="float" office:value="0" calcext:value-type="float">
            <text:p>0.00</text:p>
          </table:table-cell>
          <table:table-cell table:number-columns-repeated="149"/>
        </table:table-row>
        <table:table-row table:style-name="ro1">
          <table:table-cell table:number-columns-repeated="101"/>
          <table:table-cell table:style-name="ce41"/>
          <table:table-cell table:number-columns-repeated="193"/>
        </table:table-row>
        <table:table-row table:style-name="ro1">
          <table:table-cell office:value-type="string" calcext:value-type="string">
            <text:p>Warming 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style-name="ce4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[Carbon,u] “kernel”, from a solution for SMDAMAGE FitW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0810628" calcext:value-type="float">
            <text:p>0.0008</text:p>
          </table:table-cell>
          <table:table-cell table:style-name="ce39" office:value-type="float" office:value="0.001371235" calcext:value-type="float">
            <text:p>0.0014</text:p>
          </table:table-cell>
          <table:table-cell table:style-name="ce39" office:value-type="float" office:value="0.001782009" calcext:value-type="float">
            <text:p>0.0018</text:p>
          </table:table-cell>
          <table:table-cell table:style-name="ce39" office:value-type="float" office:value="0.002046314" calcext:value-type="float">
            <text:p>0.0020</text:p>
          </table:table-cell>
          <table:table-cell table:style-name="ce39" office:value-type="float" office:value="0.002224353" calcext:value-type="float">
            <text:p>0.0022</text:p>
          </table:table-cell>
          <table:table-cell table:style-name="ce39" office:value-type="float" office:value="0.002351114" calcext:value-type="float">
            <text:p>0.0024</text:p>
          </table:table-cell>
          <table:table-cell table:style-name="ce39" office:value-type="float" office:value="0.002443458" calcext:value-type="float">
            <text:p>0.0024</text:p>
          </table:table-cell>
          <table:table-cell table:style-name="ce39" office:value-type="float" office:value="0.002509201" calcext:value-type="float">
            <text:p>0.0025</text:p>
          </table:table-cell>
          <table:table-cell table:style-name="ce39" office:value-type="float" office:value="0.002558329" calcext:value-type="float">
            <text:p>0.0026</text:p>
          </table:table-cell>
          <table:table-cell table:style-name="ce39" office:value-type="float" office:value="0.002590824" calcext:value-type="float">
            <text:p>0.0026</text:p>
          </table:table-cell>
          <table:table-cell table:style-name="ce39" office:value-type="float" office:value="0.002611596" calcext:value-type="float">
            <text:p>0.0026</text:p>
          </table:table-cell>
          <table:table-cell table:style-name="ce39" office:value-type="float" office:value="0.002625164" calcext:value-type="float">
            <text:p>0.0026</text:p>
          </table:table-cell>
          <table:table-cell table:style-name="ce39" office:value-type="float" office:value="0.002629826" calcext:value-type="float">
            <text:p>0.0026</text:p>
          </table:table-cell>
          <table:table-cell table:style-name="ce39" office:value-type="float" office:value="0.002629549" calcext:value-type="float">
            <text:p>0.0026</text:p>
          </table:table-cell>
          <table:table-cell table:style-name="ce39" office:value-type="float" office:value="0.002626513" calcext:value-type="float">
            <text:p>0.0026</text:p>
          </table:table-cell>
          <table:table-cell table:style-name="ce39" office:value-type="float" office:value="0.002621047" calcext:value-type="float">
            <text:p>0.0026</text:p>
          </table:table-cell>
          <table:table-cell table:style-name="ce39" office:value-type="float" office:value="0.002608917" calcext:value-type="float">
            <text:p>0.0026</text:p>
          </table:table-cell>
          <table:table-cell table:style-name="ce39" office:value-type="float" office:value="0.002594681" calcext:value-type="float">
            <text:p>0.0026</text:p>
          </table:table-cell>
          <table:table-cell table:style-name="ce39" office:value-type="float" office:value="0.002581921" calcext:value-type="float">
            <text:p>0.0026</text:p>
          </table:table-cell>
          <table:table-cell table:style-name="ce39" office:value-type="float" office:value="0.00256672" calcext:value-type="float">
            <text:p>0.0026</text:p>
          </table:table-cell>
          <table:table-cell table:style-name="ce39" office:value-type="float" office:value="0.002547936" calcext:value-type="float">
            <text:p>0.0025</text:p>
          </table:table-cell>
          <table:table-cell table:style-name="ce39" office:value-type="float" office:value="0.002530647" calcext:value-type="float">
            <text:p>0.0025</text:p>
          </table:table-cell>
          <table:table-cell table:style-name="ce39" office:value-type="float" office:value="0.002513368" calcext:value-type="float">
            <text:p>0.0025</text:p>
          </table:table-cell>
          <table:table-cell table:style-name="ce39" office:value-type="float" office:value="0.00249398" calcext:value-type="float">
            <text:p>0.0025</text:p>
          </table:table-cell>
          <table:table-cell table:style-name="ce39" office:value-type="float" office:value="0.002474633" calcext:value-type="float">
            <text:p>0.0025</text:p>
          </table:table-cell>
          <table:table-cell table:style-name="ce39" office:value-type="float" office:value="0.002454967" calcext:value-type="float">
            <text:p>0.0025</text:p>
          </table:table-cell>
          <table:table-cell table:style-name="ce39" office:value-type="float" office:value="0.002435273" calcext:value-type="float">
            <text:p>0.0024</text:p>
          </table:table-cell>
          <table:table-cell table:style-name="ce39" office:value-type="float" office:value="0.00241557" calcext:value-type="float">
            <text:p>0.0024</text:p>
          </table:table-cell>
          <table:table-cell table:style-name="ce39" office:value-type="float" office:value="0.002397998" calcext:value-type="float">
            <text:p>0.0024</text:p>
          </table:table-cell>
          <table:table-cell table:style-name="ce39" office:value-type="float" office:value="0.002380466" calcext:value-type="float">
            <text:p>0.0024</text:p>
          </table:table-cell>
          <table:table-cell table:style-name="ce39" office:value-type="float" office:value="0.002362705" calcext:value-type="float">
            <text:p>0.0024</text:p>
          </table:table-cell>
          <table:table-cell table:style-name="ce39" office:value-type="float" office:value="0.002345028" calcext:value-type="float">
            <text:p>0.0023</text:p>
          </table:table-cell>
          <table:table-cell table:style-name="ce39" office:value-type="float" office:value="0.002325004" calcext:value-type="float">
            <text:p>0.0023</text:p>
          </table:table-cell>
          <table:table-cell table:style-name="ce39" office:value-type="float" office:value="0.002313421" calcext:value-type="float">
            <text:p>0.0023</text:p>
          </table:table-cell>
          <table:table-cell table:style-name="ce39" office:value-type="float" office:value="0.002298453" calcext:value-type="float">
            <text:p>0.0023</text:p>
          </table:table-cell>
          <table:table-cell table:style-name="ce39" office:value-type="float" office:value="0.002283075" calcext:value-type="float">
            <text:p>0.0023</text:p>
          </table:table-cell>
          <table:table-cell table:style-name="ce39" office:value-type="float" office:value="0.002267619" calcext:value-type="float">
            <text:p>0.0023</text:p>
          </table:table-cell>
          <table:table-cell table:style-name="ce39" office:value-type="float" office:value="0.002249917" calcext:value-type="float">
            <text:p>0.0022</text:p>
          </table:table-cell>
          <table:table-cell table:style-name="ce39" office:value-type="float" office:value="0.002236422" calcext:value-type="float">
            <text:p>0.0022</text:p>
          </table:table-cell>
          <table:table-cell table:style-name="ce39" office:value-type="float" office:value="0.002219432" calcext:value-type="float">
            <text:p>0.0022</text:p>
          </table:table-cell>
          <table:table-cell table:style-name="ce39" office:value-type="float" office:value="0.00220099" calcext:value-type="float">
            <text:p>0.0022</text:p>
          </table:table-cell>
          <table:table-cell table:style-name="ce39" office:value-type="float" office:value="0.002179592" calcext:value-type="float">
            <text:p>0.0022</text:p>
          </table:table-cell>
          <table:table-cell table:style-name="ce39" office:value-type="float" office:value="0.002164619" calcext:value-type="float">
            <text:p>0.0022</text:p>
          </table:table-cell>
          <table:table-cell table:style-name="ce39" office:value-type="float" office:value="0.002147621" calcext:value-type="float">
            <text:p>0.0021</text:p>
          </table:table-cell>
          <table:table-cell table:style-name="ce39" office:value-type="float" office:value="0.002130811" calcext:value-type="float">
            <text:p>0.0021</text:p>
          </table:table-cell>
          <table:table-cell table:style-name="ce39" office:value-type="float" office:value="0.002120102" calcext:value-type="float">
            <text:p>0.0021</text:p>
          </table:table-cell>
          <table:table-cell table:style-name="ce39" office:value-type="float" office:value="0.002102948" calcext:value-type="float">
            <text:p>0.0021</text:p>
          </table:table-cell>
          <table:table-cell table:style-name="ce39" office:value-type="float" office:value="0.002091885" calcext:value-type="float">
            <text:p>0.0021</text:p>
          </table:table-cell>
          <table:table-cell table:style-name="ce39" office:value-type="float" office:value="0.002081073" calcext:value-type="float">
            <text:p>0.0021</text:p>
          </table:table-cell>
          <table:table-cell table:style-name="ce39" office:value-type="float" office:value="0.002066112" calcext:value-type="float">
            <text:p>0.0021</text:p>
          </table:table-cell>
          <table:table-cell table:style-name="ce39" office:value-type="float" office:value="0.00205582" calcext:value-type="float">
            <text:p>0.0021</text:p>
          </table:table-cell>
          <table:table-cell table:style-name="ce39" office:value-type="float" office:value="0.002037398" calcext:value-type="float">
            <text:p>0.0020</text:p>
          </table:table-cell>
          <table:table-cell table:style-name="ce39" office:value-type="float" office:value="0.002026768" calcext:value-type="float">
            <text:p>0.0020</text:p>
          </table:table-cell>
          <table:table-cell table:style-name="ce39" office:value-type="float" office:value="0.002014009" calcext:value-type="float">
            <text:p>0.0020</text:p>
          </table:table-cell>
          <table:table-cell table:style-name="ce39" office:value-type="float" office:value="0.002005162" calcext:value-type="float">
            <text:p>0.0020</text:p>
          </table:table-cell>
          <table:table-cell table:style-name="ce39" office:value-type="float" office:value="0.001998105" calcext:value-type="float">
            <text:p>0.0020</text:p>
          </table:table-cell>
          <table:table-cell table:style-name="ce39" office:value-type="float" office:value="0.001989367" calcext:value-type="float">
            <text:p>0.0020</text:p>
          </table:table-cell>
          <table:table-cell table:style-name="ce39" office:value-type="float" office:value="0.001978528" calcext:value-type="float">
            <text:p>0.0020</text:p>
          </table:table-cell>
          <table:table-cell table:style-name="ce39" office:value-type="float" office:value="0.001968593" calcext:value-type="float">
            <text:p>0.0020</text:p>
          </table:table-cell>
          <table:table-cell table:style-name="ce39" office:value-type="float" office:value="0.001960273" calcext:value-type="float">
            <text:p>0.0020</text:p>
          </table:table-cell>
          <table:table-cell table:style-name="ce39" office:value-type="float" office:value="0.001949699" calcext:value-type="float">
            <text:p>0.0019</text:p>
          </table:table-cell>
          <table:table-cell table:style-name="ce39" office:value-type="float" office:value="0.001941456" calcext:value-type="float">
            <text:p>0.0019</text:p>
          </table:table-cell>
          <table:table-cell table:style-name="ce39" office:value-type="float" office:value="0.001931482" calcext:value-type="float">
            <text:p>0.0019</text:p>
          </table:table-cell>
          <table:table-cell table:style-name="ce39" office:value-type="float" office:value="0.00192284" calcext:value-type="float">
            <text:p>0.0019</text:p>
          </table:table-cell>
          <table:table-cell table:style-name="ce39" office:value-type="float" office:value="0.001914272" calcext:value-type="float">
            <text:p>0.0019</text:p>
          </table:table-cell>
          <table:table-cell table:style-name="ce39" office:value-type="float" office:value="0.001906424" calcext:value-type="float">
            <text:p>0.0019</text:p>
          </table:table-cell>
          <table:table-cell table:style-name="ce39" office:value-type="float" office:value="0.001900075" calcext:value-type="float">
            <text:p>0.0019</text:p>
          </table:table-cell>
          <table:table-cell table:style-name="ce39" office:value-type="float" office:value="0.001892102" calcext:value-type="float">
            <text:p>0.0019</text:p>
          </table:table-cell>
          <table:table-cell table:style-name="ce39" office:value-type="float" office:value="0.001885921" calcext:value-type="float">
            <text:p>0.0019</text:p>
          </table:table-cell>
          <table:table-cell table:style-name="ce39" office:value-type="float" office:value="0.001879774" calcext:value-type="float">
            <text:p>0.0019</text:p>
          </table:table-cell>
          <table:table-cell table:style-name="ce39" office:value-type="float" office:value="0.001869948" calcext:value-type="float">
            <text:p>0.0019</text:p>
          </table:table-cell>
          <table:table-cell table:style-name="ce39" office:value-type="float" office:value="0.001863941" calcext:value-type="float">
            <text:p>0.0019</text:p>
          </table:table-cell>
          <table:table-cell table:style-name="ce39" office:value-type="float" office:value="0.001855957" calcext:value-type="float">
            <text:p>0.0019</text:p>
          </table:table-cell>
          <table:table-cell table:style-name="ce39" office:value-type="float" office:value="0.001851842" calcext:value-type="float">
            <text:p>0.0019</text:p>
          </table:table-cell>
          <table:table-cell table:style-name="ce39" office:value-type="float" office:value="0.001841667" calcext:value-type="float">
            <text:p>0.0018</text:p>
          </table:table-cell>
          <table:table-cell table:style-name="ce39" office:value-type="float" office:value="0.001833609" calcext:value-type="float">
            <text:p>0.0018</text:p>
          </table:table-cell>
          <table:table-cell table:style-name="ce39" office:value-type="float" office:value="0.001829512" calcext:value-type="float">
            <text:p>0.0018</text:p>
          </table:table-cell>
          <table:table-cell table:style-name="ce39" office:value-type="float" office:value="0.001821593" calcext:value-type="float">
            <text:p>0.0018</text:p>
          </table:table-cell>
          <table:table-cell table:style-name="ce39" office:value-type="float" office:value="0.001815792" calcext:value-type="float">
            <text:p>0.0018</text:p>
          </table:table-cell>
          <table:table-cell table:style-name="ce39" office:value-type="float" office:value="0.001809341" calcext:value-type="float">
            <text:p>0.0018</text:p>
          </table:table-cell>
          <table:table-cell table:style-name="ce39" office:value-type="float" office:value="0.001803371" calcext:value-type="float">
            <text:p>0.0018</text:p>
          </table:table-cell>
          <table:table-cell table:style-name="ce39" office:value-type="float" office:value="0.00179802" calcext:value-type="float">
            <text:p>0.0018</text:p>
          </table:table-cell>
          <table:table-cell table:style-name="ce39" office:value-type="float" office:value="0.001789594" calcext:value-type="float">
            <text:p>0.0018</text:p>
          </table:table-cell>
          <table:table-cell table:style-name="ce39" office:value-type="float" office:value="0.001785239" calcext:value-type="float">
            <text:p>0.0018</text:p>
          </table:table-cell>
          <table:table-cell table:style-name="ce39" office:value-type="float" office:value="0.001777986" calcext:value-type="float">
            <text:p>0.0018</text:p>
          </table:table-cell>
          <table:table-cell table:style-name="ce39" office:value-type="float" office:value="0.001771512" calcext:value-type="float">
            <text:p>0.0018</text:p>
          </table:table-cell>
          <table:table-cell table:style-name="ce39" office:value-type="float" office:value="0.001765262" calcext:value-type="float">
            <text:p>0.0018</text:p>
          </table:table-cell>
          <table:table-cell table:style-name="ce39" office:value-type="float" office:value="0.001760534" calcext:value-type="float">
            <text:p>0.0018</text:p>
          </table:table-cell>
          <table:table-cell table:style-name="ce39" office:value-type="float" office:value="0.001754719" calcext:value-type="float">
            <text:p>0.0018</text:p>
          </table:table-cell>
          <table:table-cell table:style-name="ce39" office:value-type="float" office:value="0.001747698" calcext:value-type="float">
            <text:p>0.0017</text:p>
          </table:table-cell>
          <table:table-cell table:style-name="ce39" office:value-type="float" office:value="0.001742777" calcext:value-type="float">
            <text:p>0.0017</text:p>
          </table:table-cell>
          <table:table-cell table:style-name="ce39" office:value-type="float" office:value="0.001737629" calcext:value-type="float">
            <text:p>0.0017</text:p>
          </table:table-cell>
          <table:table-cell table:style-name="ce39" office:value-type="float" office:value="0.001728559" calcext:value-type="float">
            <text:p>0.0017</text:p>
          </table:table-cell>
          <table:table-cell table:style-name="ce39" office:value-type="float" office:value="0.001722733" calcext:value-type="float">
            <text:p>0.0017</text:p>
          </table:table-cell>
          <table:table-cell table:style-name="ce39" office:value-type="float" office:value="0.001712962" calcext:value-type="float">
            <text:p>0.0017</text:p>
          </table:table-cell>
          <table:table-cell table:style-name="ce39" office:value-type="float" office:value="0.001708024" calcext:value-type="float">
            <text:p>0.0017</text:p>
          </table:table-cell>
          <table:table-cell table:style-name="ce39" office:value-type="float" office:value="0.001697598" calcext:value-type="float">
            <text:p>0.0017</text:p>
          </table:table-cell>
          <table:table-cell table:style-name="ce39" office:value-type="float" office:value="0.001691429" calcext:value-type="float">
            <text:p>0.0017</text:p>
          </table:table-cell>
          <table:table-cell table:style-name="ce39" office:value-type="float" office:value="0.001685464" calcext:value-type="float">
            <text:p>0.0017</text:p>
          </table:table-cell>
          <table:table-cell table:style-name="ce44" office:value-type="float" office:value="0.001681741" calcext:value-type="float">
            <text:p>0.0017</text:p>
          </table:table-cell>
          <table:table-cell table:style-name="ce39" office:value-type="float" office:value="0.001676029" calcext:value-type="float">
            <text:p>0.0017</text:p>
          </table:table-cell>
          <table:table-cell table:style-name="ce39" office:value-type="float" office:value="0.001668527" calcext:value-type="float">
            <text:p>0.0017</text:p>
          </table:table-cell>
          <table:table-cell table:style-name="ce39" office:value-type="float" office:value="0.001662831" calcext:value-type="float">
            <text:p>0.0017</text:p>
          </table:table-cell>
          <table:table-cell table:style-name="ce39" office:value-type="float" office:value="0.001657143" calcext:value-type="float">
            <text:p>0.0017</text:p>
          </table:table-cell>
          <table:table-cell table:style-name="ce39" office:value-type="float" office:value="0.00164965" calcext:value-type="float">
            <text:p>0.0016</text:p>
          </table:table-cell>
          <table:table-cell table:style-name="ce39" office:value-type="float" office:value="0.001646093" calcext:value-type="float">
            <text:p>0.0016</text:p>
          </table:table-cell>
          <table:table-cell table:style-name="ce39" office:value-type="float" office:value="0.001638629" calcext:value-type="float">
            <text:p>0.0016</text:p>
          </table:table-cell>
          <table:table-cell table:style-name="ce39" office:value-type="float" office:value="0.001632972" calcext:value-type="float">
            <text:p>0.0016</text:p>
          </table:table-cell>
          <table:table-cell table:style-name="ce39" office:value-type="float" office:value="0.001629437" calcext:value-type="float">
            <text:p>0.0016</text:p>
          </table:table-cell>
          <table:table-cell table:style-name="ce39" office:value-type="float" office:value="0.001621997" calcext:value-type="float">
            <text:p>0.0016</text:p>
          </table:table-cell>
          <table:table-cell table:style-name="ce39" office:value-type="float" office:value="0.001616362" calcext:value-type="float">
            <text:p>0.0016</text:p>
          </table:table-cell>
          <table:table-cell table:style-name="ce39" office:value-type="float" office:value="0.001608937" calcext:value-type="float">
            <text:p>0.0016</text:p>
          </table:table-cell>
          <table:table-cell table:style-name="ce39" office:value-type="float" office:value="0.001603635" calcext:value-type="float">
            <text:p>0.0016</text:p>
          </table:table-cell>
          <table:table-cell table:style-name="ce39" office:value-type="float" office:value="0.001598023" calcext:value-type="float">
            <text:p>0.0016</text:p>
          </table:table-cell>
          <table:table-cell table:style-name="ce39" office:value-type="float" office:value="0.001594534" calcext:value-type="float">
            <text:p>0.0016</text:p>
          </table:table-cell>
          <table:table-cell table:style-name="ce39" office:value-type="float" office:value="0.001589255" calcext:value-type="float">
            <text:p>0.0016</text:p>
          </table:table-cell>
          <table:table-cell table:style-name="ce39" office:value-type="float" office:value="0.001583666" calcext:value-type="float">
            <text:p>0.0016</text:p>
          </table:table-cell>
          <table:table-cell table:style-name="ce39" office:value-type="float" office:value="0.001578084" calcext:value-type="float">
            <text:p>0.0016</text:p>
          </table:table-cell>
          <table:table-cell table:style-name="ce39" office:value-type="float" office:value="0.001572828" calcext:value-type="float">
            <text:p>0.0016</text:p>
          </table:table-cell>
          <table:table-cell table:style-name="ce39" office:value-type="float" office:value="0.001565463" calcext:value-type="float">
            <text:p>0.0016</text:p>
          </table:table-cell>
          <table:table-cell table:style-name="ce39" office:value-type="float" office:value="0.00156202" calcext:value-type="float">
            <text:p>0.0016</text:p>
          </table:table-cell>
          <table:table-cell table:style-name="ce39" office:value-type="float" office:value="0.001556469" calcext:value-type="float">
            <text:p>0.0016</text:p>
          </table:table-cell>
          <table:table-cell table:style-name="ce39" office:value-type="float" office:value="0.001551242" calcext:value-type="float">
            <text:p>0.0016</text:p>
          </table:table-cell>
          <table:table-cell table:style-name="ce39" office:value-type="float" office:value="0.001543907" calcext:value-type="float">
            <text:p>0.0015</text:p>
          </table:table-cell>
          <table:table-cell table:style-name="ce39" office:value-type="float" office:value="0.001538378" calcext:value-type="float">
            <text:p>0.0015</text:p>
          </table:table-cell>
          <table:table-cell table:style-name="ce39" office:value-type="float" office:value="0.00153529" calcext:value-type="float">
            <text:p>0.0015</text:p>
          </table:table-cell>
          <table:table-cell table:style-name="ce39" office:value-type="float" office:value="0.001529776" calcext:value-type="float">
            <text:p>0.0015</text:p>
          </table:table-cell>
          <table:table-cell table:style-name="ce39" office:value-type="float" office:value="0.00152427" calcext:value-type="float">
            <text:p>0.0015</text:p>
          </table:table-cell>
          <table:table-cell table:style-name="ce39" office:value-type="float" office:value="0.001523305" calcext:value-type="float">
            <text:p>0.0015</text:p>
          </table:table-cell>
          <table:table-cell table:style-name="ce39" office:value-type="float" office:value="0.001518089" calcext:value-type="float">
            <text:p>0.0015</text:p>
          </table:table-cell>
          <table:table-cell table:style-name="ce39" office:value-type="float" office:value="0.001510763" calcext:value-type="float">
            <text:p>0.0015</text:p>
          </table:table-cell>
          <table:table-cell table:style-name="ce39" office:value-type="float" office:value="0.001507365" calcext:value-type="float">
            <text:p>0.0015</text:p>
          </table:table-cell>
          <table:table-cell table:style-name="ce39" office:value-type="float" office:value="0.001500057" calcext:value-type="float">
            <text:p>0.0015</text:p>
          </table:table-cell>
          <table:table-cell table:style-name="ce39" office:value-type="float" office:value="0.001496675" calcext:value-type="float">
            <text:p>0.0015</text:p>
          </table:table-cell>
          <table:table-cell table:style-name="ce39" office:value-type="float" office:value="0.001489385" calcext:value-type="float">
            <text:p>0.0015</text:p>
          </table:table-cell>
          <table:table-cell table:style-name="ce39" office:value-type="float" office:value="0.00148422" calcext:value-type="float">
            <text:p>0.0015</text:p>
          </table:table-cell>
          <table:table-cell table:style-name="ce39" office:value-type="float" office:value="0.001480862" calcext:value-type="float">
            <text:p>0.0015</text:p>
          </table:table-cell>
          <table:table-cell table:style-name="ce39" office:value-type="float" office:value="0.001475714" calcext:value-type="float">
            <text:p>0.0015</text:p>
          </table:table-cell>
          <table:table-cell table:style-name="ce39" office:value-type="float" office:value="0.001468133" calcext:value-type="float">
            <text:p>0.0015</text:p>
          </table:table-cell>
          <table:table-cell table:style-name="ce39" office:value-type="float" office:value="0.001463001" calcext:value-type="float">
            <text:p>0.0015</text:p>
          </table:table-cell>
          <table:table-cell table:style-name="ce39" office:value-type="float" office:value="0.001457875" calcext:value-type="float">
            <text:p>0.0015</text:p>
          </table:table-cell>
          <table:table-cell table:style-name="ce39" office:value-type="float" office:value="0.001454554" calcext:value-type="float">
            <text:p>0.0015</text:p>
          </table:table-cell>
          <table:table-cell table:style-name="ce39" office:value-type="float" office:value="0.001445525" calcext:value-type="float">
            <text:p>0.0014</text:p>
          </table:table-cell>
          <table:table-cell table:style-name="ce39" office:value-type="float" office:value="0.001444018" calcext:value-type="float">
            <text:p>0.0014</text:p>
          </table:table-cell>
          <table:table-cell table:style-name="ce39" office:value-type="float" office:value="0.001438922" calcext:value-type="float">
            <text:p>0.0014</text:p>
          </table:table-cell>
          <table:table-cell table:style-name="ce39" office:value-type="float" office:value="0.001431714" calcext:value-type="float">
            <text:p>0.0014</text:p>
          </table:table-cell>
          <table:table-cell table:style-name="ce39" office:value-type="float" office:value="0.001428429" calcext:value-type="float">
            <text:p>0.0014</text:p>
          </table:table-cell>
          <table:table-cell table:style-name="ce39" office:value-type="float" office:value="0.001421234" calcext:value-type="float">
            <text:p>0.0014</text:p>
          </table:table-cell>
          <table:table-cell table:style-name="ce39" office:value-type="float" office:value="0.001414416" calcext:value-type="float">
            <text:p>0.0014</text:p>
          </table:table-cell>
          <table:table-cell table:style-name="ce39" office:value-type="float" office:value="0.001409025" calcext:value-type="float">
            <text:p>0.0014</text:p>
          </table:table-cell>
          <table:table-cell table:style-name="ce39" office:value-type="float" office:value="0.001403961" calcext:value-type="float">
            <text:p>0.0014</text:p>
          </table:table-cell>
          <table:table-cell table:style-name="ce39" office:value-type="float" office:value="0.001398582" calcext:value-type="float">
            <text:p>0.0014</text:p>
          </table:table-cell>
          <table:table-cell table:style-name="ce39" office:value-type="float" office:value="0.00139353" calcext:value-type="float">
            <text:p>0.0014</text:p>
          </table:table-cell>
          <table:table-cell table:style-name="ce39" office:value-type="float" office:value="0.001388486" calcext:value-type="float">
            <text:p>0.0014</text:p>
          </table:table-cell>
          <table:table-cell table:style-name="ce39" office:value-type="float" office:value="0.001383127" calcext:value-type="float">
            <text:p>0.0014</text:p>
          </table:table-cell>
          <table:table-cell table:style-name="ce39" office:value-type="float" office:value="0.001378101" calcext:value-type="float">
            <text:p>0.0014</text:p>
          </table:table-cell>
          <table:table-cell table:style-name="ce39" office:value-type="string" calcext:value-type="string">
            <text:p>0.001373081,0.001365947</text:p>
          </table:table-cell>
          <table:table-cell table:style-name="ce39" office:value-type="float" office:value="0.001360937" calcext:value-type="float">
            <text:p>0.0014</text:p>
          </table:table-cell>
          <table:table-cell table:style-name="ce39" office:value-type="float" office:value="0.001355637" calcext:value-type="float">
            <text:p>0.0014</text:p>
          </table:table-cell>
          <table:table-cell table:style-name="ce39" office:value-type="float" office:value="0.001350664" calcext:value-type="float">
            <text:p>0.0014</text:p>
          </table:table-cell>
          <table:table-cell table:style-name="ce39" office:value-type="float" office:value="0.00134358" calcext:value-type="float">
            <text:p>0.0013</text:p>
          </table:table-cell>
          <table:table-cell table:style-name="ce39" office:value-type="float" office:value="0.001340419" calcext:value-type="float">
            <text:p>0.0013</text:p>
          </table:table-cell>
          <table:table-cell table:style-name="ce39" office:value-type="float" office:value="0.001333678" calcext:value-type="float">
            <text:p>0.0013</text:p>
          </table:table-cell>
          <table:table-cell table:style-name="ce39" office:value-type="float" office:value="0.001328422" calcext:value-type="float">
            <text:p>0.0013</text:p>
          </table:table-cell>
          <table:table-cell table:style-name="ce39" office:value-type="float" office:value="0.001323499" calcext:value-type="float">
            <text:p>0.0013</text:p>
          </table:table-cell>
          <table:table-cell table:style-name="ce39" office:value-type="float" office:value="0.001322499" calcext:value-type="float">
            <text:p>0.0013</text:p>
          </table:table-cell>
          <table:table-cell table:style-name="ce39" office:value-type="float" office:value="0.001313676" calcext:value-type="float">
            <text:p>0.0013</text:p>
          </table:table-cell>
          <table:table-cell table:style-name="ce39" office:value-type="float" office:value="0.001306657" calcext:value-type="float">
            <text:p>0.0013</text:p>
          </table:table-cell>
          <table:table-cell table:style-name="ce39" office:value-type="float" office:value="0.001303562" calcext:value-type="float">
            <text:p>0.0013</text:p>
          </table:table-cell>
          <table:table-cell table:style-name="ce39" office:value-type="float" office:value="0.001298673" calcext:value-type="float">
            <text:p>0.0013</text:p>
          </table:table-cell>
          <table:table-cell table:style-name="ce39" office:value-type="float" office:value="0.001291687" calcext:value-type="float">
            <text:p>0.0013</text:p>
          </table:table-cell>
          <table:table-cell table:style-name="ce39" office:value-type="float" office:value="0.001286831" calcext:value-type="float">
            <text:p>0.0013</text:p>
          </table:table-cell>
          <table:table-cell table:style-name="ce39" office:value-type="float" office:value="0.001283786" calcext:value-type="float">
            <text:p>0.0013</text:p>
          </table:table-cell>
          <table:table-cell table:style-name="ce39" office:value-type="float" office:value="0.001276838" calcext:value-type="float">
            <text:p>0.0013</text:p>
          </table:table-cell>
          <table:table-cell table:style-name="ce39" office:value-type="float" office:value="0.001272021" calcext:value-type="float">
            <text:p>0.0013</text:p>
          </table:table-cell>
          <table:table-cell table:style-name="ce39" office:value-type="float" office:value="0.001267212" calcext:value-type="float">
            <text:p>0.0013</text:p>
          </table:table-cell>
          <table:table-cell table:style-name="ce39" office:value-type="float" office:value="0.001260293" calcext:value-type="float">
            <text:p>0.0013</text:p>
          </table:table-cell>
          <table:table-cell table:style-name="ce39" office:value-type="float" office:value="0.001259416" calcext:value-type="float">
            <text:p>0.0013</text:p>
          </table:table-cell>
          <table:table-cell table:style-name="ce39" office:value-type="float" office:value="0.001252513" calcext:value-type="float">
            <text:p>0.0013</text:p>
          </table:table-cell>
          <table:table-cell table:style-name="ce39" office:value-type="float" office:value="0.001247736" calcext:value-type="float">
            <text:p>0.0012</text:p>
          </table:table-cell>
          <table:table-cell table:style-name="ce39" office:value-type="float" office:value="0.001242968" calcext:value-type="float">
            <text:p>0.0012</text:p>
          </table:table-cell>
          <table:table-cell table:style-name="ce39" office:value-type="float" office:value="0.001237888" calcext:value-type="float">
            <text:p>0.0012</text:p>
          </table:table-cell>
          <table:table-cell table:style-name="ce39" office:value-type="float" office:value="0.001233457" calcext:value-type="float">
            <text:p>0.0012</text:p>
          </table:table-cell>
          <table:table-cell table:style-name="ce39" office:value-type="float" office:value="0.001226597" calcext:value-type="float">
            <text:p>0.0012</text:p>
          </table:table-cell>
          <table:table-cell table:style-name="ce39" office:value-type="float" office:value="0.001223664" calcext:value-type="float">
            <text:p>0.0012</text:p>
          </table:table-cell>
          <table:table-cell table:style-name="ce39" office:value-type="float" office:value="0.001218938" calcext:value-type="float">
            <text:p>0.0012</text:p>
          </table:table-cell>
          <table:table-cell table:style-name="ce39" office:value-type="float" office:value="0.001212101" calcext:value-type="float">
            <text:p>0.0012</text:p>
          </table:table-cell>
          <table:table-cell table:style-name="ce39" office:value-type="float" office:value="0.001207388" calcext:value-type="float">
            <text:p>0.0012</text:p>
          </table:table-cell>
          <table:table-cell table:style-name="ce39" office:value-type="float" office:value="0.001202681" calcext:value-type="float">
            <text:p>0.0012</text:p>
          </table:table-cell>
          <table:table-cell table:style-name="ce39" office:value-type="float" office:value="0.001197659" calcext:value-type="float">
            <text:p>0.0012</text:p>
          </table:table-cell>
          <table:table-cell table:style-name="ce39" office:value-type="float" office:value="0.001192959" calcext:value-type="float">
            <text:p>0.0012</text:p>
          </table:table-cell>
          <table:table-cell table:style-name="ce39" office:value-type="float" office:value="0.00118646" calcext:value-type="float">
            <text:p>0.0012</text:p>
          </table:table-cell>
          <table:table-cell table:style-name="ce39" office:value-type="float" office:value="0.001181438" calcext:value-type="float">
            <text:p>0.0012</text:p>
          </table:table-cell>
          <table:table-cell table:style-name="ce39" office:value-type="float" office:value="0.001178862" calcext:value-type="float">
            <text:p>0.0012</text:p>
          </table:table-cell>
          <table:table-cell table:style-name="ce39" office:value-type="float" office:value="0.001172053" calcext:value-type="float">
            <text:p>0.0012</text:p>
          </table:table-cell>
          <table:table-cell table:style-name="ce39" office:value-type="float" office:value="0.001169166" calcext:value-type="float">
            <text:p>0.0012</text:p>
          </table:table-cell>
          <table:table-cell table:style-name="ce39" office:value-type="float" office:value="0.00116449" calcext:value-type="float">
            <text:p>0.0012</text:p>
          </table:table-cell>
          <table:table-cell table:style-name="ce39" office:value-type="float" office:value="0.001159228" calcext:value-type="float">
            <text:p>0.0012</text:p>
          </table:table-cell>
          <table:table-cell table:style-name="ce39" office:value-type="float" office:value="0.001156347" calcext:value-type="float">
            <text:p>0.0012</text:p>
          </table:table-cell>
          <table:table-cell table:style-name="ce39" office:value-type="float" office:value="0.001149877" calcext:value-type="float">
            <text:p>0.0011</text:p>
          </table:table-cell>
          <table:table-cell table:style-name="ce39" office:value-type="float" office:value="0.00114489" calcext:value-type="float">
            <text:p>0.0011</text:p>
          </table:table-cell>
          <table:table-cell table:style-name="ce39" office:value-type="float" office:value="0.001138432" calcext:value-type="float">
            <text:p>0.0011</text:p>
          </table:table-cell>
          <table:table-cell table:style-name="ce39" office:value-type="float" office:value="0.001135578" calcext:value-type="float">
            <text:p>0.0011</text:p>
          </table:table-cell>
          <table:table-cell table:style-name="ce39" office:value-type="float" office:value="0.001130933" calcext:value-type="float">
            <text:p>0.0011</text:p>
          </table:table-cell>
          <table:table-cell table:style-name="ce39" office:value-type="float" office:value="0.001124174" calcext:value-type="float">
            <text:p>0.0011</text:p>
          </table:table-cell>
          <table:table-cell table:style-name="ce39" office:value-type="float" office:value="0.001121662" calcext:value-type="float">
            <text:p>0.0011</text:p>
          </table:table-cell>
          <table:table-cell table:style-name="ce39" office:value-type="float" office:value="0.001116715" calcext:value-type="float">
            <text:p>0.0011</text:p>
          </table:table-cell>
          <table:table-cell table:style-name="ce39" office:value-type="float" office:value="0.001112096" calcext:value-type="float">
            <text:p>0.0011</text:p>
          </table:table-cell>
          <table:table-cell table:style-name="ce39" office:value-type="float" office:value="0.001105685" calcext:value-type="float">
            <text:p>0.0011</text:p>
          </table:table-cell>
          <table:table-cell table:style-name="ce39" office:value-type="float" office:value="0.001100759" calcext:value-type="float">
            <text:p>0.0011</text:p>
          </table:table-cell>
          <table:table-cell table:style-name="ce39" office:value-type="float" office:value="0.001094361" calcext:value-type="float">
            <text:p>0.0011</text:p>
          </table:table-cell>
          <table:table-cell table:style-name="ce39" office:value-type="float" office:value="0.001091567" calcext:value-type="float">
            <text:p>0.0011</text:p>
          </table:table-cell>
          <table:table-cell table:style-name="ce39" office:value-type="float" office:value="0.001086981" calcext:value-type="float">
            <text:p>0.0011</text:p>
          </table:table-cell>
          <table:table-cell table:style-name="ce39" office:value-type="float" office:value="0.001082402" calcext:value-type="float">
            <text:p>0.0011</text:p>
          </table:table-cell>
          <table:table-cell table:style-name="ce39" office:value-type="float" office:value="0.001077509" calcext:value-type="float">
            <text:p>0.0011</text:p>
          </table:table-cell>
          <table:table-cell table:style-name="ce39" office:value-type="float" office:value="0.001072943" calcext:value-type="float">
            <text:p>0.0011</text:p>
          </table:table-cell>
          <table:table-cell table:style-name="ce39" office:value-type="float" office:value="0.001066264" calcext:value-type="float">
            <text:p>0.0011</text:p>
          </table:table-cell>
          <table:table-cell table:style-name="ce39" office:value-type="float" office:value="0.001061711" calcext:value-type="float">
            <text:p>0.0011</text:p>
          </table:table-cell>
          <table:table-cell table:style-name="ce39" office:value-type="float" office:value="0.001056843" calcext:value-type="float">
            <text:p>0.0011</text:p>
          </table:table-cell>
          <table:table-cell table:style-name="ce39" office:value-type="float" office:value="0.001052304" calcext:value-type="float">
            <text:p>0.0011</text:p>
          </table:table-cell>
          <table:table-cell table:style-name="ce39" office:value-type="float" office:value="0.001045651" calcext:value-type="float">
            <text:p>0.0010</text:p>
          </table:table-cell>
          <table:table-cell table:style-name="ce39" office:value-type="float" office:value="0.001040803" calcext:value-type="float">
            <text:p>0.0010</text:p>
          </table:table-cell>
          <table:table-cell table:style-name="ce39" office:value-type="float" office:value="0.001034163" calcext:value-type="float">
            <text:p>0.0010</text:p>
          </table:table-cell>
          <table:table-cell table:style-name="ce39" office:value-type="float" office:value="0.00102965" calcext:value-type="float">
            <text:p>0.0010</text:p>
          </table:table-cell>
          <table:table-cell table:style-name="ce39" office:value-type="float" office:value="0.001023023" calcext:value-type="float">
            <text:p>0.0010</text:p>
          </table:table-cell>
          <table:table-cell table:style-name="ce39" office:value-type="float" office:value="0.001020321" calcext:value-type="float">
            <text:p>0.0010</text:p>
          </table:table-cell>
          <table:table-cell table:style-name="ce39" office:value-type="float" office:value="0.001015506" calcext:value-type="float">
            <text:p>0.0010</text:p>
          </table:table-cell>
          <table:table-cell table:style-name="ce39" office:value-type="float" office:value="0.001011018" calcext:value-type="float">
            <text:p>0.0010</text:p>
          </table:table-cell>
          <table:table-cell table:style-name="ce39" office:value-type="float" office:value="0.001004417" calcext:value-type="float">
            <text:p>0.0010</text:p>
          </table:table-cell>
          <table:table-cell table:style-name="ce39" office:value-type="float" office:value="0.000999621" calcext:value-type="float">
            <text:p>0.0010</text:p>
          </table:table-cell>
          <table:table-cell table:style-name="ce39" office:value-type="float" office:value="0.000993033" calcext:value-type="float">
            <text:p>0.0010</text:p>
          </table:table-cell>
          <table:table-cell table:style-name="ce39" office:value-type="float" office:value="0.00098825" calcext:value-type="float">
            <text:p>0.0010</text:p>
          </table:table-cell>
          <table:table-cell table:style-name="ce39" office:value-type="float" office:value="0.000983795" calcext:value-type="float">
            <text:p>0.0010</text:p>
          </table:table-cell>
          <table:table-cell table:style-name="ce39" office:value-type="float" office:value="0.000975107" calcext:value-type="float">
            <text:p>0.0010</text:p>
          </table:table-cell>
          <table:table-cell table:style-name="ce39" office:value-type="float" office:value="0.000972463" calcext:value-type="float">
            <text:p>0.0010</text:p>
          </table:table-cell>
          <table:table-cell table:style-name="ce39" office:value-type="float" office:value="0.000967705" calcext:value-type="float">
            <text:p>0.0010</text:p>
          </table:table-cell>
          <table:table-cell table:style-name="ce39" office:value-type="float" office:value="0.000963276" calcext:value-type="float">
            <text:p>0.0010</text:p>
          </table:table-cell>
          <table:table-cell table:style-name="ce39" office:value-type="float" office:value="0.000954613" calcext:value-type="float">
            <text:p>0.0010</text:p>
          </table:table-cell>
          <table:table-cell table:style-name="ce39" office:value-type="float" office:value="0.000949875" calcext:value-type="float">
            <text:p>0.0009</text:p>
          </table:table-cell>
          <table:table-cell table:style-name="ce39" office:value-type="float" office:value="0.000945464" calcext:value-type="float">
            <text:p>0.0009</text:p>
          </table:table-cell>
          <table:table-cell table:style-name="ce39" office:value-type="float" office:value="0.000940739" calcext:value-type="float">
            <text:p>0.0009</text:p>
          </table:table-cell>
          <table:table-cell table:style-name="ce39" office:value-type="float" office:value="0.000932102" calcext:value-type="float">
            <text:p>0.0009</text:p>
          </table:table-cell>
          <table:table-cell table:style-name="ce39" office:value-type="float" office:value="0.000929509" calcext:value-type="float">
            <text:p>0.0009</text:p>
          </table:table-cell>
          <table:table-cell table:style-name="ce39" office:value-type="float" office:value="0.000923004" calcext:value-type="float">
            <text:p>0.0009</text:p>
          </table:table-cell>
          <table:table-cell table:style-name="ce39" office:value-type="float" office:value="0.000918304" calcext:value-type="float">
            <text:p>0.0009</text:p>
          </table:table-cell>
          <table:table-cell table:style-name="ce39" office:value-type="string" calcext:value-type="string">
            <text:p>0.000911812,0.000907124</text:p>
          </table:table-cell>
          <table:table-cell table:style-name="ce39" office:value-type="float" office:value="0.000900645" calcext:value-type="float">
            <text:p>0.0009</text:p>
          </table:table-cell>
          <table:table-cell table:style-name="ce39" office:value-type="float" office:value="0.00089597" calcext:value-type="float">
            <text:p>0.0009</text:p>
          </table:table-cell>
          <table:table-cell table:style-name="ce39" office:value-type="float" office:value="0.000891301" calcext:value-type="float">
            <text:p>0.0009</text:p>
          </table:table-cell>
          <table:table-cell table:style-name="ce39" office:value-type="float" office:value="0.00088484" calcext:value-type="float">
            <text:p>0.0009</text:p>
          </table:table-cell>
          <table:table-cell table:style-name="ce39" office:value-type="float" office:value="0.000880184" calcext:value-type="float">
            <text:p>0.0009</text:p>
          </table:table-cell>
          <table:table-cell table:style-name="ce39" office:value-type="float" office:value="0.000875535" calcext:value-type="float">
            <text:p>0.0009</text:p>
          </table:table-cell>
          <table:table-cell table:style-name="ce39" office:value-type="float" office:value="0.000869093" calcext:value-type="float">
            <text:p>0.0009</text:p>
          </table:table-cell>
          <table:table-cell table:style-name="ce39" office:value-type="float" office:value="0.000866575" calcext:value-type="float">
            <text:p>0.0009</text:p>
          </table:table-cell>
          <table:table-cell table:style-name="ce39" office:value-type="float" office:value="0.000858026" calcext:value-type="float">
            <text:p>0.0009</text:p>
          </table:table-cell>
          <table:table-cell table:style-name="ce39" office:value-type="float" office:value="0.000853401" calcext:value-type="float">
            <text:p>0.0009</text:p>
          </table:table-cell>
          <table:table-cell table:style-name="ce39" office:value-type="float" office:value="0.000848782" calcext:value-type="float">
            <text:p>0.0008</text:p>
          </table:table-cell>
          <table:table-cell table:style-name="ce39" office:value-type="float" office:value="0.00084417" calcext:value-type="float">
            <text:p>0.0008</text:p>
          </table:table-cell>
          <table:table-cell table:style-name="ce39" office:value-type="float" office:value="0.000837765" calcext:value-type="float">
            <text:p>0.0008</text:p>
          </table:table-cell>
          <table:table-cell table:style-name="ce39" office:value-type="float" office:value="0.000829247" calcext:value-type="float">
            <text:p>0.0008</text:p>
          </table:table-cell>
          <table:table-cell table:style-name="ce39" office:value-type="float" office:value="0.000826773" calcext:value-type="float">
            <text:p>0.0008</text:p>
          </table:table-cell>
          <table:table-cell table:style-name="ce39" office:value-type="float" office:value="0.000820387" calcext:value-type="float">
            <text:p>0.0008</text:p>
          </table:table-cell>
          <table:table-cell table:style-name="ce39" office:value-type="float" office:value="0.000817604" calcext:value-type="float">
            <text:p>0.0008</text:p>
          </table:table-cell>
          <table:table-cell table:style-name="ce39" office:value-type="float" office:value="0.00081123" calcext:value-type="float">
            <text:p>0.0008</text:p>
          </table:table-cell>
          <table:table-cell table:style-name="ce39" office:value-type="float" office:value="0.000804862" calcext:value-type="float">
            <text:p>0.0008</text:p>
          </table:table-cell>
          <table:table-cell table:style-name="ce39" office:value-type="float" office:value="0.000800299" calcext:value-type="float">
            <text:p>0.0008</text:p>
          </table:table-cell>
          <table:table-cell table:style-name="ce39" office:value-type="float" office:value="0.000793623" calcext:value-type="float">
            <text:p>0.0008</text:p>
          </table:table-cell>
          <table:table-cell table:style-name="ce39" office:value-type="float" office:value="0.000789393" calcext:value-type="float">
            <text:p>0.0008</text:p>
          </table:table-cell>
          <table:table-cell table:style-name="ce39" office:value-type="float" office:value="0.000782729" calcext:value-type="float">
            <text:p>0.0008</text:p>
          </table:table-cell>
          <table:table-cell table:style-name="ce39" office:value-type="float" office:value="0.00077819" calcext:value-type="float">
            <text:p>0.0008</text:p>
          </table:table-cell>
          <table:table-cell table:style-name="ce39" office:value-type="float" office:value="0.000771859" calcext:value-type="float">
            <text:p>0.0008</text:p>
          </table:table-cell>
          <table:table-cell table:style-name="ce39" office:value-type="float" office:value="0.000765534" calcext:value-type="float">
            <text:p>0.0008</text:p>
          </table:table-cell>
          <table:table-cell table:style-name="ce39" office:value-type="float" office:value="0.000763134" calcext:value-type="float">
            <text:p>0.0008</text:p>
          </table:table-cell>
          <table:table-cell table:style-name="ce39" office:value-type="float" office:value="0.0007565" calcext:value-type="float">
            <text:p>0.0008</text:p>
          </table:table-cell>
          <table:table-cell table:style-name="ce39" office:value-type="float" office:value="0.000752313" calcext:value-type="float">
            <text:p>0.0008</text:p>
          </table:table-cell>
          <table:table-cell table:style-name="ce39" office:value-type="float" office:value="0.000745691" calcext:value-type="float">
            <text:p>0.0007</text:p>
          </table:table-cell>
          <table:table-cell table:style-name="ce39" office:value-type="float" office:value="0.000741195" calcext:value-type="float">
            <text:p>0.0007</text:p>
          </table:table-cell>
          <table:table-cell table:style-name="ce39" office:value-type="float" office:value="0.000736541" calcext:value-type="float">
            <text:p>0.0007</text:p>
          </table:table-cell>
          <table:table-cell table:style-name="ce39" office:value-type="float" office:value="0.000731893" calcext:value-type="float">
            <text:p>0.0007</text:p>
          </table:table-cell>
          <table:table-cell table:style-name="ce39" office:value-type="float" office:value="0.00072725" calcext:value-type="float">
            <text:p>0.0007</text:p>
          </table:table-cell>
          <table:table-cell table:style-name="ce39" office:value-type="float" office:value="0.000722613" calcext:value-type="float">
            <text:p>0.0007</text:p>
          </table:table-cell>
          <table:table-cell table:style-name="ce39" office:value-type="float" office:value="0.000717982" calcext:value-type="float">
            <text:p>0.0007</text:p>
          </table:table-cell>
          <table:table-cell table:style-name="ce39" office:value-type="float" office:value="0.000713356" calcext:value-type="float">
            <text:p>0.0007</text:p>
          </table:table-cell>
          <table:table-cell table:style-name="ce39" office:value-type="float" office:value="0.000708735" calcext:value-type="float">
            <text:p>0.0007</text:p>
          </table:table-cell>
          <table:table-cell table:style-name="ce39" office:value-type="float" office:value="0.00070412" calcext:value-type="float">
            <text:p>0.0007</text:p>
          </table:table-cell>
          <table:table-cell table:style-name="ce39" office:value-type="float" office:value="0.00069951" calcext:value-type="float">
            <text:p>0.0007</text:p>
          </table:table-cell>
          <table:table-cell table:style-name="ce39" office:value-type="float" office:value="0.000694906" calcext:value-type="float">
            <text:p>0.0007</text:p>
          </table:table-cell>
          <table:table-cell table:style-name="ce39" office:value-type="float" office:value="0.000689385" calcext:value-type="float">
            <text:p>0.0007</text:p>
          </table:table-cell>
          <table:table-cell table:style-name="ce39" office:value-type="float" office:value="0.000684791" calcext:value-type="float">
            <text:p>0.0007</text:p>
          </table:table-cell>
          <table:table-cell table:style-name="ce39" office:value-type="float" office:value="0.000680203" calcext:value-type="float">
            <text:p>0.0007</text:p>
          </table:table-cell>
          <table:table-cell table:style-name="ce39" office:value-type="float" office:value="0.000675621" calcext:value-type="float">
            <text:p>0.0007</text:p>
          </table:table-cell>
          <table:table-cell table:style-name="ce39" office:value-type="float" office:value="0.000671044" calcext:value-type="float">
            <text:p>0.0007</text:p>
          </table:table-cell>
          <table:table-cell table:style-name="ce39" office:value-type="float" office:value="0.000667394" calcext:value-type="float">
            <text:p>0.0007</text:p>
          </table:table-cell>
        </table:table-row>
        <table:table-row table:style-name="ro1">
          <table:table-cell office:value-type="string" calcext:value-type="string">
            <text:p>W[forestry,u], total warming in warming year, by convolution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" calcext:value-type="float">
            <text:p>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0215798703978172" calcext:value-type="float">
            <text:p>0.000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0709106825656529" calcext:value-type="float">
            <text:p>0.000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151724161573244" calcext:value-type="float">
            <text:p>0.001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264754120640937" calcext:value-type="float">
            <text:p>0.002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409565046031794" calcext:value-type="float">
            <text:p>0.004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585073215465159" calcext:value-type="float">
            <text:p>0.005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789755814739931" calcext:value-type="float">
            <text:p>0.007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0217559481001" calcext:value-type="float">
            <text:p>0.010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27911374928416" calcext:value-type="float">
            <text:p>0.012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55969322523217" calcext:value-type="float">
            <text:p>0.015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86133168844273" calcext:value-type="float">
            <text:p>0.018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18192427049184" calcext:value-type="float">
            <text:p>0.021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1933883822487" calcext:value-type="float">
            <text:p>0.025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715419013068" calcext:value-type="float">
            <text:p>0.02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3661795057146" calcext:value-type="float">
            <text:p>0.032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1275283561793" calcext:value-type="float">
            <text:p>0.036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9811262169034" calcext:value-type="float">
            <text:p>0.040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39100557188937" calcext:value-type="float">
            <text:p>0.043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78992950701884" calcext:value-type="float">
            <text:p>0.047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519342346114657" calcext:value-type="float">
            <text:p>0.051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560006941152038" calcext:value-type="float">
            <text:p>0.056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600863582852575" calcext:value-type="float">
            <text:p>0.060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641798119115935" calcext:value-type="float">
            <text:p>0.064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68270043824661" calcext:value-type="float">
            <text:p>0.068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72347182709961" calcext:value-type="float">
            <text:p>0.072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764021379146112" calcext:value-type="float">
            <text:p>0.076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804266558353681" calcext:value-type="float">
            <text:p>0.080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84413242466753" calcext:value-type="float">
            <text:p>0.084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883556790026051" calcext:value-type="float">
            <text:p>0.088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922481850760701" calcext:value-type="float">
            <text:p>0.092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960854966140289" calcext:value-type="float">
            <text:p>0.096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998629365502494" calcext:value-type="float">
            <text:p>0.099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357569867297" calcext:value-type="float">
            <text:p>0.103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722194459693" calcext:value-type="float">
            <text:p>0.107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0798490158875" calcext:value-type="float">
            <text:p>0.110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4302720612881" calcext:value-type="float">
            <text:p>0.114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7732382258783" calcext:value-type="float">
            <text:p>0.117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1084949944335" calcext:value-type="float">
            <text:p>0.121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4359556054051" calcext:value-type="float">
            <text:p>0.124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7554252652158" calcext:value-type="float">
            <text:p>0.127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0667303999596" calcext:value-type="float">
            <text:p>0.130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3696597486161" calcext:value-type="float">
            <text:p>0.133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6642304052493" calcext:value-type="float">
            <text:p>0.136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9503637697296" calcext:value-type="float">
            <text:p>0.139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2280244271313" calcext:value-type="float">
            <text:p>0.142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4973551470248" calcext:value-type="float">
            <text:p>0.145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7582772874526" calcext:value-type="float">
            <text:p>0.147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0109499548431" calcext:value-type="float">
            <text:p>0.150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2554876340215" calcext:value-type="float">
            <text:p>0.152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4918962060305" calcext:value-type="float">
            <text:p>0.154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7203542618595" calcext:value-type="float">
            <text:p>0.157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9407825333396" calcext:value-type="float">
            <text:p>0.159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1533984481279" calcext:value-type="float">
            <text:p>0.161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3582912700826" calcext:value-type="float">
            <text:p>0.163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5556778576856" calcext:value-type="float">
            <text:p>0.165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7457836738968" calcext:value-type="float">
            <text:p>0.167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9287672714036" calcext:value-type="float">
            <text:p>0.169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1047439932641" calcext:value-type="float">
            <text:p>0.171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2738730166671" calcext:value-type="float">
            <text:p>0.172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4363467760412" calcext:value-type="float">
            <text:p>0.174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5922787710115" calcext:value-type="float">
            <text:p>0.175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7418649830563" calcext:value-type="float">
            <text:p>0.177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8852294757456" calcext:value-type="float">
            <text:p>0.178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0225463161892" calcext:value-type="float">
            <text:p>0.180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1539755396168" calcext:value-type="float">
            <text:p>0.181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2796919437036" calcext:value-type="float">
            <text:p>0.182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3998987906249" calcext:value-type="float">
            <text:p>0.184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5147352900172" calcext:value-type="float">
            <text:p>0.185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6243992568248" calcext:value-type="float">
            <text:p>0.186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7290659991704" calcext:value-type="float">
            <text:p>0.187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8288060117915" calcext:value-type="float">
            <text:p>0.188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923824896436" calcext:value-type="float">
            <text:p>0.189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0142335863793" calcext:value-type="float">
            <text:p>0.190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1002610298606" calcext:value-type="float">
            <text:p>0.191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1819298243762" calcext:value-type="float">
            <text:p>0.191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2593756871934" calcext:value-type="float">
            <text:p>0.192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3328172955464" calcext:value-type="float">
            <text:p>0.193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4023260097207" calcext:value-type="float">
            <text:p>0.194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4680624719869" calcext:value-type="float">
            <text:p>0.194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530144640955" calcext:value-type="float">
            <text:p>0.195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5887048237616" calcext:value-type="float">
            <text:p>0.195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6438823077294" calcext:value-type="float">
            <text:p>0.196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6957230213442" calcext:value-type="float">
            <text:p>0.197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7444089889846" calcext:value-type="float">
            <text:p>0.197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7900002720632" calcext:value-type="float">
            <text:p>0.197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8326022762746" calcext:value-type="float">
            <text:p>0.198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8723157365776" calcext:value-type="float">
            <text:p>0.19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9092762082126" calcext:value-type="float">
            <text:p>0.199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9044510281182" calcext:value-type="float">
            <text:p>0.199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8708331019161" calcext:value-type="float">
            <text:p>0.19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8163567746512" calcext:value-type="float">
            <text:p>0.198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7485887964647" calcext:value-type="float">
            <text:p>0.197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6719170871779" calcext:value-type="float">
            <text:p>0.196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5890672731907" calcext:value-type="float">
            <text:p>0.195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5017543191207" calcext:value-type="float">
            <text:p>0.195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4114450223909" calcext:value-type="float">
            <text:p>0.194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3188988313617" calcext:value-type="float">
            <text:p>0.193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2250258086697" calcext:value-type="float">
            <text:p>0.192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1304441755935" calcext:value-type="float">
            <text:p>0.1913</text:p>
          </table:table-cell>
          <table:table-cell table:style-name="ce45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90355965607712" calcext:value-type="float">
            <text:p>0.190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9409205639453" calcext:value-type="float">
            <text:p>0.189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8466214971967" calcext:value-type="float">
            <text:p>0.188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7528598520148" calcext:value-type="float">
            <text:p>0.187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6597590618852" calcext:value-type="float">
            <text:p>0.186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5675946599419" calcext:value-type="float">
            <text:p>0.185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4765380504545" calcext:value-type="float">
            <text:p>0.184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3864405529027" calcext:value-type="float">
            <text:p>0.183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2974303151072" calcext:value-type="float">
            <text:p>0.183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2097267132808" calcext:value-type="float">
            <text:p>0.182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1231725314118" calcext:value-type="float">
            <text:p>0.181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8037770367806" calcext:value-type="float">
            <text:p>0.180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9535600754553" calcext:value-type="float">
            <text:p>0.179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8705507987334" calcext:value-type="float">
            <text:p>0.17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7887400473401" calcext:value-type="float">
            <text:p>0.177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7081698136405" calcext:value-type="float">
            <text:p>0.177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6288101229329" calcext:value-type="float">
            <text:p>0.176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5505354037751" calcext:value-type="float">
            <text:p>0.175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4733262220228" calcext:value-type="float">
            <text:p>0.174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3971846475817" calcext:value-type="float">
            <text:p>0.174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3220376438502" calcext:value-type="float">
            <text:p>0.173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2480562494209" calcext:value-type="float">
            <text:p>0.172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1747924660549" calcext:value-type="float">
            <text:p>0.171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102406306493" calcext:value-type="float">
            <text:p>0.171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70308508930517" calcext:value-type="float">
            <text:p>0.170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9601332984009" calcext:value-type="float">
            <text:p>0.169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8904132458713" calcext:value-type="float">
            <text:p>0.168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8214456226556" calcext:value-type="float">
            <text:p>0.168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753384447028" calcext:value-type="float">
            <text:p>0.167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686402347044" calcext:value-type="float">
            <text:p>0.166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6205810120908" calcext:value-type="float">
            <text:p>0.166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5555298316309" calcext:value-type="float">
            <text:p>0.165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4914005962313" calcext:value-type="float">
            <text:p>0.164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4280928643073" calcext:value-type="float">
            <text:p>0.164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3653652925655" calcext:value-type="float">
            <text:p>0.163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3034453313681" calcext:value-type="float">
            <text:p>0.163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2420446676979" calcext:value-type="float">
            <text:p>0.162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1811917258159" calcext:value-type="float">
            <text:p>0.161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1210602352813" calcext:value-type="float">
            <text:p>0.161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0613458280287" calcext:value-type="float">
            <text:p>0.160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0024584172879" calcext:value-type="float">
            <text:p>0.160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9440080822974" calcext:value-type="float">
            <text:p>0.159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8861400091317" calcext:value-type="float">
            <text:p>0.158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8285339650837" calcext:value-type="float">
            <text:p>0.158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7712355290303" calcext:value-type="float">
            <text:p>0.157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71428847391" calcext:value-type="float">
            <text:p>0.157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6577320236097" calcext:value-type="float">
            <text:p>0.156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6015853553055" calcext:value-type="float">
            <text:p>0.156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5456908932542" calcext:value-type="float">
            <text:p>0.155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4901290084175" calcext:value-type="float">
            <text:p>0.154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4347932750482" calcext:value-type="float">
            <text:p>0.154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3797713704961" calcext:value-type="float">
            <text:p>0.153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3249894475006" calcext:value-type="float">
            <text:p>0.153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2704475397307" calcext:value-type="float">
            <text:p>0.152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2161113541393" calcext:value-type="float">
            <text:p>0.152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1619009241719" calcext:value-type="float">
            <text:p>0.151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1079004859689" calcext:value-type="float">
            <text:p>0.151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50174712862949" calcext:value-type="float">
            <text:p>0.150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9418034698215" calcext:value-type="float">
            <text:p>0.149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8682681605952" calcext:value-type="float">
            <text:p>0.14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7965593788022" calcext:value-type="float">
            <text:p>0.148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7266030513832" calcext:value-type="float">
            <text:p>0.147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6581749218272" calcext:value-type="float">
            <text:p>0.146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5914058234623" calcext:value-type="float">
            <text:p>0.145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5261068997335" calcext:value-type="float">
            <text:p>0.145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4620036801386" calcext:value-type="float">
            <text:p>0.144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3993079676318" calcext:value-type="float">
            <text:p>0.144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3376949047681" calcext:value-type="float">
            <text:p>0.143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2771069230401" calcext:value-type="float">
            <text:p>0.142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2175262737662" calcext:value-type="float">
            <text:p>0.142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1588458517814" calcext:value-type="float">
            <text:p>0.141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1011019253474" calcext:value-type="float">
            <text:p>0.141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4044065369865" calcext:value-type="float">
            <text:p>0.140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9878791917833" calcext:value-type="float">
            <text:p>0.139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9323851275949" calcext:value-type="float">
            <text:p>0.139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8775514786632" calcext:value-type="float">
            <text:p>0.138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8232669651142" calcext:value-type="float">
            <text:p>0.138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7694938084461" calcext:value-type="float">
            <text:p>0.137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7163844833912" calcext:value-type="float">
            <text:p>0.137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6637099215334" calcext:value-type="float">
            <text:p>0.136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6114733450611" calcext:value-type="float">
            <text:p>0.136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55983819836" calcext:value-type="float">
            <text:p>0.135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5086110530517" calcext:value-type="float">
            <text:p>0.135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4579710639676" calcext:value-type="float">
            <text:p>0.134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4075997004765" calcext:value-type="float">
            <text:p>0.134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3578133254729" calcext:value-type="float">
            <text:p>0.133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3083661872816" calcext:value-type="float">
            <text:p>0.133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2591742996782" calcext:value-type="float">
            <text:p>0.132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2101358963621" calcext:value-type="float">
            <text:p>0.132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1613369593486" calcext:value-type="float">
            <text:p>0.131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1128439029651" calcext:value-type="float">
            <text:p>0.131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0645602859601" calcext:value-type="float">
            <text:p>0.130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30164280782824" calcext:value-type="float">
            <text:p>0.130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9685360065875" calcext:value-type="float">
            <text:p>0.129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9207460214575" calcext:value-type="float">
            <text:p>0.129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8731644572784" calcext:value-type="float">
            <text:p>0.12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8257650046676" calcext:value-type="float">
            <text:p>0.128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7784215824465" calcext:value-type="float">
            <text:p>0.127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7313025748956" calcext:value-type="float">
            <text:p>0.127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6843666279906" calcext:value-type="float">
            <text:p>0.126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6376277487768" calcext:value-type="float">
            <text:p>0.126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5909851241287" calcext:value-type="float">
            <text:p>0.125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5444054475377" calcext:value-type="float">
            <text:p>0.125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4978501341734" calcext:value-type="float">
            <text:p>0.125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4513878030501" calcext:value-type="float">
            <text:p>0.124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4049741412816" calcext:value-type="float">
            <text:p>0.124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3586852064168" calcext:value-type="float">
            <text:p>0.123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3124741049642" calcext:value-type="float">
            <text:p>0.123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2664437038548" calcext:value-type="float">
            <text:p>0.122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2203528659546" calcext:value-type="float">
            <text:p>0.122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1743146232499" calcext:value-type="float">
            <text:p>0.121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1282697044997" calcext:value-type="float">
            <text:p>0.121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0823886955584" calcext:value-type="float">
            <text:p>0.120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0365667971187" calcext:value-type="float">
            <text:p>0.120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9906871837798" calcext:value-type="float">
            <text:p>0.119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9448619212936" calcext:value-type="float">
            <text:p>0.119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8990948989249" calcext:value-type="float">
            <text:p>0.119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8531117843336" calcext:value-type="float">
            <text:p>0.118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807146618622" calcext:value-type="float">
            <text:p>0.118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7612969491247" calcext:value-type="float">
            <text:p>0.117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7153784639185" calcext:value-type="float">
            <text:p>0.117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6695296161247" calcext:value-type="float">
            <text:p>0.116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6235769762818" calcext:value-type="float">
            <text:p>0.116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5776648721312" calcext:value-type="float">
            <text:p>0.115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5317181388315" calcext:value-type="float">
            <text:p>0.115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4856024927171" calcext:value-type="float">
            <text:p>0.114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4394857433408" calcext:value-type="float">
            <text:p>0.114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3934684481916" calcext:value-type="float">
            <text:p>0.113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3474410710462" calcext:value-type="float">
            <text:p>0.113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3013546846749" calcext:value-type="float">
            <text:p>0.113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2551437780568" calcext:value-type="float">
            <text:p>0.112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2090425383443" calcext:value-type="float">
            <text:p>0.112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1627076230003" calcext:value-type="float">
            <text:p>0.111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1163315108525" calcext:value-type="float">
            <text:p>0.111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0699147618063" calcext:value-type="float">
            <text:p>0.110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10233701324829" calcext:value-type="float">
            <text:p>0.110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9768762506231" calcext:value-type="float">
            <text:p>0.109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9304284397395" calcext:value-type="float">
            <text:p>0.109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883855022621" calcext:value-type="float">
            <text:p>0.108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8371882266944" calcext:value-type="float">
            <text:p>0.108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7904630570031" calcext:value-type="float">
            <text:p>0.107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7436705018339" calcext:value-type="float">
            <text:p>0.107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6967153296599" calcext:value-type="float">
            <text:p>0.107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6497203490516" calcext:value-type="float">
            <text:p>0.106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6026122580123" calcext:value-type="float">
            <text:p>0.106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6216824714665" calcext:value-type="float">
            <text:p>0.106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5489729761456" calcext:value-type="float">
            <text:p>0.105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4858896919808" calcext:value-type="float">
            <text:p>0.104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4239474511071" calcext:value-type="float">
            <text:p>0.104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3631802769336" calcext:value-type="float">
            <text:p>0.103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03032849883814" calcext:value-type="float">
            <text:p>0.1030</text:p>
          </table:table-cell>
          <table:table-cell table:style-name="ce39" table:number-columns-repeated="43"/>
        </table:table-row>
        <table:table-row table:style-name="ro1">
          <table:table-cell office:value-type="string" calcext:value-type="string">
            <text:p>omega*W, as if year=2125</text:p>
          </table:table-cell>
          <table:table-cell table:style-name="ce38" table:formula="of:=[.B10]*['Plantation example'.$E$2]" office:value-type="currency" office:currency="USD" office:value="0" calcext:value-type="currency">
            <text:p>$0.00</text:p>
          </table:table-cell>
          <table:table-cell table:style-name="ce38" table:formula="of:=[.C10]*['Plantation example'.$E$2]" office:value-type="currency" office:currency="USD" office:value="2.15798703978172" calcext:value-type="currency">
            <text:p>$2.16</text:p>
          </table:table-cell>
          <table:table-cell table:style-name="ce38" table:formula="of:=[.D10]*['Plantation example'.$E$2]" office:value-type="currency" office:currency="USD" office:value="7.09106825656529" calcext:value-type="currency">
            <text:p>$7.09</text:p>
          </table:table-cell>
          <table:table-cell table:style-name="ce38" table:formula="of:=[.E10]*['Plantation example'.$E$2]" office:value-type="currency" office:currency="USD" office:value="15.1724161573244" calcext:value-type="currency">
            <text:p>$15.17</text:p>
          </table:table-cell>
          <table:table-cell table:style-name="ce38" table:formula="of:=[.F10]*['Plantation example'.$E$2]" office:value-type="currency" office:currency="USD" office:value="26.4754120640937" calcext:value-type="currency">
            <text:p>$26.48</text:p>
          </table:table-cell>
          <table:table-cell table:style-name="ce38" table:formula="of:=[.G10]*['Plantation example'.$E$2]" office:value-type="currency" office:currency="USD" office:value="40.9565046031794" calcext:value-type="currency">
            <text:p>$40.96</text:p>
          </table:table-cell>
          <table:table-cell table:style-name="ce38" table:formula="of:=[.H10]*['Plantation example'.$E$2]" office:value-type="currency" office:currency="USD" office:value="58.5073215465159" calcext:value-type="currency">
            <text:p>$58.51</text:p>
          </table:table-cell>
          <table:table-cell table:style-name="ce38" table:formula="of:=[.I10]*['Plantation example'.$E$2]" office:value-type="currency" office:currency="USD" office:value="78.9755814739931" calcext:value-type="currency">
            <text:p>$78.98</text:p>
          </table:table-cell>
          <table:table-cell table:style-name="ce38" table:formula="of:=[.J10]*['Plantation example'.$E$2]" office:value-type="currency" office:currency="USD" office:value="102.17559481001" calcext:value-type="currency">
            <text:p>$102.18</text:p>
          </table:table-cell>
          <table:table-cell table:style-name="ce38" table:formula="of:=[.K10]*['Plantation example'.$E$2]" office:value-type="currency" office:currency="USD" office:value="127.911374928416" calcext:value-type="currency">
            <text:p>$127.91</text:p>
          </table:table-cell>
          <table:table-cell table:style-name="ce38" table:formula="of:=[.L10]*['Plantation example'.$E$2]" office:value-type="currency" office:currency="USD" office:value="155.969322523217" calcext:value-type="currency">
            <text:p>$155.97</text:p>
          </table:table-cell>
          <table:table-cell table:style-name="ce38" table:formula="of:=[.M10]*['Plantation example'.$E$2]" office:value-type="currency" office:currency="USD" office:value="186.133168844273" calcext:value-type="currency">
            <text:p>$186.13</text:p>
          </table:table-cell>
          <table:table-cell table:style-name="ce38" table:formula="of:=[.N10]*['Plantation example'.$E$2]" office:value-type="currency" office:currency="USD" office:value="218.192427049184" calcext:value-type="currency">
            <text:p>$218.19</text:p>
          </table:table-cell>
          <table:table-cell table:style-name="ce38" table:formula="of:=[.O10]*['Plantation example'.$E$2]" office:value-type="currency" office:currency="USD" office:value="251.933883822487" calcext:value-type="currency">
            <text:p>$251.93</text:p>
          </table:table-cell>
          <table:table-cell table:style-name="ce38" table:formula="of:=[.P10]*['Plantation example'.$E$2]" office:value-type="currency" office:currency="USD" office:value="287.15419013068" calcext:value-type="currency">
            <text:p>$287.15</text:p>
          </table:table-cell>
          <table:table-cell table:style-name="ce38" table:formula="of:=[.Q10]*['Plantation example'.$E$2]" office:value-type="currency" office:currency="USD" office:value="323.661795057146" calcext:value-type="currency">
            <text:p>$323.66</text:p>
          </table:table-cell>
          <table:table-cell table:style-name="ce38" table:formula="of:=[.R10]*['Plantation example'.$E$2]" office:value-type="currency" office:currency="USD" office:value="361.275283561793" calcext:value-type="currency">
            <text:p>$361.28</text:p>
          </table:table-cell>
          <table:table-cell table:style-name="ce38" table:formula="of:=[.S10]*['Plantation example'.$E$2]" office:value-type="currency" office:currency="USD" office:value="399.811262169034" calcext:value-type="currency">
            <text:p>$399.81</text:p>
          </table:table-cell>
          <table:table-cell table:style-name="ce38" table:formula="of:=[.T10]*['Plantation example'.$E$2]" office:value-type="currency" office:currency="USD" office:value="439.100557188937" calcext:value-type="currency">
            <text:p>$439.10</text:p>
          </table:table-cell>
          <table:table-cell table:style-name="ce38" table:formula="of:=[.U10]*['Plantation example'.$E$2]" office:value-type="currency" office:currency="USD" office:value="478.992950701884" calcext:value-type="currency">
            <text:p>$478.99</text:p>
          </table:table-cell>
          <table:table-cell table:style-name="ce38" table:formula="of:=[.V10]*['Plantation example'.$E$2]" office:value-type="currency" office:currency="USD" office:value="519.342346114657" calcext:value-type="currency">
            <text:p>$519.34</text:p>
          </table:table-cell>
          <table:table-cell table:style-name="ce38" table:formula="of:=[.W10]*['Plantation example'.$E$2]" office:value-type="currency" office:currency="USD" office:value="560.006941152038" calcext:value-type="currency">
            <text:p>$560.01</text:p>
          </table:table-cell>
          <table:table-cell table:style-name="ce38" table:formula="of:=[.X10]*['Plantation example'.$E$2]" office:value-type="currency" office:currency="USD" office:value="600.863582852575" calcext:value-type="currency">
            <text:p>$600.86</text:p>
          </table:table-cell>
          <table:table-cell table:style-name="ce38" table:formula="of:=[.Y10]*['Plantation example'.$E$2]" office:value-type="currency" office:currency="USD" office:value="641.798119115935" calcext:value-type="currency">
            <text:p>$641.80</text:p>
          </table:table-cell>
          <table:table-cell table:style-name="ce38" table:formula="of:=[.Z10]*['Plantation example'.$E$2]" office:value-type="currency" office:currency="USD" office:value="682.70043824661" calcext:value-type="currency">
            <text:p>$682.70</text:p>
          </table:table-cell>
          <table:table-cell table:style-name="ce38" table:formula="of:=[.AA10]*['Plantation example'.$E$2]" office:value-type="currency" office:currency="USD" office:value="723.47182709961" calcext:value-type="currency">
            <text:p>$723.47</text:p>
          </table:table-cell>
          <table:table-cell table:style-name="ce38" table:formula="of:=[.AB10]*['Plantation example'.$E$2]" office:value-type="currency" office:currency="USD" office:value="764.021379146112" calcext:value-type="currency">
            <text:p>$764.02</text:p>
          </table:table-cell>
          <table:table-cell table:style-name="ce38" table:formula="of:=[.AC10]*['Plantation example'.$E$2]" office:value-type="currency" office:currency="USD" office:value="804.266558353681" calcext:value-type="currency">
            <text:p>$804.27</text:p>
          </table:table-cell>
          <table:table-cell table:style-name="ce38" table:formula="of:=[.AD10]*['Plantation example'.$E$2]" office:value-type="currency" office:currency="USD" office:value="844.13242466753" calcext:value-type="currency">
            <text:p>$844.13</text:p>
          </table:table-cell>
          <table:table-cell table:style-name="ce38" table:formula="of:=[.AE10]*['Plantation example'.$E$2]" office:value-type="currency" office:currency="USD" office:value="883.556790026051" calcext:value-type="currency">
            <text:p>$883.56</text:p>
          </table:table-cell>
          <table:table-cell table:style-name="ce38" table:formula="of:=[.AF10]*['Plantation example'.$E$2]" office:value-type="currency" office:currency="USD" office:value="922.481850760701" calcext:value-type="currency">
            <text:p>$922.48</text:p>
          </table:table-cell>
          <table:table-cell table:style-name="ce38" table:formula="of:=[.AG10]*['Plantation example'.$E$2]" office:value-type="currency" office:currency="USD" office:value="960.854966140289" calcext:value-type="currency">
            <text:p>$960.85</text:p>
          </table:table-cell>
          <table:table-cell table:style-name="ce38" table:formula="of:=[.AH10]*['Plantation example'.$E$2]" office:value-type="currency" office:currency="USD" office:value="998.629365502494" calcext:value-type="currency">
            <text:p>$998.63</text:p>
          </table:table-cell>
          <table:table-cell table:style-name="ce38" table:formula="of:=[.AI10]*['Plantation example'.$E$2]" office:value-type="currency" office:currency="USD" office:value="1035.7569867297" calcext:value-type="currency">
            <text:p>$1,035.76</text:p>
          </table:table-cell>
          <table:table-cell table:style-name="ce38" table:formula="of:=[.AJ10]*['Plantation example'.$E$2]" office:value-type="currency" office:currency="USD" office:value="1072.2194459693" calcext:value-type="currency">
            <text:p>$1,072.22</text:p>
          </table:table-cell>
          <table:table-cell table:style-name="ce38" table:formula="of:=[.AK10]*['Plantation example'.$E$2]" office:value-type="currency" office:currency="USD" office:value="1107.98490158875" calcext:value-type="currency">
            <text:p>$1,107.98</text:p>
          </table:table-cell>
          <table:table-cell table:style-name="ce38" table:formula="of:=[.AL10]*['Plantation example'.$E$2]" office:value-type="currency" office:currency="USD" office:value="1143.02720612881" calcext:value-type="currency">
            <text:p>$1,143.03</text:p>
          </table:table-cell>
          <table:table-cell table:style-name="ce38" table:formula="of:=[.AM10]*['Plantation example'.$E$2]" office:value-type="currency" office:currency="USD" office:value="1177.32382258783" calcext:value-type="currency">
            <text:p>$1,177.32</text:p>
          </table:table-cell>
          <table:table-cell table:style-name="ce38" table:formula="of:=[.AN10]*['Plantation example'.$E$2]" office:value-type="currency" office:currency="USD" office:value="1210.84949944335" calcext:value-type="currency">
            <text:p>$1,210.85</text:p>
          </table:table-cell>
          <table:table-cell table:style-name="ce38" table:formula="of:=[.AO10]*['Plantation example'.$E$2]" office:value-type="currency" office:currency="USD" office:value="1243.59556054051" calcext:value-type="currency">
            <text:p>$1,243.60</text:p>
          </table:table-cell>
          <table:table-cell table:style-name="ce38" table:formula="of:=[.AP10]*['Plantation example'.$E$2]" office:value-type="currency" office:currency="USD" office:value="1275.54252652158" calcext:value-type="currency">
            <text:p>$1,275.54</text:p>
          </table:table-cell>
          <table:table-cell table:style-name="ce38" table:formula="of:=[.AQ10]*['Plantation example'.$E$2]" office:value-type="currency" office:currency="USD" office:value="1306.67303999596" calcext:value-type="currency">
            <text:p>$1,306.67</text:p>
          </table:table-cell>
          <table:table-cell table:style-name="ce38" table:formula="of:=[.AR10]*['Plantation example'.$E$2]" office:value-type="currency" office:currency="USD" office:value="1336.96597486161" calcext:value-type="currency">
            <text:p>$1,336.97</text:p>
          </table:table-cell>
          <table:table-cell table:style-name="ce38" table:formula="of:=[.AS10]*['Plantation example'.$E$2]" office:value-type="currency" office:currency="USD" office:value="1366.42304052493" calcext:value-type="currency">
            <text:p>$1,366.42</text:p>
          </table:table-cell>
          <table:table-cell table:style-name="ce38" table:formula="of:=[.AT10]*['Plantation example'.$E$2]" office:value-type="currency" office:currency="USD" office:value="1395.03637697296" calcext:value-type="currency">
            <text:p>$1,395.04</text:p>
          </table:table-cell>
          <table:table-cell table:style-name="ce38" table:formula="of:=[.AU10]*['Plantation example'.$E$2]" office:value-type="currency" office:currency="USD" office:value="1422.80244271313" calcext:value-type="currency">
            <text:p>$1,422.80</text:p>
          </table:table-cell>
          <table:table-cell table:style-name="ce38" table:formula="of:=[.AV10]*['Plantation example'.$E$2]" office:value-type="currency" office:currency="USD" office:value="1449.73551470248" calcext:value-type="currency">
            <text:p>$1,449.74</text:p>
          </table:table-cell>
          <table:table-cell table:style-name="ce38" table:formula="of:=[.AW10]*['Plantation example'.$E$2]" office:value-type="currency" office:currency="USD" office:value="1475.82772874526" calcext:value-type="currency">
            <text:p>$1,475.83</text:p>
          </table:table-cell>
          <table:table-cell table:style-name="ce38" table:formula="of:=[.AX10]*['Plantation example'.$E$2]" office:value-type="currency" office:currency="USD" office:value="1501.09499548431" calcext:value-type="currency">
            <text:p>$1,501.09</text:p>
          </table:table-cell>
          <table:table-cell table:style-name="ce38" table:formula="of:=[.AY10]*['Plantation example'.$E$2]" office:value-type="currency" office:currency="USD" office:value="1525.54876340215" calcext:value-type="currency">
            <text:p>$1,525.55</text:p>
          </table:table-cell>
          <table:table-cell table:style-name="ce38" table:formula="of:=[.AZ10]*['Plantation example'.$E$2]" office:value-type="currency" office:currency="USD" office:value="1549.18962060305" calcext:value-type="currency">
            <text:p>$1,549.19</text:p>
          </table:table-cell>
          <table:table-cell table:style-name="ce38" table:formula="of:=[.BA10]*['Plantation example'.$E$2]" office:value-type="currency" office:currency="USD" office:value="1572.03542618595" calcext:value-type="currency">
            <text:p>$1,572.04</text:p>
          </table:table-cell>
          <table:table-cell table:style-name="ce38" table:formula="of:=[.BB10]*['Plantation example'.$E$2]" office:value-type="currency" office:currency="USD" office:value="1594.07825333396" calcext:value-type="currency">
            <text:p>$1,594.08</text:p>
          </table:table-cell>
          <table:table-cell table:style-name="ce38" table:formula="of:=[.BC10]*['Plantation example'.$E$2]" office:value-type="currency" office:currency="USD" office:value="1615.33984481279" calcext:value-type="currency">
            <text:p>$1,615.34</text:p>
          </table:table-cell>
          <table:table-cell table:style-name="ce38" table:formula="of:=[.BD10]*['Plantation example'.$E$2]" office:value-type="currency" office:currency="USD" office:value="1635.82912700826" calcext:value-type="currency">
            <text:p>$1,635.83</text:p>
          </table:table-cell>
          <table:table-cell table:style-name="ce38" table:formula="of:=[.BE10]*['Plantation example'.$E$2]" office:value-type="currency" office:currency="USD" office:value="1655.56778576856" calcext:value-type="currency">
            <text:p>$1,655.57</text:p>
          </table:table-cell>
          <table:table-cell table:style-name="ce38" table:formula="of:=[.BF10]*['Plantation example'.$E$2]" office:value-type="currency" office:currency="USD" office:value="1674.57836738968" calcext:value-type="currency">
            <text:p>$1,674.58</text:p>
          </table:table-cell>
          <table:table-cell table:style-name="ce38" table:formula="of:=[.BG10]*['Plantation example'.$E$2]" office:value-type="currency" office:currency="USD" office:value="1692.87672714036" calcext:value-type="currency">
            <text:p>$1,692.88</text:p>
          </table:table-cell>
          <table:table-cell table:style-name="ce38" table:formula="of:=[.BH10]*['Plantation example'.$E$2]" office:value-type="currency" office:currency="USD" office:value="1710.47439932641" calcext:value-type="currency">
            <text:p>$1,710.47</text:p>
          </table:table-cell>
          <table:table-cell table:style-name="ce38" table:formula="of:=[.BI10]*['Plantation example'.$E$2]" office:value-type="currency" office:currency="USD" office:value="1727.38730166671" calcext:value-type="currency">
            <text:p>$1,727.39</text:p>
          </table:table-cell>
          <table:table-cell table:style-name="ce38" table:formula="of:=[.BJ10]*['Plantation example'.$E$2]" office:value-type="currency" office:currency="USD" office:value="1743.63467760412" calcext:value-type="currency">
            <text:p>$1,743.63</text:p>
          </table:table-cell>
          <table:table-cell table:style-name="ce38" table:formula="of:=[.BK10]*['Plantation example'.$E$2]" office:value-type="currency" office:currency="USD" office:value="1759.22787710115" calcext:value-type="currency">
            <text:p>$1,759.23</text:p>
          </table:table-cell>
          <table:table-cell table:style-name="ce38" table:formula="of:=[.BL10]*['Plantation example'.$E$2]" office:value-type="currency" office:currency="USD" office:value="1774.18649830563" calcext:value-type="currency">
            <text:p>$1,774.19</text:p>
          </table:table-cell>
          <table:table-cell table:style-name="ce38" table:formula="of:=[.BM10]*['Plantation example'.$E$2]" office:value-type="currency" office:currency="USD" office:value="1788.52294757456" calcext:value-type="currency">
            <text:p>$1,788.52</text:p>
          </table:table-cell>
          <table:table-cell table:style-name="ce38" table:formula="of:=[.BN10]*['Plantation example'.$E$2]" office:value-type="currency" office:currency="USD" office:value="1802.25463161892" calcext:value-type="currency">
            <text:p>$1,802.25</text:p>
          </table:table-cell>
          <table:table-cell table:style-name="ce38" table:formula="of:=[.BO10]*['Plantation example'.$E$2]" office:value-type="currency" office:currency="USD" office:value="1815.39755396168" calcext:value-type="currency">
            <text:p>$1,815.40</text:p>
          </table:table-cell>
          <table:table-cell table:style-name="ce38" table:formula="of:=[.BP10]*['Plantation example'.$E$2]" office:value-type="currency" office:currency="USD" office:value="1827.96919437036" calcext:value-type="currency">
            <text:p>$1,827.97</text:p>
          </table:table-cell>
          <table:table-cell table:style-name="ce38" table:formula="of:=[.BQ10]*['Plantation example'.$E$2]" office:value-type="currency" office:currency="USD" office:value="1839.98987906249" calcext:value-type="currency">
            <text:p>$1,839.99</text:p>
          </table:table-cell>
          <table:table-cell table:style-name="ce38" table:formula="of:=[.BR10]*['Plantation example'.$E$2]" office:value-type="currency" office:currency="USD" office:value="1851.47352900172" calcext:value-type="currency">
            <text:p>$1,851.47</text:p>
          </table:table-cell>
          <table:table-cell table:style-name="ce38" table:formula="of:=[.BS10]*['Plantation example'.$E$2]" office:value-type="currency" office:currency="USD" office:value="1862.43992568248" calcext:value-type="currency">
            <text:p>$1,862.44</text:p>
          </table:table-cell>
          <table:table-cell table:style-name="ce38" table:formula="of:=[.BT10]*['Plantation example'.$E$2]" office:value-type="currency" office:currency="USD" office:value="1872.90659991704" calcext:value-type="currency">
            <text:p>$1,872.91</text:p>
          </table:table-cell>
          <table:table-cell table:style-name="ce38" table:formula="of:=[.BU10]*['Plantation example'.$E$2]" office:value-type="currency" office:currency="USD" office:value="1882.88060117915" calcext:value-type="currency">
            <text:p>$1,882.88</text:p>
          </table:table-cell>
          <table:table-cell table:style-name="ce38" table:formula="of:=[.BV10]*['Plantation example'.$E$2]" office:value-type="currency" office:currency="USD" office:value="1892.3824896436" calcext:value-type="currency">
            <text:p>$1,892.38</text:p>
          </table:table-cell>
          <table:table-cell table:style-name="ce38" table:formula="of:=[.BW10]*['Plantation example'.$E$2]" office:value-type="currency" office:currency="USD" office:value="1901.42335863793" calcext:value-type="currency">
            <text:p>$1,901.42</text:p>
          </table:table-cell>
          <table:table-cell table:style-name="ce38" table:formula="of:=[.BX10]*['Plantation example'.$E$2]" office:value-type="currency" office:currency="USD" office:value="1910.02610298606" calcext:value-type="currency">
            <text:p>$1,910.03</text:p>
          </table:table-cell>
          <table:table-cell table:style-name="ce38" table:formula="of:=[.BY10]*['Plantation example'.$E$2]" office:value-type="currency" office:currency="USD" office:value="1918.19298243762" calcext:value-type="currency">
            <text:p>$1,918.19</text:p>
          </table:table-cell>
          <table:table-cell table:style-name="ce38" table:formula="of:=[.BZ10]*['Plantation example'.$E$2]" office:value-type="currency" office:currency="USD" office:value="1925.93756871934" calcext:value-type="currency">
            <text:p>$1,925.94</text:p>
          </table:table-cell>
          <table:table-cell table:style-name="ce38" table:formula="of:=[.CA10]*['Plantation example'.$E$2]" office:value-type="currency" office:currency="USD" office:value="1933.28172955464" calcext:value-type="currency">
            <text:p>$1,933.28</text:p>
          </table:table-cell>
          <table:table-cell table:style-name="ce38" table:formula="of:=[.CB10]*['Plantation example'.$E$2]" office:value-type="currency" office:currency="USD" office:value="1940.23260097207" calcext:value-type="currency">
            <text:p>$1,940.23</text:p>
          </table:table-cell>
          <table:table-cell table:style-name="ce38" table:formula="of:=[.CC10]*['Plantation example'.$E$2]" office:value-type="currency" office:currency="USD" office:value="1946.80624719869" calcext:value-type="currency">
            <text:p>$1,946.81</text:p>
          </table:table-cell>
          <table:table-cell table:style-name="ce38" table:formula="of:=[.CD10]*['Plantation example'.$E$2]" office:value-type="currency" office:currency="USD" office:value="1953.0144640955" calcext:value-type="currency">
            <text:p>$1,953.01</text:p>
          </table:table-cell>
          <table:table-cell table:style-name="ce38" table:formula="of:=[.CE10]*['Plantation example'.$E$2]" office:value-type="currency" office:currency="USD" office:value="1958.87048237616" calcext:value-type="currency">
            <text:p>$1,958.87</text:p>
          </table:table-cell>
          <table:table-cell table:style-name="ce38" table:formula="of:=[.CF10]*['Plantation example'.$E$2]" office:value-type="currency" office:currency="USD" office:value="1964.38823077294" calcext:value-type="currency">
            <text:p>$1,964.39</text:p>
          </table:table-cell>
          <table:table-cell table:style-name="ce38" table:formula="of:=[.CG10]*['Plantation example'.$E$2]" office:value-type="currency" office:currency="USD" office:value="1969.57230213442" calcext:value-type="currency">
            <text:p>$1,969.57</text:p>
          </table:table-cell>
          <table:table-cell table:style-name="ce38" table:formula="of:=[.CH10]*['Plantation example'.$E$2]" office:value-type="currency" office:currency="USD" office:value="1974.44089889846" calcext:value-type="currency">
            <text:p>$1,974.44</text:p>
          </table:table-cell>
          <table:table-cell table:style-name="ce38" table:formula="of:=[.CI10]*['Plantation example'.$E$2]" office:value-type="currency" office:currency="USD" office:value="1979.00002720632" calcext:value-type="currency">
            <text:p>$1,979.00</text:p>
          </table:table-cell>
          <table:table-cell table:style-name="ce38" table:formula="of:=[.CJ10]*['Plantation example'.$E$2]" office:value-type="currency" office:currency="USD" office:value="1983.26022762746" calcext:value-type="currency">
            <text:p>$1,983.26</text:p>
          </table:table-cell>
          <table:table-cell table:style-name="ce38" table:formula="of:=[.CK10]*['Plantation example'.$E$2]" office:value-type="currency" office:currency="USD" office:value="1987.23157365776" calcext:value-type="currency">
            <text:p>$1,987.23</text:p>
          </table:table-cell>
          <table:table-cell table:style-name="ce38" table:formula="of:=[.CL10]*['Plantation example'.$E$2]" office:value-type="currency" office:currency="USD" office:value="1990.92762082126" calcext:value-type="currency">
            <text:p>$1,990.93</text:p>
          </table:table-cell>
          <table:table-cell table:style-name="ce38" table:formula="of:=[.CM10]*['Plantation example'.$E$2]" office:value-type="currency" office:currency="USD" office:value="1990.44510281182" calcext:value-type="currency">
            <text:p>$1,990.45</text:p>
          </table:table-cell>
          <table:table-cell table:style-name="ce38" table:formula="of:=[.CN10]*['Plantation example'.$E$2]" office:value-type="currency" office:currency="USD" office:value="1987.08331019161" calcext:value-type="currency">
            <text:p>$1,987.08</text:p>
          </table:table-cell>
          <table:table-cell table:style-name="ce38" table:formula="of:=[.CO10]*['Plantation example'.$E$2]" office:value-type="currency" office:currency="USD" office:value="1981.63567746512" calcext:value-type="currency">
            <text:p>$1,981.64</text:p>
          </table:table-cell>
          <table:table-cell table:style-name="ce38" table:formula="of:=[.CP10]*['Plantation example'.$E$2]" office:value-type="currency" office:currency="USD" office:value="1974.85887964647" calcext:value-type="currency">
            <text:p>$1,974.86</text:p>
          </table:table-cell>
          <table:table-cell table:style-name="ce38" table:formula="of:=[.CQ10]*['Plantation example'.$E$2]" office:value-type="currency" office:currency="USD" office:value="1967.19170871779" calcext:value-type="currency">
            <text:p>$1,967.19</text:p>
          </table:table-cell>
          <table:table-cell table:style-name="ce38" table:formula="of:=[.CR10]*['Plantation example'.$E$2]" office:value-type="currency" office:currency="USD" office:value="1958.90672731907" calcext:value-type="currency">
            <text:p>$1,958.91</text:p>
          </table:table-cell>
          <table:table-cell table:style-name="ce38" table:formula="of:=[.CS10]*['Plantation example'.$E$2]" office:value-type="currency" office:currency="USD" office:value="1950.17543191207" calcext:value-type="currency">
            <text:p>$1,950.18</text:p>
          </table:table-cell>
          <table:table-cell table:style-name="ce38" table:formula="of:=[.CT10]*['Plantation example'.$E$2]" office:value-type="currency" office:currency="USD" office:value="1941.14450223909" calcext:value-type="currency">
            <text:p>$1,941.14</text:p>
          </table:table-cell>
          <table:table-cell table:style-name="ce38" table:formula="of:=[.CU10]*['Plantation example'.$E$2]" office:value-type="currency" office:currency="USD" office:value="1931.88988313617" calcext:value-type="currency">
            <text:p>$1,931.89</text:p>
          </table:table-cell>
          <table:table-cell table:style-name="ce38" table:formula="of:=[.CV10]*['Plantation example'.$E$2]" office:value-type="currency" office:currency="USD" office:value="1922.50258086697" calcext:value-type="currency">
            <text:p>$1,922.50</text:p>
          </table:table-cell>
          <table:table-cell table:style-name="ce38" table:formula="of:=[.CW10]*['Plantation example'.$E$2]" office:value-type="currency" office:currency="USD" office:value="1913.04441755935" calcext:value-type="currency">
            <text:p>$1,913.04</text:p>
          </table:table-cell>
          <table:table-cell table:style-name="ce38" table:formula="of:=[.CX10]*['Plantation example'.$E$2]" office:value-type="currency" office:currency="USD" office:value="1903.55965607712" calcext:value-type="currency">
            <text:p>$1,903.56</text:p>
          </table:table-cell>
          <table:table-cell table:style-name="ce46" table:formula="of:=[.CY10]*['Plantation example'.$E$2]" office:value-type="currency" office:currency="USD" office:value="1894.09205639453" calcext:value-type="currency">
            <text:p>$1,894</text:p>
          </table:table-cell>
          <table:table-cell table:style-name="ce46" table:formula="of:=[.CZ10]*['Plantation example'.$E$2]" office:value-type="currency" office:currency="USD" office:value="1884.66214971967" calcext:value-type="currency">
            <text:p>$1,885</text:p>
          </table:table-cell>
          <table:table-cell table:style-name="ce46" table:formula="of:=[.DA10]*['Plantation example'.$E$2]" office:value-type="currency" office:currency="USD" office:value="1875.28598520148" calcext:value-type="currency">
            <text:p>$1,875</text:p>
          </table:table-cell>
          <table:table-cell table:style-name="ce46" table:formula="of:=[.DB10]*['Plantation example'.$E$2]" office:value-type="currency" office:currency="USD" office:value="1865.97590618852" calcext:value-type="currency">
            <text:p>$1,866</text:p>
          </table:table-cell>
          <table:table-cell table:style-name="ce46" table:formula="of:=[.DC10]*['Plantation example'.$E$2]" office:value-type="currency" office:currency="USD" office:value="1856.75946599419" calcext:value-type="currency">
            <text:p>$1,857</text:p>
          </table:table-cell>
          <table:table-cell table:style-name="ce46" table:formula="of:=[.DD10]*['Plantation example'.$E$2]" office:value-type="currency" office:currency="USD" office:value="1847.65380504545" calcext:value-type="currency">
            <text:p>$1,848</text:p>
          </table:table-cell>
          <table:table-cell table:style-name="ce46" table:formula="of:=[.DE10]*['Plantation example'.$E$2]" office:value-type="currency" office:currency="USD" office:value="1838.64405529027" calcext:value-type="currency">
            <text:p>$1,839</text:p>
          </table:table-cell>
          <table:table-cell table:style-name="ce46" table:formula="of:=[.DF10]*['Plantation example'.$E$2]" office:value-type="currency" office:currency="USD" office:value="1829.74303151072" calcext:value-type="currency">
            <text:p>$1,830</text:p>
          </table:table-cell>
          <table:table-cell table:style-name="ce46" table:formula="of:=[.DG10]*['Plantation example'.$E$2]" office:value-type="currency" office:currency="USD" office:value="1820.97267132808" calcext:value-type="currency">
            <text:p>$1,821</text:p>
          </table:table-cell>
          <table:table-cell table:style-name="ce46" table:formula="of:=[.DH10]*['Plantation example'.$E$2]" office:value-type="currency" office:currency="USD" office:value="1812.31725314118" calcext:value-type="currency">
            <text:p>$1,812</text:p>
          </table:table-cell>
          <table:table-cell table:style-name="ce46" table:formula="of:=[.DI10]*['Plantation example'.$E$2]" office:value-type="currency" office:currency="USD" office:value="1803.7770367806" calcext:value-type="currency">
            <text:p>$1,804</text:p>
          </table:table-cell>
          <table:table-cell table:style-name="ce46" table:formula="of:=[.DJ10]*['Plantation example'.$E$2]" office:value-type="currency" office:currency="USD" office:value="1795.35600754553" calcext:value-type="currency">
            <text:p>$1,795</text:p>
          </table:table-cell>
          <table:table-cell table:style-name="ce46" table:formula="of:=[.DK10]*['Plantation example'.$E$2]" office:value-type="currency" office:currency="USD" office:value="1787.05507987334" calcext:value-type="currency">
            <text:p>$1,787</text:p>
          </table:table-cell>
          <table:table-cell table:style-name="ce46" table:formula="of:=[.DL10]*['Plantation example'.$E$2]" office:value-type="currency" office:currency="USD" office:value="1778.87400473401" calcext:value-type="currency">
            <text:p>$1,779</text:p>
          </table:table-cell>
          <table:table-cell table:style-name="ce46" table:formula="of:=[.DM10]*['Plantation example'.$E$2]" office:value-type="currency" office:currency="USD" office:value="1770.81698136405" calcext:value-type="currency">
            <text:p>$1,771</text:p>
          </table:table-cell>
          <table:table-cell table:style-name="ce46" table:formula="of:=[.DN10]*['Plantation example'.$E$2]" office:value-type="currency" office:currency="USD" office:value="1762.88101229329" calcext:value-type="currency">
            <text:p>$1,763</text:p>
          </table:table-cell>
          <table:table-cell table:style-name="ce46" table:formula="of:=[.DO10]*['Plantation example'.$E$2]" office:value-type="currency" office:currency="USD" office:value="1755.05354037751" calcext:value-type="currency">
            <text:p>$1,755</text:p>
          </table:table-cell>
          <table:table-cell table:style-name="ce46" table:formula="of:=[.DP10]*['Plantation example'.$E$2]" office:value-type="currency" office:currency="USD" office:value="1747.33262220228" calcext:value-type="currency">
            <text:p>$1,747</text:p>
          </table:table-cell>
          <table:table-cell table:style-name="ce46" table:formula="of:=[.DQ10]*['Plantation example'.$E$2]" office:value-type="currency" office:currency="USD" office:value="1739.71846475817" calcext:value-type="currency">
            <text:p>$1,740</text:p>
          </table:table-cell>
          <table:table-cell table:style-name="ce46" table:formula="of:=[.DR10]*['Plantation example'.$E$2]" office:value-type="currency" office:currency="USD" office:value="1732.20376438502" calcext:value-type="currency">
            <text:p>$1,732</text:p>
          </table:table-cell>
          <table:table-cell table:style-name="ce46" office:value-type="string" calcext:value-type="string">
            <text:p>w</text:p>
          </table:table-cell>
          <table:table-cell table:style-name="ce46" table:formula="of:=[.DT10]*['Plantation example'.$E$2]" office:value-type="currency" office:currency="USD" office:value="1717.47924660549" calcext:value-type="currency">
            <text:p>$1,717</text:p>
          </table:table-cell>
          <table:table-cell table:style-name="ce46" table:formula="of:=[.DU10]*['Plantation example'.$E$2]" office:value-type="currency" office:currency="USD" office:value="1710.2406306493" calcext:value-type="currency">
            <text:p>$1,710</text:p>
          </table:table-cell>
          <table:table-cell table:style-name="ce46" table:formula="of:=[.DV10]*['Plantation example'.$E$2]" office:value-type="currency" office:currency="USD" office:value="1703.08508930517" calcext:value-type="currency">
            <text:p>$1,703</text:p>
          </table:table-cell>
          <table:table-cell table:style-name="ce46" table:formula="of:=[.DW10]*['Plantation example'.$E$2]" office:value-type="currency" office:currency="USD" office:value="1696.01332984009" calcext:value-type="currency">
            <text:p>$1,696</text:p>
          </table:table-cell>
          <table:table-cell table:style-name="ce46" table:formula="of:=[.DX10]*['Plantation example'.$E$2]" office:value-type="currency" office:currency="USD" office:value="1689.04132458713" calcext:value-type="currency">
            <text:p>$1,689</text:p>
          </table:table-cell>
          <table:table-cell table:style-name="ce46" table:formula="of:=[.DY10]*['Plantation example'.$E$2]" office:value-type="currency" office:currency="USD" office:value="1682.14456226556" calcext:value-type="currency">
            <text:p>$1,682</text:p>
          </table:table-cell>
          <table:table-cell table:style-name="ce46" table:formula="of:=[.DZ10]*['Plantation example'.$E$2]" office:value-type="currency" office:currency="USD" office:value="1675.3384447028" calcext:value-type="currency">
            <text:p>$1,675</text:p>
          </table:table-cell>
          <table:table-cell table:style-name="ce46" table:formula="of:=[.EA10]*['Plantation example'.$E$2]" office:value-type="currency" office:currency="USD" office:value="1668.6402347044" calcext:value-type="currency">
            <text:p>$1,669</text:p>
          </table:table-cell>
          <table:table-cell table:style-name="ce46" table:formula="of:=[.EB10]*['Plantation example'.$E$2]" office:value-type="currency" office:currency="USD" office:value="1662.05810120908" calcext:value-type="currency">
            <text:p>$1,662</text:p>
          </table:table-cell>
          <table:table-cell table:style-name="ce46" table:formula="of:=[.EC10]*['Plantation example'.$E$2]" office:value-type="currency" office:currency="USD" office:value="1655.55298316309" calcext:value-type="currency">
            <text:p>$1,656</text:p>
          </table:table-cell>
          <table:table-cell table:style-name="ce46" table:formula="of:=[.ED10]*['Plantation example'.$E$2]" office:value-type="currency" office:currency="USD" office:value="1649.14005962313" calcext:value-type="currency">
            <text:p>$1,649</text:p>
          </table:table-cell>
          <table:table-cell table:style-name="ce46" table:formula="of:=[.EE10]*['Plantation example'.$E$2]" office:value-type="currency" office:currency="USD" office:value="1642.80928643073" calcext:value-type="currency">
            <text:p>$1,643</text:p>
          </table:table-cell>
          <table:table-cell table:style-name="ce46" table:formula="of:=[.EF10]*['Plantation example'.$E$2]" office:value-type="currency" office:currency="USD" office:value="1636.53652925655" calcext:value-type="currency">
            <text:p>$1,637</text:p>
          </table:table-cell>
          <table:table-cell table:style-name="ce46" table:formula="of:=[.EG10]*['Plantation example'.$E$2]" office:value-type="currency" office:currency="USD" office:value="1630.34453313681" calcext:value-type="currency">
            <text:p>$1,630</text:p>
          </table:table-cell>
          <table:table-cell table:style-name="ce47" table:number-columns-repeated="115"/>
          <table:table-cell table:number-columns-repeated="43"/>
        </table:table-row>
        <table:table-row table:style-name="ro1" table:number-rows-repeated="1048563">
          <table:table-cell table:number-columns-repeated="295"/>
        </table:table-row>
        <table:table-row table:style-name="ro1">
          <table:table-cell table:number-columns-repeated="2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6" number:min-decimal-places="6" number:min-integer-digits="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14" number:min-decimal-places="14" number:min-integer-digits="1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 loext:blank-width-char=")1">-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4" number:min-decimal-places="4" number:min-integer-digits="1"/>
    </number:number-style>
    <number:number-style style:name="N173">
      <number:number number:decimal-places="1" number:min-decimal-places="1" number:min-integer-digits="1"/>
    </number:number-style>
    <number:number-style style:name="N174">
      <number:number number:decimal-places="3" number:min-decimal-places="3" number:min-integer-digits="1" number:grouping="true"/>
    </number:number-style>
    <number:number-style style:name="N175">
      <number:number number:decimal-places="4" number:min-decimal-places="4" number:min-integer-digits="1" number:grouping="true"/>
    </number:number-style>
    <number:number-style style:name="N176">
      <number:number number:decimal-places="5" number:min-decimal-places="5" number:min-integer-digits="1" number:grouping="true"/>
    </number:number-style>
    <number:number-style style:name="N177">
      <number:number number:decimal-places="6" number:min-decimal-places="6" number:min-integer-digits="1" number:grouping="true"/>
    </number:number-style>
    <number:number-style style:name="N178">
      <number:number number:decimal-places="7" number:min-decimal-places="7" number:min-integer-digits="1" number:grouping="true"/>
    </number:number-style>
    <number:number-style style:name="N179">
      <number:number number:decimal-places="8" number:min-decimal-places="8" number:min-integer-digits="1" number:grouping="true"/>
    </number:number-style>
    <number:number-style style:name="N180">
      <number:number number:decimal-places="9" number:min-decimal-places="9" number:min-integer-digits="1" number:grouping="true"/>
    </number:number-style>
    <number:number-style style:name="N181">
      <number:number number:decimal-places="10" number:min-decimal-places="10" number:min-integer-digits="1" number:grouping="true"/>
    </number:number-style>
    <number:currency-style style:name="N18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83P0"/>
    </number:currency-style>
    <number:number-style style:name="N184">
      <number:number number:decimal-places="16" number:min-decimal-places="16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49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49P0"/>
    </number:currency-style>
    <number:number-style style:name="N10150" number:language="en" number:country="US">
      <number:number number:decimal-places="1" number:min-decimal-places="1" number:min-integer-digits="1" number:grouping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13:25:55.47766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tation_20_example" style:display-name="PageStyle_Plantation exa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hn F. Raffensperger</meta:initial-creator>
    <meta:creation-date>2026-07-02T19:58:07</meta:creation-date>
    <dc:date>2026-07-07T13:39:53.750468500</dc:date>
    <meta:editing-cycles>16</meta:editing-cycles>
    <meta:editing-duration>PT17H27M10S</meta:editing-duration>
    <meta:generator>LibreOffice/26.2.4.2$Windows_X86_64 LibreOffice_project/0229ac93fcf0d7cbc6376066c6f35021cef002dc</meta:generator>
    <meta:document-statistic meta:table-count="2" meta:cell-count="1940" meta:object-count="0"/>
  </office:meta>
</office:document-meta>
</file>