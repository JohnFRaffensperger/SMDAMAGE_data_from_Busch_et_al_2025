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53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4.0866in"/>
    </style:style>
    <style:style style:name="co4" style:family="table-column">
      <style:table-column-properties fo:break-before="auto" style:column-width="0.757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lantation_20_examp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="0.028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81">
      <style:table-cell-properties fo:padding="0.028in"/>
    </style:style>
    <style:style style:name="ce1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25" style:family="table-cell" style:parent-style-name="Default">
      <style:table-cell-properties fo:padding="0.028in"/>
      <style:text-properties style:text-underline-style="none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eeeeee" style:diagonal-bl-tr="none" style:diagonal-tl-br="none" fo:border="0.74pt solid #999999" fo:padding="0.028in" style:rotation-align="none"/>
    </style:style>
    <style:style style:name="ce5" style:family="table-cell" style:parent-style-name="Default" style:data-style-name="N11">
      <style:table-cell-properties fo:padding="0.028in"/>
    </style:style>
    <style:style style:name="ce6" style:family="table-cell" style:parent-style-name="Default" style:data-style-name="N10103">
      <style:table-cell-properties fo:padding="0.028in"/>
    </style:style>
    <style:style style:name="ce7" style:family="table-cell" style:parent-style-name="Default" style:data-style-name="N10">
      <style:table-cell-properties fo:padding="0.028in"/>
    </style:style>
    <style:style style:name="ce8" style:family="table-cell" style:parent-style-name="Default" style:data-style-name="N10103">
      <style:table-cell-properties fo:background-color="#eeeeee" style:diagonal-bl-tr="none" style:diagonal-tl-br="none" fo:border="0.74pt solid #999999" fo:padding="0.028in" style:rotation-align="none"/>
    </style:style>
    <style:style style:name="ce9" style:family="table-cell" style:parent-style-name="Default" style:data-style-name="N135">
      <style:table-cell-properties fo:background-color="#eeeeee" style:diagonal-bl-tr="none" style:diagonal-tl-br="none" fo:border="0.74pt solid #999999" fo:padding="0.028in" style:rotation-align="none"/>
    </style:style>
    <style:style style:name="ce51" style:family="table-cell" style:parent-style-name="Default" style:data-style-name="N4">
      <style:table-cell-properties fo:background-color="#eeeeee" style:diagonal-bl-tr="none" style:diagonal-tl-br="none" fo:border="0.74pt solid #999999" fo:padding="0.028in" style:rotation-align="none"/>
      <style:text-properties fo:font-weight="normal" style:font-weight-asian="normal" style:font-weight-complex="normal"/>
    </style:style>
    <style:style style:name="ce52" style:family="table-cell" style:parent-style-name="Default" style:data-style-name="N135">
      <style:table-cell-properties fo:background-color="#eeeeee" style:diagonal-bl-tr="none" style:diagonal-tl-br="none" fo:border="0.74pt solid #999999" fo:padding="0.028in" style:rotation-align="none"/>
      <style:text-properties fo:font-weight="normal" style:font-weight-asian="normal" style:font-weight-complex="normal"/>
    </style:style>
    <style:style style:name="ce32" style:family="table-cell" style:parent-style-name="Default" style:data-style-name="N103">
      <style:table-cell-properties fo:background-color="#eeeeee" style:diagonal-bl-tr="none" style:diagonal-tl-br="none" fo:border="0.74pt solid #999999" fo:padding="0.028in" style:rotation-align="none"/>
    </style:style>
    <style:style style:name="ce33" style:family="table-cell" style:parent-style-name="Default" style:data-style-name="N103"/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ackground-color="#eeeeee" style:diagonal-bl-tr="none" style:diagonal-tl-br="none" fo:border="0.74pt solid #999999" fo:padding="0.028in" style:rotation-align="none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#e6e6e6" fo:border="0.54pt solid #a0a0a0"/>
    </style:style>
    <style:style style:name="ce26" style:family="table-cell" style:parent-style-name="Default">
      <style:table-cell-properties fo:background-color="#e6e6e6" fo:border="0.54pt solid #a0a0a0"/>
    </style:style>
    <style:style style:name="ce46" style:family="table-cell" style:parent-style-name="Default" style:data-style-name="N103">
      <style:table-cell-properties fo:background-color="#e6e6e6" fo:border="0.54pt solid #a0a0a0"/>
      <style:text-properties fo:font-weight="normal" style:font-weight-asian="normal" style:font-weight-complex="normal"/>
    </style:style>
    <style:style style:name="ce39" style:family="table-cell" style:parent-style-name="Default" style:data-style-name="N175"/>
    <style:style style:name="ce40" style:family="table-cell" style:parent-style-name="Default" style:data-style-name="N175">
      <style:table-cell-properties fo:background-color="#e6e6e6" fo:border="0.54pt solid #a0a0a0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e6e6e6" fo:border="0.54pt solid #a0a0a0"/>
      <style:text-properties fo:font-weight="normal" style:font-weight-asian="normal" style:font-weight-complex="normal"/>
    </style:style>
    <style:style style:name="ce44" style:family="table-cell" style:parent-style-name="Default" style:data-style-name="N175">
      <style:text-properties fo:font-weight="normal" style:font-weight-asian="normal" style:font-weight-complex="normal"/>
    </style:style>
    <style:style style:name="ce45" style:family="table-cell" style:parent-style-name="Default" style:data-style-name="N175">
      <style:table-cell-properties fo:background-color="#e6e6e6" fo:border="0.54pt solid #a0a0a0"/>
      <style:text-properties fo:font-weight="normal" style:font-weight-asian="normal" style:font-weight-complex="normal"/>
    </style:style>
    <style:style style:name="ce47" style:family="table-cell" style:parent-style-name="Default" style:data-style-name="N17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antation examp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2" table:default-cell-style-name="ce2"/>
        <table:table-column table:style-name="co2" table:number-columns-repeated="16131"/>
        <table:table-row table:style-name="ro1">
          <table:table-cell table:style-name="ce1" office:value-type="string" calcext:value-type="string">
            <text:p>Busch 2024 plantation example (same baseline pixel assumptions as NR sheet)</text:p>
          </table:table-cell>
          <table:table-cell table:style-name="ce1"/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Default" table:number-columns-repeated="2"/>
          <table:table-cell/>
          <table:table-cell table:style-name="Default" office:value-type="string" calcext:value-type="string">
            <text:p>omega[2125], $m/000C</text:p>
          </table:table-cell>
          <table:table-cell table:style-name="ce33" office:value-type="currency" office:currency="USD" office:value="10000" calcext:value-type="currency">
            <text:p>$10,000</text:p>
          </table:table-cell>
          <table:table-cell table:number-columns-repeated="24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iso</text:p>
          </table:table-cell>
          <table:table-cell table:style-name="ce21" office:value-type="string" calcext:value-type="string">
            <text:p>BRA</text:p>
          </table:table-cell>
          <table:table-cell/>
          <table:table-cell table:style-name="ce21" office:value-type="string" calcext:value-type="string">
            <text:p>Bid</text:p>
          </table:table-cell>
          <table:table-cell table:style-name="ce34" office:value-type="string" calcext:value-type="string">
            <text:p>Omega value</text:p>
          </table:table-cell>
          <table:table-cell table:style-name="Default" office:value-type="string" calcext:value-type="string">
            <text:p>Omega_value - bid</text:p>
          </table:table-cell>
          <table:table-cell table:number-columns-repeated="247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_genus</text:p>
          </table:table-cell>
          <table:table-cell table:style-name="ce21" office:value-type="string" calcext:value-type="string">
            <text:p>pinu</text:p>
          </table:table-cell>
          <table:table-cell/>
          <table:table-cell table:style-name="ce32" table:formula="of:=[.C47]" office:value-type="currency" office:currency="USD" office:value="2197.22856550931" calcext:value-type="currency">
            <text:p>$2,197</text:p>
          </table:table-cell>
          <table:table-cell table:style-name="ce32" table:formula="of:=MAX([#REF!])" office:value-type="string" office:string-value="" calcext:value-type="error">
            <text:p>#REF!</text:p>
          </table:table-cell>
          <table:table-cell table:style-name="ce33" table:formula="of:=[.E4]-[.D4]" office:value-type="string" office:string-value="" calcext:value-type="error">
            <text:p>#REF!</text:p>
          </table:table-cell>
          <table:table-cell table:style-name="Default" table:number-columns-repeated="119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elected_plantation_rotation_year (mapped)</text:p>
          </table:table-cell>
          <table:table-cell table:style-name="ce25" office:value-type="float" office:value="120" calcext:value-type="float">
            <text:p>120</text:p>
          </table:table-cell>
          <table:table-cell table:style-name="ce3" table:number-columns-repeated="2"/>
          <table:table-cell table:style-name="ce55" office:value-type="string" calcext:value-type="string">
            <text:p>Best contract_length, years:</text:p>
          </table:table-cell>
          <table:table-cell table:style-name="ce57" table:formula="of:=MATCH([.E4];[#REF!];0)" office:value-type="string" office:string-value="" calcext:value-type="error">
            <text:p>#REF!</text:p>
          </table:table-cell>
          <table:table-cell table:style-name="Default" table:number-columns-repeated="119"/>
          <table:table-cell table:number-columns-repeated="12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hapman growth factor, pl_A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hapman growth factor, pl_k</text:p>
          </table:table-cell>
          <table:table-cell office:value-type="float" office:value="0.03" calcext:value-type="float">
            <text:p>0.03</text:p>
          </table:table-cell>
          <table:table-cell table:style-name="Default"/>
          <table:table-cell/>
          <table:table-cell table:style-name="Default" table:number-columns-repeated="121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4" office:value-type="string" calcext:value-type="string">
            <text:p>PLANTATION_SOIL_C</text:p>
          </table:table-cell>
          <table:table-cell office:value-type="float" office:value="0.092749069" calcext:value-type="float">
            <text:p>0.092749069</text:p>
          </table:table-cell>
          <table:table-cell table:number-columns-repeated="2"/>
          <table:table-cell table:style-name="Default" table:number-columns-repeated="121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0" office:value-type="string" calcext:value-type="string">
            <text:p>pl_rootshoot</text:p>
          </table:table-cell>
          <table:table-cell office:value-type="float" office:value="0.26" calcext:value-type="float">
            <text:p>0.26</text:p>
          </table:table-cell>
          <table:table-cell table:style-name="Default" table:number-columns-repeated="123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0" office:value-type="string" calcext:value-type="string">
            <text:p>w (wood storage share)</text:p>
          </table:table-cell>
          <table:table-cell office:value-type="float" office:value="0.268" calcext:value-type="float">
            <text:p>0.268</text:p>
          </table:table-cell>
          <table:table-cell table:style-name="Default" table:number-columns-repeated="123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A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B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 table:number-columns-repeated="122"/>
          <table:table-cell table:number-columns-repeated="128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SOIL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11" office:value-type="string" calcext:value-type="string">
            <text:p>HARVEST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number-columns-repeated="3"/>
          <table:table-cell office:value-type="string" calcext:value-type="string">
            <text:p>Present value of harvest revenue is small, while the warming impact is large. Never harvest!</text:p>
          </table:table-cell>
          <table:table-cell table:number-columns-repeated="246"/>
          <table:table-cell table:style-name="Default" table:number-columns-repeated="16131"/>
        </table:table-row>
        <table:table-row table:style-name="ro1">
          <table:table-cell table:style-name="ce19"/>
          <table:table-cell table:style-name="Default" table:number-columns-repeated="2"/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g_harvested_cum_tC_per_ha</text:p>
          </table:table-cell>
          <table:table-cell table:style-name="ce13" table:formula="of:=[.$B$6]*(1-EXP(-[.$B$7]*[.B$16]))^2*IF([.B16]=[.$B$5];1;0)" office:value-type="float" office:value="0" calcext:value-type="float">
            <text:p>0.00</text:p>
          </table:table-cell>
          <table:table-cell table:style-name="ce13" table:formula="of:=[.B$17]+[.$B$6]*(1-EXP(-[.$B$7]*[.C$16]))^2*IF([.C16]=[.$B$5];1;0)" office:value-type="float" office:value="0" calcext:value-type="float">
            <text:p>0.00</text:p>
          </table:table-cell>
          <table:table-cell table:style-name="ce13" table:formula="of:=[.C$17]+[.$B$6]*(1-EXP(-[.$B$7]*[.D$16]))^2*IF([.D16]=[.$B$5];1;0)" office:value-type="float" office:value="0" calcext:value-type="float">
            <text:p>0.00</text:p>
          </table:table-cell>
          <table:table-cell table:style-name="ce13" table:formula="of:=[.D$17]+[.$B$6]*(1-EXP(-[.$B$7]*[.E$16]))^2*IF([.E16]=[.$B$5];1;0)" office:value-type="float" office:value="0" calcext:value-type="float">
            <text:p>0.00</text:p>
          </table:table-cell>
          <table:table-cell table:style-name="ce13" table:formula="of:=[.E$17]+[.$B$6]*(1-EXP(-[.$B$7]*[.F$16]))^2*IF([.F16]=[.$B$5];1;0)" office:value-type="float" office:value="0" calcext:value-type="float">
            <text:p>0.00</text:p>
          </table:table-cell>
          <table:table-cell table:style-name="ce13" table:formula="of:=[.F$17]+[.$B$6]*(1-EXP(-[.$B$7]*[.G$16]))^2*IF([.G16]=[.$B$5];1;0)" office:value-type="float" office:value="0" calcext:value-type="float">
            <text:p>0.00</text:p>
          </table:table-cell>
          <table:table-cell table:style-name="ce13" table:formula="of:=[.G$17]+[.$B$6]*(1-EXP(-[.$B$7]*[.H$16]))^2*IF([.H16]=[.$B$5];1;0)" office:value-type="float" office:value="0" calcext:value-type="float">
            <text:p>0.00</text:p>
          </table:table-cell>
          <table:table-cell table:style-name="ce13" table:formula="of:=[.H$17]+[.$B$6]*(1-EXP(-[.$B$7]*[.I$16]))^2*IF([.I16]=[.$B$5];1;0)" office:value-type="float" office:value="0" calcext:value-type="float">
            <text:p>0.00</text:p>
          </table:table-cell>
          <table:table-cell table:style-name="ce13" table:formula="of:=[.I$17]+[.$B$6]*(1-EXP(-[.$B$7]*[.J$16]))^2*IF([.J16]=[.$B$5];1;0)" office:value-type="float" office:value="0" calcext:value-type="float">
            <text:p>0.00</text:p>
          </table:table-cell>
          <table:table-cell table:style-name="ce13" table:formula="of:=[.J$17]+[.$B$6]*(1-EXP(-[.$B$7]*[.K$16]))^2*IF([.K16]=[.$B$5];1;0)" office:value-type="float" office:value="0" calcext:value-type="float">
            <text:p>0.00</text:p>
          </table:table-cell>
          <table:table-cell table:style-name="ce13" table:formula="of:=[.K$17]+[.$B$6]*(1-EXP(-[.$B$7]*[.L$16]))^2*IF([.L16]=[.$B$5];1;0)" office:value-type="float" office:value="0" calcext:value-type="float">
            <text:p>0.00</text:p>
          </table:table-cell>
          <table:table-cell table:style-name="ce13" table:formula="of:=[.L$17]+[.$B$6]*(1-EXP(-[.$B$7]*[.M$16]))^2*IF([.M16]=[.$B$5];1;0)" office:value-type="float" office:value="0" calcext:value-type="float">
            <text:p>0.00</text:p>
          </table:table-cell>
          <table:table-cell table:style-name="ce13" table:formula="of:=[.M$17]+[.$B$6]*(1-EXP(-[.$B$7]*[.N$16]))^2*IF([.N16]=[.$B$5];1;0)" office:value-type="float" office:value="0" calcext:value-type="float">
            <text:p>0.00</text:p>
          </table:table-cell>
          <table:table-cell table:style-name="ce13" table:formula="of:=[.N$17]+[.$B$6]*(1-EXP(-[.$B$7]*[.O$16]))^2*IF([.O16]=[.$B$5];1;0)" office:value-type="float" office:value="0" calcext:value-type="float">
            <text:p>0.00</text:p>
          </table:table-cell>
          <table:table-cell table:style-name="ce13" table:formula="of:=[.O$17]+[.$B$6]*(1-EXP(-[.$B$7]*[.P$16]))^2*IF([.P16]=[.$B$5];1;0)" office:value-type="float" office:value="0" calcext:value-type="float">
            <text:p>0.00</text:p>
          </table:table-cell>
          <table:table-cell table:style-name="ce13" table:formula="of:=[.P$17]+[.$B$6]*(1-EXP(-[.$B$7]*[.Q$16]))^2*IF([.Q16]=[.$B$5];1;0)" office:value-type="float" office:value="0" calcext:value-type="float">
            <text:p>0.00</text:p>
          </table:table-cell>
          <table:table-cell table:style-name="ce13" table:formula="of:=[.Q$17]+[.$B$6]*(1-EXP(-[.$B$7]*[.R$16]))^2*IF([.R16]=[.$B$5];1;0)" office:value-type="float" office:value="0" calcext:value-type="float">
            <text:p>0.00</text:p>
          </table:table-cell>
          <table:table-cell table:style-name="ce13" table:formula="of:=[.R$17]+[.$B$6]*(1-EXP(-[.$B$7]*[.S$16]))^2*IF([.S16]=[.$B$5];1;0)" office:value-type="float" office:value="0" calcext:value-type="float">
            <text:p>0.00</text:p>
          </table:table-cell>
          <table:table-cell table:style-name="ce13" table:formula="of:=[.S$17]+[.$B$6]*(1-EXP(-[.$B$7]*[.T$16]))^2*IF([.T16]=[.$B$5];1;0)" office:value-type="float" office:value="0" calcext:value-type="float">
            <text:p>0.00</text:p>
          </table:table-cell>
          <table:table-cell table:style-name="ce13" table:formula="of:=[.T$17]+[.$B$6]*(1-EXP(-[.$B$7]*[.U$16]))^2*IF([.U16]=[.$B$5];1;0)" office:value-type="float" office:value="0" calcext:value-type="float">
            <text:p>0.00</text:p>
          </table:table-cell>
          <table:table-cell table:style-name="ce13" table:formula="of:=[.U$17]+[.$B$6]*(1-EXP(-[.$B$7]*[.V$16]))^2*IF([.V16]=[.$B$5];1;0)" office:value-type="float" office:value="0" calcext:value-type="float">
            <text:p>0.00</text:p>
          </table:table-cell>
          <table:table-cell table:style-name="ce13" table:formula="of:=[.V$17]+[.$B$6]*(1-EXP(-[.$B$7]*[.W$16]))^2*IF([.W16]=[.$B$5];1;0)" office:value-type="float" office:value="0" calcext:value-type="float">
            <text:p>0.00</text:p>
          </table:table-cell>
          <table:table-cell table:style-name="ce13" table:formula="of:=[.W$17]+[.$B$6]*(1-EXP(-[.$B$7]*[.X$16]))^2*IF([.X16]=[.$B$5];1;0)" office:value-type="float" office:value="0" calcext:value-type="float">
            <text:p>0.00</text:p>
          </table:table-cell>
          <table:table-cell table:style-name="ce13" table:formula="of:=[.X$17]+[.$B$6]*(1-EXP(-[.$B$7]*[.Y$16]))^2*IF([.Y16]=[.$B$5];1;0)" office:value-type="float" office:value="0" calcext:value-type="float">
            <text:p>0.00</text:p>
          </table:table-cell>
          <table:table-cell table:style-name="ce13" table:formula="of:=[.Y$17]+[.$B$6]*(1-EXP(-[.$B$7]*[.Z$16]))^2*IF([.Z16]=[.$B$5];1;0)" office:value-type="float" office:value="0" calcext:value-type="float">
            <text:p>0.00</text:p>
          </table:table-cell>
          <table:table-cell table:style-name="ce13" table:formula="of:=[.Z$17]+[.$B$6]*(1-EXP(-[.$B$7]*[.AA$16]))^2*IF([.AA16]=[.$B$5];1;0)" office:value-type="float" office:value="0" calcext:value-type="float">
            <text:p>0.00</text:p>
          </table:table-cell>
          <table:table-cell table:style-name="ce13" table:formula="of:=[.AA$17]+[.$B$6]*(1-EXP(-[.$B$7]*[.AB$16]))^2*IF([.AB16]=[.$B$5];1;0)" office:value-type="float" office:value="0" calcext:value-type="float">
            <text:p>0.00</text:p>
          </table:table-cell>
          <table:table-cell table:style-name="ce13" table:formula="of:=[.AB$17]+[.$B$6]*(1-EXP(-[.$B$7]*[.AC$16]))^2*IF([.AC16]=[.$B$5];1;0)" office:value-type="float" office:value="0" calcext:value-type="float">
            <text:p>0.00</text:p>
          </table:table-cell>
          <table:table-cell table:style-name="ce13" table:formula="of:=[.AC$17]+[.$B$6]*(1-EXP(-[.$B$7]*[.AD$16]))^2*IF([.AD16]=[.$B$5];1;0)" office:value-type="float" office:value="0" calcext:value-type="float">
            <text:p>0.00</text:p>
          </table:table-cell>
          <table:table-cell table:style-name="ce13" table:formula="of:=[.AD$17]+[.$B$6]*(1-EXP(-[.$B$7]*[.AE$16]))^2*IF([.AE16]=[.$B$5];1;0)" office:value-type="float" office:value="0" calcext:value-type="float">
            <text:p>0.00</text:p>
          </table:table-cell>
          <table:table-cell table:style-name="ce13" table:formula="of:=[.AE$17]+[.$B$6]*(1-EXP(-[.$B$7]*[.AF$16]))^2*IF([.AF16]=[.$B$5];1;0)" office:value-type="float" office:value="0" calcext:value-type="float">
            <text:p>0.00</text:p>
          </table:table-cell>
          <table:table-cell table:style-name="ce13" table:formula="of:=[.$B$6]*(1-EXP(-[.$B$7]*[.AG$16]))^2*IF([.AG16]=[.$B$5];1;0)" office:value-type="float" office:value="0" calcext:value-type="float">
            <text:p>0.00</text:p>
          </table:table-cell>
          <table:table-cell table:style-name="ce13" table:formula="of:=[.AG$17]+[.$B$6]*(1-EXP(-[.$B$7]*[.AH$16]))^2*IF([.AH16]=[.$B$5];1;0)" office:value-type="float" office:value="0" calcext:value-type="float">
            <text:p>0.00</text:p>
          </table:table-cell>
          <table:table-cell table:style-name="ce13" table:formula="of:=[.AH$17]+[.$B$6]*(1-EXP(-[.$B$7]*[.AI$16]))^2*IF([.AI16]=[.$B$5];1;0)" office:value-type="float" office:value="0" calcext:value-type="float">
            <text:p>0.00</text:p>
          </table:table-cell>
          <table:table-cell table:style-name="ce13" table:formula="of:=[.AI$17]+[.$B$6]*(1-EXP(-[.$B$7]*[.AJ$16]))^2*IF([.AJ16]=[.$B$5];1;0)" office:value-type="float" office:value="0" calcext:value-type="float">
            <text:p>0.00</text:p>
          </table:table-cell>
          <table:table-cell table:style-name="ce13" table:formula="of:=[.AJ$17]+[.$B$6]*(1-EXP(-[.$B$7]*[.AK$16]))^2*IF([.AK16]=[.$B$5];1;0)" office:value-type="float" office:value="0" calcext:value-type="float">
            <text:p>0.00</text:p>
          </table:table-cell>
          <table:table-cell table:style-name="ce13" table:formula="of:=[.AK$17]+[.$B$6]*(1-EXP(-[.$B$7]*[.AL$16]))^2*IF([.AL16]=[.$B$5];1;0)" office:value-type="float" office:value="0" calcext:value-type="float">
            <text:p>0.00</text:p>
          </table:table-cell>
          <table:table-cell table:style-name="ce13" table:formula="of:=[.AL$17]+[.$B$6]*(1-EXP(-[.$B$7]*[.AM$16]))^2*IF([.AM16]=[.$B$5];1;0)" office:value-type="float" office:value="0" calcext:value-type="float">
            <text:p>0.00</text:p>
          </table:table-cell>
          <table:table-cell table:style-name="ce13" table:formula="of:=[.AM$17]+[.$B$6]*(1-EXP(-[.$B$7]*[.AN$16]))^2*IF([.AN16]=[.$B$5];1;0)" office:value-type="float" office:value="0" calcext:value-type="float">
            <text:p>0.00</text:p>
          </table:table-cell>
          <table:table-cell table:style-name="ce13" table:formula="of:=[.AN$17]+[.$B$6]*(1-EXP(-[.$B$7]*[.AO$16]))^2*IF([.AO16]=[.$B$5];1;0)" office:value-type="float" office:value="0" calcext:value-type="float">
            <text:p>0.00</text:p>
          </table:table-cell>
          <table:table-cell table:style-name="ce13" table:formula="of:=[.AO$17]+[.$B$6]*(1-EXP(-[.$B$7]*[.AP$16]))^2*IF([.AP16]=[.$B$5];1;0)" office:value-type="float" office:value="0" calcext:value-type="float">
            <text:p>0.00</text:p>
          </table:table-cell>
          <table:table-cell table:style-name="ce13" table:formula="of:=[.AP$17]+[.$B$6]*(1-EXP(-[.$B$7]*[.AQ$16]))^2*IF([.AQ16]=[.$B$5];1;0)" office:value-type="float" office:value="0" calcext:value-type="float">
            <text:p>0.00</text:p>
          </table:table-cell>
          <table:table-cell table:style-name="ce13" table:formula="of:=[.AQ$17]+[.$B$6]*(1-EXP(-[.$B$7]*[.AR$16]))^2*IF([.AR16]=[.$B$5];1;0)" office:value-type="float" office:value="0" calcext:value-type="float">
            <text:p>0.00</text:p>
          </table:table-cell>
          <table:table-cell table:style-name="ce13" table:formula="of:=[.AR$17]+[.$B$6]*(1-EXP(-[.$B$7]*[.AS$16]))^2*IF([.AS16]=[.$B$5];1;0)" office:value-type="float" office:value="0" calcext:value-type="float">
            <text:p>0.00</text:p>
          </table:table-cell>
          <table:table-cell table:style-name="ce13" table:formula="of:=[.AS$17]+[.$B$6]*(1-EXP(-[.$B$7]*[.AT$16]))^2*IF([.AT16]=[.$B$5];1;0)" office:value-type="float" office:value="0" calcext:value-type="float">
            <text:p>0.00</text:p>
          </table:table-cell>
          <table:table-cell table:style-name="ce13" table:formula="of:=[.AT$17]+[.$B$6]*(1-EXP(-[.$B$7]*[.AU$16]))^2*IF([.AU16]=[.$B$5];1;0)" office:value-type="float" office:value="0" calcext:value-type="float">
            <text:p>0.00</text:p>
          </table:table-cell>
          <table:table-cell table:style-name="ce13" table:formula="of:=[.AU$17]+[.$B$6]*(1-EXP(-[.$B$7]*[.AV$16]))^2*IF([.AV16]=[.$B$5];1;0)" office:value-type="float" office:value="0" calcext:value-type="float">
            <text:p>0.00</text:p>
          </table:table-cell>
          <table:table-cell table:style-name="ce13" table:formula="of:=[.AV$17]+[.$B$6]*(1-EXP(-[.$B$7]*[.AW$16]))^2*IF([.AW16]=[.$B$5];1;0)" office:value-type="float" office:value="0" calcext:value-type="float">
            <text:p>0.00</text:p>
          </table:table-cell>
          <table:table-cell table:style-name="ce13" table:formula="of:=[.AW$17]+[.$B$6]*(1-EXP(-[.$B$7]*[.AX$16]))^2*IF([.AX16]=[.$B$5];1;0)" office:value-type="float" office:value="0" calcext:value-type="float">
            <text:p>0.00</text:p>
          </table:table-cell>
          <table:table-cell table:style-name="ce13" table:formula="of:=[.AX$17]+[.$B$6]*(1-EXP(-[.$B$7]*[.AY$16]))^2*IF([.AY16]=[.$B$5];1;0)" office:value-type="float" office:value="0" calcext:value-type="float">
            <text:p>0.00</text:p>
          </table:table-cell>
          <table:table-cell table:style-name="ce13" table:formula="of:=[.AY$17]+[.$B$6]*(1-EXP(-[.$B$7]*[.AZ$16]))^2*IF([.AZ16]=[.$B$5];1;0)" office:value-type="float" office:value="0" calcext:value-type="float">
            <text:p>0.00</text:p>
          </table:table-cell>
          <table:table-cell table:style-name="ce13" table:formula="of:=[.AZ$17]+[.$B$6]*(1-EXP(-[.$B$7]*[.BA$16]))^2*IF([.BA16]=[.$B$5];1;0)" office:value-type="float" office:value="0" calcext:value-type="float">
            <text:p>0.00</text:p>
          </table:table-cell>
          <table:table-cell table:style-name="ce13" table:formula="of:=[.BA$17]+[.$B$6]*(1-EXP(-[.$B$7]*[.BB$16]))^2*IF([.BB16]=[.$B$5];1;0)" office:value-type="float" office:value="0" calcext:value-type="float">
            <text:p>0.00</text:p>
          </table:table-cell>
          <table:table-cell table:style-name="ce13" table:formula="of:=[.BB$17]+[.$B$6]*(1-EXP(-[.$B$7]*[.BC$16]))^2*IF([.BC16]=[.$B$5];1;0)" office:value-type="float" office:value="0" calcext:value-type="float">
            <text:p>0.00</text:p>
          </table:table-cell>
          <table:table-cell table:style-name="ce13" table:formula="of:=[.BC$17]+[.$B$6]*(1-EXP(-[.$B$7]*[.BD$16]))^2*IF([.BD16]=[.$B$5];1;0)" office:value-type="float" office:value="0" calcext:value-type="float">
            <text:p>0.00</text:p>
          </table:table-cell>
          <table:table-cell table:style-name="ce13" table:formula="of:=[.BD$17]+[.$B$6]*(1-EXP(-[.$B$7]*[.BE$16]))^2*IF([.BE16]=[.$B$5];1;0)" office:value-type="float" office:value="0" calcext:value-type="float">
            <text:p>0.00</text:p>
          </table:table-cell>
          <table:table-cell table:style-name="ce13" table:formula="of:=[.BE$17]+[.$B$6]*(1-EXP(-[.$B$7]*[.BF$16]))^2*IF([.BF16]=[.$B$5];1;0)" office:value-type="float" office:value="0" calcext:value-type="float">
            <text:p>0.00</text:p>
          </table:table-cell>
          <table:table-cell table:style-name="ce13" table:formula="of:=[.BF$17]+[.$B$6]*(1-EXP(-[.$B$7]*[.BG$16]))^2*IF([.BG16]=[.$B$5];1;0)" office:value-type="float" office:value="0" calcext:value-type="float">
            <text:p>0.00</text:p>
          </table:table-cell>
          <table:table-cell table:style-name="ce13" table:formula="of:=[.BG$17]+[.$B$6]*(1-EXP(-[.$B$7]*[.BH$16]))^2*IF([.BH16]=[.$B$5];1;0)" office:value-type="float" office:value="0" calcext:value-type="float">
            <text:p>0.00</text:p>
          </table:table-cell>
          <table:table-cell table:style-name="ce13" table:formula="of:=[.BH$17]+[.$B$6]*(1-EXP(-[.$B$7]*[.BI$16]))^2*IF([.BI16]=[.$B$5];1;0)" office:value-type="float" office:value="0" calcext:value-type="float">
            <text:p>0.00</text:p>
          </table:table-cell>
          <table:table-cell table:style-name="ce13" table:formula="of:=[.BI$17]+[.$B$6]*(1-EXP(-[.$B$7]*[.BJ$16]))^2*IF([.BJ16]=[.$B$5];1;0)" office:value-type="float" office:value="0" calcext:value-type="float">
            <text:p>0.00</text:p>
          </table:table-cell>
          <table:table-cell table:style-name="ce13" table:formula="of:=[.BJ$17]+[.$B$6]*(1-EXP(-[.$B$7]*[.BK$16]))^2*IF([.BK16]=[.$B$5];1;0)" office:value-type="float" office:value="0" calcext:value-type="float">
            <text:p>0.00</text:p>
          </table:table-cell>
          <table:table-cell table:style-name="ce13" table:formula="of:=[.BK$17]+[.$B$6]*(1-EXP(-[.$B$7]*[.BL$16]))^2*IF([.BL16]=[.$B$5];1;0)" office:value-type="float" office:value="0" calcext:value-type="float">
            <text:p>0.00</text:p>
          </table:table-cell>
          <table:table-cell table:style-name="ce13" table:formula="of:=[.BL$17]+[.$B$6]*(1-EXP(-[.$B$7]*[.BM$16]))^2*IF([.BM16]=[.$B$5];1;0)" office:value-type="float" office:value="0" calcext:value-type="float">
            <text:p>0.00</text:p>
          </table:table-cell>
          <table:table-cell table:style-name="ce13" table:formula="of:=[.BM$17]+[.$B$6]*(1-EXP(-[.$B$7]*[.BN$16]))^2*IF([.BN16]=[.$B$5];1;0)" office:value-type="float" office:value="0" calcext:value-type="float">
            <text:p>0.00</text:p>
          </table:table-cell>
          <table:table-cell table:style-name="ce13" table:formula="of:=[.BN$17]+[.$B$6]*(1-EXP(-[.$B$7]*[.BO$16]))^2*IF([.BO16]=[.$B$5];1;0)" office:value-type="float" office:value="0" calcext:value-type="float">
            <text:p>0.00</text:p>
          </table:table-cell>
          <table:table-cell table:style-name="ce13" table:formula="of:=[.BO$17]+[.$B$6]*(1-EXP(-[.$B$7]*[.BP$16]))^2*IF([.BP16]=[.$B$5];1;0)" office:value-type="float" office:value="0" calcext:value-type="float">
            <text:p>0.00</text:p>
          </table:table-cell>
          <table:table-cell table:style-name="ce13" table:formula="of:=[.BP$17]+[.$B$6]*(1-EXP(-[.$B$7]*[.BQ$16]))^2*IF([.BQ16]=[.$B$5];1;0)" office:value-type="float" office:value="0" calcext:value-type="float">
            <text:p>0.00</text:p>
          </table:table-cell>
          <table:table-cell table:style-name="ce13" table:formula="of:=[.BQ$17]+[.$B$6]*(1-EXP(-[.$B$7]*[.BR$16]))^2*IF([.BR16]=[.$B$5];1;0)" office:value-type="float" office:value="0" calcext:value-type="float">
            <text:p>0.00</text:p>
          </table:table-cell>
          <table:table-cell table:style-name="ce13" table:formula="of:=[.BR$17]+[.$B$6]*(1-EXP(-[.$B$7]*[.BS$16]))^2*IF([.BS16]=[.$B$5];1;0)" office:value-type="float" office:value="0" calcext:value-type="float">
            <text:p>0.00</text:p>
          </table:table-cell>
          <table:table-cell table:style-name="ce13" table:formula="of:=[.BS$17]+[.$B$6]*(1-EXP(-[.$B$7]*[.BT$16]))^2*IF([.BT16]=[.$B$5];1;0)" office:value-type="float" office:value="0" calcext:value-type="float">
            <text:p>0.00</text:p>
          </table:table-cell>
          <table:table-cell table:style-name="ce13" table:formula="of:=[.BT$17]+[.$B$6]*(1-EXP(-[.$B$7]*[.BU$16]))^2*IF([.BU16]=[.$B$5];1;0)" office:value-type="float" office:value="0" calcext:value-type="float">
            <text:p>0.00</text:p>
          </table:table-cell>
          <table:table-cell table:style-name="ce13" table:formula="of:=[.BU$17]+[.$B$6]*(1-EXP(-[.$B$7]*[.BV$16]))^2*IF([.BV16]=[.$B$5];1;0)" office:value-type="float" office:value="0" calcext:value-type="float">
            <text:p>0.00</text:p>
          </table:table-cell>
          <table:table-cell table:style-name="ce13" table:formula="of:=[.BV$17]+[.$B$6]*(1-EXP(-[.$B$7]*[.BW$16]))^2*IF([.BW16]=[.$B$5];1;0)" office:value-type="float" office:value="0" calcext:value-type="float">
            <text:p>0.00</text:p>
          </table:table-cell>
          <table:table-cell table:style-name="ce13" table:formula="of:=[.BW$17]+[.$B$6]*(1-EXP(-[.$B$7]*[.BX$16]))^2*IF([.BX16]=[.$B$5];1;0)" office:value-type="float" office:value="0" calcext:value-type="float">
            <text:p>0.00</text:p>
          </table:table-cell>
          <table:table-cell table:style-name="ce13" table:formula="of:=[.BX$17]+[.$B$6]*(1-EXP(-[.$B$7]*[.BY$16]))^2*IF([.BY16]=[.$B$5];1;0)" office:value-type="float" office:value="0" calcext:value-type="float">
            <text:p>0.00</text:p>
          </table:table-cell>
          <table:table-cell table:style-name="ce13" table:formula="of:=[.BY$17]+[.$B$6]*(1-EXP(-[.$B$7]*[.BZ$16]))^2*IF([.BZ16]=[.$B$5];1;0)" office:value-type="float" office:value="0" calcext:value-type="float">
            <text:p>0.00</text:p>
          </table:table-cell>
          <table:table-cell table:style-name="ce13" table:formula="of:=[.BZ$17]+[.$B$6]*(1-EXP(-[.$B$7]*[.CA$16]))^2*IF([.CA16]=[.$B$5];1;0)" office:value-type="float" office:value="0" calcext:value-type="float">
            <text:p>0.00</text:p>
          </table:table-cell>
          <table:table-cell table:style-name="ce13" table:formula="of:=[.CA$17]+[.$B$6]*(1-EXP(-[.$B$7]*[.CB$16]))^2*IF([.CB16]=[.$B$5];1;0)" office:value-type="float" office:value="0" calcext:value-type="float">
            <text:p>0.00</text:p>
          </table:table-cell>
          <table:table-cell table:style-name="ce13" table:formula="of:=[.CB$17]+[.$B$6]*(1-EXP(-[.$B$7]*[.CC$16]))^2*IF([.CC16]=[.$B$5];1;0)" office:value-type="float" office:value="0" calcext:value-type="float">
            <text:p>0.00</text:p>
          </table:table-cell>
          <table:table-cell table:style-name="ce13" table:formula="of:=[.CC$17]+[.$B$6]*(1-EXP(-[.$B$7]*[.CD$16]))^2*IF([.CD16]=[.$B$5];1;0)" office:value-type="float" office:value="0" calcext:value-type="float">
            <text:p>0.00</text:p>
          </table:table-cell>
          <table:table-cell table:style-name="ce13" table:formula="of:=[.CD$17]+[.$B$6]*(1-EXP(-[.$B$7]*[.CE$16]))^2*IF([.CE16]=[.$B$5];1;0)" office:value-type="float" office:value="0" calcext:value-type="float">
            <text:p>0.00</text:p>
          </table:table-cell>
          <table:table-cell table:style-name="ce13" table:formula="of:=[.CE$17]+[.$B$6]*(1-EXP(-[.$B$7]*[.CF$16]))^2*IF([.CF16]=[.$B$5];1;0)" office:value-type="float" office:value="0" calcext:value-type="float">
            <text:p>0.00</text:p>
          </table:table-cell>
          <table:table-cell table:style-name="ce13" table:formula="of:=[.CF$17]+[.$B$6]*(1-EXP(-[.$B$7]*[.CG$16]))^2*IF([.CG16]=[.$B$5];1;0)" office:value-type="float" office:value="0" calcext:value-type="float">
            <text:p>0.00</text:p>
          </table:table-cell>
          <table:table-cell table:style-name="ce13" table:formula="of:=[.CG$17]+[.$B$6]*(1-EXP(-[.$B$7]*[.CH$16]))^2*IF([.CH16]=[.$B$5];1;0)" office:value-type="float" office:value="0" calcext:value-type="float">
            <text:p>0.00</text:p>
          </table:table-cell>
          <table:table-cell table:style-name="ce13" table:formula="of:=[.CH$17]+[.$B$6]*(1-EXP(-[.$B$7]*[.CI$16]))^2*IF([.CI16]=[.$B$5];1;0)" office:value-type="float" office:value="0" calcext:value-type="float">
            <text:p>0.00</text:p>
          </table:table-cell>
          <table:table-cell table:style-name="ce13" table:formula="of:=[.CI$17]+[.$B$6]*(1-EXP(-[.$B$7]*[.CJ$16]))^2*IF([.CJ16]=[.$B$5];1;0)" office:value-type="float" office:value="0" calcext:value-type="float">
            <text:p>0.00</text:p>
          </table:table-cell>
          <table:table-cell table:style-name="ce13" table:formula="of:=[.CJ$17]+[.$B$6]*(1-EXP(-[.$B$7]*[.CK$16]))^2*IF([.CK16]=[.$B$5];1;0)" office:value-type="float" office:value="0" calcext:value-type="float">
            <text:p>0.00</text:p>
          </table:table-cell>
          <table:table-cell table:style-name="ce13" table:formula="of:=[.CK$17]+[.$B$6]*(1-EXP(-[.$B$7]*[.CL$16]))^2*IF([.CL16]=[.$B$5];1;0)" office:value-type="float" office:value="0" calcext:value-type="float">
            <text:p>0.00</text:p>
          </table:table-cell>
          <table:table-cell table:style-name="ce13" table:formula="of:=[.CL$17]+[.$B$6]*(1-EXP(-[.$B$7]*[.CM$16]))^2*IF([.CM16]=[.$B$5];1;0)" office:value-type="float" office:value="0" calcext:value-type="float">
            <text:p>0.00</text:p>
          </table:table-cell>
          <table:table-cell table:style-name="ce13" table:formula="of:=[.CM$17]+[.$B$6]*(1-EXP(-[.$B$7]*[.CN$16]))^2*IF([.CN16]=[.$B$5];1;0)" office:value-type="float" office:value="0" calcext:value-type="float">
            <text:p>0.00</text:p>
          </table:table-cell>
          <table:table-cell table:style-name="ce13" table:formula="of:=[.CN$17]+[.$B$6]*(1-EXP(-[.$B$7]*[.CO$16]))^2*IF([.CO16]=[.$B$5];1;0)" office:value-type="float" office:value="0" calcext:value-type="float">
            <text:p>0.00</text:p>
          </table:table-cell>
          <table:table-cell table:style-name="ce13" table:formula="of:=[.CO$17]+[.$B$6]*(1-EXP(-[.$B$7]*[.CP$16]))^2*IF([.CP16]=[.$B$5];1;0)" office:value-type="float" office:value="0" calcext:value-type="float">
            <text:p>0.00</text:p>
          </table:table-cell>
          <table:table-cell table:style-name="ce13" table:formula="of:=[.CP$17]+[.$B$6]*(1-EXP(-[.$B$7]*[.CQ$16]))^2*IF([.CQ16]=[.$B$5];1;0)" office:value-type="float" office:value="0" calcext:value-type="float">
            <text:p>0.00</text:p>
          </table:table-cell>
          <table:table-cell table:style-name="ce13" table:formula="of:=[.CQ$17]+[.$B$6]*(1-EXP(-[.$B$7]*[.CR$16]))^2*IF([.CR16]=[.$B$5];1;0)" office:value-type="float" office:value="0" calcext:value-type="float">
            <text:p>0.00</text:p>
          </table:table-cell>
          <table:table-cell table:style-name="ce13" table:formula="of:=[.CR$17]+[.$B$6]*(1-EXP(-[.$B$7]*[.CS$16]))^2*IF([.CS16]=[.$B$5];1;0)" office:value-type="float" office:value="0" calcext:value-type="float">
            <text:p>0.00</text:p>
          </table:table-cell>
          <table:table-cell table:style-name="ce13" table:formula="of:=[.CS$17]+[.$B$6]*(1-EXP(-[.$B$7]*[.CT$16]))^2*IF([.CT16]=[.$B$5];1;0)" office:value-type="float" office:value="0" calcext:value-type="float">
            <text:p>0.00</text:p>
          </table:table-cell>
          <table:table-cell table:style-name="ce13" table:formula="of:=[.CT$17]+[.$B$6]*(1-EXP(-[.$B$7]*[.CU$16]))^2*IF([.CU16]=[.$B$5];1;0)" office:value-type="float" office:value="0" calcext:value-type="float">
            <text:p>0.00</text:p>
          </table:table-cell>
          <table:table-cell table:style-name="ce13" table:formula="of:=[.CU$17]+[.$B$6]*(1-EXP(-[.$B$7]*[.CV$16]))^2*IF([.CV16]=[.$B$5];1;0)" office:value-type="float" office:value="0" calcext:value-type="float">
            <text:p>0.00</text:p>
          </table:table-cell>
          <table:table-cell table:style-name="ce13" table:formula="of:=[.CV$17]+[.$B$6]*(1-EXP(-[.$B$7]*[.CW$16]))^2*IF([.CW16]=[.$B$5];1;0)" office:value-type="float" office:value="0" calcext:value-type="float">
            <text:p>0.00</text:p>
          </table:table-cell>
          <table:table-cell table:style-name="ce13" table:formula="of:=[.CW$17]+[.$B$6]*(1-EXP(-[.$B$7]*[.CX$16]))^2*IF([.CX16]=[.$B$5];1;0)" office:value-type="float" office:value="0" calcext:value-type="float">
            <text:p>0.00</text:p>
          </table:table-cell>
          <table:table-cell table:style-name="ce13" table:formula="of:=[.CX$17]+[.$B$6]*(1-EXP(-[.$B$7]*[.CY$16]))^2*IF([.CY16]=[.$B$5];1;0)" office:value-type="float" office:value="0" calcext:value-type="float">
            <text:p>0.00</text:p>
          </table:table-cell>
          <table:table-cell table:style-name="ce13" table:formula="of:=[.CY$17]+[.$B$6]*(1-EXP(-[.$B$7]*[.CZ$16]))^2*IF([.CZ16]=[.$B$5];1;0)" office:value-type="float" office:value="0" calcext:value-type="float">
            <text:p>0.00</text:p>
          </table:table-cell>
          <table:table-cell table:style-name="ce13" table:formula="of:=[.CZ$17]+[.$B$6]*(1-EXP(-[.$B$7]*[.DA$16]))^2*IF([.DA16]=[.$B$5];1;0)" office:value-type="float" office:value="0" calcext:value-type="float">
            <text:p>0.00</text:p>
          </table:table-cell>
          <table:table-cell table:style-name="ce13" table:formula="of:=[.DA$17]+[.$B$6]*(1-EXP(-[.$B$7]*[.DB$16]))^2*IF([.DB16]=[.$B$5];1;0)" office:value-type="float" office:value="0" calcext:value-type="float">
            <text:p>0.00</text:p>
          </table:table-cell>
          <table:table-cell table:style-name="ce13" table:formula="of:=[.DB$17]+[.$B$6]*(1-EXP(-[.$B$7]*[.DC$16]))^2*IF([.DC16]=[.$B$5];1;0)" office:value-type="float" office:value="0" calcext:value-type="float">
            <text:p>0.00</text:p>
          </table:table-cell>
          <table:table-cell table:style-name="ce13" table:formula="of:=[.DC$17]+[.$B$6]*(1-EXP(-[.$B$7]*[.DD$16]))^2*IF([.DD16]=[.$B$5];1;0)" office:value-type="float" office:value="0" calcext:value-type="float">
            <text:p>0.00</text:p>
          </table:table-cell>
          <table:table-cell table:style-name="ce13" table:formula="of:=[.DD$17]+[.$B$6]*(1-EXP(-[.$B$7]*[.DE$16]))^2*IF([.DE16]=[.$B$5];1;0)" office:value-type="float" office:value="0" calcext:value-type="float">
            <text:p>0.00</text:p>
          </table:table-cell>
          <table:table-cell table:style-name="ce13" table:formula="of:=[.DE$17]+[.$B$6]*(1-EXP(-[.$B$7]*[.DF$16]))^2*IF([.DF16]=[.$B$5];1;0)" office:value-type="float" office:value="0" calcext:value-type="float">
            <text:p>0.00</text:p>
          </table:table-cell>
          <table:table-cell table:style-name="ce13" table:formula="of:=[.DF$17]+[.$B$6]*(1-EXP(-[.$B$7]*[.DG$16]))^2*IF([.DG16]=[.$B$5];1;0)" office:value-type="float" office:value="0" calcext:value-type="float">
            <text:p>0.00</text:p>
          </table:table-cell>
          <table:table-cell table:style-name="ce13" table:formula="of:=[.DG$17]+[.$B$6]*(1-EXP(-[.$B$7]*[.DH$16]))^2*IF([.DH16]=[.$B$5];1;0)" office:value-type="float" office:value="0" calcext:value-type="float">
            <text:p>0.00</text:p>
          </table:table-cell>
          <table:table-cell table:style-name="ce13" table:formula="of:=[.DH$17]+[.$B$6]*(1-EXP(-[.$B$7]*[.DI$16]))^2*IF([.DI16]=[.$B$5];1;0)" office:value-type="float" office:value="0" calcext:value-type="float">
            <text:p>0.00</text:p>
          </table:table-cell>
          <table:table-cell table:style-name="ce13" table:formula="of:=[.DI$17]+[.$B$6]*(1-EXP(-[.$B$7]*[.DJ$16]))^2*IF([.DJ16]=[.$B$5];1;0)" office:value-type="float" office:value="0" calcext:value-type="float">
            <text:p>0.00</text:p>
          </table:table-cell>
          <table:table-cell table:style-name="ce13" table:formula="of:=[.DJ$17]+[.$B$6]*(1-EXP(-[.$B$7]*[.DK$16]))^2*IF([.DK16]=[.$B$5];1;0)" office:value-type="float" office:value="0" calcext:value-type="float">
            <text:p>0.00</text:p>
          </table:table-cell>
          <table:table-cell table:style-name="ce13" table:formula="of:=[.DK$17]+[.$B$6]*(1-EXP(-[.$B$7]*[.DL$16]))^2*IF([.DL16]=[.$B$5];1;0)" office:value-type="float" office:value="0" calcext:value-type="float">
            <text:p>0.00</text:p>
          </table:table-cell>
          <table:table-cell table:style-name="ce13" table:formula="of:=[.DL$17]+[.$B$6]*(1-EXP(-[.$B$7]*[.DM$16]))^2*IF([.DM16]=[.$B$5];1;0)" office:value-type="float" office:value="0" calcext:value-type="float">
            <text:p>0.00</text:p>
          </table:table-cell>
          <table:table-cell table:style-name="ce13" table:formula="of:=[.DM$17]+[.$B$6]*(1-EXP(-[.$B$7]*[.DN$16]))^2*IF([.DN16]=[.$B$5];1;0)" office:value-type="float" office:value="0" calcext:value-type="float">
            <text:p>0.00</text:p>
          </table:table-cell>
          <table:table-cell table:style-name="ce13" table:formula="of:=[.DN$17]+[.$B$6]*(1-EXP(-[.$B$7]*[.DO$16]))^2*IF([.DO16]=[.$B$5];1;0)" office:value-type="float" office:value="0" calcext:value-type="float">
            <text:p>0.00</text:p>
          </table:table-cell>
          <table:table-cell table:style-name="ce13" table:formula="of:=[.DO$17]+[.$B$6]*(1-EXP(-[.$B$7]*[.DP$16]))^2*IF([.DP16]=[.$B$5];1;0)" office:value-type="float" office:value="0" calcext:value-type="float">
            <text:p>0.00</text:p>
          </table:table-cell>
          <table:table-cell table:style-name="ce13" table:formula="of:=[.DP$17]+[.$B$6]*(1-EXP(-[.$B$7]*[.DQ$16]))^2*IF([.DQ16]=[.$B$5];1;0)" office:value-type="float" office:value="9.46099140913792" calcext:value-type="float">
            <text:p>9.46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C_pl(t) cumulative tC/ha</text:p>
          </table:table-cell>
          <table:table-cell table:style-name="ce13" table:formula="of:=[.$B$6]*(1-EXP(-[.$B$7]*IF([.B16]&gt;=[.$B$5];0;[.B16])))^2*([.$B$11]+[.$B$12]*[.$B$9])+[.$B$13]*[.$B$8]*MIN(MAX([.$B$5]-1;0);[.B$16])+[.$B$14]*[.$B$10]*[.B$17]" office:value-type="float" office:value="0.103754746739128" calcext:value-type="float">
            <text:p>0.10</text:p>
          </table:table-cell>
          <table:table-cell table:style-name="ce13" table:formula="of:=[.$B$6]*(1-EXP(-[.$B$7]*IF([.C16]&gt;=[.$B$5];0;[.C16])))^2*([.$B$11]+[.$B$12]*[.$B$9])+[.$B$13]*[.$B$8]*MIN(MAX([.$B$5]-1;0);[.C$16])+[.$B$14]*[.$B$10]*[.C$17]" office:value-type="float" office:value="0.228229394313117" calcext:value-type="float">
            <text:p>0.23</text:p>
          </table:table-cell>
          <table:table-cell table:style-name="ce13" table:formula="of:=[.$B$6]*(1-EXP(-[.$B$7]*IF([.D16]&gt;=[.$B$5];0;[.D16])))^2*([.$B$11]+[.$B$12]*[.$B$9])+[.$B$13]*[.$B$8]*MIN(MAX([.$B$5]-1;0);[.D$16])+[.$B$14]*[.$B$10]*[.D$17]" office:value-type="float" office:value="0.371586001947077" calcext:value-type="float">
            <text:p>0.37</text:p>
          </table:table-cell>
          <table:table-cell table:style-name="ce13" table:formula="of:=[.$B$6]*(1-EXP(-[.$B$7]*IF([.E16]&gt;=[.$B$5];0;[.E16])))^2*([.$B$11]+[.$B$12]*[.$B$9])+[.$B$13]*[.$B$8]*MIN(MAX([.$B$5]-1;0);[.E$16])+[.$B$14]*[.$B$10]*[.E$17]" office:value-type="float" office:value="0.532112320166204" calcext:value-type="float">
            <text:p>0.53</text:p>
          </table:table-cell>
          <table:table-cell table:style-name="ce13" table:formula="of:=[.$B$6]*(1-EXP(-[.$B$7]*IF([.F16]&gt;=[.$B$5];0;[.F16])))^2*([.$B$11]+[.$B$12]*[.$B$9])+[.$B$13]*[.$B$8]*MIN(MAX([.$B$5]-1;0);[.F$16])+[.$B$14]*[.$B$10]*[.F$17]" office:value-type="float" office:value="0.708213919678188" calcext:value-type="float">
            <text:p>0.71</text:p>
          </table:table-cell>
          <table:table-cell table:style-name="ce13" table:formula="of:=[.$B$6]*(1-EXP(-[.$B$7]*IF([.G16]&gt;=[.$B$5];0;[.G16])))^2*([.$B$11]+[.$B$12]*[.$B$9])+[.$B$13]*[.$B$8]*MIN(MAX([.$B$5]-1;0);[.G$16])+[.$B$14]*[.$B$10]*[.G$17]" office:value-type="float" office:value="0.898406794930936" calcext:value-type="float">
            <text:p>0.90</text:p>
          </table:table-cell>
          <table:table-cell table:style-name="ce13" table:formula="of:=[.$B$6]*(1-EXP(-[.$B$7]*IF([.H16]&gt;=[.$B$5];0;[.H16])))^2*([.$B$11]+[.$B$12]*[.$B$9])+[.$B$13]*[.$B$8]*MIN(MAX([.$B$5]-1;0);[.H$16])+[.$B$14]*[.$B$10]*[.H$17]" office:value-type="float" office:value="1.101310414221" calcext:value-type="float">
            <text:p>1.10</text:p>
          </table:table-cell>
          <table:table-cell table:style-name="ce13" table:formula="of:=[.$B$6]*(1-EXP(-[.$B$7]*IF([.I16]&gt;=[.$B$5];0;[.I16])))^2*([.$B$11]+[.$B$12]*[.$B$9])+[.$B$13]*[.$B$8]*MIN(MAX([.$B$5]-1;0);[.I$16])+[.$B$14]*[.$B$10]*[.I$17]" office:value-type="float" office:value="1.31564118988023" calcext:value-type="float">
            <text:p>1.32</text:p>
          </table:table-cell>
          <table:table-cell table:style-name="ce13" table:formula="of:=[.$B$6]*(1-EXP(-[.$B$7]*IF([.J16]&gt;=[.$B$5];0;[.J16])))^2*([.$B$11]+[.$B$12]*[.$B$9])+[.$B$13]*[.$B$8]*MIN(MAX([.$B$5]-1;0);[.J$16])+[.$B$14]*[.$B$10]*[.J$17]" office:value-type="float" office:value="1.54020634362357" calcext:value-type="float">
            <text:p>1.54</text:p>
          </table:table-cell>
          <table:table-cell table:style-name="ce13" table:formula="of:=[.$B$6]*(1-EXP(-[.$B$7]*IF([.K16]&gt;=[.$B$5];0;[.K16])))^2*([.$B$11]+[.$B$12]*[.$B$9])+[.$B$13]*[.$B$8]*MIN(MAX([.$B$5]-1;0);[.K$16])+[.$B$14]*[.$B$10]*[.K$17]" office:value-type="float" office:value="1.77389814360544" calcext:value-type="float">
            <text:p>1.77</text:p>
          </table:table-cell>
          <table:table-cell table:style-name="ce13" table:formula="of:=[.$B$6]*(1-EXP(-[.$B$7]*IF([.L16]&gt;=[.$B$5];0;[.L16])))^2*([.$B$11]+[.$B$12]*[.$B$9])+[.$B$13]*[.$B$8]*MIN(MAX([.$B$5]-1;0);[.L$16])+[.$B$14]*[.$B$10]*[.L$17]" office:value-type="float" office:value="2.01568849111087" calcext:value-type="float">
            <text:p>2.02</text:p>
          </table:table-cell>
          <table:table-cell table:style-name="ce13" table:formula="of:=[.$B$6]*(1-EXP(-[.$B$7]*IF([.M16]&gt;=[.$B$5];0;[.M16])))^2*([.$B$11]+[.$B$12]*[.$B$9])+[.$B$13]*[.$B$8]*MIN(MAX([.$B$5]-1;0);[.M$16])+[.$B$14]*[.$B$10]*[.M$17]" office:value-type="float" office:value="2.26462383610566" calcext:value-type="float">
            <text:p>2.26</text:p>
          </table:table-cell>
          <table:table-cell table:style-name="ce13" table:formula="of:=[.$B$6]*(1-EXP(-[.$B$7]*IF([.N16]&gt;=[.$B$5];0;[.N16])))^2*([.$B$11]+[.$B$12]*[.$B$9])+[.$B$13]*[.$B$8]*MIN(MAX([.$B$5]-1;0);[.N$16])+[.$B$14]*[.$B$10]*[.N$17]" office:value-type="float" office:value="2.51982040209207" calcext:value-type="float">
            <text:p>2.52</text:p>
          </table:table-cell>
          <table:table-cell table:style-name="ce13" table:formula="of:=[.$B$6]*(1-EXP(-[.$B$7]*IF([.O16]&gt;=[.$B$5];0;[.O16])))^2*([.$B$11]+[.$B$12]*[.$B$9])+[.$B$13]*[.$B$8]*MIN(MAX([.$B$5]-1;0);[.O$16])+[.$B$14]*[.$B$10]*[.O$17]" office:value-type="float" office:value="2.78045970186697" calcext:value-type="float">
            <text:p>2.78</text:p>
          </table:table-cell>
          <table:table-cell table:style-name="ce13" table:formula="of:=[.$B$6]*(1-EXP(-[.$B$7]*IF([.P16]&gt;=[.$B$5];0;[.P16])))^2*([.$B$11]+[.$B$12]*[.$B$9])+[.$B$13]*[.$B$8]*MIN(MAX([.$B$5]-1;0);[.P$16])+[.$B$14]*[.$B$10]*[.P$17]" office:value-type="float" office:value="3.04578432686286" calcext:value-type="float">
            <text:p>3.05</text:p>
          </table:table-cell>
          <table:table-cell table:style-name="ce13" table:formula="of:=[.$B$6]*(1-EXP(-[.$B$7]*IF([.Q16]&gt;=[.$B$5];0;[.Q16])))^2*([.$B$11]+[.$B$12]*[.$B$9])+[.$B$13]*[.$B$8]*MIN(MAX([.$B$5]-1;0);[.Q$16])+[.$B$14]*[.$B$10]*[.Q$17]" office:value-type="float" office:value="3.31509399377166" calcext:value-type="float">
            <text:p>3.32</text:p>
          </table:table-cell>
          <table:table-cell table:style-name="ce13" table:formula="of:=[.$B$6]*(1-EXP(-[.$B$7]*IF([.R16]&gt;=[.$B$5];0;[.R16])))^2*([.$B$11]+[.$B$12]*[.$B$9])+[.$B$13]*[.$B$8]*MIN(MAX([.$B$5]-1;0);[.R$16])+[.$B$14]*[.$B$10]*[.R$17]" office:value-type="float" office:value="3.58774183311169" calcext:value-type="float">
            <text:p>3.59</text:p>
          </table:table-cell>
          <table:table-cell table:style-name="ce13" table:formula="of:=[.$B$6]*(1-EXP(-[.$B$7]*IF([.S16]&gt;=[.$B$5];0;[.S16])))^2*([.$B$11]+[.$B$12]*[.$B$9])+[.$B$13]*[.$B$8]*MIN(MAX([.$B$5]-1;0);[.S$16])+[.$B$14]*[.$B$10]*[.S$17]" office:value-type="float" office:value="3.86313090530169" calcext:value-type="float">
            <text:p>3.86</text:p>
          </table:table-cell>
          <table:table-cell table:style-name="ce13" table:formula="of:=[.$B$6]*(1-EXP(-[.$B$7]*IF([.T16]&gt;=[.$B$5];0;[.T16])))^2*([.$B$11]+[.$B$12]*[.$B$9])+[.$B$13]*[.$B$8]*MIN(MAX([.$B$5]-1;0);[.T$16])+[.$B$14]*[.$B$10]*[.T$17]" office:value-type="float" office:value="4.14071093065709" calcext:value-type="float">
            <text:p>4.14</text:p>
          </table:table-cell>
          <table:table-cell table:style-name="ce13" table:formula="of:=[.$B$6]*(1-EXP(-[.$B$7]*IF([.U16]&gt;=[.$B$5];0;[.U16])))^2*([.$B$11]+[.$B$12]*[.$B$9])+[.$B$13]*[.$B$8]*MIN(MAX([.$B$5]-1;0);[.U$16])+[.$B$14]*[.$B$10]*[.U$17]" office:value-type="float" office:value="4.41997522052428" calcext:value-type="float">
            <text:p>4.42</text:p>
          </table:table-cell>
          <table:table-cell table:style-name="ce13" table:formula="of:=[.$B$6]*(1-EXP(-[.$B$7]*IF([.V16]&gt;=[.$B$5];0;[.V16])))^2*([.$B$11]+[.$B$12]*[.$B$9])+[.$B$13]*[.$B$8]*MIN(MAX([.$B$5]-1;0);[.V$16])+[.$B$14]*[.$B$10]*[.V$17]" office:value-type="float" office:value="4.7004577975233" calcext:value-type="float">
            <text:p>4.70</text:p>
          </table:table-cell>
          <table:table-cell table:style-name="ce13" table:formula="of:=[.$B$6]*(1-EXP(-[.$B$7]*IF([.W16]&gt;=[.$B$5];0;[.W16])))^2*([.$B$11]+[.$B$12]*[.$B$9])+[.$B$13]*[.$B$8]*MIN(MAX([.$B$5]-1;0);[.W$16])+[.$B$14]*[.$B$10]*[.W$17]" office:value-type="float" office:value="4.98173069357889" calcext:value-type="float">
            <text:p>4.98</text:p>
          </table:table-cell>
          <table:table-cell table:style-name="ce13" table:formula="of:=[.$B$6]*(1-EXP(-[.$B$7]*IF([.X16]&gt;=[.$B$5];0;[.X16])))^2*([.$B$11]+[.$B$12]*[.$B$9])+[.$B$13]*[.$B$8]*MIN(MAX([.$B$5]-1;0);[.X$16])+[.$B$14]*[.$B$10]*[.X$17]" office:value-type="float" office:value="5.26340141508833" calcext:value-type="float">
            <text:p>5.26</text:p>
          </table:table-cell>
          <table:table-cell table:style-name="ce13" table:formula="of:=[.$B$6]*(1-EXP(-[.$B$7]*IF([.Y16]&gt;=[.$B$5];0;[.Y16])))^2*([.$B$11]+[.$B$12]*[.$B$9])+[.$B$13]*[.$B$8]*MIN(MAX([.$B$5]-1;0);[.Y$16])+[.$B$14]*[.$B$10]*[.Y$17]" office:value-type="float" office:value="5.54511056520345" calcext:value-type="float">
            <text:p>5.55</text:p>
          </table:table-cell>
          <table:table-cell table:style-name="ce13" table:formula="of:=[.$B$6]*(1-EXP(-[.$B$7]*IF([.Z16]&gt;=[.$B$5];0;[.Z16])))^2*([.$B$11]+[.$B$12]*[.$B$9])+[.$B$13]*[.$B$8]*MIN(MAX([.$B$5]-1;0);[.Z$16])+[.$B$14]*[.$B$10]*[.Z$17]" office:value-type="float" office:value="5.82652961379664" calcext:value-type="float">
            <text:p>5.83</text:p>
          </table:table-cell>
          <table:table-cell table:style-name="ce13" table:formula="of:=[.$B$6]*(1-EXP(-[.$B$7]*IF([.AA16]&gt;=[.$B$5];0;[.AA16])))^2*([.$B$11]+[.$B$12]*[.$B$9])+[.$B$13]*[.$B$8]*MIN(MAX([.$B$5]-1;0);[.AA$16])+[.$B$14]*[.$B$10]*[.AA$17]" office:value-type="float" office:value="6.107358806238" calcext:value-type="float">
            <text:p>6.11</text:p>
          </table:table-cell>
          <table:table-cell table:style-name="ce13" table:formula="of:=[.$B$6]*(1-EXP(-[.$B$7]*IF([.AB16]&gt;=[.$B$5];0;[.AB16])))^2*([.$B$11]+[.$B$12]*[.$B$9])+[.$B$13]*[.$B$8]*MIN(MAX([.$B$5]-1;0);[.AB$16])+[.$B$14]*[.$B$10]*[.AB$17]" office:value-type="float" office:value="6.38732520263543" calcext:value-type="float">
            <text:p>6.39</text:p>
          </table:table-cell>
          <table:table-cell table:style-name="ce13" table:formula="of:=[.$B$6]*(1-EXP(-[.$B$7]*IF([.AC16]&gt;=[.$B$5];0;[.AC16])))^2*([.$B$11]+[.$B$12]*[.$B$9])+[.$B$13]*[.$B$8]*MIN(MAX([.$B$5]-1;0);[.AC$16])+[.$B$14]*[.$B$10]*[.AC$17]" office:value-type="float" office:value="6.66618083968376" calcext:value-type="float">
            <text:p>6.67</text:p>
          </table:table-cell>
          <table:table-cell table:style-name="ce13" table:formula="of:=[.$B$6]*(1-EXP(-[.$B$7]*IF([.AD16]&gt;=[.$B$5];0;[.AD16])))^2*([.$B$11]+[.$B$12]*[.$B$9])+[.$B$13]*[.$B$8]*MIN(MAX([.$B$5]-1;0);[.AD$16])+[.$B$14]*[.$B$10]*[.AD$17]" office:value-type="float" office:value="6.94370100773366" calcext:value-type="float">
            <text:p>6.94</text:p>
          </table:table-cell>
          <table:table-cell table:style-name="ce13" table:formula="of:=[.$B$6]*(1-EXP(-[.$B$7]*IF([.AE16]&gt;=[.$B$5];0;[.AE16])))^2*([.$B$11]+[.$B$12]*[.$B$9])+[.$B$13]*[.$B$8]*MIN(MAX([.$B$5]-1;0);[.AE$16])+[.$B$14]*[.$B$10]*[.AE$17]" office:value-type="float" office:value="7.21968263612889" calcext:value-type="float">
            <text:p>7.22</text:p>
          </table:table-cell>
          <table:table-cell table:style-name="ce13" table:formula="of:=[.$B$6]*(1-EXP(-[.$B$7]*IF([.AF16]&gt;=[.$B$5];0;[.AF16])))^2*([.$B$11]+[.$B$12]*[.$B$9])+[.$B$13]*[.$B$8]*MIN(MAX([.$B$5]-1;0);[.AF$16])+[.$B$14]*[.$B$10]*[.AF$17]" office:value-type="float" office:value="7.49394278027242" calcext:value-type="float">
            <text:p>7.49</text:p>
          </table:table-cell>
          <table:table-cell table:style-name="ce13" table:formula="of:=[.$B$6]*(1-EXP(-[.$B$7]*IF([.AG16]&gt;=[.$B$5];0;[.AG16])))^2*([.$B$11]+[.$B$12]*[.$B$9])+[.$B$13]*[.$B$8]*MIN(MAX([.$B$5]-1;0);[.AG$16])+[.$B$14]*[.$B$10]*[.AG$17]" office:value-type="float" office:value="7.76631720426959" calcext:value-type="float">
            <text:p>7.77</text:p>
          </table:table-cell>
          <table:table-cell table:style-name="ce13" table:formula="of:=[.$B$6]*(1-EXP(-[.$B$7]*IF([.AH16]&gt;=[.$B$5];0;[.AH16])))^2*([.$B$11]+[.$B$12]*[.$B$9])+[.$B$13]*[.$B$8]*MIN(MAX([.$B$5]-1;0);[.AH$16])+[.$B$14]*[.$B$10]*[.AH$17]" office:value-type="float" office:value="8.0366590533617" calcext:value-type="float">
            <text:p>8.04</text:p>
          </table:table-cell>
          <table:table-cell table:style-name="ce13" table:formula="of:=[.$B$6]*(1-EXP(-[.$B$7]*IF([.AI16]&gt;=[.$B$5];0;[.AI16])))^2*([.$B$11]+[.$B$12]*[.$B$9])+[.$B$13]*[.$B$8]*MIN(MAX([.$B$5]-1;0);[.AI$16])+[.$B$14]*[.$B$10]*[.AI$17]" office:value-type="float" office:value="8.30483761070659" calcext:value-type="float">
            <text:p>8.30</text:p>
          </table:table-cell>
          <table:table-cell table:style-name="ce13" table:formula="of:=[.$B$6]*(1-EXP(-[.$B$7]*IF([.AJ16]&gt;=[.$B$5];0;[.AJ16])))^2*([.$B$11]+[.$B$12]*[.$B$9])+[.$B$13]*[.$B$8]*MIN(MAX([.$B$5]-1;0);[.AJ$16])+[.$B$14]*[.$B$10]*[.AJ$17]" office:value-type="float" office:value="8.57073713338646" calcext:value-type="float">
            <text:p>8.57</text:p>
          </table:table-cell>
          <table:table-cell table:style-name="ce13" table:formula="of:=[.$B$6]*(1-EXP(-[.$B$7]*IF([.AK16]&gt;=[.$B$5];0;[.AK16])))^2*([.$B$11]+[.$B$12]*[.$B$9])+[.$B$13]*[.$B$8]*MIN(MAX([.$B$5]-1;0);[.AK$16])+[.$B$14]*[.$B$10]*[.AK$17]" office:value-type="float" office:value="8.83425576282712" calcext:value-type="float">
            <text:p>8.83</text:p>
          </table:table-cell>
          <table:table-cell table:style-name="ce13" table:formula="of:=[.$B$6]*(1-EXP(-[.$B$7]*IF([.AL16]&gt;=[.$B$5];0;[.AL16])))^2*([.$B$11]+[.$B$12]*[.$B$9])+[.$B$13]*[.$B$8]*MIN(MAX([.$B$5]-1;0);[.AL$16])+[.$B$14]*[.$B$10]*[.AL$17]" office:value-type="float" office:value="9.09530450509971" calcext:value-type="float">
            <text:p>9.10</text:p>
          </table:table-cell>
          <table:table-cell table:style-name="ce13" table:formula="of:=[.$B$6]*(1-EXP(-[.$B$7]*IF([.AM16]&gt;=[.$B$5];0;[.AM16])))^2*([.$B$11]+[.$B$12]*[.$B$9])+[.$B$13]*[.$B$8]*MIN(MAX([.$B$5]-1;0);[.AM$16])+[.$B$14]*[.$B$10]*[.AM$17]" office:value-type="float" office:value="9.35380627684491" calcext:value-type="float">
            <text:p>9.35</text:p>
          </table:table-cell>
          <table:table-cell table:style-name="ce13" table:formula="of:=[.$B$6]*(1-EXP(-[.$B$7]*IF([.AN16]&gt;=[.$B$5];0;[.AN16])))^2*([.$B$11]+[.$B$12]*[.$B$9])+[.$B$13]*[.$B$8]*MIN(MAX([.$B$5]-1;0);[.AN$16])+[.$B$14]*[.$B$10]*[.AN$17]" office:value-type="float" office:value="9.60969501281399" calcext:value-type="float">
            <text:p>9.61</text:p>
          </table:table-cell>
          <table:table-cell table:style-name="ce13" table:formula="of:=[.$B$6]*(1-EXP(-[.$B$7]*IF([.AO16]&gt;=[.$B$5];0;[.AO16])))^2*([.$B$11]+[.$B$12]*[.$B$9])+[.$B$13]*[.$B$8]*MIN(MAX([.$B$5]-1;0);[.AO$16])+[.$B$14]*[.$B$10]*[.AO$17]" office:value-type="float" office:value="9.8629148312591" calcext:value-type="float">
            <text:p>9.86</text:p>
          </table:table-cell>
          <table:table-cell table:style-name="ce13" table:formula="of:=[.$B$6]*(1-EXP(-[.$B$7]*IF([.AP16]&gt;=[.$B$5];0;[.AP16])))^2*([.$B$11]+[.$B$12]*[.$B$9])+[.$B$13]*[.$B$8]*MIN(MAX([.$B$5]-1;0);[.AP$16])+[.$B$14]*[.$B$10]*[.AP$17]" office:value-type="float" office:value="10.1134192536306" calcext:value-type="float">
            <text:p>10.11</text:p>
          </table:table-cell>
          <table:table-cell table:style-name="ce13" table:formula="of:=[.$B$6]*(1-EXP(-[.$B$7]*IF([.AQ16]&gt;=[.$B$5];0;[.AQ16])))^2*([.$B$11]+[.$B$12]*[.$B$9])+[.$B$13]*[.$B$8]*MIN(MAX([.$B$5]-1;0);[.AQ$16])+[.$B$14]*[.$B$10]*[.AQ$17]" office:value-type="float" office:value="10.3611704752499" calcext:value-type="float">
            <text:p>10.36</text:p>
          </table:table-cell>
          <table:table-cell table:style-name="ce13" table:formula="of:=[.$B$6]*(1-EXP(-[.$B$7]*IF([.AR16]&gt;=[.$B$5];0;[.AR16])))^2*([.$B$11]+[.$B$12]*[.$B$9])+[.$B$13]*[.$B$8]*MIN(MAX([.$B$5]-1;0);[.AR$16])+[.$B$14]*[.$B$10]*[.AR$17]" office:value-type="float" office:value="10.6061386838261" calcext:value-type="float">
            <text:p>10.61</text:p>
          </table:table-cell>
          <table:table-cell table:style-name="ce13" table:formula="of:=[.$B$6]*(1-EXP(-[.$B$7]*IF([.AS16]&gt;=[.$B$5];0;[.AS16])))^2*([.$B$11]+[.$B$12]*[.$B$9])+[.$B$13]*[.$B$8]*MIN(MAX([.$B$5]-1;0);[.AS$16])+[.$B$14]*[.$B$10]*[.AS$17]" office:value-type="float" office:value="10.848301422871" calcext:value-type="float">
            <text:p>10.85</text:p>
          </table:table-cell>
          <table:table-cell table:style-name="ce13" table:formula="of:=[.$B$6]*(1-EXP(-[.$B$7]*IF([.AT16]&gt;=[.$B$5];0;[.AT16])))^2*([.$B$11]+[.$B$12]*[.$B$9])+[.$B$13]*[.$B$8]*MIN(MAX([.$B$5]-1;0);[.AT$16])+[.$B$14]*[.$B$10]*[.AT$17]" office:value-type="float" office:value="11.0876429972444" calcext:value-type="float">
            <text:p>11.09</text:p>
          </table:table-cell>
          <table:table-cell table:style-name="ce13" table:formula="of:=[.$B$6]*(1-EXP(-[.$B$7]*IF([.AU16]&gt;=[.$B$5];0;[.AU16])))^2*([.$B$11]+[.$B$12]*[.$B$9])+[.$B$13]*[.$B$8]*MIN(MAX([.$B$5]-1;0);[.AU$16])+[.$B$14]*[.$B$10]*[.AU$17]" office:value-type="float" office:value="11.3241539182256" calcext:value-type="float">
            <text:p>11.32</text:p>
          </table:table-cell>
          <table:table-cell table:style-name="ce13" table:formula="of:=[.$B$6]*(1-EXP(-[.$B$7]*IF([.AV16]&gt;=[.$B$5];0;[.AV16])))^2*([.$B$11]+[.$B$12]*[.$B$9])+[.$B$13]*[.$B$8]*MIN(MAX([.$B$5]-1;0);[.AV$16])+[.$B$14]*[.$B$10]*[.AV$17]" office:value-type="float" office:value="11.557830385666" calcext:value-type="float">
            <text:p>11.56</text:p>
          </table:table-cell>
          <table:table-cell table:style-name="ce13" table:formula="of:=[.$B$6]*(1-EXP(-[.$B$7]*IF([.AW16]&gt;=[.$B$5];0;[.AW16])))^2*([.$B$11]+[.$B$12]*[.$B$9])+[.$B$13]*[.$B$8]*MIN(MAX([.$B$5]-1;0);[.AW$16])+[.$B$14]*[.$B$10]*[.AW$17]" office:value-type="float" office:value="11.7886738049206" calcext:value-type="float">
            <text:p>11.79</text:p>
          </table:table-cell>
          <table:table-cell table:style-name="ce13" table:formula="of:=[.$B$6]*(1-EXP(-[.$B$7]*IF([.AX16]&gt;=[.$B$5];0;[.AX16])))^2*([.$B$11]+[.$B$12]*[.$B$9])+[.$B$13]*[.$B$8]*MIN(MAX([.$B$5]-1;0);[.AX$16])+[.$B$14]*[.$B$10]*[.AX$17]" office:value-type="float" office:value="12.0166903363978" calcext:value-type="float">
            <text:p>12.02</text:p>
          </table:table-cell>
          <table:table-cell table:style-name="ce13" table:formula="of:=[.$B$6]*(1-EXP(-[.$B$7]*IF([.AY16]&gt;=[.$B$5];0;[.AY16])))^2*([.$B$11]+[.$B$12]*[.$B$9])+[.$B$13]*[.$B$8]*MIN(MAX([.$B$5]-1;0);[.AY$16])+[.$B$14]*[.$B$10]*[.AY$17]" office:value-type="float" office:value="12.2418904756947" calcext:value-type="float">
            <text:p>12.24</text:p>
          </table:table-cell>
          <table:table-cell table:style-name="ce13" table:formula="of:=[.$B$6]*(1-EXP(-[.$B$7]*IF([.AZ16]&gt;=[.$B$5];0;[.AZ16])))^2*([.$B$11]+[.$B$12]*[.$B$9])+[.$B$13]*[.$B$8]*MIN(MAX([.$B$5]-1;0);[.AZ$16])+[.$B$14]*[.$B$10]*[.AZ$17]" office:value-type="float" office:value="12.4642886624085" calcext:value-type="float">
            <text:p>12.46</text:p>
          </table:table-cell>
          <table:table-cell table:style-name="ce13" table:formula="of:=[.$B$6]*(1-EXP(-[.$B$7]*IF([.BA16]&gt;=[.$B$5];0;[.BA16])))^2*([.$B$11]+[.$B$12]*[.$B$9])+[.$B$13]*[.$B$8]*MIN(MAX([.$B$5]-1;0);[.BA$16])+[.$B$14]*[.$B$10]*[.BA$17]" office:value-type="float" office:value="12.6839029158289" calcext:value-type="float">
            <text:p>12.68</text:p>
          </table:table-cell>
          <table:table-cell table:style-name="ce13" table:formula="of:=[.$B$6]*(1-EXP(-[.$B$7]*IF([.BB16]&gt;=[.$B$5];0;[.BB16])))^2*([.$B$11]+[.$B$12]*[.$B$9])+[.$B$13]*[.$B$8]*MIN(MAX([.$B$5]-1;0);[.BB$16])+[.$B$14]*[.$B$10]*[.BB$17]" office:value-type="float" office:value="12.9007544958246" calcext:value-type="float">
            <text:p>12.90</text:p>
          </table:table-cell>
          <table:table-cell table:style-name="ce13" table:formula="of:=[.$B$6]*(1-EXP(-[.$B$7]*IF([.BC16]&gt;=[.$B$5];0;[.BC16])))^2*([.$B$11]+[.$B$12]*[.$B$9])+[.$B$13]*[.$B$8]*MIN(MAX([.$B$5]-1;0);[.BC$16])+[.$B$14]*[.$B$10]*[.BC$17]" office:value-type="float" office:value="13.1148675873401" calcext:value-type="float">
            <text:p>13.11</text:p>
          </table:table-cell>
          <table:table-cell table:style-name="ce13" table:formula="of:=[.$B$6]*(1-EXP(-[.$B$7]*IF([.BD16]&gt;=[.$B$5];0;[.BD16])))^2*([.$B$11]+[.$B$12]*[.$B$9])+[.$B$13]*[.$B$8]*MIN(MAX([.$B$5]-1;0);[.BD$16])+[.$B$14]*[.$B$10]*[.BD$17]" office:value-type="float" office:value="13.3262690070126" calcext:value-type="float">
            <text:p>13.33</text:p>
          </table:table-cell>
          <table:table-cell table:style-name="ce13" table:formula="of:=[.$B$6]*(1-EXP(-[.$B$7]*IF([.BE16]&gt;=[.$B$5];0;[.BE16])))^2*([.$B$11]+[.$B$12]*[.$B$9])+[.$B$13]*[.$B$8]*MIN(MAX([.$B$5]-1;0);[.BE$16])+[.$B$14]*[.$B$10]*[.BE$17]" office:value-type="float" office:value="13.5349879305106" calcext:value-type="float">
            <text:p>13.53</text:p>
          </table:table-cell>
          <table:table-cell table:style-name="ce13" table:formula="of:=[.$B$6]*(1-EXP(-[.$B$7]*IF([.BF16]&gt;=[.$B$5];0;[.BF16])))^2*([.$B$11]+[.$B$12]*[.$B$9])+[.$B$13]*[.$B$8]*MIN(MAX([.$B$5]-1;0);[.BF$16])+[.$B$14]*[.$B$10]*[.BF$17]" office:value-type="float" office:value="13.7410556392802" calcext:value-type="float">
            <text:p>13.74</text:p>
          </table:table-cell>
          <table:table-cell table:style-name="ce13" table:formula="of:=[.$B$6]*(1-EXP(-[.$B$7]*IF([.BG16]&gt;=[.$B$5];0;[.BG16])))^2*([.$B$11]+[.$B$12]*[.$B$9])+[.$B$13]*[.$B$8]*MIN(MAX([.$B$5]-1;0);[.BG$16])+[.$B$14]*[.$B$10]*[.BG$17]" office:value-type="float" office:value="13.9445052854643" calcext:value-type="float">
            <text:p>13.94</text:p>
          </table:table-cell>
          <table:table-cell table:style-name="ce13" table:formula="of:=[.$B$6]*(1-EXP(-[.$B$7]*IF([.BH16]&gt;=[.$B$5];0;[.BH16])))^2*([.$B$11]+[.$B$12]*[.$B$9])+[.$B$13]*[.$B$8]*MIN(MAX([.$B$5]-1;0);[.BH$16])+[.$B$14]*[.$B$10]*[.BH$17]" office:value-type="float" office:value="14.1453716738354" calcext:value-type="float">
            <text:p>14.15</text:p>
          </table:table-cell>
          <table:table-cell table:style-name="ce13" table:formula="of:=[.$B$6]*(1-EXP(-[.$B$7]*IF([.BI16]&gt;=[.$B$5];0;[.BI16])))^2*([.$B$11]+[.$B$12]*[.$B$9])+[.$B$13]*[.$B$8]*MIN(MAX([.$B$5]-1;0);[.BI$16])+[.$B$14]*[.$B$10]*[.BI$17]" office:value-type="float" office:value="14.3436910596519" calcext:value-type="float">
            <text:p>14.34</text:p>
          </table:table-cell>
          <table:table-cell table:style-name="ce13" table:formula="of:=[.$B$6]*(1-EXP(-[.$B$7]*IF([.BJ16]&gt;=[.$B$5];0;[.BJ16])))^2*([.$B$11]+[.$B$12]*[.$B$9])+[.$B$13]*[.$B$8]*MIN(MAX([.$B$5]-1;0);[.BJ$16])+[.$B$14]*[.$B$10]*[.BJ$17]" office:value-type="float" office:value="14.5395009614178" calcext:value-type="float">
            <text:p>14.54</text:p>
          </table:table-cell>
          <table:table-cell table:style-name="ce13" table:formula="of:=[.$B$6]*(1-EXP(-[.$B$7]*IF([.BK16]&gt;=[.$B$5];0;[.BK16])))^2*([.$B$11]+[.$B$12]*[.$B$9])+[.$B$13]*[.$B$8]*MIN(MAX([.$B$5]-1;0);[.BK$16])+[.$B$14]*[.$B$10]*[.BK$17]" office:value-type="float" office:value="14.7328399875822" calcext:value-type="float">
            <text:p>14.73</text:p>
          </table:table-cell>
          <table:table-cell table:style-name="ce13" table:formula="of:=[.$B$6]*(1-EXP(-[.$B$7]*IF([.BL16]&gt;=[.$B$5];0;[.BL16])))^2*([.$B$11]+[.$B$12]*[.$B$9])+[.$B$13]*[.$B$8]*MIN(MAX([.$B$5]-1;0);[.BL$16])+[.$B$14]*[.$B$10]*[.BL$17]" office:value-type="float" office:value="14.9237476762796" calcext:value-type="float">
            <text:p>14.92</text:p>
          </table:table-cell>
          <table:table-cell table:style-name="ce13" table:formula="of:=[.$B$6]*(1-EXP(-[.$B$7]*IF([.BM16]&gt;=[.$B$5];0;[.BM16])))^2*([.$B$11]+[.$B$12]*[.$B$9])+[.$B$13]*[.$B$8]*MIN(MAX([.$B$5]-1;0);[.BM$16])+[.$B$14]*[.$B$10]*[.BM$17]" office:value-type="float" office:value="15.1122643472633" calcext:value-type="float">
            <text:p>15.11</text:p>
          </table:table-cell>
          <table:table-cell table:style-name="ce13" table:formula="of:=[.$B$6]*(1-EXP(-[.$B$7]*IF([.BN16]&gt;=[.$B$5];0;[.BN16])))^2*([.$B$11]+[.$B$12]*[.$B$9])+[.$B$13]*[.$B$8]*MIN(MAX([.$B$5]-1;0);[.BN$16])+[.$B$14]*[.$B$10]*[.BN$17]" office:value-type="float" office:value="15.298430965237" calcext:value-type="float">
            <text:p>15.30</text:p>
          </table:table-cell>
          <table:table-cell table:style-name="ce13" table:formula="of:=[.$B$6]*(1-EXP(-[.$B$7]*IF([.BO16]&gt;=[.$B$5];0;[.BO16])))^2*([.$B$11]+[.$B$12]*[.$B$9])+[.$B$13]*[.$B$8]*MIN(MAX([.$B$5]-1;0);[.BO$16])+[.$B$14]*[.$B$10]*[.BO$17]" office:value-type="float" office:value="15.4822890138398" calcext:value-type="float">
            <text:p>15.48</text:p>
          </table:table-cell>
          <table:table-cell table:style-name="ce13" table:formula="of:=[.$B$6]*(1-EXP(-[.$B$7]*IF([.BP16]&gt;=[.$B$5];0;[.BP16])))^2*([.$B$11]+[.$B$12]*[.$B$9])+[.$B$13]*[.$B$8]*MIN(MAX([.$B$5]-1;0);[.BP$16])+[.$B$14]*[.$B$10]*[.BP$17]" office:value-type="float" office:value="15.6638803795838" calcext:value-type="float">
            <text:p>15.66</text:p>
          </table:table-cell>
          <table:table-cell table:style-name="ce13" table:formula="of:=[.$B$6]*(1-EXP(-[.$B$7]*IF([.BQ16]&gt;=[.$B$5];0;[.BQ16])))^2*([.$B$11]+[.$B$12]*[.$B$9])+[.$B$13]*[.$B$8]*MIN(MAX([.$B$5]-1;0);[.BQ$16])+[.$B$14]*[.$B$10]*[.BQ$17]" office:value-type="float" office:value="15.8432472450878" calcext:value-type="float">
            <text:p>15.84</text:p>
          </table:table-cell>
          <table:table-cell table:style-name="ce13" table:formula="of:=[.$B$6]*(1-EXP(-[.$B$7]*IF([.BR16]&gt;=[.$B$5];0;[.BR16])))^2*([.$B$11]+[.$B$12]*[.$B$9])+[.$B$13]*[.$B$8]*MIN(MAX([.$B$5]-1;0);[.BR$16])+[.$B$14]*[.$B$10]*[.BR$17]" office:value-type="float" office:value="16.0204319909899" calcext:value-type="float">
            <text:p>16.02</text:p>
          </table:table-cell>
          <table:table-cell table:style-name="ce13" table:formula="of:=[.$B$6]*(1-EXP(-[.$B$7]*IF([.BS16]&gt;=[.$B$5];0;[.BS16])))^2*([.$B$11]+[.$B$12]*[.$B$9])+[.$B$13]*[.$B$8]*MIN(MAX([.$B$5]-1;0);[.BS$16])+[.$B$14]*[.$B$10]*[.BS$17]" office:value-type="float" office:value="16.1954771059629" calcext:value-type="float">
            <text:p>16.20</text:p>
          </table:table-cell>
          <table:table-cell table:style-name="ce13" table:formula="of:=[.$B$6]*(1-EXP(-[.$B$7]*IF([.BT16]&gt;=[.$B$5];0;[.BT16])))^2*([.$B$11]+[.$B$12]*[.$B$9])+[.$B$13]*[.$B$8]*MIN(MAX([.$B$5]-1;0);[.BT$16])+[.$B$14]*[.$B$10]*[.BT$17]" office:value-type="float" office:value="16.3684251042873" calcext:value-type="float">
            <text:p>16.37</text:p>
          </table:table-cell>
          <table:table-cell table:style-name="ce13" table:formula="of:=[.$B$6]*(1-EXP(-[.$B$7]*IF([.BU16]&gt;=[.$B$5];0;[.BU16])))^2*([.$B$11]+[.$B$12]*[.$B$9])+[.$B$13]*[.$B$8]*MIN(MAX([.$B$5]-1;0);[.BU$16])+[.$B$14]*[.$B$10]*[.BU$17]" office:value-type="float" office:value="16.5393184504756" calcext:value-type="float">
            <text:p>16.54</text:p>
          </table:table-cell>
          <table:table-cell table:style-name="ce13" table:formula="of:=[.$B$6]*(1-EXP(-[.$B$7]*IF([.BV16]&gt;=[.$B$5];0;[.BV16])))^2*([.$B$11]+[.$B$12]*[.$B$9])+[.$B$13]*[.$B$8]*MIN(MAX([.$B$5]-1;0);[.BV$16])+[.$B$14]*[.$B$10]*[.BV$17]" office:value-type="float" office:value="16.7081994904689" calcext:value-type="float">
            <text:p>16.71</text:p>
          </table:table-cell>
          <table:table-cell table:style-name="ce13" table:formula="of:=[.$B$6]*(1-EXP(-[.$B$7]*IF([.BW16]&gt;=[.$B$5];0;[.BW16])))^2*([.$B$11]+[.$B$12]*[.$B$9])+[.$B$13]*[.$B$8]*MIN(MAX([.$B$5]-1;0);[.BW$16])+[.$B$14]*[.$B$10]*[.BW$17]" office:value-type="float" office:value="16.8751103889599" calcext:value-type="float">
            <text:p>16.88</text:p>
          </table:table-cell>
          <table:table-cell table:style-name="ce13" table:formula="of:=[.$B$6]*(1-EXP(-[.$B$7]*IF([.BX16]&gt;=[.$B$5];0;[.BX16])))^2*([.$B$11]+[.$B$12]*[.$B$9])+[.$B$13]*[.$B$8]*MIN(MAX([.$B$5]-1;0);[.BX$16])+[.$B$14]*[.$B$10]*[.BX$17]" office:value-type="float" office:value="17.0400930724229" calcext:value-type="float">
            <text:p>17.04</text:p>
          </table:table-cell>
          <table:table-cell table:style-name="ce13" table:formula="of:=[.$B$6]*(1-EXP(-[.$B$7]*IF([.BY16]&gt;=[.$B$5];0;[.BY16])))^2*([.$B$11]+[.$B$12]*[.$B$9])+[.$B$13]*[.$B$8]*MIN(MAX([.$B$5]-1;0);[.BY$16])+[.$B$14]*[.$B$10]*[.BY$17]" office:value-type="float" office:value="17.2031891774556" calcext:value-type="float">
            <text:p>17.20</text:p>
          </table:table-cell>
          <table:table-cell table:style-name="ce13" table:formula="of:=[.$B$6]*(1-EXP(-[.$B$7]*IF([.BZ16]&gt;=[.$B$5];0;[.BZ16])))^2*([.$B$11]+[.$B$12]*[.$B$9])+[.$B$13]*[.$B$8]*MIN(MAX([.$B$5]-1;0);[.BZ$16])+[.$B$14]*[.$B$10]*[.BZ$17]" office:value-type="float" office:value="17.3644400040679" calcext:value-type="float">
            <text:p>17.36</text:p>
          </table:table-cell>
          <table:table-cell table:style-name="ce13" table:formula="of:=[.$B$6]*(1-EXP(-[.$B$7]*IF([.CA16]&gt;=[.$B$5];0;[.CA16])))^2*([.$B$11]+[.$B$12]*[.$B$9])+[.$B$13]*[.$B$8]*MIN(MAX([.$B$5]-1;0);[.CA$16])+[.$B$14]*[.$B$10]*[.CA$17]" office:value-type="float" office:value="17.5238864735686" calcext:value-type="float">
            <text:p>17.52</text:p>
          </table:table-cell>
          <table:table-cell table:style-name="ce13" table:formula="of:=[.$B$6]*(1-EXP(-[.$B$7]*IF([.CB16]&gt;=[.$B$5];0;[.CB16])))^2*([.$B$11]+[.$B$12]*[.$B$9])+[.$B$13]*[.$B$8]*MIN(MAX([.$B$5]-1;0);[.CB$16])+[.$B$14]*[.$B$10]*[.CB$17]" office:value-type="float" office:value="17.6815690907299" calcext:value-type="float">
            <text:p>17.68</text:p>
          </table:table-cell>
          <table:table-cell table:style-name="ce13" table:formula="of:=[.$B$6]*(1-EXP(-[.$B$7]*IF([.CC16]&gt;=[.$B$5];0;[.CC16])))^2*([.$B$11]+[.$B$12]*[.$B$9])+[.$B$13]*[.$B$8]*MIN(MAX([.$B$5]-1;0);[.CC$16])+[.$B$14]*[.$B$10]*[.CC$17]" office:value-type="float" office:value="17.8375279099245" calcext:value-type="float">
            <text:p>17.84</text:p>
          </table:table-cell>
          <table:table-cell table:style-name="ce13" table:formula="of:=[.$B$6]*(1-EXP(-[.$B$7]*IF([.CD16]&gt;=[.$B$5];0;[.CD16])))^2*([.$B$11]+[.$B$12]*[.$B$9])+[.$B$13]*[.$B$8]*MIN(MAX([.$B$5]-1;0);[.CD$16])+[.$B$14]*[.$B$10]*[.CD$17]" office:value-type="float" office:value="17.9918025049525" calcext:value-type="float">
            <text:p>17.99</text:p>
          </table:table-cell>
          <table:table-cell table:style-name="ce13" table:formula="of:=[.$B$6]*(1-EXP(-[.$B$7]*IF([.CE16]&gt;=[.$B$5];0;[.CE16])))^2*([.$B$11]+[.$B$12]*[.$B$9])+[.$B$13]*[.$B$8]*MIN(MAX([.$B$5]-1;0);[.CE$16])+[.$B$14]*[.$B$10]*[.CE$17]" office:value-type="float" office:value="18.144431942293" calcext:value-type="float">
            <text:p>18.14</text:p>
          </table:table-cell>
          <table:table-cell table:style-name="ce13" table:formula="of:=[.$B$6]*(1-EXP(-[.$B$7]*IF([.CF16]&gt;=[.$B$5];0;[.CF16])))^2*([.$B$11]+[.$B$12]*[.$B$9])+[.$B$13]*[.$B$8]*MIN(MAX([.$B$5]-1;0);[.CF$16])+[.$B$14]*[.$B$10]*[.CF$17]" office:value-type="float" office:value="18.2954547575301" calcext:value-type="float">
            <text:p>18.30</text:p>
          </table:table-cell>
          <table:table-cell table:style-name="ce13" table:formula="of:=[.$B$6]*(1-EXP(-[.$B$7]*IF([.CG16]&gt;=[.$B$5];0;[.CG16])))^2*([.$B$11]+[.$B$12]*[.$B$9])+[.$B$13]*[.$B$8]*MIN(MAX([.$B$5]-1;0);[.CG$16])+[.$B$14]*[.$B$10]*[.CG$17]" office:value-type="float" office:value="18.4449089347222" calcext:value-type="float">
            <text:p>18.44</text:p>
          </table:table-cell>
          <table:table-cell table:style-name="ce13" table:formula="of:=[.$B$6]*(1-EXP(-[.$B$7]*IF([.CH16]&gt;=[.$B$5];0;[.CH16])))^2*([.$B$11]+[.$B$12]*[.$B$9])+[.$B$13]*[.$B$8]*MIN(MAX([.$B$5]-1;0);[.CH$16])+[.$B$14]*[.$B$10]*[.CH$17]" office:value-type="float" office:value="18.5928318884964" calcext:value-type="float">
            <text:p>18.59</text:p>
          </table:table-cell>
          <table:table-cell table:style-name="ce13" table:formula="of:=[.$B$6]*(1-EXP(-[.$B$7]*IF([.CI16]&gt;=[.$B$5];0;[.CI16])))^2*([.$B$11]+[.$B$12]*[.$B$9])+[.$B$13]*[.$B$8]*MIN(MAX([.$B$5]-1;0);[.CI$16])+[.$B$14]*[.$B$10]*[.CI$17]" office:value-type="float" office:value="18.7392604486635" calcext:value-type="float">
            <text:p>18.74</text:p>
          </table:table-cell>
          <table:table-cell table:style-name="ce13" table:formula="of:=[.$B$6]*(1-EXP(-[.$B$7]*IF([.CJ16]&gt;=[.$B$5];0;[.CJ16])))^2*([.$B$11]+[.$B$12]*[.$B$9])+[.$B$13]*[.$B$8]*MIN(MAX([.$B$5]-1;0);[.CJ$16])+[.$B$14]*[.$B$10]*[.CJ$17]" office:value-type="float" office:value="18.8842308471641" calcext:value-type="float">
            <text:p>18.88</text:p>
          </table:table-cell>
          <table:table-cell table:style-name="ce13" table:formula="of:=[.$B$6]*(1-EXP(-[.$B$7]*IF([.CK16]&gt;=[.$B$5];0;[.CK16])))^2*([.$B$11]+[.$B$12]*[.$B$9])+[.$B$13]*[.$B$8]*MIN(MAX([.$B$5]-1;0);[.CK$16])+[.$B$14]*[.$B$10]*[.CK$17]" office:value-type="float" office:value="19.0277787071671" calcext:value-type="float">
            <text:p>19.03</text:p>
          </table:table-cell>
          <table:table-cell table:style-name="ce13" table:formula="of:=[.$B$6]*(1-EXP(-[.$B$7]*IF([.CL16]&gt;=[.$B$5];0;[.CL16])))^2*([.$B$11]+[.$B$12]*[.$B$9])+[.$B$13]*[.$B$8]*MIN(MAX([.$B$5]-1;0);[.CL$16])+[.$B$14]*[.$B$10]*[.CL$17]" office:value-type="float" office:value="19.1699390341542" calcext:value-type="float">
            <text:p>19.17</text:p>
          </table:table-cell>
          <table:table-cell table:style-name="ce13" table:formula="of:=[.$B$6]*(1-EXP(-[.$B$7]*IF([.CM16]&gt;=[.$B$5];0;[.CM16])))^2*([.$B$11]+[.$B$12]*[.$B$9])+[.$B$13]*[.$B$8]*MIN(MAX([.$B$5]-1;0);[.CM$16])+[.$B$14]*[.$B$10]*[.CM$17]" office:value-type="float" office:value="19.3107462088352" calcext:value-type="float">
            <text:p>19.31</text:p>
          </table:table-cell>
          <table:table-cell table:style-name="ce13" table:formula="of:=[.$B$6]*(1-EXP(-[.$B$7]*IF([.CN16]&gt;=[.$B$5];0;[.CN16])))^2*([.$B$11]+[.$B$12]*[.$B$9])+[.$B$13]*[.$B$8]*MIN(MAX([.$B$5]-1;0);[.CN$16])+[.$B$14]*[.$B$10]*[.CN$17]" office:value-type="float" office:value="19.4502339817479" calcext:value-type="float">
            <text:p>19.45</text:p>
          </table:table-cell>
          <table:table-cell table:style-name="ce13" table:formula="of:=[.$B$6]*(1-EXP(-[.$B$7]*IF([.CO16]&gt;=[.$B$5];0;[.CO16])))^2*([.$B$11]+[.$B$12]*[.$B$9])+[.$B$13]*[.$B$8]*MIN(MAX([.$B$5]-1;0);[.CO$16])+[.$B$14]*[.$B$10]*[.CO$17]" office:value-type="float" office:value="19.5884354694074" calcext:value-type="float">
            <text:p>19.59</text:p>
          </table:table-cell>
          <table:table-cell table:style-name="ce13" table:formula="of:=[.$B$6]*(1-EXP(-[.$B$7]*IF([.CP16]&gt;=[.$B$5];0;[.CP16])))^2*([.$B$11]+[.$B$12]*[.$B$9])+[.$B$13]*[.$B$8]*MIN(MAX([.$B$5]-1;0);[.CP$16])+[.$B$14]*[.$B$10]*[.CP$17]" office:value-type="float" office:value="19.7253831518788" calcext:value-type="float">
            <text:p>19.73</text:p>
          </table:table-cell>
          <table:table-cell table:style-name="ce13" table:formula="of:=[.$B$6]*(1-EXP(-[.$B$7]*IF([.CQ16]&gt;=[.$B$5];0;[.CQ16])))^2*([.$B$11]+[.$B$12]*[.$B$9])+[.$B$13]*[.$B$8]*MIN(MAX([.$B$5]-1;0);[.CQ$16])+[.$B$14]*[.$B$10]*[.CQ$17]" office:value-type="float" office:value="19.8611088716531" calcext:value-type="float">
            <text:p>19.86</text:p>
          </table:table-cell>
          <table:table-cell table:style-name="ce13" table:formula="of:=[.$B$6]*(1-EXP(-[.$B$7]*IF([.CR16]&gt;=[.$B$5];0;[.CR16])))^2*([.$B$11]+[.$B$12]*[.$B$9])+[.$B$13]*[.$B$8]*MIN(MAX([.$B$5]-1;0);[.CR$16])+[.$B$14]*[.$B$10]*[.CR$17]" office:value-type="float" office:value="19.9956438337182" calcext:value-type="float">
            <text:p>20.00</text:p>
          </table:table-cell>
          <table:table-cell table:style-name="ce13" table:formula="of:=[.$B$6]*(1-EXP(-[.$B$7]*IF([.CS16]&gt;=[.$B$5];0;[.CS16])))^2*([.$B$11]+[.$B$12]*[.$B$9])+[.$B$13]*[.$B$8]*MIN(MAX([.$B$5]-1;0);[.CS$16])+[.$B$14]*[.$B$10]*[.CS$17]" office:value-type="float" office:value="20.1290186067202" calcext:value-type="float">
            <text:p>20.13</text:p>
          </table:table-cell>
          <table:table-cell table:style-name="ce13" table:formula="of:=[.$B$6]*(1-EXP(-[.$B$7]*IF([.CT16]&gt;=[.$B$5];0;[.CT16])))^2*([.$B$11]+[.$B$12]*[.$B$9])+[.$B$13]*[.$B$8]*MIN(MAX([.$B$5]-1;0);[.CT$16])+[.$B$14]*[.$B$10]*[.CT$17]" office:value-type="float" office:value="20.2612631251207" calcext:value-type="float">
            <text:p>20.26</text:p>
          </table:table-cell>
          <table:table-cell table:style-name="ce13" table:formula="of:=[.$B$6]*(1-EXP(-[.$B$7]*IF([.CU16]&gt;=[.$B$5];0;[.CU16])))^2*([.$B$11]+[.$B$12]*[.$B$9])+[.$B$13]*[.$B$8]*MIN(MAX([.$B$5]-1;0);[.CU$16])+[.$B$14]*[.$B$10]*[.CU$17]" office:value-type="float" office:value="20.392406692259" calcext:value-type="float">
            <text:p>20.39</text:p>
          </table:table-cell>
          <table:table-cell table:style-name="ce13" table:formula="of:=[.$B$6]*(1-EXP(-[.$B$7]*IF([.CV16]&gt;=[.$B$5];0;[.CV16])))^2*([.$B$11]+[.$B$12]*[.$B$9])+[.$B$13]*[.$B$8]*MIN(MAX([.$B$5]-1;0);[.CV$16])+[.$B$14]*[.$B$10]*[.CV$17]" office:value-type="float" office:value="20.5224779842384" calcext:value-type="float">
            <text:p>20.52</text:p>
          </table:table-cell>
          <table:table-cell table:style-name="ce13" table:formula="of:=[.$B$6]*(1-EXP(-[.$B$7]*IF([.CW16]&gt;=[.$B$5];0;[.CW16])))^2*([.$B$11]+[.$B$12]*[.$B$9])+[.$B$13]*[.$B$8]*MIN(MAX([.$B$5]-1;0);[.CW$16])+[.$B$14]*[.$B$10]*[.CW$17]" office:value-type="float" office:value="20.6515050545558" calcext:value-type="float">
            <text:p>20.65</text:p>
          </table:table-cell>
          <table:table-cell table:style-name="ce13" table:formula="of:=[.$B$6]*(1-EXP(-[.$B$7]*IF([.CX16]&gt;=[.$B$5];0;[.CX16])))^2*([.$B$11]+[.$B$12]*[.$B$9])+[.$B$13]*[.$B$8]*MIN(MAX([.$B$5]-1;0);[.CX$16])+[.$B$14]*[.$B$10]*[.CX$17]" office:value-type="float" office:value="20.779515339406" calcext:value-type="float">
            <text:p>20.78</text:p>
          </table:table-cell>
          <table:table-cell table:style-name="ce13" table:formula="of:=[.$B$6]*(1-EXP(-[.$B$7]*IF([.CY16]&gt;=[.$B$5];0;[.CY16])))^2*([.$B$11]+[.$B$12]*[.$B$9])+[.$B$13]*[.$B$8]*MIN(MAX([.$B$5]-1;0);[.CY$16])+[.$B$14]*[.$B$10]*[.CY$17]" office:value-type="float" office:value="20.9065356635906" calcext:value-type="float">
            <text:p>20.91</text:p>
          </table:table-cell>
          <table:table-cell table:style-name="ce13" table:formula="of:=[.$B$6]*(1-EXP(-[.$B$7]*IF([.CZ16]&gt;=[.$B$5];0;[.CZ16])))^2*([.$B$11]+[.$B$12]*[.$B$9])+[.$B$13]*[.$B$8]*MIN(MAX([.$B$5]-1;0);[.CZ$16])+[.$B$14]*[.$B$10]*[.CZ$17]" office:value-type="float" office:value="21.032592246972" calcext:value-type="float">
            <text:p>21.03</text:p>
          </table:table-cell>
          <table:table-cell table:style-name="ce13" table:formula="of:=[.$B$6]*(1-EXP(-[.$B$7]*IF([.DA16]&gt;=[.$B$5];0;[.DA16])))^2*([.$B$11]+[.$B$12]*[.$B$9])+[.$B$13]*[.$B$8]*MIN(MAX([.$B$5]-1;0);[.DA$16])+[.$B$14]*[.$B$10]*[.DA$17]" office:value-type="float" office:value="21.1577107114116" calcext:value-type="float">
            <text:p>21.16</text:p>
          </table:table-cell>
          <table:table-cell table:style-name="ce13" table:formula="of:=[.$B$6]*(1-EXP(-[.$B$7]*IF([.DB16]&gt;=[.$B$5];0;[.DB16])))^2*([.$B$11]+[.$B$12]*[.$B$9])+[.$B$13]*[.$B$8]*MIN(MAX([.$B$5]-1;0);[.DB$16])+[.$B$14]*[.$B$10]*[.DB$17]" office:value-type="float" office:value="21.2819160881412" calcext:value-type="float">
            <text:p>21.28</text:p>
          </table:table-cell>
          <table:table-cell table:style-name="ce13" table:formula="of:=[.$B$6]*(1-EXP(-[.$B$7]*IF([.DC16]&gt;=[.$B$5];0;[.DC16])))^2*([.$B$11]+[.$B$12]*[.$B$9])+[.$B$13]*[.$B$8]*MIN(MAX([.$B$5]-1;0);[.DC$16])+[.$B$14]*[.$B$10]*[.DC$17]" office:value-type="float" office:value="21.4052328255158" calcext:value-type="float">
            <text:p>21.41</text:p>
          </table:table-cell>
          <table:table-cell table:style-name="ce13" table:formula="of:=[.$B$6]*(1-EXP(-[.$B$7]*IF([.DD16]&gt;=[.$B$5];0;[.DD16])))^2*([.$B$11]+[.$B$12]*[.$B$9])+[.$B$13]*[.$B$8]*MIN(MAX([.$B$5]-1;0);[.DD$16])+[.$B$14]*[.$B$10]*[.DD$17]" office:value-type="float" office:value="21.5276847971032" calcext:value-type="float">
            <text:p>21.53</text:p>
          </table:table-cell>
          <table:table-cell table:style-name="ce13" table:formula="of:=[.$B$6]*(1-EXP(-[.$B$7]*IF([.DE16]&gt;=[.$B$5];0;[.DE16])))^2*([.$B$11]+[.$B$12]*[.$B$9])+[.$B$13]*[.$B$8]*MIN(MAX([.$B$5]-1;0);[.DE$16])+[.$B$14]*[.$B$10]*[.DE$17]" office:value-type="float" office:value="21.649295310065" calcext:value-type="float">
            <text:p>21.65</text:p>
          </table:table-cell>
          <table:table-cell table:style-name="ce13" table:formula="of:=[.$B$6]*(1-EXP(-[.$B$7]*IF([.DF16]&gt;=[.$B$5];0;[.DF16])))^2*([.$B$11]+[.$B$12]*[.$B$9])+[.$B$13]*[.$B$8]*MIN(MAX([.$B$5]-1;0);[.DF$16])+[.$B$14]*[.$B$10]*[.DF$17]" office:value-type="float" office:value="21.7700871137933" calcext:value-type="float">
            <text:p>21.77</text:p>
          </table:table-cell>
          <table:table-cell table:style-name="ce13" table:formula="of:=[.$B$6]*(1-EXP(-[.$B$7]*IF([.DG16]&gt;=[.$B$5];0;[.DG16])))^2*([.$B$11]+[.$B$12]*[.$B$9])+[.$B$13]*[.$B$8]*MIN(MAX([.$B$5]-1;0);[.DG$16])+[.$B$14]*[.$B$10]*[.DG$17]" office:value-type="float" office:value="21.8900824087619" calcext:value-type="float">
            <text:p>21.89</text:p>
          </table:table-cell>
          <table:table-cell table:style-name="ce13" table:formula="of:=[.$B$6]*(1-EXP(-[.$B$7]*IF([.DH16]&gt;=[.$B$5];0;[.DH16])))^2*([.$B$11]+[.$B$12]*[.$B$9])+[.$B$13]*[.$B$8]*MIN(MAX([.$B$5]-1;0);[.DH$16])+[.$B$14]*[.$B$10]*[.DH$17]" office:value-type="float" office:value="22.0093028555619" calcext:value-type="float">
            <text:p>22.01</text:p>
          </table:table-cell>
          <table:table-cell table:style-name="ce13" table:formula="of:=[.$B$6]*(1-EXP(-[.$B$7]*IF([.DI16]&gt;=[.$B$5];0;[.DI16])))^2*([.$B$11]+[.$B$12]*[.$B$9])+[.$B$13]*[.$B$8]*MIN(MAX([.$B$5]-1;0);[.DI$16])+[.$B$14]*[.$B$10]*[.DI$17]" office:value-type="float" office:value="22.1277695840885" calcext:value-type="float">
            <text:p>22.13</text:p>
          </table:table-cell>
          <table:table-cell table:style-name="ce13" table:formula="of:=[.$B$6]*(1-EXP(-[.$B$7]*IF([.DJ16]&gt;=[.$B$5];0;[.DJ16])))^2*([.$B$11]+[.$B$12]*[.$B$9])+[.$B$13]*[.$B$8]*MIN(MAX([.$B$5]-1;0);[.DJ$16])+[.$B$14]*[.$B$10]*[.DJ$17]" office:value-type="float" office:value="22.2455032028496" calcext:value-type="float">
            <text:p>22.25</text:p>
          </table:table-cell>
          <table:table-cell table:style-name="ce13" table:formula="of:=[.$B$6]*(1-EXP(-[.$B$7]*IF([.DK16]&gt;=[.$B$5];0;[.DK16])))^2*([.$B$11]+[.$B$12]*[.$B$9])+[.$B$13]*[.$B$8]*MIN(MAX([.$B$5]-1;0);[.DK$16])+[.$B$14]*[.$B$10]*[.DK$17]" office:value-type="float" office:value="22.3625238083722" calcext:value-type="float">
            <text:p>22.36</text:p>
          </table:table-cell>
          <table:table-cell table:style-name="ce13" table:formula="of:=[.$B$6]*(1-EXP(-[.$B$7]*IF([.DL16]&gt;=[.$B$5];0;[.DL16])))^2*([.$B$11]+[.$B$12]*[.$B$9])+[.$B$13]*[.$B$8]*MIN(MAX([.$B$5]-1;0);[.DL$16])+[.$B$14]*[.$B$10]*[.DL$17]" office:value-type="float" office:value="22.4788509946787" calcext:value-type="float">
            <text:p>22.48</text:p>
          </table:table-cell>
          <table:table-cell table:style-name="ce13" table:formula="of:=[.$B$6]*(1-EXP(-[.$B$7]*IF([.DM16]&gt;=[.$B$5];0;[.DM16])))^2*([.$B$11]+[.$B$12]*[.$B$9])+[.$B$13]*[.$B$8]*MIN(MAX([.$B$5]-1;0);[.DM$16])+[.$B$14]*[.$B$10]*[.DM$17]" office:value-type="float" office:value="22.5945038628139" calcext:value-type="float">
            <text:p>22.59</text:p>
          </table:table-cell>
          <table:table-cell table:style-name="ce13" table:formula="of:=[.$B$6]*(1-EXP(-[.$B$7]*IF([.DN16]&gt;=[.$B$5];0;[.DN16])))^2*([.$B$11]+[.$B$12]*[.$B$9])+[.$B$13]*[.$B$8]*MIN(MAX([.$B$5]-1;0);[.DN$16])+[.$B$14]*[.$B$10]*[.DN$17]" office:value-type="float" office:value="22.7095010303994" calcext:value-type="float">
            <text:p>22.71</text:p>
          </table:table-cell>
          <table:table-cell table:style-name="ce13" table:formula="of:=[.$B$6]*(1-EXP(-[.$B$7]*IF([.DO16]&gt;=[.$B$5];0;[.DO16])))^2*([.$B$11]+[.$B$12]*[.$B$9])+[.$B$13]*[.$B$8]*MIN(MAX([.$B$5]-1;0);[.DO$16])+[.$B$14]*[.$B$10]*[.DO$17]" office:value-type="float" office:value="22.8238606411982" calcext:value-type="float">
            <text:p>22.82</text:p>
          </table:table-cell>
          <table:table-cell table:style-name="ce13" table:formula="of:=[.$B$6]*(1-EXP(-[.$B$7]*IF([.DP16]&gt;=[.$B$5];0;[.DP16])))^2*([.$B$11]+[.$B$12]*[.$B$9])+[.$B$13]*[.$B$8]*MIN(MAX([.$B$5]-1;0);[.DP$16])+[.$B$14]*[.$B$10]*[.DP$17]" office:value-type="float" office:value="22.9376003746719" calcext:value-type="float">
            <text:p>22.94</text:p>
          </table:table-cell>
          <table:table-cell table:style-name="ce13" table:formula="of:=[.$B$6]*(1-EXP(-[.$B$7]*IF([.DQ16]&gt;=[.$B$5];0;[.DQ16])))^2*([.$B$11]+[.$B$12]*[.$B$9])+[.$B$13]*[.$B$8]*MIN(MAX([.$B$5]-1;0);[.DQ$16])+[.$B$14]*[.$B$10]*[.DQ$17]" office:value-type="float" office:value="13.572684908649" calcext:value-type="float">
            <text:p>13.57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2" office:value-type="string" calcext:value-type="string">
            <text:p>Carbon schedule, annual_pl(t) tC/ha/year</text:p>
          </table:table-cell>
          <table:table-cell table:style-name="ce13" table:formula="of:=[.B$18]" office:value-type="float" office:value="0.103754746739128" calcext:value-type="float">
            <text:p>0.10</text:p>
          </table:table-cell>
          <table:table-cell table:style-name="ce13" table:formula="of:=[.C$18]-[.B$18]" office:value-type="float" office:value="0.12447464757399" calcext:value-type="float">
            <text:p>0.12</text:p>
          </table:table-cell>
          <table:table-cell table:style-name="ce13" table:formula="of:=[.D$18]-[.C$18]" office:value-type="float" office:value="0.14335660763396" calcext:value-type="float">
            <text:p>0.14</text:p>
          </table:table-cell>
          <table:table-cell table:style-name="ce13" table:formula="of:=[.E$18]-[.D$18]" office:value-type="float" office:value="0.160526318219127" calcext:value-type="float">
            <text:p>0.16</text:p>
          </table:table-cell>
          <table:table-cell table:style-name="ce13" table:formula="of:=[.F$18]-[.E$18]" office:value-type="float" office:value="0.176101599511985" calcext:value-type="float">
            <text:p>0.18</text:p>
          </table:table-cell>
          <table:table-cell table:style-name="ce13" table:formula="of:=[.G$18]-[.F$18]" office:value-type="float" office:value="0.190192875252748" calcext:value-type="float">
            <text:p>0.19</text:p>
          </table:table-cell>
          <table:table-cell table:style-name="ce13" table:formula="of:=[.H$18]-[.G$18]" office:value-type="float" office:value="0.202903619290064" calcext:value-type="float">
            <text:p>0.20</text:p>
          </table:table-cell>
          <table:table-cell table:style-name="ce13" table:formula="of:=[.I$18]-[.H$18]" office:value-type="float" office:value="0.214330775659228" calcext:value-type="float">
            <text:p>0.21</text:p>
          </table:table-cell>
          <table:table-cell table:style-name="ce13" table:formula="of:=[.J$18]-[.I$18]" office:value-type="float" office:value="0.224565153743341" calcext:value-type="float">
            <text:p>0.22</text:p>
          </table:table-cell>
          <table:table-cell table:style-name="ce13" table:formula="of:=[.K$18]-[.J$18]" office:value-type="float" office:value="0.233691799981873" calcext:value-type="float">
            <text:p>0.23</text:p>
          </table:table-cell>
          <table:table-cell table:style-name="ce13" table:formula="of:=[.L$18]-[.K$18]" office:value-type="float" office:value="0.241790347505428" calcext:value-type="float">
            <text:p>0.24</text:p>
          </table:table-cell>
          <table:table-cell table:style-name="ce13" table:formula="of:=[.M$18]-[.L$18]" office:value-type="float" office:value="0.24893534499479" calcext:value-type="float">
            <text:p>0.25</text:p>
          </table:table-cell>
          <table:table-cell table:style-name="ce13" table:formula="of:=[.N$18]-[.M$18]" office:value-type="float" office:value="0.255196565986406" calcext:value-type="float">
            <text:p>0.26</text:p>
          </table:table-cell>
          <table:table-cell table:style-name="ce13" table:formula="of:=[.O$18]-[.N$18]" office:value-type="float" office:value="0.260639299774907" calcext:value-type="float">
            <text:p>0.26</text:p>
          </table:table-cell>
          <table:table-cell table:style-name="ce13" table:formula="of:=[.P$18]-[.O$18]" office:value-type="float" office:value="0.265324624995888" calcext:value-type="float">
            <text:p>0.27</text:p>
          </table:table-cell>
          <table:table-cell table:style-name="ce13" table:formula="of:=[.Q$18]-[.P$18]" office:value-type="float" office:value="0.2693096669088" calcext:value-type="float">
            <text:p>0.27</text:p>
          </table:table-cell>
          <table:table-cell table:style-name="ce13" table:formula="of:=[.R$18]-[.Q$18]" office:value-type="float" office:value="0.272647839340023" calcext:value-type="float">
            <text:p>0.27</text:p>
          </table:table-cell>
          <table:table-cell table:style-name="ce13" table:formula="of:=[.S$18]-[.R$18]" office:value-type="float" office:value="0.275389072190008" calcext:value-type="float">
            <text:p>0.28</text:p>
          </table:table-cell>
          <table:table-cell table:style-name="ce13" table:formula="of:=[.T$18]-[.S$18]" office:value-type="float" office:value="0.2775800253554" calcext:value-type="float">
            <text:p>0.28</text:p>
          </table:table-cell>
          <table:table-cell table:style-name="ce13" table:formula="of:=[.U$18]-[.T$18]" office:value-type="float" office:value="0.279264289867186" calcext:value-type="float">
            <text:p>0.28</text:p>
          </table:table-cell>
          <table:table-cell table:style-name="ce13" table:formula="of:=[.V$18]-[.U$18]" office:value-type="float" office:value="0.280482576999018" calcext:value-type="float">
            <text:p>0.28</text:p>
          </table:table-cell>
          <table:table-cell table:style-name="ce13" table:formula="of:=[.W$18]-[.V$18]" office:value-type="float" office:value="0.281272896055595" calcext:value-type="float">
            <text:p>0.28</text:p>
          </table:table-cell>
          <table:table-cell table:style-name="ce13" table:formula="of:=[.X$18]-[.W$18]" office:value-type="float" office:value="0.28167072150944" calcext:value-type="float">
            <text:p>0.28</text:p>
          </table:table-cell>
          <table:table-cell table:style-name="ce13" table:formula="of:=[.Y$18]-[.X$18]" office:value-type="float" office:value="0.281709150115115" calcext:value-type="float">
            <text:p>0.28</text:p>
          </table:table-cell>
          <table:table-cell table:style-name="ce13" table:formula="of:=[.Z$18]-[.Y$18]" office:value-type="float" office:value="0.281419048593197" calcext:value-type="float">
            <text:p>0.28</text:p>
          </table:table-cell>
          <table:table-cell table:style-name="ce13" table:formula="of:=[.AA$18]-[.Z$18]" office:value-type="float" office:value="0.280829192441359" calcext:value-type="float">
            <text:p>0.28</text:p>
          </table:table-cell>
          <table:table-cell table:style-name="ce13" table:formula="of:=[.AB$18]-[.AA$18]" office:value-type="float" office:value="0.279966396397426" calcext:value-type="float">
            <text:p>0.28</text:p>
          </table:table-cell>
          <table:table-cell table:style-name="ce13" table:formula="of:=[.AC$18]-[.AB$18]" office:value-type="float" office:value="0.278855637048329" calcext:value-type="float">
            <text:p>0.28</text:p>
          </table:table-cell>
          <table:table-cell table:style-name="ce13" table:formula="of:=[.AD$18]-[.AC$18]" office:value-type="float" office:value="0.277520168049899" calcext:value-type="float">
            <text:p>0.28</text:p>
          </table:table-cell>
          <table:table-cell table:style-name="ce13" table:formula="of:=[.AE$18]-[.AD$18]" office:value-type="float" office:value="0.275981628395233" calcext:value-type="float">
            <text:p>0.28</text:p>
          </table:table-cell>
          <table:table-cell table:style-name="ce13" table:formula="of:=[.AF$18]-[.AE$18]" office:value-type="float" office:value="0.274260144143527" calcext:value-type="float">
            <text:p>0.27</text:p>
          </table:table-cell>
          <table:table-cell table:style-name="ce13" table:formula="of:=[.AG$18]-[.AF$18]" office:value-type="float" office:value="0.272374423997171" calcext:value-type="float">
            <text:p>0.27</text:p>
          </table:table-cell>
          <table:table-cell table:style-name="ce13" table:formula="of:=[.AH$18]-[.AG$18]" office:value-type="float" office:value="0.270341849092109" calcext:value-type="float">
            <text:p>0.27</text:p>
          </table:table-cell>
          <table:table-cell table:style-name="ce13" table:formula="of:=[.AI$18]-[.AH$18]" office:value-type="float" office:value="0.268178557344895" calcext:value-type="float">
            <text:p>0.27</text:p>
          </table:table-cell>
          <table:table-cell table:style-name="ce13" table:formula="of:=[.AJ$18]-[.AI$18]" office:value-type="float" office:value="0.265899522679867" calcext:value-type="float">
            <text:p>0.27</text:p>
          </table:table-cell>
          <table:table-cell table:style-name="ce13" table:formula="of:=[.AK$18]-[.AJ$18]" office:value-type="float" office:value="0.263518629440663" calcext:value-type="float">
            <text:p>0.26</text:p>
          </table:table-cell>
          <table:table-cell table:style-name="ce13" table:formula="of:=[.AL$18]-[.AK$18]" office:value-type="float" office:value="0.261048742272584" calcext:value-type="float">
            <text:p>0.26</text:p>
          </table:table-cell>
          <table:table-cell table:style-name="ce13" table:formula="of:=[.AM$18]-[.AL$18]" office:value-type="float" office:value="0.258501771745209" calcext:value-type="float">
            <text:p>0.26</text:p>
          </table:table-cell>
          <table:table-cell table:style-name="ce13" table:formula="of:=[.AN$18]-[.AM$18]" office:value-type="float" office:value="0.255888735969076" calcext:value-type="float">
            <text:p>0.26</text:p>
          </table:table-cell>
          <table:table-cell table:style-name="ce13" table:formula="of:=[.AO$18]-[.AN$18]" office:value-type="float" office:value="0.253219818445112" calcext:value-type="float">
            <text:p>0.25</text:p>
          </table:table-cell>
          <table:table-cell table:style-name="ce13" table:formula="of:=[.AP$18]-[.AO$18]" office:value-type="float" office:value="0.250504422371488" calcext:value-type="float">
            <text:p>0.25</text:p>
          </table:table-cell>
          <table:table-cell table:style-name="ce13" table:formula="of:=[.AQ$18]-[.AP$18]" office:value-type="float" office:value="0.247751221619302" calcext:value-type="float">
            <text:p>0.25</text:p>
          </table:table-cell>
          <table:table-cell table:style-name="ce13" table:formula="of:=[.AR$18]-[.AQ$18]" office:value-type="float" office:value="0.244968208576204" calcext:value-type="float">
            <text:p>0.24</text:p>
          </table:table-cell>
          <table:table-cell table:style-name="ce13" table:formula="of:=[.AS$18]-[.AR$18]" office:value-type="float" office:value="0.242162739044939" calcext:value-type="float">
            <text:p>0.24</text:p>
          </table:table-cell>
          <table:table-cell table:style-name="ce13" table:formula="of:=[.AT$18]-[.AS$18]" office:value-type="float" office:value="0.239341574373345" calcext:value-type="float">
            <text:p>0.24</text:p>
          </table:table-cell>
          <table:table-cell table:style-name="ce13" table:formula="of:=[.AU$18]-[.AT$18]" office:value-type="float" office:value="0.236510920981228" calcext:value-type="float">
            <text:p>0.24</text:p>
          </table:table-cell>
          <table:table-cell table:style-name="ce13" table:formula="of:=[.AV$18]-[.AU$18]" office:value-type="float" office:value="0.233676467440411" calcext:value-type="float">
            <text:p>0.23</text:p>
          </table:table-cell>
          <table:table-cell table:style-name="ce13" table:formula="of:=[.AW$18]-[.AV$18]" office:value-type="float" office:value="0.230843419254597" calcext:value-type="float">
            <text:p>0.23</text:p>
          </table:table-cell>
          <table:table-cell table:style-name="ce13" table:formula="of:=[.AX$18]-[.AW$18]" office:value-type="float" office:value="0.228016531477156" calcext:value-type="float">
            <text:p>0.23</text:p>
          </table:table-cell>
          <table:table-cell table:style-name="ce13" table:formula="of:=[.AY$18]-[.AX$18]" office:value-type="float" office:value="0.225200139296883" calcext:value-type="float">
            <text:p>0.23</text:p>
          </table:table-cell>
          <table:table-cell table:style-name="ce13" table:formula="of:=[.AZ$18]-[.AY$18]" office:value-type="float" office:value="0.222398186713823" calcext:value-type="float">
            <text:p>0.22</text:p>
          </table:table-cell>
          <table:table-cell table:style-name="ce13" table:formula="of:=[.BA$18]-[.AZ$18]" office:value-type="float" office:value="0.219614253420382" calcext:value-type="float">
            <text:p>0.22</text:p>
          </table:table-cell>
          <table:table-cell table:style-name="ce13" table:formula="of:=[.BB$18]-[.BA$18]" office:value-type="float" office:value="0.216851579995744" calcext:value-type="float">
            <text:p>0.22</text:p>
          </table:table-cell>
          <table:table-cell table:style-name="ce13" table:formula="of:=[.BC$18]-[.BB$18]" office:value-type="float" office:value="0.214113091515545" calcext:value-type="float">
            <text:p>0.21</text:p>
          </table:table-cell>
          <table:table-cell table:style-name="ce13" table:formula="of:=[.BD$18]-[.BC$18]" office:value-type="float" office:value="0.211401419672471" calcext:value-type="float">
            <text:p>0.21</text:p>
          </table:table-cell>
          <table:table-cell table:style-name="ce13" table:formula="of:=[.BE$18]-[.BD$18]" office:value-type="float" office:value="0.208718923497957" calcext:value-type="float">
            <text:p>0.21</text:p>
          </table:table-cell>
          <table:table-cell table:style-name="ce13" table:formula="of:=[.BF$18]-[.BE$18]" office:value-type="float" office:value="0.206067708769597" calcext:value-type="float">
            <text:p>0.21</text:p>
          </table:table-cell>
          <table:table-cell table:style-name="ce13" table:formula="of:=[.BG$18]-[.BF$18]" office:value-type="float" office:value="0.203449646184172" calcext:value-type="float">
            <text:p>0.20</text:p>
          </table:table-cell>
          <table:table-cell table:style-name="ce13" table:formula="of:=[.BH$18]-[.BG$18]" office:value-type="float" office:value="0.20086638837102" calcext:value-type="float">
            <text:p>0.20</text:p>
          </table:table-cell>
          <table:table-cell table:style-name="ce13" table:formula="of:=[.BI$18]-[.BH$18]" office:value-type="float" office:value="0.198319385816541" calcext:value-type="float">
            <text:p>0.20</text:p>
          </table:table-cell>
          <table:table-cell table:style-name="ce13" table:formula="of:=[.BJ$18]-[.BI$18]" office:value-type="float" office:value="0.195809901765873" calcext:value-type="float">
            <text:p>0.20</text:p>
          </table:table-cell>
          <table:table-cell table:style-name="ce13" table:formula="of:=[.BK$18]-[.BJ$18]" office:value-type="float" office:value="0.193339026164395" calcext:value-type="float">
            <text:p>0.19</text:p>
          </table:table-cell>
          <table:table-cell table:style-name="ce13" table:formula="of:=[.BL$18]-[.BK$18]" office:value-type="float" office:value="0.190907688697454" calcext:value-type="float">
            <text:p>0.19</text:p>
          </table:table-cell>
          <table:table-cell table:style-name="ce13" table:formula="of:=[.BM$18]-[.BL$18]" office:value-type="float" office:value="0.188516670983681" calcext:value-type="float">
            <text:p>0.19</text:p>
          </table:table-cell>
          <table:table-cell table:style-name="ce13" table:formula="of:=[.BN$18]-[.BM$18]" office:value-type="float" office:value="0.186166617973683" calcext:value-type="float">
            <text:p>0.19</text:p>
          </table:table-cell>
          <table:table-cell table:style-name="ce13" table:formula="of:=[.BO$18]-[.BN$18]" office:value-type="float" office:value="0.183858048602815" calcext:value-type="float">
            <text:p>0.18</text:p>
          </table:table-cell>
          <table:table-cell table:style-name="ce13" table:formula="of:=[.BP$18]-[.BO$18]" office:value-type="float" office:value="0.18159136574404" calcext:value-type="float">
            <text:p>0.18</text:p>
          </table:table-cell>
          <table:table-cell table:style-name="ce13" table:formula="of:=[.BQ$18]-[.BP$18]" office:value-type="float" office:value="0.179366865503905" calcext:value-type="float">
            <text:p>0.18</text:p>
          </table:table-cell>
          <table:table-cell table:style-name="ce13" table:formula="of:=[.BR$18]-[.BQ$18]" office:value-type="float" office:value="0.177184745902117" calcext:value-type="float">
            <text:p>0.18</text:p>
          </table:table-cell>
          <table:table-cell table:style-name="ce13" table:formula="of:=[.BS$18]-[.BR$18]" office:value-type="float" office:value="0.17504511497301" calcext:value-type="float">
            <text:p>0.18</text:p>
          </table:table-cell>
          <table:table-cell table:style-name="ce13" table:formula="of:=[.BT$18]-[.BS$18]" office:value-type="float" office:value="0.172947998324467" calcext:value-type="float">
            <text:p>0.17</text:p>
          </table:table-cell>
          <table:table-cell table:style-name="ce13" table:formula="of:=[.BU$18]-[.BT$18]" office:value-type="float" office:value="0.170893346188272" calcext:value-type="float">
            <text:p>0.17</text:p>
          </table:table-cell>
          <table:table-cell table:style-name="ce13" table:formula="of:=[.BV$18]-[.BU$18]" office:value-type="float" office:value="0.168881039993231" calcext:value-type="float">
            <text:p>0.17</text:p>
          </table:table-cell>
          <table:table-cell table:style-name="ce13" table:formula="of:=[.BW$18]-[.BV$18]" office:value-type="float" office:value="0.166910898491079" calcext:value-type="float">
            <text:p>0.17</text:p>
          </table:table-cell>
          <table:table-cell table:style-name="ce13" table:formula="of:=[.BX$18]-[.BW$18]" office:value-type="float" office:value="0.164982683462942" calcext:value-type="float">
            <text:p>0.16</text:p>
          </table:table-cell>
          <table:table-cell table:style-name="ce13" table:formula="of:=[.BY$18]-[.BX$18]" office:value-type="float" office:value="0.163096105032764" calcext:value-type="float">
            <text:p>0.16</text:p>
          </table:table-cell>
          <table:table-cell table:style-name="ce13" table:formula="of:=[.BZ$18]-[.BY$18]" office:value-type="float" office:value="0.161250826612257" calcext:value-type="float">
            <text:p>0.16</text:p>
          </table:table-cell>
          <table:table-cell table:style-name="ce13" table:formula="of:=[.CA$18]-[.BZ$18]" office:value-type="float" office:value="0.159446469500701" calcext:value-type="float">
            <text:p>0.16</text:p>
          </table:table-cell>
          <table:table-cell table:style-name="ce13" table:formula="of:=[.CB$18]-[.CA$18]" office:value-type="float" office:value="0.157682617161299" calcext:value-type="float">
            <text:p>0.16</text:p>
          </table:table-cell>
          <table:table-cell table:style-name="ce13" table:formula="of:=[.CC$18]-[.CB$18]" office:value-type="float" office:value="0.155958819194566" calcext:value-type="float">
            <text:p>0.16</text:p>
          </table:table-cell>
          <table:table-cell table:style-name="ce13" table:formula="of:=[.CD$18]-[.CC$18]" office:value-type="float" office:value="0.154274595028078" calcext:value-type="float">
            <text:p>0.15</text:p>
          </table:table-cell>
          <table:table-cell table:style-name="ce13" table:formula="of:=[.CE$18]-[.CD$18]" office:value-type="float" office:value="0.152629437340508" calcext:value-type="float">
            <text:p>0.15</text:p>
          </table:table-cell>
          <table:table-cell table:style-name="ce13" table:formula="of:=[.CF$18]-[.CE$18]" office:value-type="float" office:value="0.151022815237059" calcext:value-type="float">
            <text:p>0.15</text:p>
          </table:table-cell>
          <table:table-cell table:style-name="ce13" table:formula="of:=[.CG$18]-[.CF$18]" office:value-type="float" office:value="0.149454177192126" calcext:value-type="float">
            <text:p>0.15</text:p>
          </table:table-cell>
          <table:table-cell table:style-name="ce13" table:formula="of:=[.CH$18]-[.CG$18]" office:value-type="float" office:value="0.147922953774209" calcext:value-type="float">
            <text:p>0.15</text:p>
          </table:table-cell>
          <table:table-cell table:style-name="ce13" table:formula="of:=[.CI$18]-[.CH$18]" office:value-type="float" office:value="0.146428560167099" calcext:value-type="float">
            <text:p>0.15</text:p>
          </table:table-cell>
          <table:table-cell table:style-name="ce13" table:formula="of:=[.CJ$18]-[.CI$18]" office:value-type="float" office:value="0.144970398500583" calcext:value-type="float">
            <text:p>0.14</text:p>
          </table:table-cell>
          <table:table-cell table:style-name="ce13" table:formula="of:=[.CK$18]-[.CJ$18]" office:value-type="float" office:value="0.143547860002961" calcext:value-type="float">
            <text:p>0.14</text:p>
          </table:table-cell>
          <table:table-cell table:style-name="ce13" table:formula="of:=[.CL$18]-[.CK$18]" office:value-type="float" office:value="0.142160326987138" calcext:value-type="float">
            <text:p>0.14</text:p>
          </table:table-cell>
          <table:table-cell table:style-name="ce13" table:formula="of:=[.CM$18]-[.CL$18]" office:value-type="float" office:value="0.140807174681008" calcext:value-type="float">
            <text:p>0.14</text:p>
          </table:table-cell>
          <table:table-cell table:style-name="ce13" table:formula="of:=[.CN$18]-[.CM$18]" office:value-type="float" office:value="0.139487772912631" calcext:value-type="float">
            <text:p>0.14</text:p>
          </table:table-cell>
          <table:table-cell table:style-name="ce13" table:formula="of:=[.CO$18]-[.CN$18]" office:value-type="float" office:value="0.138201487659536" calcext:value-type="float">
            <text:p>0.14</text:p>
          </table:table-cell>
          <table:table-cell table:style-name="ce13" table:formula="of:=[.CP$18]-[.CO$18]" office:value-type="float" office:value="0.136947682471387" calcext:value-type="float">
            <text:p>0.14</text:p>
          </table:table-cell>
          <table:table-cell table:style-name="ce13" table:formula="of:=[.CQ$18]-[.CP$18]" office:value-type="float" office:value="0.135725719774339" calcext:value-type="float">
            <text:p>0.14</text:p>
          </table:table-cell>
          <table:table-cell table:style-name="ce13" table:formula="of:=[.CR$18]-[.CQ$18]" office:value-type="float" office:value="0.134534962065086" calcext:value-type="float">
            <text:p>0.13</text:p>
          </table:table-cell>
          <table:table-cell table:style-name="ce13" table:formula="of:=[.CS$18]-[.CR$18]" office:value-type="float" office:value="0.133374773002025" calcext:value-type="float">
            <text:p>0.13</text:p>
          </table:table-cell>
          <table:table-cell table:style-name="ce13" table:formula="of:=[.CT$18]-[.CS$18]" office:value-type="float" office:value="0.132244518400423" calcext:value-type="float">
            <text:p>0.13</text:p>
          </table:table-cell>
          <table:table-cell table:style-name="ce13" table:formula="of:=[.CU$18]-[.CT$18]" office:value-type="float" office:value="0.131143567138381" calcext:value-type="float">
            <text:p>0.13</text:p>
          </table:table-cell>
          <table:table-cell table:style-name="ce13" table:formula="of:=[.CV$18]-[.CU$18]" office:value-type="float" office:value="0.13007129197937" calcext:value-type="float">
            <text:p>0.13</text:p>
          </table:table-cell>
          <table:table-cell table:style-name="ce13" table:formula="of:=[.CW$18]-[.CV$18]" office:value-type="float" office:value="0.12902707031742" calcext:value-type="float">
            <text:p>0.13</text:p>
          </table:table-cell>
          <table:table-cell table:style-name="ce13" table:formula="of:=[.CX$18]-[.CW$18]" office:value-type="float" office:value="0.128010284850138" calcext:value-type="float">
            <text:p>0.13</text:p>
          </table:table-cell>
          <table:table-cell table:style-name="ce13" table:formula="of:=[.CY$18]-[.CX$18]" office:value-type="float" office:value="0.127020324184667" calcext:value-type="float">
            <text:p>0.13</text:p>
          </table:table-cell>
          <table:table-cell table:style-name="ce13" table:formula="of:=[.CZ$18]-[.CY$18]" office:value-type="float" office:value="0.126056583381377" calcext:value-type="float">
            <text:p>0.13</text:p>
          </table:table-cell>
          <table:table-cell table:style-name="ce13" table:formula="of:=[.DA$18]-[.CZ$18]" office:value-type="float" office:value="0.125118464439584" calcext:value-type="float">
            <text:p>0.13</text:p>
          </table:table-cell>
          <table:table-cell table:style-name="ce13" table:formula="of:=[.DB$18]-[.DA$18]" office:value-type="float" office:value="0.124205376729563" calcext:value-type="float">
            <text:p>0.12</text:p>
          </table:table-cell>
          <table:table-cell table:style-name="ce13" table:formula="of:=[.DC$18]-[.DB$18]" office:value-type="float" office:value="0.123316737374687" calcext:value-type="float">
            <text:p>0.12</text:p>
          </table:table-cell>
          <table:table-cell table:style-name="ce13" table:formula="of:=[.DD$18]-[.DC$18]" office:value-type="float" office:value="0.12245197158731" calcext:value-type="float">
            <text:p>0.12</text:p>
          </table:table-cell>
          <table:table-cell table:style-name="ce13" table:formula="of:=[.DE$18]-[.DD$18]" office:value-type="float" office:value="0.121610512961865" calcext:value-type="float">
            <text:p>0.12</text:p>
          </table:table-cell>
          <table:table-cell table:style-name="ce13" table:formula="of:=[.DF$18]-[.DE$18]" office:value-type="float" office:value="0.120791803728252" calcext:value-type="float">
            <text:p>0.12</text:p>
          </table:table-cell>
          <table:table-cell table:style-name="ce13" table:formula="of:=[.DG$18]-[.DF$18]" office:value-type="float" office:value="0.119995294968589" calcext:value-type="float">
            <text:p>0.12</text:p>
          </table:table-cell>
          <table:table-cell table:style-name="ce13" table:formula="of:=[.DH$18]-[.DG$18]" office:value-type="float" office:value="0.119220446800071" calcext:value-type="float">
            <text:p>0.12</text:p>
          </table:table-cell>
          <table:table-cell table:style-name="ce13" table:formula="of:=[.DI$18]-[.DH$18]" office:value-type="float" office:value="0.118466728526531" calcext:value-type="float">
            <text:p>0.12</text:p>
          </table:table-cell>
          <table:table-cell table:style-name="ce13" table:formula="of:=[.DJ$18]-[.DI$18]" office:value-type="float" office:value="0.117733618761147" calcext:value-type="float">
            <text:p>0.12</text:p>
          </table:table-cell>
          <table:table-cell table:style-name="ce13" table:formula="of:=[.DK$18]-[.DJ$18]" office:value-type="float" office:value="0.117020605522555" calcext:value-type="float">
            <text:p>0.12</text:p>
          </table:table-cell>
          <table:table-cell table:style-name="ce13" table:formula="of:=[.DL$18]-[.DK$18]" office:value-type="float" office:value="0.116327186306542" calcext:value-type="float">
            <text:p>0.12</text:p>
          </table:table-cell>
          <table:table-cell table:style-name="ce13" table:formula="of:=[.DM$18]-[.DL$18]" office:value-type="float" office:value="0.115652868135186" calcext:value-type="float">
            <text:p>0.12</text:p>
          </table:table-cell>
          <table:table-cell table:style-name="ce13" table:formula="of:=[.DN$18]-[.DM$18]" office:value-type="float" office:value="0.114997167585464" calcext:value-type="float">
            <text:p>0.11</text:p>
          </table:table-cell>
          <table:table-cell table:style-name="ce13" table:formula="of:=[.DO$18]-[.DN$18]" office:value-type="float" office:value="0.11435961079885" calcext:value-type="float">
            <text:p>0.11</text:p>
          </table:table-cell>
          <table:table-cell table:style-name="ce13" table:formula="of:=[.DP$18]-[.DO$18]" office:value-type="float" office:value="0.113739733473714" calcext:value-type="float">
            <text:p>0.11</text:p>
          </table:table-cell>
          <table:table-cell table:style-name="ce13" table:formula="of:=[.DQ$18]-[.DP$18]" office:value-type="float" office:value="-9.36491546602295" calcext:value-type="float">
            <text:p>-9.36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style-name="ce1" office:value-type="string" calcext:value-type="string">
            <text:p>Carbon schedule, annual_pl(t) tC/ha/year, calculus</text:p>
          </table:table-cell>
          <table:table-cell table:style-name="ce13" table:formula="of:=IF([.B16]&lt;=[.$B$5]-[.$B$14];2*[.$B$7]*[.$B$6]*([.$B$11]+[.$B$12]*[.$B$9])*(EXP(-[.$B$7]*[.B16]) - EXP(-2*[.$B$7]*[.B16])) + [.$B$13]*[.$B$8];- [.$B$6]*(1-EXP(-[.$B$7]*[.B$16]))^2*IF([.B16]=[.$B$5];1;0))" office:value-type="float" office:value="0.11443190497298" calcext:value-type="float">
            <text:p>0.11</text:p>
          </table:table-cell>
          <table:table-cell table:style-name="ce13" table:formula="of:=IF([.C16]&lt;=[.$B$5]-[.$B$14];2*[.$B$7]*[.$B$6]*([.$B$11]+[.$B$12]*[.$B$9])*(EXP(-[.$B$7]*[.C16]) - EXP(-2*[.$B$7]*[.C16])) + [.$B$13]*[.$B$8];- [.$B$6]*(1-EXP(-[.$B$7]*[.C$16]))^2*IF([.C16]=[.$B$5];1;0))" office:value-type="float" office:value="0.134211206231521" calcext:value-type="float">
            <text:p>0.13</text:p>
          </table:table-cell>
          <table:table-cell table:style-name="ce13" table:formula="of:=IF([.D16]&lt;=[.$B$5]-[.$B$14];2*[.$B$7]*[.$B$6]*([.$B$11]+[.$B$12]*[.$B$9])*(EXP(-[.$B$7]*[.D16]) - EXP(-2*[.$B$7]*[.D16])) + [.$B$13]*[.$B$8];- [.$B$6]*(1-EXP(-[.$B$7]*[.D$16]))^2*IF([.D16]=[.$B$5];1;0))" office:value-type="float" office:value="0.152216765238127" calcext:value-type="float">
            <text:p>0.15</text:p>
          </table:table-cell>
          <table:table-cell table:style-name="ce13" table:formula="of:=IF([.E16]&lt;=[.$B$5]-[.$B$14];2*[.$B$7]*[.$B$6]*([.$B$11]+[.$B$12]*[.$B$9])*(EXP(-[.$B$7]*[.E16]) - EXP(-2*[.$B$7]*[.E16])) + [.$B$13]*[.$B$8];- [.$B$6]*(1-EXP(-[.$B$7]*[.E$16]))^2*IF([.E16]=[.$B$5];1;0))" office:value-type="float" office:value="0.168570256191857" calcext:value-type="float">
            <text:p>0.17</text:p>
          </table:table-cell>
          <table:table-cell table:style-name="ce13" table:formula="of:=IF([.F16]&lt;=[.$B$5]-[.$B$14];2*[.$B$7]*[.$B$6]*([.$B$11]+[.$B$12]*[.$B$9])*(EXP(-[.$B$7]*[.F16]) - EXP(-2*[.$B$7]*[.F16])) + [.$B$13]*[.$B$8];- [.$B$6]*(1-EXP(-[.$B$7]*[.F$16]))^2*IF([.F16]=[.$B$5];1;0))" office:value-type="float" office:value="0.183385724341965" calcext:value-type="float">
            <text:p>0.18</text:p>
          </table:table-cell>
          <table:table-cell table:style-name="ce13" table:formula="of:=IF([.G16]&lt;=[.$B$5]-[.$B$14];2*[.$B$7]*[.$B$6]*([.$B$11]+[.$B$12]*[.$B$9])*(EXP(-[.$B$7]*[.G16]) - EXP(-2*[.$B$7]*[.G16])) + [.$B$13]*[.$B$8];- [.$B$6]*(1-EXP(-[.$B$7]*[.G$16]))^2*IF([.G16]=[.$B$5];1;0))" office:value-type="float" office:value="0.196770046317222" calcext:value-type="float">
            <text:p>0.20</text:p>
          </table:table-cell>
          <table:table-cell table:style-name="ce13" table:formula="of:=IF([.H16]&lt;=[.$B$5]-[.$B$14];2*[.$B$7]*[.$B$6]*([.$B$11]+[.$B$12]*[.$B$9])*(EXP(-[.$B$7]*[.H16]) - EXP(-2*[.$B$7]*[.H16])) + [.$B$13]*[.$B$8];- [.$B$6]*(1-EXP(-[.$B$7]*[.H$16]))^2*IF([.H16]=[.$B$5];1;0))" office:value-type="float" office:value="0.208823363173279" calcext:value-type="float">
            <text:p>0.21</text:p>
          </table:table-cell>
          <table:table-cell table:style-name="ce13" table:formula="of:=IF([.I16]&lt;=[.$B$5]-[.$B$14];2*[.$B$7]*[.$B$6]*([.$B$11]+[.$B$12]*[.$B$9])*(EXP(-[.$B$7]*[.I16]) - EXP(-2*[.$B$7]*[.I16])) + [.$B$13]*[.$B$8];- [.$B$6]*(1-EXP(-[.$B$7]*[.I$16]))^2*IF([.I16]=[.$B$5];1;0))" office:value-type="float" office:value="0.219639487760872" calcext:value-type="float">
            <text:p>0.22</text:p>
          </table:table-cell>
          <table:table-cell table:style-name="ce13" table:formula="of:=IF([.J16]&lt;=[.$B$5]-[.$B$14];2*[.$B$7]*[.$B$6]*([.$B$11]+[.$B$12]*[.$B$9])*(EXP(-[.$B$7]*[.J16]) - EXP(-2*[.$B$7]*[.J16])) + [.$B$13]*[.$B$8];- [.$B$6]*(1-EXP(-[.$B$7]*[.J$16]))^2*IF([.J16]=[.$B$5];1;0))" office:value-type="float" office:value="0.229306287923925" calcext:value-type="float">
            <text:p>0.23</text:p>
          </table:table-cell>
          <table:table-cell table:style-name="ce13" table:formula="of:=IF([.K16]&lt;=[.$B$5]-[.$B$14];2*[.$B$7]*[.$B$6]*([.$B$11]+[.$B$12]*[.$B$9])*(EXP(-[.$B$7]*[.K16]) - EXP(-2*[.$B$7]*[.K16])) + [.$B$13]*[.$B$8];- [.$B$6]*(1-EXP(-[.$B$7]*[.K$16]))^2*IF([.K16]=[.$B$5];1;0))" office:value-type="float" office:value="0.237906046948295" calcext:value-type="float">
            <text:p>0.24</text:p>
          </table:table-cell>
          <table:table-cell table:style-name="ce13" table:formula="of:=IF([.L16]&lt;=[.$B$5]-[.$B$14];2*[.$B$7]*[.$B$6]*([.$B$11]+[.$B$12]*[.$B$9])*(EXP(-[.$B$7]*[.L16]) - EXP(-2*[.$B$7]*[.L16])) + [.$B$13]*[.$B$8];- [.$B$6]*(1-EXP(-[.$B$7]*[.L$16]))^2*IF([.L16]=[.$B$5];1;0))" office:value-type="float" office:value="0.245515802598812" calcext:value-type="float">
            <text:p>0.25</text:p>
          </table:table-cell>
          <table:table-cell table:style-name="ce13" table:formula="of:=IF([.M16]&lt;=[.$B$5]-[.$B$14];2*[.$B$7]*[.$B$6]*([.$B$11]+[.$B$12]*[.$B$9])*(EXP(-[.$B$7]*[.M16]) - EXP(-2*[.$B$7]*[.M16])) + [.$B$13]*[.$B$8];- [.$B$6]*(1-EXP(-[.$B$7]*[.M$16]))^2*IF([.M16]=[.$B$5];1;0))" office:value-type="float" office:value="0.252207666003961" calcext:value-type="float">
            <text:p>0.25</text:p>
          </table:table-cell>
          <table:table-cell table:style-name="ce13" table:formula="of:=IF([.N16]&lt;=[.$B$5]-[.$B$14];2*[.$B$7]*[.$B$6]*([.$B$11]+[.$B$12]*[.$B$9])*(EXP(-[.$B$7]*[.N16]) - EXP(-2*[.$B$7]*[.N16])) + [.$B$13]*[.$B$8];- [.$B$6]*(1-EXP(-[.$B$7]*[.N$16]))^2*IF([.N16]=[.$B$5];1;0))" office:value-type="float" office:value="0.258049121573864" calcext:value-type="float">
            <text:p>0.26</text:p>
          </table:table-cell>
          <table:table-cell table:style-name="ce13" table:formula="of:=IF([.O16]&lt;=[.$B$5]-[.$B$14];2*[.$B$7]*[.$B$6]*([.$B$11]+[.$B$12]*[.$B$9])*(EXP(-[.$B$7]*[.O16]) - EXP(-2*[.$B$7]*[.O16])) + [.$B$13]*[.$B$8];- [.$B$6]*(1-EXP(-[.$B$7]*[.O$16]))^2*IF([.O16]=[.$B$5];1;0))" office:value-type="float" office:value="0.263103309067799" calcext:value-type="float">
            <text:p>0.26</text:p>
          </table:table-cell>
          <table:table-cell table:style-name="ce13" table:formula="of:=IF([.P16]&lt;=[.$B$5]-[.$B$14];2*[.$B$7]*[.$B$6]*([.$B$11]+[.$B$12]*[.$B$9])*(EXP(-[.$B$7]*[.P16]) - EXP(-2*[.$B$7]*[.P16])) + [.$B$13]*[.$B$8];- [.$B$6]*(1-EXP(-[.$B$7]*[.P$16]))^2*IF([.P16]=[.$B$5];1;0))" office:value-type="float" office:value="0.267429288862168" calcext:value-type="float">
            <text:p>0.27</text:p>
          </table:table-cell>
          <table:table-cell table:style-name="ce13" table:formula="of:=IF([.Q16]&lt;=[.$B$5]-[.$B$14];2*[.$B$7]*[.$B$6]*([.$B$11]+[.$B$12]*[.$B$9])*(EXP(-[.$B$7]*[.Q16]) - EXP(-2*[.$B$7]*[.Q16])) + [.$B$13]*[.$B$8];- [.$B$6]*(1-EXP(-[.$B$7]*[.Q$16]))^2*IF([.Q16]=[.$B$5];1;0))" office:value-type="float" office:value="0.271082291408258" calcext:value-type="float">
            <text:p>0.27</text:p>
          </table:table-cell>
          <table:table-cell table:style-name="ce13" table:formula="of:=IF([.R16]&lt;=[.$B$5]-[.$B$14];2*[.$B$7]*[.$B$6]*([.$B$11]+[.$B$12]*[.$B$9])*(EXP(-[.$B$7]*[.R16]) - EXP(-2*[.$B$7]*[.R16])) + [.$B$13]*[.$B$8];- [.$B$6]*(1-EXP(-[.$B$7]*[.R$16]))^2*IF([.R16]=[.$B$5];1;0))" office:value-type="float" office:value="0.274113951811226" calcext:value-type="float">
            <text:p>0.27</text:p>
          </table:table-cell>
          <table:table-cell table:style-name="ce13" table:formula="of:=IF([.S16]&lt;=[.$B$5]-[.$B$14];2*[.$B$7]*[.$B$6]*([.$B$11]+[.$B$12]*[.$B$9])*(EXP(-[.$B$7]*[.S16]) - EXP(-2*[.$B$7]*[.S16])) + [.$B$13]*[.$B$8];- [.$B$6]*(1-EXP(-[.$B$7]*[.S$16]))^2*IF([.S16]=[.$B$5];1;0))" office:value-type="float" office:value="0.276572530407162" calcext:value-type="float">
            <text:p>0.28</text:p>
          </table:table-cell>
          <table:table-cell table:style-name="ce13" table:formula="of:=IF([.T16]&lt;=[.$B$5]-[.$B$14];2*[.$B$7]*[.$B$6]*([.$B$11]+[.$B$12]*[.$B$9])*(EXP(-[.$B$7]*[.T16]) - EXP(-2*[.$B$7]*[.T16])) + [.$B$13]*[.$B$8];- [.$B$6]*(1-EXP(-[.$B$7]*[.T$16]))^2*IF([.T16]=[.$B$5];1;0))" office:value-type="float" office:value="0.278503120163724" calcext:value-type="float">
            <text:p>0.28</text:p>
          </table:table-cell>
          <table:table-cell table:style-name="ce13" table:formula="of:=IF([.U16]&lt;=[.$B$5]-[.$B$14];2*[.$B$7]*[.$B$6]*([.$B$11]+[.$B$12]*[.$B$9])*(EXP(-[.$B$7]*[.U16]) - EXP(-2*[.$B$7]*[.U16])) + [.$B$13]*[.$B$8];- [.$B$6]*(1-EXP(-[.$B$7]*[.U$16]))^2*IF([.U16]=[.$B$5];1;0))" office:value-type="float" office:value="0.279947841681459" calcext:value-type="float">
            <text:p>0.28</text:p>
          </table:table-cell>
          <table:table-cell table:style-name="ce13" table:formula="of:=IF([.V16]&lt;=[.$B$5]-[.$B$14];2*[.$B$7]*[.$B$6]*([.$B$11]+[.$B$12]*[.$B$9])*(EXP(-[.$B$7]*[.V16]) - EXP(-2*[.$B$7]*[.V16])) + [.$B$13]*[.$B$8];- [.$B$6]*(1-EXP(-[.$B$7]*[.V$16]))^2*IF([.V16]=[.$B$5];1;0))" office:value-type="float" office:value="0.280946026527388" calcext:value-type="float">
            <text:p>0.28</text:p>
          </table:table-cell>
          <table:table-cell table:style-name="ce13" table:formula="of:=IF([.W16]&lt;=[.$B$5]-[.$B$14];2*[.$B$7]*[.$B$6]*([.$B$11]+[.$B$12]*[.$B$9])*(EXP(-[.$B$7]*[.W16]) - EXP(-2*[.$B$7]*[.W16])) + [.$B$13]*[.$B$8];- [.$B$6]*(1-EXP(-[.$B$7]*[.W$16]))^2*IF([.W16]=[.$B$5];1;0))" office:value-type="float" office:value="0.281534389589542" calcext:value-type="float">
            <text:p>0.28</text:p>
          </table:table-cell>
          <table:table-cell table:style-name="ce13" table:formula="of:=IF([.X16]&lt;=[.$B$5]-[.$B$14];2*[.$B$7]*[.$B$6]*([.$B$11]+[.$B$12]*[.$B$9])*(EXP(-[.$B$7]*[.X16]) - EXP(-2*[.$B$7]*[.X16])) + [.$B$13]*[.$B$8];- [.$B$6]*(1-EXP(-[.$B$7]*[.X$16]))^2*IF([.X16]=[.$B$5];1;0))" office:value-type="float" office:value="0.281747191100762" calcext:value-type="float">
            <text:p>0.28</text:p>
          </table:table-cell>
          <table:table-cell table:style-name="ce13" table:formula="of:=IF([.Y16]&lt;=[.$B$5]-[.$B$14];2*[.$B$7]*[.$B$6]*([.$B$11]+[.$B$12]*[.$B$9])*(EXP(-[.$B$7]*[.Y16]) - EXP(-2*[.$B$7]*[.Y16])) + [.$B$13]*[.$B$8];- [.$B$6]*(1-EXP(-[.$B$7]*[.Y$16]))^2*IF([.Y16]=[.$B$5];1;0))" office:value-type="float" office:value="0.281616388942055" calcext:value-type="float">
            <text:p>0.28</text:p>
          </table:table-cell>
          <table:table-cell table:style-name="ce13" table:formula="of:=IF([.Z16]&lt;=[.$B$5]-[.$B$14];2*[.$B$7]*[.$B$6]*([.$B$11]+[.$B$12]*[.$B$9])*(EXP(-[.$B$7]*[.Z16]) - EXP(-2*[.$B$7]*[.Z16])) + [.$B$13]*[.$B$8];- [.$B$6]*(1-EXP(-[.$B$7]*[.Z$16]))^2*IF([.Z16]=[.$B$5];1;0))" office:value-type="float" office:value="0.281171781799994" calcext:value-type="float">
            <text:p>0.28</text:p>
          </table:table-cell>
          <table:table-cell table:style-name="ce13" table:formula="of:=IF([.AA16]&lt;=[.$B$5]-[.$B$14];2*[.$B$7]*[.$B$6]*([.$B$11]+[.$B$12]*[.$B$9])*(EXP(-[.$B$7]*[.AA16]) - EXP(-2*[.$B$7]*[.AA16])) + [.$B$13]*[.$B$8];- [.$B$6]*(1-EXP(-[.$B$7]*[.AA$16]))^2*IF([.AA16]=[.$B$5];1;0))" office:value-type="float" office:value="0.280441143718971" calcext:value-type="float">
            <text:p>0.28</text:p>
          </table:table-cell>
          <table:table-cell table:style-name="ce13" table:formula="of:=IF([.AB16]&lt;=[.$B$5]-[.$B$14];2*[.$B$7]*[.$B$6]*([.$B$11]+[.$B$12]*[.$B$9])*(EXP(-[.$B$7]*[.AB16]) - EXP(-2*[.$B$7]*[.AB16])) + [.$B$13]*[.$B$8];- [.$B$6]*(1-EXP(-[.$B$7]*[.AB$16]))^2*IF([.AB16]=[.$B$5];1;0))" office:value-type="float" office:value="0.279450350557331" calcext:value-type="float">
            <text:p>0.28</text:p>
          </table:table-cell>
          <table:table-cell table:style-name="ce13" table:formula="of:=IF([.AC16]&lt;=[.$B$5]-[.$B$14];2*[.$B$7]*[.$B$6]*([.$B$11]+[.$B$12]*[.$B$9])*(EXP(-[.$B$7]*[.AC16]) - EXP(-2*[.$B$7]*[.AC16])) + [.$B$13]*[.$B$8];- [.$B$6]*(1-EXP(-[.$B$7]*[.AC$16]))^2*IF([.AC16]=[.$B$5];1;0))" office:value-type="float" office:value="0.27822349882659" calcext:value-type="float">
            <text:p>0.28</text:p>
          </table:table-cell>
          <table:table-cell table:style-name="ce13" table:formula="of:=IF([.AD16]&lt;=[.$B$5]-[.$B$14];2*[.$B$7]*[.$B$6]*([.$B$11]+[.$B$12]*[.$B$9])*(EXP(-[.$B$7]*[.AD16]) - EXP(-2*[.$B$7]*[.AD16])) + [.$B$13]*[.$B$8];- [.$B$6]*(1-EXP(-[.$B$7]*[.AD$16]))^2*IF([.AD16]=[.$B$5];1;0))" office:value-type="float" office:value="0.276783017364765" calcext:value-type="float">
            <text:p>0.28</text:p>
          </table:table-cell>
          <table:table-cell table:style-name="ce13" table:formula="of:=IF([.AE16]&lt;=[.$B$5]-[.$B$14];2*[.$B$7]*[.$B$6]*([.$B$11]+[.$B$12]*[.$B$9])*(EXP(-[.$B$7]*[.AE16]) - EXP(-2*[.$B$7]*[.AE16])) + [.$B$13]*[.$B$8];- [.$B$6]*(1-EXP(-[.$B$7]*[.AE$16]))^2*IF([.AE16]=[.$B$5];1;0))" office:value-type="float" office:value="0.275149772268374" calcext:value-type="float">
            <text:p>0.28</text:p>
          </table:table-cell>
          <table:table-cell table:style-name="ce13" table:formula="of:=IF([.AF16]&lt;=[.$B$5]-[.$B$14];2*[.$B$7]*[.$B$6]*([.$B$11]+[.$B$12]*[.$B$9])*(EXP(-[.$B$7]*[.AF16]) - EXP(-2*[.$B$7]*[.AF16])) + [.$B$13]*[.$B$8];- [.$B$6]*(1-EXP(-[.$B$7]*[.AF$16]))^2*IF([.AF16]=[.$B$5];1;0))" office:value-type="float" office:value="0.273343165482724" calcext:value-type="float">
            <text:p>0.27</text:p>
          </table:table-cell>
          <table:table-cell table:style-name="ce13" table:formula="of:=IF([.AG16]&lt;=[.$B$5]-[.$B$14];2*[.$B$7]*[.$B$6]*([.$B$11]+[.$B$12]*[.$B$9])*(EXP(-[.$B$7]*[.AG16]) - EXP(-2*[.$B$7]*[.AG16])) + [.$B$13]*[.$B$8];- [.$B$6]*(1-EXP(-[.$B$7]*[.AG$16]))^2*IF([.AG16]=[.$B$5];1;0))" office:value-type="float" office:value="0.27138122742664" calcext:value-type="float">
            <text:p>0.27</text:p>
          </table:table-cell>
          <table:table-cell table:style-name="ce13" table:formula="of:=IF([.AH16]&lt;=[.$B$5]-[.$B$14];2*[.$B$7]*[.$B$6]*([.$B$11]+[.$B$12]*[.$B$9])*(EXP(-[.$B$7]*[.AH16]) - EXP(-2*[.$B$7]*[.AH16])) + [.$B$13]*[.$B$8];- [.$B$6]*(1-EXP(-[.$B$7]*[.AH$16]))^2*IF([.AH16]=[.$B$5];1;0))" office:value-type="float" office:value="0.269280704005632" calcext:value-type="float">
            <text:p>0.27</text:p>
          </table:table-cell>
          <table:table-cell table:style-name="ce13" table:formula="of:=IF([.AI16]&lt;=[.$B$5]-[.$B$14];2*[.$B$7]*[.$B$6]*([.$B$11]+[.$B$12]*[.$B$9])*(EXP(-[.$B$7]*[.AI16]) - EXP(-2*[.$B$7]*[.AI16])) + [.$B$13]*[.$B$8];- [.$B$6]*(1-EXP(-[.$B$7]*[.AI$16]))^2*IF([.AI16]=[.$B$5];1;0))" office:value-type="float" office:value="0.267057138346757" calcext:value-type="float">
            <text:p>0.27</text:p>
          </table:table-cell>
          <table:table-cell table:style-name="ce13" table:formula="of:=IF([.AJ16]&lt;=[.$B$5]-[.$B$14];2*[.$B$7]*[.$B$6]*([.$B$11]+[.$B$12]*[.$B$9])*(EXP(-[.$B$7]*[.AJ16]) - EXP(-2*[.$B$7]*[.AJ16])) + [.$B$13]*[.$B$8];- [.$B$6]*(1-EXP(-[.$B$7]*[.AJ$16]))^2*IF([.AJ16]=[.$B$5];1;0))" office:value-type="float" office:value="0.264724947568779" calcext:value-type="float">
            <text:p>0.26</text:p>
          </table:table-cell>
          <table:table-cell table:style-name="ce13" table:formula="of:=IF([.AK16]&lt;=[.$B$5]-[.$B$14];2*[.$B$7]*[.$B$6]*([.$B$11]+[.$B$12]*[.$B$9])*(EXP(-[.$B$7]*[.AK16]) - EXP(-2*[.$B$7]*[.AK16])) + [.$B$13]*[.$B$8];- [.$B$6]*(1-EXP(-[.$B$7]*[.AK$16]))^2*IF([.AK16]=[.$B$5];1;0))" office:value-type="float" office:value="0.262297494882799" calcext:value-type="float">
            <text:p>0.26</text:p>
          </table:table-cell>
          <table:table-cell table:style-name="ce13" table:formula="of:=IF([.AL16]&lt;=[.$B$5]-[.$B$14];2*[.$B$7]*[.$B$6]*([.$B$11]+[.$B$12]*[.$B$9])*(EXP(-[.$B$7]*[.AL16]) - EXP(-2*[.$B$7]*[.AL16])) + [.$B$13]*[.$B$8];- [.$B$6]*(1-EXP(-[.$B$7]*[.AL$16]))^2*IF([.AL16]=[.$B$5];1;0))" office:value-type="float" office:value="0.259787157301175" calcext:value-type="float">
            <text:p>0.26</text:p>
          </table:table-cell>
          <table:table-cell table:style-name="ce13" table:formula="of:=IF([.AM16]&lt;=[.$B$5]-[.$B$14];2*[.$B$7]*[.$B$6]*([.$B$11]+[.$B$12]*[.$B$9])*(EXP(-[.$B$7]*[.AM16]) - EXP(-2*[.$B$7]*[.AM16])) + [.$B$13]*[.$B$8];- [.$B$6]*(1-EXP(-[.$B$7]*[.AM$16]))^2*IF([.AM16]=[.$B$5];1;0))" office:value-type="float" office:value="0.257205389216179" calcext:value-type="float">
            <text:p>0.26</text:p>
          </table:table-cell>
          <table:table-cell table:style-name="ce13" table:formula="of:=IF([.AN16]&lt;=[.$B$5]-[.$B$14];2*[.$B$7]*[.$B$6]*([.$B$11]+[.$B$12]*[.$B$9])*(EXP(-[.$B$7]*[.AN16]) - EXP(-2*[.$B$7]*[.AN16])) + [.$B$13]*[.$B$8];- [.$B$6]*(1-EXP(-[.$B$7]*[.AN$16]))^2*IF([.AN16]=[.$B$5];1;0))" office:value-type="float" office:value="0.254562782094454" calcext:value-type="float">
            <text:p>0.25</text:p>
          </table:table-cell>
          <table:table-cell table:style-name="ce13" table:formula="of:=IF([.AO16]&lt;=[.$B$5]-[.$B$14];2*[.$B$7]*[.$B$6]*([.$B$11]+[.$B$12]*[.$B$9])*(EXP(-[.$B$7]*[.AO16]) - EXP(-2*[.$B$7]*[.AO16])) + [.$B$13]*[.$B$8];- [.$B$6]*(1-EXP(-[.$B$7]*[.AO$16]))^2*IF([.AO16]=[.$B$5];1;0))" office:value-type="float" office:value="0.251869120518829" calcext:value-type="float">
            <text:p>0.25</text:p>
          </table:table-cell>
          <table:table-cell table:style-name="ce13" table:formula="of:=IF([.AP16]&lt;=[.$B$5]-[.$B$14];2*[.$B$7]*[.$B$6]*([.$B$11]+[.$B$12]*[.$B$9])*(EXP(-[.$B$7]*[.AP16]) - EXP(-2*[.$B$7]*[.AP16])) + [.$B$13]*[.$B$8];- [.$B$6]*(1-EXP(-[.$B$7]*[.AP$16]))^2*IF([.AP16]=[.$B$5];1;0))" office:value-type="float" office:value="0.249133434795435" calcext:value-type="float">
            <text:p>0.25</text:p>
          </table:table-cell>
          <table:table-cell table:style-name="ce13" table:formula="of:=IF([.AQ16]&lt;=[.$B$5]-[.$B$14];2*[.$B$7]*[.$B$6]*([.$B$11]+[.$B$12]*[.$B$9])*(EXP(-[.$B$7]*[.AQ16]) - EXP(-2*[.$B$7]*[.AQ16])) + [.$B$13]*[.$B$8];- [.$B$6]*(1-EXP(-[.$B$7]*[.AQ$16]))^2*IF([.AQ16]=[.$B$5];1;0))" office:value-type="float" office:value="0.24636405033118" calcext:value-type="float">
            <text:p>0.25</text:p>
          </table:table-cell>
          <table:table-cell table:style-name="ce13" table:formula="of:=IF([.AR16]&lt;=[.$B$5]-[.$B$14];2*[.$B$7]*[.$B$6]*([.$B$11]+[.$B$12]*[.$B$9])*(EXP(-[.$B$7]*[.AR16]) - EXP(-2*[.$B$7]*[.AR16])) + [.$B$13]*[.$B$8];- [.$B$6]*(1-EXP(-[.$B$7]*[.AR$16]))^2*IF([.AR16]=[.$B$5];1;0))" office:value-type="float" office:value="0.243568633974582" calcext:value-type="float">
            <text:p>0.24</text:p>
          </table:table-cell>
          <table:table-cell table:style-name="ce13" table:formula="of:=IF([.AS16]&lt;=[.$B$5]-[.$B$14];2*[.$B$7]*[.$B$6]*([.$B$11]+[.$B$12]*[.$B$9])*(EXP(-[.$B$7]*[.AS16]) - EXP(-2*[.$B$7]*[.AS16])) + [.$B$13]*[.$B$8];- [.$B$6]*(1-EXP(-[.$B$7]*[.AS$16]))^2*IF([.AS16]=[.$B$5];1;0))" office:value-type="float" office:value="0.240754237501555" calcext:value-type="float">
            <text:p>0.24</text:p>
          </table:table-cell>
          <table:table-cell table:style-name="ce13" table:formula="of:=IF([.AT16]&lt;=[.$B$5]-[.$B$14];2*[.$B$7]*[.$B$6]*([.$B$11]+[.$B$12]*[.$B$9])*(EXP(-[.$B$7]*[.AT16]) - EXP(-2*[.$B$7]*[.AT16])) + [.$B$13]*[.$B$8];- [.$B$6]*(1-EXP(-[.$B$7]*[.AT$16]))^2*IF([.AT16]=[.$B$5];1;0))" office:value-type="float" office:value="0.237927338417043" calcext:value-type="float">
            <text:p>0.24</text:p>
          </table:table-cell>
          <table:table-cell table:style-name="ce13" table:formula="of:=IF([.AU16]&lt;=[.$B$5]-[.$B$14];2*[.$B$7]*[.$B$6]*([.$B$11]+[.$B$12]*[.$B$9])*(EXP(-[.$B$7]*[.AU16]) - EXP(-2*[.$B$7]*[.AU16])) + [.$B$13]*[.$B$8];- [.$B$6]*(1-EXP(-[.$B$7]*[.AU$16]))^2*IF([.AU16]=[.$B$5];1;0))" office:value-type="float" office:value="0.235093878233288" calcext:value-type="float">
            <text:p>0.24</text:p>
          </table:table-cell>
          <table:table-cell table:style-name="ce13" table:formula="of:=IF([.AV16]&lt;=[.$B$5]-[.$B$14];2*[.$B$7]*[.$B$6]*([.$B$11]+[.$B$12]*[.$B$9])*(EXP(-[.$B$7]*[.AV16]) - EXP(-2*[.$B$7]*[.AV16])) + [.$B$13]*[.$B$8];- [.$B$6]*(1-EXP(-[.$B$7]*[.AV$16]))^2*IF([.AV16]=[.$B$5];1;0))" office:value-type="float" office:value="0.23225929837604" calcext:value-type="float">
            <text:p>0.23</text:p>
          </table:table-cell>
          <table:table-cell table:style-name="ce13" table:formula="of:=IF([.AW16]&lt;=[.$B$5]-[.$B$14];2*[.$B$7]*[.$B$6]*([.$B$11]+[.$B$12]*[.$B$9])*(EXP(-[.$B$7]*[.AW16]) - EXP(-2*[.$B$7]*[.AW16])) + [.$B$13]*[.$B$8];- [.$B$6]*(1-EXP(-[.$B$7]*[.AW$16]))^2*IF([.AW16]=[.$B$5];1;0))" office:value-type="float" office:value="0.229428573861079" calcext:value-type="float">
            <text:p>0.23</text:p>
          </table:table-cell>
          <table:table-cell table:style-name="ce13" table:formula="of:=IF([.AX16]&lt;=[.$B$5]-[.$B$14];2*[.$B$7]*[.$B$6]*([.$B$11]+[.$B$12]*[.$B$9])*(EXP(-[.$B$7]*[.AX16]) - EXP(-2*[.$B$7]*[.AX16])) + [.$B$13]*[.$B$8];- [.$B$6]*(1-EXP(-[.$B$7]*[.AX$16]))^2*IF([.AX16]=[.$B$5];1;0))" office:value-type="float" office:value="0.22660624487497" calcext:value-type="float">
            <text:p>0.23</text:p>
          </table:table-cell>
          <table:table-cell table:style-name="ce13" table:formula="of:=IF([.AY16]&lt;=[.$B$5]-[.$B$14];2*[.$B$7]*[.$B$6]*([.$B$11]+[.$B$12]*[.$B$9])*(EXP(-[.$B$7]*[.AY16]) - EXP(-2*[.$B$7]*[.AY16])) + [.$B$13]*[.$B$8];- [.$B$6]*(1-EXP(-[.$B$7]*[.AY$16]))^2*IF([.AY16]=[.$B$5];1;0))" office:value-type="float" office:value="0.223796446386108" calcext:value-type="float">
            <text:p>0.22</text:p>
          </table:table-cell>
          <table:table-cell table:style-name="ce13" table:formula="of:=IF([.AZ16]&lt;=[.$B$5]-[.$B$14];2*[.$B$7]*[.$B$6]*([.$B$11]+[.$B$12]*[.$B$9])*(EXP(-[.$B$7]*[.AZ16]) - EXP(-2*[.$B$7]*[.AZ16])) + [.$B$13]*[.$B$8];- [.$B$6]*(1-EXP(-[.$B$7]*[.AZ$16]))^2*IF([.AZ16]=[.$B$5];1;0))" office:value-type="float" office:value="0.22100293590459" calcext:value-type="float">
            <text:p>0.22</text:p>
          </table:table-cell>
          <table:table-cell table:style-name="ce13" table:formula="of:=IF([.BA16]&lt;=[.$B$5]-[.$B$14];2*[.$B$7]*[.$B$6]*([.$B$11]+[.$B$12]*[.$B$9])*(EXP(-[.$B$7]*[.BA16]) - EXP(-2*[.$B$7]*[.BA16])) + [.$B$13]*[.$B$8];- [.$B$6]*(1-EXP(-[.$B$7]*[.BA$16]))^2*IF([.BA16]=[.$B$5];1;0))" office:value-type="float" office:value="0.21822911950249" calcext:value-type="float">
            <text:p>0.22</text:p>
          </table:table-cell>
          <table:table-cell table:style-name="ce13" table:formula="of:=IF([.BB16]&lt;=[.$B$5]-[.$B$14];2*[.$B$7]*[.$B$6]*([.$B$11]+[.$B$12]*[.$B$9])*(EXP(-[.$B$7]*[.BB16]) - EXP(-2*[.$B$7]*[.BB16])) + [.$B$13]*[.$B$8];- [.$B$6]*(1-EXP(-[.$B$7]*[.BB$16]))^2*IF([.BB16]=[.$B$5];1;0))" office:value-type="float" office:value="0.215478076199458" calcext:value-type="float">
            <text:p>0.22</text:p>
          </table:table-cell>
          <table:table-cell table:style-name="ce13" table:formula="of:=IF([.BC16]&lt;=[.$B$5]-[.$B$14];2*[.$B$7]*[.$B$6]*([.$B$11]+[.$B$12]*[.$B$9])*(EXP(-[.$B$7]*[.BC16]) - EXP(-2*[.$B$7]*[.BC16])) + [.$B$13]*[.$B$8];- [.$B$6]*(1-EXP(-[.$B$7]*[.BC$16]))^2*IF([.BC16]=[.$B$5];1;0))" office:value-type="float" office:value="0.212752580812379" calcext:value-type="float">
            <text:p>0.21</text:p>
          </table:table-cell>
          <table:table-cell table:style-name="ce13" table:formula="of:=IF([.BD16]&lt;=[.$B$5]-[.$B$14];2*[.$B$7]*[.$B$6]*([.$B$11]+[.$B$12]*[.$B$9])*(EXP(-[.$B$7]*[.BD16]) - EXP(-2*[.$B$7]*[.BD16])) + [.$B$13]*[.$B$8];- [.$B$6]*(1-EXP(-[.$B$7]*[.BD$16]))^2*IF([.BD16]=[.$B$5];1;0))" office:value-type="float" office:value="0.210055125361953" calcext:value-type="float">
            <text:p>0.21</text:p>
          </table:table-cell>
          <table:table-cell table:style-name="ce13" table:formula="of:=IF([.BE16]&lt;=[.$B$5]-[.$B$14];2*[.$B$7]*[.$B$6]*([.$B$11]+[.$B$12]*[.$B$9])*(EXP(-[.$B$7]*[.BE16]) - EXP(-2*[.$B$7]*[.BE16])) + [.$B$13]*[.$B$8];- [.$B$6]*(1-EXP(-[.$B$7]*[.BE$16]))^2*IF([.BE16]=[.$B$5];1;0))" office:value-type="float" office:value="0.207387939123572" calcext:value-type="float">
            <text:p>0.21</text:p>
          </table:table-cell>
          <table:table-cell table:style-name="ce13" table:formula="of:=IF([.BF16]&lt;=[.$B$5]-[.$B$14];2*[.$B$7]*[.$B$6]*([.$B$11]+[.$B$12]*[.$B$9])*(EXP(-[.$B$7]*[.BF16]) - EXP(-2*[.$B$7]*[.BF16])) + [.$B$13]*[.$B$8];- [.$B$6]*(1-EXP(-[.$B$7]*[.BF$16]))^2*IF([.BF16]=[.$B$5];1;0))" office:value-type="float" office:value="0.204753007404645" calcext:value-type="float">
            <text:p>0.20</text:p>
          </table:table-cell>
          <table:table-cell table:style-name="ce13" table:formula="of:=IF([.BG16]&lt;=[.$B$5]-[.$B$14];2*[.$B$7]*[.$B$6]*([.$B$11]+[.$B$12]*[.$B$9])*(EXP(-[.$B$7]*[.BG16]) - EXP(-2*[.$B$7]*[.BG16])) + [.$B$13]*[.$B$8];- [.$B$6]*(1-EXP(-[.$B$7]*[.BG$16]))^2*IF([.BG16]=[.$B$5];1;0))" office:value-type="float" office:value="0.20215208912569" calcext:value-type="float">
            <text:p>0.20</text:p>
          </table:table-cell>
          <table:table-cell table:style-name="ce13" table:formula="of:=IF([.BH16]&lt;=[.$B$5]-[.$B$14];2*[.$B$7]*[.$B$6]*([.$B$11]+[.$B$12]*[.$B$9])*(EXP(-[.$B$7]*[.BH16]) - EXP(-2*[.$B$7]*[.BH16])) + [.$B$13]*[.$B$8];- [.$B$6]*(1-EXP(-[.$B$7]*[.BH$16]))^2*IF([.BH16]=[.$B$5];1;0))" office:value-type="float" office:value="0.199586733277869" calcext:value-type="float">
            <text:p>0.20</text:p>
          </table:table-cell>
          <table:table-cell table:style-name="ce13" table:formula="of:=IF([.BI16]&lt;=[.$B$5]-[.$B$14];2*[.$B$7]*[.$B$6]*([.$B$11]+[.$B$12]*[.$B$9])*(EXP(-[.$B$7]*[.BI16]) - EXP(-2*[.$B$7]*[.BI16])) + [.$B$13]*[.$B$8];- [.$B$6]*(1-EXP(-[.$B$7]*[.BI$16]))^2*IF([.BI16]=[.$B$5];1;0))" office:value-type="float" office:value="0.197058294325366" calcext:value-type="float">
            <text:p>0.20</text:p>
          </table:table-cell>
          <table:table-cell table:style-name="ce13" table:formula="of:=IF([.BJ16]&lt;=[.$B$5]-[.$B$14];2*[.$B$7]*[.$B$6]*([.$B$11]+[.$B$12]*[.$B$9])*(EXP(-[.$B$7]*[.BJ16]) - EXP(-2*[.$B$7]*[.BJ16])) + [.$B$13]*[.$B$8];- [.$B$6]*(1-EXP(-[.$B$7]*[.BJ$16]))^2*IF([.BJ16]=[.$B$5];1;0))" office:value-type="float" office:value="0.194567946616903" calcext:value-type="float">
            <text:p>0.19</text:p>
          </table:table-cell>
          <table:table-cell table:style-name="ce13" table:formula="of:=IF([.BK16]&lt;=[.$B$5]-[.$B$14];2*[.$B$7]*[.$B$6]*([.$B$11]+[.$B$12]*[.$B$9])*(EXP(-[.$B$7]*[.BK16]) - EXP(-2*[.$B$7]*[.BK16])) + [.$B$13]*[.$B$8];- [.$B$6]*(1-EXP(-[.$B$7]*[.BK$16]))^2*IF([.BK16]=[.$B$5];1;0))" office:value-type="float" office:value="0.192116697866864" calcext:value-type="float">
            <text:p>0.19</text:p>
          </table:table-cell>
          <table:table-cell table:style-name="ce13" table:formula="of:=IF([.BL16]&lt;=[.$B$5]-[.$B$14];2*[.$B$7]*[.$B$6]*([.$B$11]+[.$B$12]*[.$B$9])*(EXP(-[.$B$7]*[.BL16]) - EXP(-2*[.$B$7]*[.BL16])) + [.$B$13]*[.$B$8];- [.$B$6]*(1-EXP(-[.$B$7]*[.BL$16]))^2*IF([.BL16]=[.$B$5];1;0))" office:value-type="float" office:value="0.189705401762926" calcext:value-type="float">
            <text:p>0.19</text:p>
          </table:table-cell>
          <table:table-cell table:style-name="ce13" table:formula="of:=IF([.BM16]&lt;=[.$B$5]-[.$B$14];2*[.$B$7]*[.$B$6]*([.$B$11]+[.$B$12]*[.$B$9])*(EXP(-[.$B$7]*[.BM16]) - EXP(-2*[.$B$7]*[.BM16])) + [.$B$13]*[.$B$8];- [.$B$6]*(1-EXP(-[.$B$7]*[.BM$16]))^2*IF([.BM16]=[.$B$5];1;0))" office:value-type="float" office:value="0.187334769753657" calcext:value-type="float">
            <text:p>0.19</text:p>
          </table:table-cell>
          <table:table-cell table:style-name="ce13" table:formula="of:=IF([.BN16]&lt;=[.$B$5]-[.$B$14];2*[.$B$7]*[.$B$6]*([.$B$11]+[.$B$12]*[.$B$9])*(EXP(-[.$B$7]*[.BN16]) - EXP(-2*[.$B$7]*[.BN16])) + [.$B$13]*[.$B$8];- [.$B$6]*(1-EXP(-[.$B$7]*[.BN$16]))^2*IF([.BN16]=[.$B$5];1;0))" office:value-type="float" office:value="0.185005382066376" calcext:value-type="float">
            <text:p>0.19</text:p>
          </table:table-cell>
          <table:table-cell table:style-name="ce13" table:formula="of:=IF([.BO16]&lt;=[.$B$5]-[.$B$14];2*[.$B$7]*[.$B$6]*([.$B$11]+[.$B$12]*[.$B$9])*(EXP(-[.$B$7]*[.BO16]) - EXP(-2*[.$B$7]*[.BO16])) + [.$B$13]*[.$B$8];- [.$B$6]*(1-EXP(-[.$B$7]*[.BO$16]))^2*IF([.BO16]=[.$B$5];1;0))" office:value-type="float" office:value="0.182717698002577" calcext:value-type="float">
            <text:p>0.18</text:p>
          </table:table-cell>
          <table:table-cell table:style-name="ce13" table:formula="of:=IF([.BP16]&lt;=[.$B$5]-[.$B$14];2*[.$B$7]*[.$B$6]*([.$B$11]+[.$B$12]*[.$B$9])*(EXP(-[.$B$7]*[.BP16]) - EXP(-2*[.$B$7]*[.BP16])) + [.$B$13]*[.$B$8];- [.$B$6]*(1-EXP(-[.$B$7]*[.BP$16]))^2*IF([.BP16]=[.$B$5];1;0))" office:value-type="float" office:value="0.180472065555352" calcext:value-type="float">
            <text:p>0.18</text:p>
          </table:table-cell>
          <table:table-cell table:style-name="ce13" table:formula="of:=IF([.BQ16]&lt;=[.$B$5]-[.$B$14];2*[.$B$7]*[.$B$6]*([.$B$11]+[.$B$12]*[.$B$9])*(EXP(-[.$B$7]*[.BQ16]) - EXP(-2*[.$B$7]*[.BQ16])) + [.$B$13]*[.$B$8];- [.$B$6]*(1-EXP(-[.$B$7]*[.BQ$16]))^2*IF([.BQ16]=[.$B$5];1;0))" office:value-type="float" office:value="0.178268730390645" calcext:value-type="float">
            <text:p>0.18</text:p>
          </table:table-cell>
          <table:table-cell table:style-name="ce13" table:formula="of:=IF([.BR16]&lt;=[.$B$5]-[.$B$14];2*[.$B$7]*[.$B$6]*([.$B$11]+[.$B$12]*[.$B$9])*(EXP(-[.$B$7]*[.BR16]) - EXP(-2*[.$B$7]*[.BR16])) + [.$B$13]*[.$B$8];- [.$B$6]*(1-EXP(-[.$B$7]*[.BR$16]))^2*IF([.BR16]=[.$B$5];1;0))" office:value-type="float" office:value="0.176107844231598" calcext:value-type="float">
            <text:p>0.18</text:p>
          </table:table-cell>
          <table:table-cell table:style-name="ce13" table:formula="of:=IF([.BS16]&lt;=[.$B$5]-[.$B$14];2*[.$B$7]*[.$B$6]*([.$B$11]+[.$B$12]*[.$B$9])*(EXP(-[.$B$7]*[.BS16]) - EXP(-2*[.$B$7]*[.BS16])) + [.$B$13]*[.$B$8];- [.$B$6]*(1-EXP(-[.$B$7]*[.BS$16]))^2*IF([.BS16]=[.$B$5];1;0))" office:value-type="float" office:value="0.173989472682973" calcext:value-type="float">
            <text:p>0.17</text:p>
          </table:table-cell>
          <table:table-cell table:style-name="ce13" table:formula="of:=IF([.BT16]&lt;=[.$B$5]-[.$B$14];2*[.$B$7]*[.$B$6]*([.$B$11]+[.$B$12]*[.$B$9])*(EXP(-[.$B$7]*[.BT16]) - EXP(-2*[.$B$7]*[.BT16])) + [.$B$13]*[.$B$8];- [.$B$6]*(1-EXP(-[.$B$7]*[.BT$16]))^2*IF([.BT16]=[.$B$5];1;0))" office:value-type="float" office:value="0.171913602530338" calcext:value-type="float">
            <text:p>0.17</text:p>
          </table:table-cell>
          <table:table-cell table:style-name="ce13" table:formula="of:=IF([.BU16]&lt;=[.$B$5]-[.$B$14];2*[.$B$7]*[.$B$6]*([.$B$11]+[.$B$12]*[.$B$9])*(EXP(-[.$B$7]*[.BU16]) - EXP(-2*[.$B$7]*[.BU16])) + [.$B$13]*[.$B$8];- [.$B$6]*(1-EXP(-[.$B$7]*[.BU$16]))^2*IF([.BU16]=[.$B$5];1;0))" office:value-type="float" office:value="0.169880148546688" calcext:value-type="float">
            <text:p>0.17</text:p>
          </table:table-cell>
          <table:table-cell table:style-name="ce13" table:formula="of:=IF([.BV16]&lt;=[.$B$5]-[.$B$14];2*[.$B$7]*[.$B$6]*([.$B$11]+[.$B$12]*[.$B$9])*(EXP(-[.$B$7]*[.BV16]) - EXP(-2*[.$B$7]*[.BV16])) + [.$B$13]*[.$B$8];- [.$B$6]*(1-EXP(-[.$B$7]*[.BV$16]))^2*IF([.BV16]=[.$B$5];1;0))" office:value-type="float" office:value="0.167888959837168" calcext:value-type="float">
            <text:p>0.17</text:p>
          </table:table-cell>
          <table:table-cell table:style-name="ce13" table:formula="of:=IF([.BW16]&lt;=[.$B$5]-[.$B$14];2*[.$B$7]*[.$B$6]*([.$B$11]+[.$B$12]*[.$B$9])*(EXP(-[.$B$7]*[.BW16]) - EXP(-2*[.$B$7]*[.BW16])) + [.$B$13]*[.$B$8];- [.$B$6]*(1-EXP(-[.$B$7]*[.BW$16]))^2*IF([.BW16]=[.$B$5];1;0))" office:value-type="float" office:value="0.165939825750736" calcext:value-type="float">
            <text:p>0.17</text:p>
          </table:table-cell>
          <table:table-cell table:style-name="ce13" table:formula="of:=IF([.BX16]&lt;=[.$B$5]-[.$B$14];2*[.$B$7]*[.$B$6]*([.$B$11]+[.$B$12]*[.$B$9])*(EXP(-[.$B$7]*[.BX16]) - EXP(-2*[.$B$7]*[.BX16])) + [.$B$13]*[.$B$8];- [.$B$6]*(1-EXP(-[.$B$7]*[.BX$16]))^2*IF([.BX16]=[.$B$5];1;0))" office:value-type="float" office:value="0.164032481385858" calcext:value-type="float">
            <text:p>0.16</text:p>
          </table:table-cell>
          <table:table-cell table:style-name="ce13" table:formula="of:=IF([.BY16]&lt;=[.$B$5]-[.$B$14];2*[.$B$7]*[.$B$6]*([.$B$11]+[.$B$12]*[.$B$9])*(EXP(-[.$B$7]*[.BY16]) - EXP(-2*[.$B$7]*[.BY16])) + [.$B$13]*[.$B$8];- [.$B$6]*(1-EXP(-[.$B$7]*[.BY$16]))^2*IF([.BY16]=[.$B$5];1;0))" office:value-type="float" office:value="0.162166612715716" calcext:value-type="float">
            <text:p>0.16</text:p>
          </table:table-cell>
          <table:table-cell table:style-name="ce13" table:formula="of:=IF([.BZ16]&lt;=[.$B$5]-[.$B$14];2*[.$B$7]*[.$B$6]*([.$B$11]+[.$B$12]*[.$B$9])*(EXP(-[.$B$7]*[.BZ16]) - EXP(-2*[.$B$7]*[.BZ16])) + [.$B$13]*[.$B$8];- [.$B$6]*(1-EXP(-[.$B$7]*[.BZ$16]))^2*IF([.BZ16]=[.$B$5];1;0))" office:value-type="float" office:value="0.160341861356835" calcext:value-type="float">
            <text:p>0.16</text:p>
          </table:table-cell>
          <table:table-cell table:style-name="ce13" table:formula="of:=IF([.CA16]&lt;=[.$B$5]-[.$B$14];2*[.$B$7]*[.$B$6]*([.$B$11]+[.$B$12]*[.$B$9])*(EXP(-[.$B$7]*[.CA16]) - EXP(-2*[.$B$7]*[.CA16])) + [.$B$13]*[.$B$8];- [.$B$6]*(1-EXP(-[.$B$7]*[.CA$16]))^2*IF([.CA16]=[.$B$5];1;0))" office:value-type="float" office:value="0.158557829003632" calcext:value-type="float">
            <text:p>0.16</text:p>
          </table:table-cell>
          <table:table-cell table:style-name="ce13" table:formula="of:=IF([.CB16]&lt;=[.$B$5]-[.$B$14];2*[.$B$7]*[.$B$6]*([.$B$11]+[.$B$12]*[.$B$9])*(EXP(-[.$B$7]*[.CB16]) - EXP(-2*[.$B$7]*[.CB16])) + [.$B$13]*[.$B$8];- [.$B$6]*(1-EXP(-[.$B$7]*[.CB$16]))^2*IF([.CB16]=[.$B$5];1;0))" office:value-type="float" office:value="0.156814081549994" calcext:value-type="float">
            <text:p>0.16</text:p>
          </table:table-cell>
          <table:table-cell table:style-name="ce13" table:formula="of:=IF([.CC16]&lt;=[.$B$5]-[.$B$14];2*[.$B$7]*[.$B$6]*([.$B$11]+[.$B$12]*[.$B$9])*(EXP(-[.$B$7]*[.CC16]) - EXP(-2*[.$B$7]*[.CC16])) + [.$B$13]*[.$B$8];- [.$B$6]*(1-EXP(-[.$B$7]*[.CC$16]))^2*IF([.CC16]=[.$B$5];1;0))" office:value-type="float" office:value="0.155110152917737" calcext:value-type="float">
            <text:p>0.16</text:p>
          </table:table-cell>
          <table:table-cell table:style-name="ce13" table:formula="of:=IF([.CD16]&lt;=[.$B$5]-[.$B$14];2*[.$B$7]*[.$B$6]*([.$B$11]+[.$B$12]*[.$B$9])*(EXP(-[.$B$7]*[.CD16]) - EXP(-2*[.$B$7]*[.CD16])) + [.$B$13]*[.$B$8];- [.$B$6]*(1-EXP(-[.$B$7]*[.CD$16]))^2*IF([.CD16]=[.$B$5];1;0))" office:value-type="float" office:value="0.153445548610574" calcext:value-type="float">
            <text:p>0.15</text:p>
          </table:table-cell>
          <table:table-cell table:style-name="ce13" table:formula="of:=IF([.CE16]&lt;=[.$B$5]-[.$B$14];2*[.$B$7]*[.$B$6]*([.$B$11]+[.$B$12]*[.$B$9])*(EXP(-[.$B$7]*[.CE16]) - EXP(-2*[.$B$7]*[.CE16])) + [.$B$13]*[.$B$8];- [.$B$6]*(1-EXP(-[.$B$7]*[.CE$16]))^2*IF([.CE16]=[.$B$5];1;0))" office:value-type="float" office:value="0.151819749011123" calcext:value-type="float">
            <text:p>0.15</text:p>
          </table:table-cell>
          <table:table-cell table:style-name="ce13" table:formula="of:=IF([.CF16]&lt;=[.$B$5]-[.$B$14];2*[.$B$7]*[.$B$6]*([.$B$11]+[.$B$12]*[.$B$9])*(EXP(-[.$B$7]*[.CF16]) - EXP(-2*[.$B$7]*[.CF16])) + [.$B$13]*[.$B$8];- [.$B$6]*(1-EXP(-[.$B$7]*[.CF$16]))^2*IF([.CF16]=[.$B$5];1;0))" office:value-type="float" office:value="0.150232212437363" calcext:value-type="float">
            <text:p>0.15</text:p>
          </table:table-cell>
          <table:table-cell table:style-name="ce13" table:formula="of:=IF([.CG16]&lt;=[.$B$5]-[.$B$14];2*[.$B$7]*[.$B$6]*([.$B$11]+[.$B$12]*[.$B$9])*(EXP(-[.$B$7]*[.CG16]) - EXP(-2*[.$B$7]*[.CG16])) + [.$B$13]*[.$B$8];- [.$B$6]*(1-EXP(-[.$B$7]*[.CG$16]))^2*IF([.CG16]=[.$B$5];1;0))" office:value-type="float" office:value="0.14868237797402" calcext:value-type="float">
            <text:p>0.15</text:p>
          </table:table-cell>
          <table:table-cell table:style-name="ce13" table:formula="of:=IF([.CH16]&lt;=[.$B$5]-[.$B$14];2*[.$B$7]*[.$B$6]*([.$B$11]+[.$B$12]*[.$B$9])*(EXP(-[.$B$7]*[.CH16]) - EXP(-2*[.$B$7]*[.CH16])) + [.$B$13]*[.$B$8];- [.$B$6]*(1-EXP(-[.$B$7]*[.CH$16]))^2*IF([.CH16]=[.$B$5];1;0))" office:value-type="float" office:value="0.147169668093342" calcext:value-type="float">
            <text:p>0.15</text:p>
          </table:table-cell>
          <table:table-cell table:style-name="ce13" table:formula="of:=IF([.CI16]&lt;=[.$B$5]-[.$B$14];2*[.$B$7]*[.$B$6]*([.$B$11]+[.$B$12]*[.$B$9])*(EXP(-[.$B$7]*[.CI16]) - EXP(-2*[.$B$7]*[.CI16])) + [.$B$13]*[.$B$8];- [.$B$6]*(1-EXP(-[.$B$7]*[.CI$16]))^2*IF([.CI16]=[.$B$5];1;0))" office:value-type="float" office:value="0.145693491078917" calcext:value-type="float">
            <text:p>0.15</text:p>
          </table:table-cell>
          <table:table-cell table:style-name="ce13" table:formula="of:=IF([.CJ16]&lt;=[.$B$5]-[.$B$14];2*[.$B$7]*[.$B$6]*([.$B$11]+[.$B$12]*[.$B$9])*(EXP(-[.$B$7]*[.CJ16]) - EXP(-2*[.$B$7]*[.CJ16])) + [.$B$13]*[.$B$8];- [.$B$6]*(1-EXP(-[.$B$7]*[.CJ$16]))^2*IF([.CJ16]=[.$B$5];1;0))" office:value-type="float" office:value="0.144253243265282" calcext:value-type="float">
            <text:p>0.14</text:p>
          </table:table-cell>
          <table:table-cell table:style-name="ce13" table:formula="of:=IF([.CK16]&lt;=[.$B$5]-[.$B$14];2*[.$B$7]*[.$B$6]*([.$B$11]+[.$B$12]*[.$B$9])*(EXP(-[.$B$7]*[.CK16]) - EXP(-2*[.$B$7]*[.CK16])) + [.$B$13]*[.$B$8];- [.$B$6]*(1-EXP(-[.$B$7]*[.CK$16]))^2*IF([.CK16]=[.$B$5];1;0))" office:value-type="float" office:value="0.142848311105347" calcext:value-type="float">
            <text:p>0.14</text:p>
          </table:table-cell>
          <table:table-cell table:style-name="ce13" table:formula="of:=IF([.CL16]&lt;=[.$B$5]-[.$B$14];2*[.$B$7]*[.$B$6]*([.$B$11]+[.$B$12]*[.$B$9])*(EXP(-[.$B$7]*[.CL16]) - EXP(-2*[.$B$7]*[.CL16])) + [.$B$13]*[.$B$8];- [.$B$6]*(1-EXP(-[.$B$7]*[.CL$16]))^2*IF([.CL16]=[.$B$5];1;0))" office:value-type="float" office:value="0.141478073076881" calcext:value-type="float">
            <text:p>0.14</text:p>
          </table:table-cell>
          <table:table-cell table:style-name="ce13" table:formula="of:=IF([.CM16]&lt;=[.$B$5]-[.$B$14];2*[.$B$7]*[.$B$6]*([.$B$11]+[.$B$12]*[.$B$9])*(EXP(-[.$B$7]*[.CM16]) - EXP(-2*[.$B$7]*[.CM16])) + [.$B$13]*[.$B$8];- [.$B$6]*(1-EXP(-[.$B$7]*[.CM$16]))^2*IF([.CM16]=[.$B$5];1;0))" office:value-type="float" office:value="0.140141901438636" calcext:value-type="float">
            <text:p>0.14</text:p>
          </table:table-cell>
          <table:table-cell table:style-name="ce13" table:formula="of:=IF([.CN16]&lt;=[.$B$5]-[.$B$14];2*[.$B$7]*[.$B$6]*([.$B$11]+[.$B$12]*[.$B$9])*(EXP(-[.$B$7]*[.CN16]) - EXP(-2*[.$B$7]*[.CN16])) + [.$B$13]*[.$B$8];- [.$B$6]*(1-EXP(-[.$B$7]*[.CN$16]))^2*IF([.CN16]=[.$B$5];1;0))" office:value-type="float" office:value="0.138839163846024" calcext:value-type="float">
            <text:p>0.14</text:p>
          </table:table-cell>
          <table:table-cell table:style-name="ce13" table:formula="of:=IF([.CO16]&lt;=[.$B$5]-[.$B$14];2*[.$B$7]*[.$B$6]*([.$B$11]+[.$B$12]*[.$B$9])*(EXP(-[.$B$7]*[.CO16]) - EXP(-2*[.$B$7]*[.CO16])) + [.$B$13]*[.$B$8];- [.$B$6]*(1-EXP(-[.$B$7]*[.CO$16]))^2*IF([.CO16]=[.$B$5];1;0))" office:value-type="float" office:value="0.137569224835668" calcext:value-type="float">
            <text:p>0.14</text:p>
          </table:table-cell>
          <table:table-cell table:style-name="ce13" table:formula="of:=IF([.CP16]&lt;=[.$B$5]-[.$B$14];2*[.$B$7]*[.$B$6]*([.$B$11]+[.$B$12]*[.$B$9])*(EXP(-[.$B$7]*[.CP16]) - EXP(-2*[.$B$7]*[.CP16])) + [.$B$13]*[.$B$8];- [.$B$6]*(1-EXP(-[.$B$7]*[.CP$16]))^2*IF([.CP16]=[.$B$5];1;0))" office:value-type="float" office:value="0.136331447187533" calcext:value-type="float">
            <text:p>0.14</text:p>
          </table:table-cell>
          <table:table-cell table:style-name="ce13" table:formula="of:=IF([.CQ16]&lt;=[.$B$5]-[.$B$14];2*[.$B$7]*[.$B$6]*([.$B$11]+[.$B$12]*[.$B$9])*(EXP(-[.$B$7]*[.CQ16]) - EXP(-2*[.$B$7]*[.CQ16])) + [.$B$13]*[.$B$8];- [.$B$6]*(1-EXP(-[.$B$7]*[.CQ$16]))^2*IF([.CQ16]=[.$B$5];1;0))" office:value-type="float" office:value="0.135125193172855" calcext:value-type="float">
            <text:p>0.14</text:p>
          </table:table-cell>
          <table:table-cell table:style-name="ce13" table:formula="of:=IF([.CR16]&lt;=[.$B$5]-[.$B$14];2*[.$B$7]*[.$B$6]*([.$B$11]+[.$B$12]*[.$B$9])*(EXP(-[.$B$7]*[.CR16]) - EXP(-2*[.$B$7]*[.CR16])) + [.$B$13]*[.$B$8];- [.$B$6]*(1-EXP(-[.$B$7]*[.CR$16]))^2*IF([.CR16]=[.$B$5];1;0))" office:value-type="float" office:value="0.13394982569553" calcext:value-type="float">
            <text:p>0.13</text:p>
          </table:table-cell>
          <table:table-cell table:style-name="ce13" table:formula="of:=IF([.CS16]&lt;=[.$B$5]-[.$B$14];2*[.$B$7]*[.$B$6]*([.$B$11]+[.$B$12]*[.$B$9])*(EXP(-[.$B$7]*[.CS16]) - EXP(-2*[.$B$7]*[.CS16])) + [.$B$13]*[.$B$8];- [.$B$6]*(1-EXP(-[.$B$7]*[.CS$16]))^2*IF([.CS16]=[.$B$5];1;0))" office:value-type="float" office:value="0.132804709334181" calcext:value-type="float">
            <text:p>0.13</text:p>
          </table:table-cell>
          <table:table-cell table:style-name="ce13" table:formula="of:=IF([.CT16]&lt;=[.$B$5]-[.$B$14];2*[.$B$7]*[.$B$6]*([.$B$11]+[.$B$12]*[.$B$9])*(EXP(-[.$B$7]*[.CT16]) - EXP(-2*[.$B$7]*[.CT16])) + [.$B$13]*[.$B$8];- [.$B$6]*(1-EXP(-[.$B$7]*[.CT$16]))^2*IF([.CT16]=[.$B$5];1;0))" office:value-type="float" office:value="0.131689211291653" calcext:value-type="float">
            <text:p>0.13</text:p>
          </table:table-cell>
          <table:table-cell table:style-name="ce13" table:formula="of:=IF([.CU16]&lt;=[.$B$5]-[.$B$14];2*[.$B$7]*[.$B$6]*([.$B$11]+[.$B$12]*[.$B$9])*(EXP(-[.$B$7]*[.CU16]) - EXP(-2*[.$B$7]*[.CU16])) + [.$B$13]*[.$B$8];- [.$B$6]*(1-EXP(-[.$B$7]*[.CU$16]))^2*IF([.CU16]=[.$B$5];1;0))" office:value-type="float" office:value="0.130602702258265" calcext:value-type="float">
            <text:p>0.13</text:p>
          </table:table-cell>
          <table:table-cell table:style-name="ce13" table:formula="of:=IF([.CV16]&lt;=[.$B$5]-[.$B$14];2*[.$B$7]*[.$B$6]*([.$B$11]+[.$B$12]*[.$B$9])*(EXP(-[.$B$7]*[.CV16]) - EXP(-2*[.$B$7]*[.CV16])) + [.$B$13]*[.$B$8];- [.$B$6]*(1-EXP(-[.$B$7]*[.CV$16]))^2*IF([.CV16]=[.$B$5];1;0))" office:value-type="float" office:value="0.129544557194765" calcext:value-type="float">
            <text:p>0.13</text:p>
          </table:table-cell>
          <table:table-cell table:style-name="ce13" table:formula="of:=IF([.CW16]&lt;=[.$B$5]-[.$B$14];2*[.$B$7]*[.$B$6]*([.$B$11]+[.$B$12]*[.$B$9])*(EXP(-[.$B$7]*[.CW16]) - EXP(-2*[.$B$7]*[.CW16])) + [.$B$13]*[.$B$8];- [.$B$6]*(1-EXP(-[.$B$7]*[.CW$16]))^2*IF([.CW16]=[.$B$5];1;0))" office:value-type="float" office:value="0.128514156040545" calcext:value-type="float">
            <text:p>0.13</text:p>
          </table:table-cell>
          <table:table-cell table:style-name="ce13" table:formula="of:=IF([.CX16]&lt;=[.$B$5]-[.$B$14];2*[.$B$7]*[.$B$6]*([.$B$11]+[.$B$12]*[.$B$9])*(EXP(-[.$B$7]*[.CX16]) - EXP(-2*[.$B$7]*[.CX16])) + [.$B$13]*[.$B$8];- [.$B$6]*(1-EXP(-[.$B$7]*[.CX$16]))^2*IF([.CX16]=[.$B$5];1;0))" office:value-type="float" office:value="0.127510884352335" calcext:value-type="float">
            <text:p>0.13</text:p>
          </table:table-cell>
          <table:table-cell table:style-name="ce13" table:formula="of:=IF([.CY16]&lt;=[.$B$5]-[.$B$14];2*[.$B$7]*[.$B$6]*([.$B$11]+[.$B$12]*[.$B$9])*(EXP(-[.$B$7]*[.CY16]) - EXP(-2*[.$B$7]*[.CY16])) + [.$B$13]*[.$B$8];- [.$B$6]*(1-EXP(-[.$B$7]*[.CY$16]))^2*IF([.CY16]=[.$B$5];1;0))" office:value-type="float" office:value="0.126534133878251" calcext:value-type="float">
            <text:p>0.13</text:p>
          </table:table-cell>
          <table:table-cell table:style-name="ce13" table:formula="of:=IF([.CZ16]&lt;=[.$B$5]-[.$B$14];2*[.$B$7]*[.$B$6]*([.$B$11]+[.$B$12]*[.$B$9])*(EXP(-[.$B$7]*[.CZ16]) - EXP(-2*[.$B$7]*[.CZ16])) + [.$B$13]*[.$B$8];- [.$B$6]*(1-EXP(-[.$B$7]*[.CZ$16]))^2*IF([.CZ16]=[.$B$5];1;0))" office:value-type="float" office:value="0.125583303071786" calcext:value-type="float">
            <text:p>0.13</text:p>
          </table:table-cell>
          <table:table-cell table:style-name="ce13" table:formula="of:=IF([.DA16]&lt;=[.$B$5]-[.$B$14];2*[.$B$7]*[.$B$6]*([.$B$11]+[.$B$12]*[.$B$9])*(EXP(-[.$B$7]*[.DA16]) - EXP(-2*[.$B$7]*[.DA16])) + [.$B$13]*[.$B$8];- [.$B$6]*(1-EXP(-[.$B$7]*[.DA$16]))^2*IF([.DA16]=[.$B$5];1;0))" office:value-type="float" office:value="0.124657797550017" calcext:value-type="float">
            <text:p>0.12</text:p>
          </table:table-cell>
          <table:table-cell table:style-name="ce13" table:formula="of:=IF([.DB16]&lt;=[.$B$5]-[.$B$14];2*[.$B$7]*[.$B$6]*([.$B$11]+[.$B$12]*[.$B$9])*(EXP(-[.$B$7]*[.DB16]) - EXP(-2*[.$B$7]*[.DB16])) + [.$B$13]*[.$B$8];- [.$B$6]*(1-EXP(-[.$B$7]*[.DB$16]))^2*IF([.DB16]=[.$B$5];1;0))" office:value-type="float" office:value="0.123757030500049" calcext:value-type="float">
            <text:p>0.12</text:p>
          </table:table-cell>
          <table:table-cell table:style-name="ce13" table:formula="of:=IF([.DC16]&lt;=[.$B$5]-[.$B$14];2*[.$B$7]*[.$B$6]*([.$B$11]+[.$B$12]*[.$B$9])*(EXP(-[.$B$7]*[.DC16]) - EXP(-2*[.$B$7]*[.DC16])) + [.$B$13]*[.$B$8];- [.$B$6]*(1-EXP(-[.$B$7]*[.DC$16]))^2*IF([.DC16]=[.$B$5];1;0))" office:value-type="float" office:value="0.122880423037443" calcext:value-type="float">
            <text:p>0.12</text:p>
          </table:table-cell>
          <table:table-cell table:style-name="ce13" table:formula="of:=IF([.DD16]&lt;=[.$B$5]-[.$B$14];2*[.$B$7]*[.$B$6]*([.$B$11]+[.$B$12]*[.$B$9])*(EXP(-[.$B$7]*[.DD16]) - EXP(-2*[.$B$7]*[.DD16])) + [.$B$13]*[.$B$8];- [.$B$6]*(1-EXP(-[.$B$7]*[.DD$16]))^2*IF([.DD16]=[.$B$5];1;0))" office:value-type="float" office:value="0.122027404520156" calcext:value-type="float">
            <text:p>0.12</text:p>
          </table:table-cell>
          <table:table-cell table:style-name="ce13" table:formula="of:=IF([.DE16]&lt;=[.$B$5]-[.$B$14];2*[.$B$7]*[.$B$6]*([.$B$11]+[.$B$12]*[.$B$9])*(EXP(-[.$B$7]*[.DE16]) - EXP(-2*[.$B$7]*[.DE16])) + [.$B$13]*[.$B$8];- [.$B$6]*(1-EXP(-[.$B$7]*[.DE$16]))^2*IF([.DE16]=[.$B$5];1;0))" office:value-type="float" office:value="0.121197412821265" calcext:value-type="float">
            <text:p>0.12</text:p>
          </table:table-cell>
          <table:table-cell table:style-name="ce13" table:formula="of:=IF([.DF16]&lt;=[.$B$5]-[.$B$14];2*[.$B$7]*[.$B$6]*([.$B$11]+[.$B$12]*[.$B$9])*(EXP(-[.$B$7]*[.DF16]) - EXP(-2*[.$B$7]*[.DF16])) + [.$B$13]*[.$B$8];- [.$B$6]*(1-EXP(-[.$B$7]*[.DF$16]))^2*IF([.DF16]=[.$B$5];1;0))" office:value-type="float" office:value="0.120389894563572" calcext:value-type="float">
            <text:p>0.12</text:p>
          </table:table-cell>
          <table:table-cell table:style-name="ce13" table:formula="of:=IF([.DG16]&lt;=[.$B$5]-[.$B$14];2*[.$B$7]*[.$B$6]*([.$B$11]+[.$B$12]*[.$B$9])*(EXP(-[.$B$7]*[.DG16]) - EXP(-2*[.$B$7]*[.DG16])) + [.$B$13]*[.$B$8];- [.$B$6]*(1-EXP(-[.$B$7]*[.DG$16]))^2*IF([.DG16]=[.$B$5];1;0))" office:value-type="float" office:value="0.119604305318951" calcext:value-type="float">
            <text:p>0.12</text:p>
          </table:table-cell>
          <table:table-cell table:style-name="ce13" table:formula="of:=IF([.DH16]&lt;=[.$B$5]-[.$B$14];2*[.$B$7]*[.$B$6]*([.$B$11]+[.$B$12]*[.$B$9])*(EXP(-[.$B$7]*[.DH16]) - EXP(-2*[.$B$7]*[.DH16])) + [.$B$13]*[.$B$8];- [.$B$6]*(1-EXP(-[.$B$7]*[.DH$16]))^2*IF([.DH16]=[.$B$5];1;0))" office:value-type="float" office:value="0.118840109775137" calcext:value-type="float">
            <text:p>0.12</text:p>
          </table:table-cell>
          <table:table-cell table:style-name="ce13" table:formula="of:=IF([.DI16]&lt;=[.$B$5]-[.$B$14];2*[.$B$7]*[.$B$6]*([.$B$11]+[.$B$12]*[.$B$9])*(EXP(-[.$B$7]*[.DI16]) - EXP(-2*[.$B$7]*[.DI16])) + [.$B$13]*[.$B$8];- [.$B$6]*(1-EXP(-[.$B$7]*[.DI$16]))^2*IF([.DI16]=[.$B$5];1;0))" office:value-type="float" office:value="0.11809678187247" calcext:value-type="float">
            <text:p>0.12</text:p>
          </table:table-cell>
          <table:table-cell table:style-name="ce13" table:formula="of:=IF([.DJ16]&lt;=[.$B$5]-[.$B$14];2*[.$B$7]*[.$B$6]*([.$B$11]+[.$B$12]*[.$B$9])*(EXP(-[.$B$7]*[.DJ16]) - EXP(-2*[.$B$7]*[.DJ16])) + [.$B$13]*[.$B$8];- [.$B$6]*(1-EXP(-[.$B$7]*[.DJ$16]))^2*IF([.DJ16]=[.$B$5];1;0))" office:value-type="float" office:value="0.117373804912947" calcext:value-type="float">
            <text:p>0.12</text:p>
          </table:table-cell>
          <table:table-cell table:style-name="ce13" table:formula="of:=IF([.DK16]&lt;=[.$B$5]-[.$B$14];2*[.$B$7]*[.$B$6]*([.$B$11]+[.$B$12]*[.$B$9])*(EXP(-[.$B$7]*[.DK16]) - EXP(-2*[.$B$7]*[.DK16])) + [.$B$13]*[.$B$8];- [.$B$6]*(1-EXP(-[.$B$7]*[.DK$16]))^2*IF([.DK16]=[.$B$5];1;0))" office:value-type="float" office:value="0.116670671643771" calcext:value-type="float">
            <text:p>0.12</text:p>
          </table:table-cell>
          <table:table-cell table:style-name="ce13" table:formula="of:=IF([.DL16]&lt;=[.$B$5]-[.$B$14];2*[.$B$7]*[.$B$6]*([.$B$11]+[.$B$12]*[.$B$9])*(EXP(-[.$B$7]*[.DL16]) - EXP(-2*[.$B$7]*[.DL16])) + [.$B$13]*[.$B$8];- [.$B$6]*(1-EXP(-[.$B$7]*[.DL$16]))^2*IF([.DL16]=[.$B$5];1;0))" office:value-type="float" office:value="0.115986884317459" calcext:value-type="float">
            <text:p>0.12</text:p>
          </table:table-cell>
          <table:table-cell table:style-name="ce13" table:formula="of:=IF([.DM16]&lt;=[.$B$5]-[.$B$14];2*[.$B$7]*[.$B$6]*([.$B$11]+[.$B$12]*[.$B$9])*(EXP(-[.$B$7]*[.DM16]) - EXP(-2*[.$B$7]*[.DM16])) + [.$B$13]*[.$B$8];- [.$B$6]*(1-EXP(-[.$B$7]*[.DM$16]))^2*IF([.DM16]=[.$B$5];1;0))" office:value-type="float" office:value="0.115321954730407" calcext:value-type="float">
            <text:p>0.12</text:p>
          </table:table-cell>
          <table:table-cell table:style-name="ce13" table:formula="of:=IF([.DN16]&lt;=[.$B$5]-[.$B$14];2*[.$B$7]*[.$B$6]*([.$B$11]+[.$B$12]*[.$B$9])*(EXP(-[.$B$7]*[.DN16]) - EXP(-2*[.$B$7]*[.DN16])) + [.$B$13]*[.$B$8];- [.$B$6]*(1-EXP(-[.$B$7]*[.DN$16]))^2*IF([.DN16]=[.$B$5];1;0))" office:value-type="float" office:value="0.114675404241723" calcext:value-type="float">
            <text:p>0.11</text:p>
          </table:table-cell>
          <table:table-cell table:style-name="ce13" table:formula="of:=IF([.DO16]&lt;=[.$B$5]-[.$B$14];2*[.$B$7]*[.$B$6]*([.$B$11]+[.$B$12]*[.$B$9])*(EXP(-[.$B$7]*[.DO16]) - EXP(-2*[.$B$7]*[.DO16])) + [.$B$13]*[.$B$8];- [.$B$6]*(1-EXP(-[.$B$7]*[.DO$16]))^2*IF([.DO16]=[.$B$5];1;0))" office:value-type="float" office:value="0.114046763773967" calcext:value-type="float">
            <text:p>0.11</text:p>
          </table:table-cell>
          <table:table-cell table:style-name="ce13" table:formula="of:=IF([.DP16]&lt;=[.$B$5]-[.$B$14];2*[.$B$7]*[.$B$6]*([.$B$11]+[.$B$12]*[.$B$9])*(EXP(-[.$B$7]*[.DP16]) - EXP(-2*[.$B$7]*[.DP16])) + [.$B$13]*[.$B$8];- [.$B$6]*(1-EXP(-[.$B$7]*[.DP$16]))^2*IF([.DP16]=[.$B$5];1;0))" office:value-type="float" office:value="0.113435573797378" calcext:value-type="float">
            <text:p>0.11</text:p>
          </table:table-cell>
          <table:table-cell table:style-name="ce13" table:formula="of:=IF([.DQ16]&lt;=[.$B$5]-[.$B$14];2*[.$B$7]*[.$B$6]*([.$B$11]+[.$B$12]*[.$B$9])*(EXP(-[.$B$7]*[.DQ16]) - EXP(-2*[.$B$7]*[.DQ16])) + [.$B$13]*[.$B$8];- [.$B$6]*(1-EXP(-[.$B$7]*[.DQ$16]))^2*IF([.DQ16]=[.$B$5];1;0))" office:value-type="float" office:value="-9.46099140913792" calcext:value-type="float">
            <text:p>-9.46</text:p>
          </table:table-cell>
          <table:table-cell table:number-columns-repeated="132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/>
          <table:table-cell table:style-name="ce21" office:value-type="string" calcext:value-type="string">
            <text:p>Claude</text:p>
          </table:table-cell>
          <table:table-cell table:style-name="ce21" office:value-type="string" calcext:value-type="string">
            <text:p>JFR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cost_inflator_2011_to_2020</text:p>
          </table:table-cell>
          <table:table-cell table:number-columns-repeated="2" table:style-name="ce5" office:value-type="percentage" office:value="1.1577" calcext:value-type="percentage">
            <text:p>115.77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ep_cost_2011_USD_per_ha, Exotic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exotic_share, Country-level share of plantations that are exotic species.</text:p>
          </table:table-cell>
          <table:table-cell table:number-columns-repeated="2" table:style-name="ce7" office:value-type="percentage" office:value="0.97" calcext:value-type="percentage">
            <text:p>97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np_cost_2011_USD_per_ha, Native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native_share = 1 - exotic_share</text:p>
          </table:table-cell>
          <table:table-cell table:style-name="ce7" table:formula="of:=1-[.B25]" office:value-type="percentage" office:value="0.03" calcext:value-type="percentage">
            <text:p>3%</text:p>
          </table:table-cell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ce1"/>
          <table:table-cell table:number-columns-repeated="252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net present value establishment cost per hectare, pl_npv_estcost_USD_per_ha = init_cost</text:p>
          </table:table-cell>
          <table:table-cell table:style-name="ce8" table:formula="of:=[.B23]*([.B24]*[.B25]+[.B26]*[.B27])" office:value-type="currency" office:currency="USD" office:value="578.85" calcext:value-type="currency">
            <text:p>$579</text:p>
          </table:table-cell>
          <table:table-cell table:style-name="ce8" table:formula="of:=[.C23]*([.C24]*[.C25]+[.C26]*(1-[.C25]))" office:value-type="currency" office:currency="USD" office:value="578.85" calcext:value-type="currency">
            <text:p>$579</text:p>
          </table:table-cell>
          <table:table-cell office:value-type="string" calcext:value-type="string">
            <text:p>Setup cost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TIME_HORIZON_YEARS</text:p>
          </table:table-cell>
          <table:table-cell office:value-type="float" office:value="120" calcext:value-type="float">
            <text:p>120</text:p>
          </table:table-cell>
          <table:table-cell table:number-columns-repeated="251"/>
          <table:table-cell table:style-name="Default" table:number-columns-repeated="16131"/>
        </table:table-row>
        <table:table-row table:style-name="ro1">
          <table:table-cell table:style-name="Default" table:number-columns-repeated="3"/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total carbon per hectare without harvest, pl_wohrv_total_tC_per_ha at year 120 (no harvest term)</text:p>
          </table:table-cell>
          <table:table-cell table:style-name="ce9" table:formula="of:=[.$B$11]*[.$B$6]*(1-EXP(-[.$B$7]*[.$B$30]))^2+[.$B$12]*([.$B$6]*(1-EXP(-[.$B$7]*[.$B$30]))^2)*[.$B$9]+[.$B$13]*[.$B$30]*[.$B$8]" office:value-type="float" office:value="23.0507374555138" calcext:value-type="float">
            <text:p>23.1</text:p>
          </table:table-cell>
          <table:table-cell table:style-name="ce9" table:formula="of:=[.$B$11]*[.$B$6]*(1-EXP(-[.$B$7]*[.$B$5]))^2+[.$B$12]*([.$B$6]*(1-EXP(-[.$B$7]*[.$B$5]))^2)*[.$B$9]+[.$B$13]*[.$B$5]*[.$B$8]" office:value-type="float" office:value="23.0507374555138" calcext:value-type="float">
            <text:p>23.1</text:p>
          </table:table-cell>
          <table:table-cell office:value-type="string" calcext:value-type="string">
            <text:p>Discard total carbon per hector, because it ignores timing of removal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tCO2_per_tC</text:p>
          </table:table-cell>
          <table:table-cell table:number-columns-repeated="2" office:value-type="float" office:value="3.67" calcext:value-type="float">
            <text:p>3.67</text:p>
          </table:table-cell>
          <table:table-cell office:value-type="string" calcext:value-type="string">
            <text:p>Unneeded, since we never need tons CO2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Opportunity cost of land $/ha/year, crop_va_USD_per_ha_per_year</text:p>
          </table:table-cell>
          <table:table-cell table:number-columns-repeated="2" table:style-name="ce6" office:value-type="currency" office:currency="USD" office:value="50" calcext:value-type="currency">
            <text:p>$5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out harvest in USD per ton CO2, pl_wohrv_costeff_USD_per_tCO2</text:p>
          </table:table-cell>
          <table:table-cell table:style-name="ce8" table:formula="of:=([.B29]+[.B30]*[.B34])/[.B33]/[.B32]" office:value-type="currency" office:currency="USD" office:value="77.767671567823" calcext:value-type="currency">
            <text:p>$78</text:p>
          </table:table-cell>
          <table:table-cell table:style-name="ce8" table:formula="of:=([.C29]+[.$B$5]*[.C34])/[.C33]/[.C32]" office:value-type="currency" office:currency="USD" office:value="77.767671567823" calcext:value-type="currency">
            <text:p>$78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 harvest, excluding wood product revenue, $/tCO2, pl_whrv0_costeff_USD_per_tCO2</text:p>
          </table:table-cell>
          <table:table-cell table:style-name="ce8" table:formula="of:=([.$B$34]*[.$B$30]+[.$B$29])/([.$B$33]*[.DQ$18])" office:value-type="currency" office:currency="USD" office:value="132.074250002975" calcext:value-type="currency">
            <text:p>$132</text:p>
          </table:table-cell>
          <table:table-cell table:style-name="ce8" table:formula="of:=([.$C$34]*[.$B$5]+[.$C$29])/([.$C$33]*[.DQ$18])" office:value-type="currency" office:currency="USD" office:value="132.074250002975" calcext:value-type="currency">
            <text:p>$132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office:value-type="string" calcext:value-type="string">
            <text:p>Wood-product revenue with harvest, p_USD_per_tC_harvested</text:p>
          </table:table-cell>
          <table:table-cell table:number-columns-repeated="2" table:style-name="ce6" office:value-type="currency" office:currency="USD" office:value="61.04" calcext:value-type="currency">
            <text:p>$61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23" office:value-type="string" calcext:value-type="string">
            <text:p>Plantation harvested carbon per hectare over the time horizon, pl_harvested_tC_per_ha at year 120, from g_harvested_cum_tC_per_ha</text:p>
          </table:table-cell>
          <table:table-cell table:style-name="ce51" table:formula="of:=[.DQ$17]" office:value-type="float" office:value="9.46099140913792" calcext:value-type="float">
            <text:p>9.46</text:p>
          </table:table-cell>
          <table:table-cell table:style-name="ce52" table:formula="of:=[.$B$6]*(1-EXP(-[.$B$7]*[.$B$5]))^2" office:value-type="float" office:value="9.46099140913792" calcext:value-type="float">
            <table:detective>
              <table:operation table:name="trace-dependents" table:index="0"/>
            </table:detective>
            <text:p>9.5</text:p>
          </table:table-cell>
          <table:table-cell table:style-name="ce23" office:value-type="string" calcext:value-type="string">
            <text:p>Discard</text:p>
          </table:table-cell>
          <table:table-cell table:style-name="ce3" table:number-columns-repeated="29"/>
          <table:table-cell table:number-columns-repeated="22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lantation abatement cost-effectiveness with harvest, including wood product revenue, in USD per ton CO2, pl_whrv_costeff_USD_per_tCO2</text:p>
          </table:table-cell>
          <table:table-cell table:style-name="ce8" table:formula="of:=([.B34]*[.B30]+[.B29]-[.B38]*[.B39])/([.B33]*[.DP$18])" office:value-type="currency" office:currency="USD" office:value="71.2910461587072" calcext:value-type="currency">
            <text:p>$71</text:p>
          </table:table-cell>
          <table:table-cell table:style-name="ce8" table:formula="of:=([.C34]*[.$B$5]+[.C29]-[.C38]*[.C39])/([.C33]*[.DQ$18])" office:value-type="currency" office:currency="USD" office:value="120.480622521391" calcext:value-type="currency">
            <table:detective>
              <table:highlighted-range table:cell-range-address="'Plantation example'.C39:'Plantation example'.C39" table:direction="from-same-table"/>
            </table:detective>
            <text:p>$120</text:p>
          </table:table-cell>
          <table:table-cell office:value-type="string" calcext:value-type="string">
            <text:p>Discard, because SMDAMAGE will price the emission under removal. But the harvest revenue should be part of the bid.</text:p>
          </table:table-cell>
          <table:table-cell table:number-columns-repeated="249"/>
          <table:table-cell table:style-name="Default" table:number-columns-repeated="16131"/>
        </table:table-row>
        <table:table-row table:style-name="ro1">
          <table:table-cell table:number-columns-repeated="253"/>
          <table:table-cell table:style-name="Default" table:number-columns-repeated="16131"/>
        </table:table-row>
        <table:table-row table:style-name="ro1">
          <table:table-cell office:value-type="string" calcext:value-type="string">
            <text:p>Discount_rate</text:p>
          </table:table-cell>
          <table:table-cell/>
          <table:table-cell table:style-name="ce7" office:value-type="percentage" office:value="0.03" calcext:value-type="percentage">
            <text:p>3%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Setup cost</text:p>
          </table:table-cell>
          <table:table-cell/>
          <table:table-cell table:style-name="ce8" table:formula="of:=[.C23]*([.C24]*[.C25]+[.C26]*(1-[.C25]))" office:value-type="currency" office:currency="USD" office:value="578.85" calcext:value-type="currency">
            <text:p>$579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resent value of land opportunity costs, Plantation net present value establishment cost per hectare, pl_npv_estcost_USD_per_ha = init_cost</text:p>
          </table:table-cell>
          <table:table-cell/>
          <table:table-cell table:style-name="ce8" table:formula="of:=[.C34]*(1-(1+[.C42])^(-[.$B$5]))/[.C42]" office:value-type="currency" office:currency="USD" office:value="1618.6511302558" calcext:value-type="currency">
            <text:p>$1,619</text:p>
          </table:table-cell>
          <table:table-cell office:value-type="string" calcext:value-type="string">
            <text:p>Payments at end of year.</text:p>
          </table:table-cell>
          <table:table-cell table:number-columns-repeated="2"/>
          <table:table-cell office:value-type="string" calcext:value-type="string">
            <text:p><text:span text:style-name="T1">'=</text:span><text:span text:style-name="T2">crop_va</text:span><text:span text:style-name="T3">*(1-(1+</text:span><text:span text:style-name="T4">discount_rate</text:span><text:span text:style-name="T3">)^(-</text:span><text:span text:style-name="T5">contract_length</text:span><text:span text:style-name="T3">))/</text:span><text:span text:style-name="T4">discount_rate</text:span></text:p>
          </table:table-cell>
          <table:table-cell table:number-columns-repeated="246"/>
          <table:table-cell table:style-name="Default" table:number-columns-repeated="16131"/>
        </table:table-row>
        <table:table-row table:style-name="ro1">
          <table:table-cell office:value-type="string" calcext:value-type="string">
            <text:p>Present value of wood harvest revenue, from plantation harvested C/ha over the time horizon, pl_harvested_tC_per_ha, from g_harvested_cum_tC_per_ha</text:p>
          </table:table-cell>
          <table:table-cell/>
          <table:table-cell table:style-name="ce8" table:formula="of:=-[.$B$6]*(1-EXP(-[.$B$7]*[.$B$5]))^2/(1+[.C42])^[.$B$5]" office:value-type="currency" office:currency="USD" office:value="-0.272564746493026" calcext:value-type="currency">
            <text:p>-$0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MDAMAGE bid $/ha discounted to year 0 of contract </text:p>
          </table:table-cell>
          <table:table-cell/>
          <table:table-cell table:style-name="ce8" table:formula="of:=[.C43]+[.C44]+[.C45]" office:value-type="currency" office:currency="USD" office:value="2197.22856550931" calcext:value-type="currency">
            <text:p>$2,197</text:p>
          </table:table-cell>
          <table:table-cell table:number-columns-repeated="250"/>
          <table:table-cell table:style-name="Default" table:number-columns-repeated="16131"/>
        </table:table-row>
        <table:table-row table:style-name="ro1">
          <table:table-cell table:style-name="ce3" office:value-type="string" calcext:value-type="string">
            <text:p>SMDAMAGE bid $/ha discounted to year 0 of contract, collected terms</text:p>
          </table:table-cell>
          <table:table-cell/>
          <table:table-cell table:style-name="ce8" table:formula="of:=[.C23]*([.C24]*[.C25]+[.C26]*(1-[.C25]))+[.C34]*(1-(1+[.C42])^(-[.$B$5]))/[.C42]-[.$B$6]*(1-EXP(-[.$B$7]*[.$B$5]))^2/(1+[.C42])^[.$B$5]" office:value-type="currency" office:currency="USD" office:value="2197.22856550931" calcext:value-type="currency">
            <text:p>$2,197</text:p>
          </table:table-cell>
          <table:table-cell table:number-columns-repeated="250"/>
          <table:table-cell table:style-name="Default" table:number-columns-repeated="16131"/>
        </table:table-row>
        <table:table-row table:style-name="ro1" table:number-rows-repeated="1048527">
          <table:table-cell table:number-columns-repeated="253"/>
          <table:table-cell table:style-name="Default" table:number-columns-repeated="16131"/>
        </table:table-row>
        <table:table-row table:style-name="ro2">
          <table:table-cell table:number-columns-repeated="253"/>
          <table:table-cell table:style-name="Default" table:number-columns-repeated="16131"/>
        </table:table-row>
        <table:table-row table:style-name="ro2">
          <table:table-cell table:number-columns-repeated="253"/>
          <table:table-cell table:style-name="Default" table:number-columns-repeated="16131"/>
        </table:table-row>
      </table:table>
      <table:table table:name="Convolution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94" table:default-cell-style-name="Default"/>
        <table:table-column table:style-name="co4" table:number-columns-repeated="16089"/>
        <table:table-row table:style-name="ro1">
          <table:table-cell office:value-type="string" calcext:value-type="string">
            <text:p>Hand-compared with the Python convolution code.</text:p>
          </table:table-cell>
          <table:table-cell table:number-columns-repeated="294"/>
          <table:table-cell table:style-name="Default" table:number-columns-repeated="16089"/>
        </table:table-row>
        <table:table-row table:style-name="ro1">
          <table:table-cell table:number-columns-repeated="295"/>
          <table:table-cell table:style-name="Default" table:number-columns-repeated="16089"/>
        </table:table-row>
        <table:table-row table:style-name="ro1" table:number-rows-repeated="2">
          <table:table-cell table:number-columns-repeated="101"/>
          <table:table-cell table:style-name="ce42"/>
          <table:table-cell table:number-columns-repeated="193"/>
          <table:table-cell table:style-name="Default" table:number-columns-repeated="16089"/>
        </table:table-row>
        <table:table-row table:style-name="ro1">
          <table:table-cell office:value-type="string" calcext:value-type="string">
            <text:p>Emission 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41" table:formula="of:=[.CW5]+1" office:value-type="float" office:value="101" calcext:value-type="float">
            <text:p>101</text:p>
          </table:table-cell>
          <table:table-cell table:formula="of:=[.CX5]+1" office:value-type="float" office:value="102" calcext:value-type="float">
            <text:p>102</text:p>
          </table:table-cell>
          <table:table-cell table:formula="of:=[.CY5]+1" office:value-type="float" office:value="103" calcext:value-type="float">
            <text:p>103</text:p>
          </table:table-cell>
          <table:table-cell table:formula="of:=[.CZ5]+1" office:value-type="float" office:value="104" calcext:value-type="float">
            <text:p>104</text:p>
          </table:table-cell>
          <table:table-cell table:formula="of:=[.DA5]+1" office:value-type="float" office:value="105" calcext:value-type="float">
            <text:p>105</text:p>
          </table:table-cell>
          <table:table-cell table:formula="of:=[.DB5]+1" office:value-type="float" office:value="106" calcext:value-type="float">
            <text:p>106</text:p>
          </table:table-cell>
          <table:table-cell table:formula="of:=[.DC5]+1" office:value-type="float" office:value="107" calcext:value-type="float">
            <text:p>107</text:p>
          </table:table-cell>
          <table:table-cell table:formula="of:=[.DD5]+1" office:value-type="float" office:value="108" calcext:value-type="float">
            <text:p>108</text:p>
          </table:table-cell>
          <table:table-cell table:formula="of:=[.DE5]+1" office:value-type="float" office:value="109" calcext:value-type="float">
            <text:p>109</text:p>
          </table:table-cell>
          <table:table-cell table:formula="of:=[.DF5]+1" office:value-type="float" office:value="110" calcext:value-type="float">
            <text:p>110</text:p>
          </table:table-cell>
          <table:table-cell table:formula="of:=[.DG5]+1" office:value-type="float" office:value="111" calcext:value-type="float">
            <text:p>111</text:p>
          </table:table-cell>
          <table:table-cell table:formula="of:=[.DH5]+1" office:value-type="float" office:value="112" calcext:value-type="float">
            <text:p>112</text:p>
          </table:table-cell>
          <table:table-cell table:formula="of:=[.DI5]+1" office:value-type="float" office:value="113" calcext:value-type="float">
            <text:p>113</text:p>
          </table:table-cell>
          <table:table-cell table:formula="of:=[.DJ5]+1" office:value-type="float" office:value="114" calcext:value-type="float">
            <text:p>114</text:p>
          </table:table-cell>
          <table:table-cell table:formula="of:=[.DK5]+1" office:value-type="float" office:value="115" calcext:value-type="float">
            <text:p>115</text:p>
          </table:table-cell>
          <table:table-cell table:formula="of:=[.DL5]+1" office:value-type="float" office:value="116" calcext:value-type="float">
            <text:p>116</text:p>
          </table:table-cell>
          <table:table-cell table:formula="of:=[.DM5]+1" office:value-type="float" office:value="117" calcext:value-type="float">
            <text:p>117</text:p>
          </table:table-cell>
          <table:table-cell table:formula="of:=[.DN5]+1" office:value-type="float" office:value="118" calcext:value-type="float">
            <text:p>118</text:p>
          </table:table-cell>
          <table:table-cell table:formula="of:=[.DO5]+1" office:value-type="float" office:value="119" calcext:value-type="float">
            <text:p>119</text:p>
          </table:table-cell>
          <table:table-cell table:formula="of:=[.DP5]+1" office:value-type="float" office:value="120" calcext:value-type="float">
            <text:p>120</text:p>
          </table:table-cell>
          <table:table-cell table:formula="of:=[.DQ5]+1" office:value-type="float" office:value="121" calcext:value-type="float">
            <text:p>121</text:p>
          </table:table-cell>
          <table:table-cell table:formula="of:=[.DR5]+1" office:value-type="float" office:value="122" calcext:value-type="float">
            <text:p>122</text:p>
          </table:table-cell>
          <table:table-cell table:formula="of:=[.DS5]+1" office:value-type="float" office:value="123" calcext:value-type="float">
            <text:p>123</text:p>
          </table:table-cell>
          <table:table-cell table:formula="of:=[.DT5]+1" office:value-type="float" office:value="124" calcext:value-type="float">
            <text:p>124</text:p>
          </table:table-cell>
          <table:table-cell table:formula="of:=[.DU5]+1" office:value-type="float" office:value="125" calcext:value-type="float">
            <text:p>125</text:p>
          </table:table-cell>
          <table:table-cell table:formula="of:=[.DV5]+1" office:value-type="float" office:value="126" calcext:value-type="float">
            <text:p>126</text:p>
          </table:table-cell>
          <table:table-cell table:formula="of:=[.DW5]+1" office:value-type="float" office:value="127" calcext:value-type="float">
            <text:p>127</text:p>
          </table:table-cell>
          <table:table-cell table:formula="of:=[.DX5]+1" office:value-type="float" office:value="128" calcext:value-type="float">
            <text:p>128</text:p>
          </table:table-cell>
          <table:table-cell table:formula="of:=[.DY5]+1" office:value-type="float" office:value="129" calcext:value-type="float">
            <text:p>129</text:p>
          </table:table-cell>
          <table:table-cell table:formula="of:=[.DZ5]+1" office:value-type="float" office:value="130" calcext:value-type="float">
            <text:p>130</text:p>
          </table:table-cell>
          <table:table-cell table:formula="of:=[.EA5]+1" office:value-type="float" office:value="131" calcext:value-type="float">
            <text:p>131</text:p>
          </table:table-cell>
          <table:table-cell table:formula="of:=[.EB5]+1" office:value-type="float" office:value="132" calcext:value-type="float">
            <text:p>132</text:p>
          </table:table-cell>
          <table:table-cell table:formula="of:=[.EC5]+1" office:value-type="float" office:value="133" calcext:value-type="float">
            <text:p>133</text:p>
          </table:table-cell>
          <table:table-cell table:formula="of:=[.ED5]+1" office:value-type="float" office:value="134" calcext:value-type="float">
            <text:p>134</text:p>
          </table:table-cell>
          <table:table-cell table:formula="of:=[.EE5]+1" office:value-type="float" office:value="135" calcext:value-type="float">
            <text:p>135</text:p>
          </table:table-cell>
          <table:table-cell table:formula="of:=[.EF5]+1" office:value-type="float" office:value="136" calcext:value-type="float">
            <text:p>136</text:p>
          </table:table-cell>
          <table:table-cell table:formula="of:=[.EG5]+1" office:value-type="float" office:value="137" calcext:value-type="float">
            <text:p>137</text:p>
          </table:table-cell>
          <table:table-cell table:formula="of:=[.EH5]+1" office:value-type="float" office:value="138" calcext:value-type="float">
            <text:p>138</text:p>
          </table:table-cell>
          <table:table-cell table:formula="of:=[.EI5]+1" office:value-type="float" office:value="139" calcext:value-type="float">
            <text:p>139</text:p>
          </table:table-cell>
          <table:table-cell table:formula="of:=[.EJ5]+1" office:value-type="float" office:value="140" calcext:value-type="float">
            <text:p>140</text:p>
          </table:table-cell>
          <table:table-cell table:formula="of:=[.EK5]+1" office:value-type="float" office:value="141" calcext:value-type="float">
            <text:p>141</text:p>
          </table:table-cell>
          <table:table-cell table:formula="of:=[.EL5]+1" office:value-type="float" office:value="142" calcext:value-type="float">
            <text:p>142</text:p>
          </table:table-cell>
          <table:table-cell table:formula="of:=[.EM5]+1" office:value-type="float" office:value="143" calcext:value-type="float">
            <text:p>143</text:p>
          </table:table-cell>
          <table:table-cell table:formula="of:=[.EN5]+1" office:value-type="float" office:value="144" calcext:value-type="float">
            <text:p>144</text:p>
          </table:table-cell>
          <table:table-cell table:formula="of:=[.EO5]+1" office:value-type="float" office:value="145" calcext:value-type="float">
            <text:p>145</text:p>
          </table:table-cell>
          <table:table-cell table:number-columns-repeated="149"/>
          <table:table-cell table:style-name="Default" table:number-columns-repeated="16089"/>
        </table:table-row>
        <table:table-row table:style-name="ro1">
          <table:table-cell office:value-type="string" calcext:value-type="string">
            <text:p>Carbon schedule, mtons emitted</text:p>
          </table:table-cell>
          <table:table-cell table:style-name="ce36" table:formula="of:=[$'Plantation example'.B20]" office:value-type="float" office:value="0.11443190497298" calcext:value-type="float">
            <text:p>0.11</text:p>
          </table:table-cell>
          <table:table-cell table:style-name="ce36" table:formula="of:=[$'Plantation example'.C20]" office:value-type="float" office:value="0.134211206231521" calcext:value-type="float">
            <text:p>0.13</text:p>
          </table:table-cell>
          <table:table-cell table:style-name="ce36" table:formula="of:=[$'Plantation example'.D20]" office:value-type="float" office:value="0.152216765238127" calcext:value-type="float">
            <text:p>0.15</text:p>
          </table:table-cell>
          <table:table-cell table:style-name="ce36" table:formula="of:=[$'Plantation example'.E20]" office:value-type="float" office:value="0.168570256191857" calcext:value-type="float">
            <text:p>0.17</text:p>
          </table:table-cell>
          <table:table-cell table:style-name="ce36" table:formula="of:=[$'Plantation example'.F20]" office:value-type="float" office:value="0.183385724341965" calcext:value-type="float">
            <text:p>0.18</text:p>
          </table:table-cell>
          <table:table-cell table:style-name="ce36" table:formula="of:=[$'Plantation example'.G20]" office:value-type="float" office:value="0.196770046317222" calcext:value-type="float">
            <text:p>0.20</text:p>
          </table:table-cell>
          <table:table-cell table:style-name="ce36" table:formula="of:=[$'Plantation example'.H20]" office:value-type="float" office:value="0.208823363173279" calcext:value-type="float">
            <text:p>0.21</text:p>
          </table:table-cell>
          <table:table-cell table:style-name="ce36" table:formula="of:=[$'Plantation example'.I20]" office:value-type="float" office:value="0.219639487760872" calcext:value-type="float">
            <text:p>0.22</text:p>
          </table:table-cell>
          <table:table-cell table:style-name="ce36" table:formula="of:=[$'Plantation example'.J20]" office:value-type="float" office:value="0.229306287923925" calcext:value-type="float">
            <text:p>0.23</text:p>
          </table:table-cell>
          <table:table-cell table:style-name="ce36" table:formula="of:=[$'Plantation example'.K20]" office:value-type="float" office:value="0.237906046948295" calcext:value-type="float">
            <text:p>0.24</text:p>
          </table:table-cell>
          <table:table-cell table:style-name="ce36" table:formula="of:=[$'Plantation example'.L20]" office:value-type="float" office:value="0.245515802598812" calcext:value-type="float">
            <text:p>0.25</text:p>
          </table:table-cell>
          <table:table-cell table:style-name="ce36" table:formula="of:=[$'Plantation example'.M20]" office:value-type="float" office:value="0.252207666003961" calcext:value-type="float">
            <text:p>0.25</text:p>
          </table:table-cell>
          <table:table-cell table:style-name="ce36" table:formula="of:=[$'Plantation example'.N20]" office:value-type="float" office:value="0.258049121573864" calcext:value-type="float">
            <text:p>0.26</text:p>
          </table:table-cell>
          <table:table-cell table:style-name="ce36" table:formula="of:=[$'Plantation example'.O20]" office:value-type="float" office:value="0.263103309067799" calcext:value-type="float">
            <text:p>0.26</text:p>
          </table:table-cell>
          <table:table-cell table:style-name="ce36" table:formula="of:=[$'Plantation example'.P20]" office:value-type="float" office:value="0.267429288862168" calcext:value-type="float">
            <text:p>0.27</text:p>
          </table:table-cell>
          <table:table-cell table:style-name="ce36" table:formula="of:=[$'Plantation example'.Q20]" office:value-type="float" office:value="0.271082291408258" calcext:value-type="float">
            <text:p>0.27</text:p>
          </table:table-cell>
          <table:table-cell table:style-name="ce36" table:formula="of:=[$'Plantation example'.R20]" office:value-type="float" office:value="0.274113951811226" calcext:value-type="float">
            <text:p>0.27</text:p>
          </table:table-cell>
          <table:table-cell table:style-name="ce36" table:formula="of:=[$'Plantation example'.S20]" office:value-type="float" office:value="0.276572530407162" calcext:value-type="float">
            <text:p>0.28</text:p>
          </table:table-cell>
          <table:table-cell table:style-name="ce36" table:formula="of:=[$'Plantation example'.T20]" office:value-type="float" office:value="0.278503120163724" calcext:value-type="float">
            <text:p>0.28</text:p>
          </table:table-cell>
          <table:table-cell table:style-name="ce36" table:formula="of:=[$'Plantation example'.U20]" office:value-type="float" office:value="0.279947841681459" calcext:value-type="float">
            <text:p>0.28</text:p>
          </table:table-cell>
          <table:table-cell table:style-name="ce36" table:formula="of:=[$'Plantation example'.V20]" office:value-type="float" office:value="0.280946026527388" calcext:value-type="float">
            <text:p>0.28</text:p>
          </table:table-cell>
          <table:table-cell table:style-name="ce36" table:formula="of:=[$'Plantation example'.W20]" office:value-type="float" office:value="0.281534389589542" calcext:value-type="float">
            <text:p>0.28</text:p>
          </table:table-cell>
          <table:table-cell table:style-name="ce36" table:formula="of:=[$'Plantation example'.X20]" office:value-type="float" office:value="0.281747191100762" calcext:value-type="float">
            <text:p>0.28</text:p>
          </table:table-cell>
          <table:table-cell table:style-name="ce36" table:formula="of:=[$'Plantation example'.Y20]" office:value-type="float" office:value="0.281616388942055" calcext:value-type="float">
            <text:p>0.28</text:p>
          </table:table-cell>
          <table:table-cell table:style-name="ce36" table:formula="of:=[$'Plantation example'.Z20]" office:value-type="float" office:value="0.281171781799994" calcext:value-type="float">
            <text:p>0.28</text:p>
          </table:table-cell>
          <table:table-cell table:style-name="ce36" table:formula="of:=[$'Plantation example'.AA20]" office:value-type="float" office:value="0.280441143718971" calcext:value-type="float">
            <text:p>0.28</text:p>
          </table:table-cell>
          <table:table-cell table:style-name="ce36" table:formula="of:=[$'Plantation example'.AB20]" office:value-type="float" office:value="0.279450350557331" calcext:value-type="float">
            <text:p>0.28</text:p>
          </table:table-cell>
          <table:table-cell table:style-name="ce36" table:formula="of:=[$'Plantation example'.AC20]" office:value-type="float" office:value="0.27822349882659" calcext:value-type="float">
            <text:p>0.28</text:p>
          </table:table-cell>
          <table:table-cell table:style-name="ce36" table:formula="of:=[$'Plantation example'.AD20]" office:value-type="float" office:value="0.276783017364765" calcext:value-type="float">
            <text:p>0.28</text:p>
          </table:table-cell>
          <table:table-cell table:style-name="ce36" table:formula="of:=[$'Plantation example'.AE20]" office:value-type="float" office:value="0.275149772268374" calcext:value-type="float">
            <text:p>0.28</text:p>
          </table:table-cell>
          <table:table-cell table:style-name="ce36" table:formula="of:=[$'Plantation example'.AF20]" office:value-type="float" office:value="0.273343165482724" calcext:value-type="float">
            <text:p>0.27</text:p>
          </table:table-cell>
          <table:table-cell table:style-name="ce36" table:formula="of:=[$'Plantation example'.AG20]" office:value-type="float" office:value="0.27138122742664" calcext:value-type="float">
            <text:p>0.27</text:p>
          </table:table-cell>
          <table:table-cell table:style-name="ce36" table:formula="of:=[$'Plantation example'.AH20]" office:value-type="float" office:value="0.269280704005632" calcext:value-type="float">
            <text:p>0.27</text:p>
          </table:table-cell>
          <table:table-cell table:style-name="ce36" table:formula="of:=[$'Plantation example'.AI20]" office:value-type="float" office:value="0.267057138346757" calcext:value-type="float">
            <text:p>0.27</text:p>
          </table:table-cell>
          <table:table-cell table:style-name="ce36" table:formula="of:=[$'Plantation example'.AJ20]" office:value-type="float" office:value="0.264724947568779" calcext:value-type="float">
            <text:p>0.26</text:p>
          </table:table-cell>
          <table:table-cell table:style-name="ce36" table:formula="of:=[$'Plantation example'.AK20]" office:value-type="float" office:value="0.262297494882799" calcext:value-type="float">
            <text:p>0.26</text:p>
          </table:table-cell>
          <table:table-cell table:style-name="ce36" table:formula="of:=[$'Plantation example'.AL20]" office:value-type="float" office:value="0.259787157301175" calcext:value-type="float">
            <text:p>0.26</text:p>
          </table:table-cell>
          <table:table-cell table:style-name="ce36" table:formula="of:=[$'Plantation example'.AM20]" office:value-type="float" office:value="0.257205389216179" calcext:value-type="float">
            <text:p>0.26</text:p>
          </table:table-cell>
          <table:table-cell table:style-name="ce36" table:formula="of:=[$'Plantation example'.AN20]" office:value-type="float" office:value="0.254562782094454" calcext:value-type="float">
            <text:p>0.25</text:p>
          </table:table-cell>
          <table:table-cell table:style-name="ce36" table:formula="of:=[$'Plantation example'.AO20]" office:value-type="float" office:value="0.251869120518829" calcext:value-type="float">
            <text:p>0.25</text:p>
          </table:table-cell>
          <table:table-cell table:style-name="ce36" table:formula="of:=[$'Plantation example'.AP20]" office:value-type="float" office:value="0.249133434795435" calcext:value-type="float">
            <text:p>0.25</text:p>
          </table:table-cell>
          <table:table-cell table:style-name="ce36" table:formula="of:=[$'Plantation example'.AQ20]" office:value-type="float" office:value="0.24636405033118" calcext:value-type="float">
            <text:p>0.25</text:p>
          </table:table-cell>
          <table:table-cell table:style-name="ce36" table:formula="of:=[$'Plantation example'.AR20]" office:value-type="float" office:value="0.243568633974582" calcext:value-type="float">
            <text:p>0.24</text:p>
          </table:table-cell>
          <table:table-cell table:style-name="ce36" table:formula="of:=[$'Plantation example'.AS20]" office:value-type="float" office:value="0.240754237501555" calcext:value-type="float">
            <text:p>0.24</text:p>
          </table:table-cell>
          <table:table-cell table:style-name="ce36" table:formula="of:=[$'Plantation example'.AT20]" office:value-type="float" office:value="0.237927338417043" calcext:value-type="float">
            <text:p>0.24</text:p>
          </table:table-cell>
          <table:table-cell table:style-name="ce36" table:formula="of:=[$'Plantation example'.AU20]" office:value-type="float" office:value="0.235093878233288" calcext:value-type="float">
            <text:p>0.24</text:p>
          </table:table-cell>
          <table:table-cell table:style-name="ce36" table:formula="of:=[$'Plantation example'.AV20]" office:value-type="float" office:value="0.23225929837604" calcext:value-type="float">
            <text:p>0.23</text:p>
          </table:table-cell>
          <table:table-cell table:style-name="ce36" table:formula="of:=[$'Plantation example'.AW20]" office:value-type="float" office:value="0.229428573861079" calcext:value-type="float">
            <text:p>0.23</text:p>
          </table:table-cell>
          <table:table-cell table:style-name="ce36" table:formula="of:=[$'Plantation example'.AX20]" office:value-type="float" office:value="0.22660624487497" calcext:value-type="float">
            <text:p>0.23</text:p>
          </table:table-cell>
          <table:table-cell table:style-name="ce36" table:formula="of:=[$'Plantation example'.AY20]" office:value-type="float" office:value="0.223796446386108" calcext:value-type="float">
            <text:p>0.22</text:p>
          </table:table-cell>
          <table:table-cell table:style-name="ce36" table:formula="of:=[$'Plantation example'.AZ20]" office:value-type="float" office:value="0.22100293590459" calcext:value-type="float">
            <text:p>0.22</text:p>
          </table:table-cell>
          <table:table-cell table:style-name="ce36" table:formula="of:=[$'Plantation example'.BA20]" office:value-type="float" office:value="0.21822911950249" calcext:value-type="float">
            <text:p>0.22</text:p>
          </table:table-cell>
          <table:table-cell table:style-name="ce36" table:formula="of:=[$'Plantation example'.BB20]" office:value-type="float" office:value="0.215478076199458" calcext:value-type="float">
            <text:p>0.22</text:p>
          </table:table-cell>
          <table:table-cell table:style-name="ce36" table:formula="of:=[$'Plantation example'.BC20]" office:value-type="float" office:value="0.212752580812379" calcext:value-type="float">
            <text:p>0.21</text:p>
          </table:table-cell>
          <table:table-cell table:style-name="ce36" table:formula="of:=[$'Plantation example'.BD20]" office:value-type="float" office:value="0.210055125361953" calcext:value-type="float">
            <text:p>0.21</text:p>
          </table:table-cell>
          <table:table-cell table:style-name="ce36" table:formula="of:=[$'Plantation example'.BE20]" office:value-type="float" office:value="0.207387939123572" calcext:value-type="float">
            <text:p>0.21</text:p>
          </table:table-cell>
          <table:table-cell table:style-name="ce36" table:formula="of:=[$'Plantation example'.BF20]" office:value-type="float" office:value="0.204753007404645" calcext:value-type="float">
            <text:p>0.20</text:p>
          </table:table-cell>
          <table:table-cell table:style-name="ce36" table:formula="of:=[$'Plantation example'.BG20]" office:value-type="float" office:value="0.20215208912569" calcext:value-type="float">
            <text:p>0.20</text:p>
          </table:table-cell>
          <table:table-cell table:style-name="ce36" table:formula="of:=[$'Plantation example'.BH20]" office:value-type="float" office:value="0.199586733277869" calcext:value-type="float">
            <text:p>0.20</text:p>
          </table:table-cell>
          <table:table-cell table:style-name="ce36" table:formula="of:=[$'Plantation example'.BI20]" office:value-type="float" office:value="0.197058294325366" calcext:value-type="float">
            <text:p>0.20</text:p>
          </table:table-cell>
          <table:table-cell table:style-name="ce36" table:formula="of:=[$'Plantation example'.BJ20]" office:value-type="float" office:value="0.194567946616903" calcext:value-type="float">
            <text:p>0.19</text:p>
          </table:table-cell>
          <table:table-cell table:style-name="ce36" table:formula="of:=[$'Plantation example'.BK20]" office:value-type="float" office:value="0.192116697866864" calcext:value-type="float">
            <text:p>0.19</text:p>
          </table:table-cell>
          <table:table-cell table:style-name="ce36" table:formula="of:=[$'Plantation example'.BL20]" office:value-type="float" office:value="0.189705401762926" calcext:value-type="float">
            <text:p>0.19</text:p>
          </table:table-cell>
          <table:table-cell table:style-name="ce36" table:formula="of:=[$'Plantation example'.BM20]" office:value-type="float" office:value="0.187334769753657" calcext:value-type="float">
            <text:p>0.19</text:p>
          </table:table-cell>
          <table:table-cell table:style-name="ce36" table:formula="of:=[$'Plantation example'.BN20]" office:value-type="float" office:value="0.185005382066376" calcext:value-type="float">
            <text:p>0.19</text:p>
          </table:table-cell>
          <table:table-cell table:style-name="ce36" table:formula="of:=[$'Plantation example'.BO20]" office:value-type="float" office:value="0.182717698002577" calcext:value-type="float">
            <text:p>0.18</text:p>
          </table:table-cell>
          <table:table-cell table:style-name="ce36" table:formula="of:=[$'Plantation example'.BP20]" office:value-type="float" office:value="0.180472065555352" calcext:value-type="float">
            <text:p>0.18</text:p>
          </table:table-cell>
          <table:table-cell table:style-name="ce36" table:formula="of:=[$'Plantation example'.BQ20]" office:value-type="float" office:value="0.178268730390645" calcext:value-type="float">
            <text:p>0.18</text:p>
          </table:table-cell>
          <table:table-cell table:style-name="ce36" table:formula="of:=[$'Plantation example'.BR20]" office:value-type="float" office:value="0.176107844231598" calcext:value-type="float">
            <text:p>0.18</text:p>
          </table:table-cell>
          <table:table-cell table:style-name="ce36" table:formula="of:=[$'Plantation example'.BS20]" office:value-type="float" office:value="0.173989472682973" calcext:value-type="float">
            <text:p>0.17</text:p>
          </table:table-cell>
          <table:table-cell table:style-name="ce36" table:formula="of:=[$'Plantation example'.BT20]" office:value-type="float" office:value="0.171913602530338" calcext:value-type="float">
            <text:p>0.17</text:p>
          </table:table-cell>
          <table:table-cell table:style-name="ce36" table:formula="of:=[$'Plantation example'.BU20]" office:value-type="float" office:value="0.169880148546688" calcext:value-type="float">
            <text:p>0.17</text:p>
          </table:table-cell>
          <table:table-cell table:style-name="ce36" table:formula="of:=[$'Plantation example'.BV20]" office:value-type="float" office:value="0.167888959837168" calcext:value-type="float">
            <text:p>0.17</text:p>
          </table:table-cell>
          <table:table-cell table:style-name="ce36" table:formula="of:=[$'Plantation example'.BW20]" office:value-type="float" office:value="0.165939825750736" calcext:value-type="float">
            <text:p>0.17</text:p>
          </table:table-cell>
          <table:table-cell table:style-name="ce36" table:formula="of:=[$'Plantation example'.BX20]" office:value-type="float" office:value="0.164032481385858" calcext:value-type="float">
            <text:p>0.16</text:p>
          </table:table-cell>
          <table:table-cell table:style-name="ce36" table:formula="of:=[$'Plantation example'.BY20]" office:value-type="float" office:value="0.162166612715716" calcext:value-type="float">
            <text:p>0.16</text:p>
          </table:table-cell>
          <table:table-cell table:style-name="ce36" table:formula="of:=[$'Plantation example'.BZ20]" office:value-type="float" office:value="0.160341861356835" calcext:value-type="float">
            <text:p>0.16</text:p>
          </table:table-cell>
          <table:table-cell table:style-name="ce36" table:formula="of:=[$'Plantation example'.CA20]" office:value-type="float" office:value="0.158557829003632" calcext:value-type="float">
            <text:p>0.16</text:p>
          </table:table-cell>
          <table:table-cell table:style-name="ce36" table:formula="of:=[$'Plantation example'.CB20]" office:value-type="float" office:value="0.156814081549994" calcext:value-type="float">
            <text:p>0.16</text:p>
          </table:table-cell>
          <table:table-cell table:style-name="ce36" table:formula="of:=[$'Plantation example'.CC20]" office:value-type="float" office:value="0.155110152917737" calcext:value-type="float">
            <text:p>0.16</text:p>
          </table:table-cell>
          <table:table-cell table:style-name="ce36" table:formula="of:=[$'Plantation example'.CD20]" office:value-type="float" office:value="0.153445548610574" calcext:value-type="float">
            <text:p>0.15</text:p>
          </table:table-cell>
          <table:table-cell table:style-name="ce36" table:formula="of:=[$'Plantation example'.CE20]" office:value-type="float" office:value="0.151819749011123" calcext:value-type="float">
            <text:p>0.15</text:p>
          </table:table-cell>
          <table:table-cell table:style-name="ce36" table:formula="of:=[$'Plantation example'.CF20]" office:value-type="float" office:value="0.150232212437363" calcext:value-type="float">
            <text:p>0.15</text:p>
          </table:table-cell>
          <table:table-cell table:style-name="ce36" table:formula="of:=[$'Plantation example'.CG20]" office:value-type="float" office:value="0.14868237797402" calcext:value-type="float">
            <text:p>0.15</text:p>
          </table:table-cell>
          <table:table-cell table:style-name="ce36" table:formula="of:=[$'Plantation example'.CH20]" office:value-type="float" office:value="0.147169668093342" calcext:value-type="float">
            <text:p>0.15</text:p>
          </table:table-cell>
          <table:table-cell table:style-name="ce36" table:formula="of:=[$'Plantation example'.CI20]" office:value-type="float" office:value="0.145693491078917" calcext:value-type="float">
            <text:p>0.15</text:p>
          </table:table-cell>
          <table:table-cell table:style-name="ce36" table:formula="of:=[$'Plantation example'.CJ20]" office:value-type="float" office:value="0.144253243265282" calcext:value-type="float">
            <text:p>0.14</text:p>
          </table:table-cell>
          <table:table-cell table:style-name="ce36" table:formula="of:=[$'Plantation example'.CK20]" office:value-type="float" office:value="0.142848311105347" calcext:value-type="float">
            <text:p>0.14</text:p>
          </table:table-cell>
          <table:table-cell table:style-name="ce36" table:formula="of:=[$'Plantation example'.CL20]" office:value-type="float" office:value="0.141478073076881" calcext:value-type="float">
            <text:p>0.14</text:p>
          </table:table-cell>
          <table:table-cell table:style-name="ce36" table:formula="of:=[$'Plantation example'.CM20]" office:value-type="float" office:value="0.140141901438636" calcext:value-type="float">
            <text:p>0.14</text:p>
          </table:table-cell>
          <table:table-cell table:style-name="ce36" table:formula="of:=[$'Plantation example'.CN20]" office:value-type="float" office:value="0.138839163846024" calcext:value-type="float">
            <text:p>0.14</text:p>
          </table:table-cell>
          <table:table-cell table:style-name="ce36" table:formula="of:=[$'Plantation example'.CO20]" office:value-type="float" office:value="0.137569224835668" calcext:value-type="float">
            <text:p>0.14</text:p>
          </table:table-cell>
          <table:table-cell table:style-name="ce36" table:formula="of:=[$'Plantation example'.CP20]" office:value-type="float" office:value="0.136331447187533" calcext:value-type="float">
            <text:p>0.14</text:p>
          </table:table-cell>
          <table:table-cell table:style-name="ce36" table:formula="of:=[$'Plantation example'.CQ20]" office:value-type="float" office:value="0.135125193172855" calcext:value-type="float">
            <text:p>0.14</text:p>
          </table:table-cell>
          <table:table-cell table:style-name="ce36" table:formula="of:=[$'Plantation example'.CR20]" office:value-type="float" office:value="0.13394982569553" calcext:value-type="float">
            <text:p>0.13</text:p>
          </table:table-cell>
          <table:table-cell table:style-name="ce36" table:formula="of:=[$'Plantation example'.CS20]" office:value-type="float" office:value="0.132804709334181" calcext:value-type="float">
            <text:p>0.13</text:p>
          </table:table-cell>
          <table:table-cell table:style-name="ce36" table:formula="of:=[$'Plantation example'.CT20]" office:value-type="float" office:value="0.131689211291653" calcext:value-type="float">
            <text:p>0.13</text:p>
          </table:table-cell>
          <table:table-cell table:style-name="ce36" table:formula="of:=[$'Plantation example'.CU20]" office:value-type="float" office:value="0.130602702258265" calcext:value-type="float">
            <text:p>0.13</text:p>
          </table:table-cell>
          <table:table-cell table:style-name="ce36" table:formula="of:=[$'Plantation example'.CV20]" office:value-type="float" office:value="0.129544557194765" calcext:value-type="float">
            <text:p>0.13</text:p>
          </table:table-cell>
          <table:table-cell table:style-name="ce36" table:formula="of:=[$'Plantation example'.CW20]" office:value-type="float" office:value="0.128514156040545" calcext:value-type="float">
            <text:p>0.13</text:p>
          </table:table-cell>
          <table:table-cell table:style-name="ce43" table:formula="of:=[$'Plantation example'.CX20]" office:value-type="float" office:value="0.127510884352335" calcext:value-type="float">
            <text:p>0.13</text:p>
          </table:table-cell>
          <table:table-cell table:style-name="ce36" table:formula="of:=[$'Plantation example'.CY20]" office:value-type="float" office:value="0.126534133878251" calcext:value-type="float">
            <text:p>0.13</text:p>
          </table:table-cell>
          <table:table-cell table:style-name="ce36" table:formula="of:=[$'Plantation example'.CZ20]" office:value-type="float" office:value="0.125583303071786" calcext:value-type="float">
            <text:p>0.13</text:p>
          </table:table-cell>
          <table:table-cell table:style-name="ce36" table:formula="of:=[$'Plantation example'.DA20]" office:value-type="float" office:value="0.124657797550017" calcext:value-type="float">
            <text:p>0.12</text:p>
          </table:table-cell>
          <table:table-cell table:style-name="ce36" table:formula="of:=[$'Plantation example'.DB20]" office:value-type="float" office:value="0.123757030500049" calcext:value-type="float">
            <text:p>0.12</text:p>
          </table:table-cell>
          <table:table-cell table:style-name="ce36" table:formula="of:=[$'Plantation example'.DC20]" office:value-type="float" office:value="0.122880423037443" calcext:value-type="float">
            <text:p>0.12</text:p>
          </table:table-cell>
          <table:table-cell table:style-name="ce36" table:formula="of:=[$'Plantation example'.DD20]" office:value-type="float" office:value="0.122027404520156" calcext:value-type="float">
            <text:p>0.12</text:p>
          </table:table-cell>
          <table:table-cell table:style-name="ce36" table:formula="of:=[$'Plantation example'.DE20]" office:value-type="float" office:value="0.121197412821265" calcext:value-type="float">
            <text:p>0.12</text:p>
          </table:table-cell>
          <table:table-cell table:style-name="ce36" table:formula="of:=[$'Plantation example'.DF20]" office:value-type="float" office:value="0.120389894563572" calcext:value-type="float">
            <text:p>0.12</text:p>
          </table:table-cell>
          <table:table-cell table:style-name="ce36" table:formula="of:=[$'Plantation example'.DG20]" office:value-type="float" office:value="0.119604305318951" calcext:value-type="float">
            <text:p>0.12</text:p>
          </table:table-cell>
          <table:table-cell table:style-name="ce36" table:formula="of:=[$'Plantation example'.DH20]" office:value-type="float" office:value="0.118840109775137" calcext:value-type="float">
            <text:p>0.12</text:p>
          </table:table-cell>
          <table:table-cell table:style-name="ce36" table:formula="of:=[$'Plantation example'.DI20]" office:value-type="float" office:value="0.11809678187247" calcext:value-type="float">
            <text:p>0.12</text:p>
          </table:table-cell>
          <table:table-cell table:style-name="ce36" table:formula="of:=[$'Plantation example'.DJ20]" office:value-type="float" office:value="0.117373804912947" calcext:value-type="float">
            <text:p>0.12</text:p>
          </table:table-cell>
          <table:table-cell table:style-name="ce36" table:formula="of:=[$'Plantation example'.DK20]" office:value-type="float" office:value="0.116670671643771" calcext:value-type="float">
            <text:p>0.12</text:p>
          </table:table-cell>
          <table:table-cell table:style-name="ce36" table:formula="of:=[$'Plantation example'.DL20]" office:value-type="float" office:value="0.115986884317459" calcext:value-type="float">
            <text:p>0.12</text:p>
          </table:table-cell>
          <table:table-cell table:style-name="ce36" table:formula="of:=[$'Plantation example'.DM20]" office:value-type="float" office:value="0.115321954730407" calcext:value-type="float">
            <text:p>0.12</text:p>
          </table:table-cell>
          <table:table-cell table:style-name="ce36" table:formula="of:=[$'Plantation example'.DN20]" office:value-type="float" office:value="0.114675404241723" calcext:value-type="float">
            <text:p>0.11</text:p>
          </table:table-cell>
          <table:table-cell table:style-name="ce36" table:formula="of:=[$'Plantation example'.DO20]" office:value-type="float" office:value="0.114046763773967" calcext:value-type="float">
            <text:p>0.11</text:p>
          </table:table-cell>
          <table:table-cell table:style-name="ce36" table:formula="of:=[$'Plantation example'.DP20]" office:value-type="float" office:value="0.113435573797378" calcext:value-type="float">
            <text:p>0.11</text:p>
          </table:table-cell>
          <table:table-cell table:style-name="ce36" table:formula="of:=[$'Plantation example'.DQ20]" office:value-type="float" office:value="-9.46099140913792" calcext:value-type="float">
            <text:p>-9.46</text:p>
          </table:table-cell>
          <table:table-cell table:style-name="ce36" table:formula="of:=[$'Plantation example'.DR20]" office:value-type="float" office:value="0" calcext:value-type="float">
            <text:p>0.00</text:p>
          </table:table-cell>
          <table:table-cell table:style-name="ce36" table:formula="of:=[$'Plantation example'.DS20]" office:value-type="float" office:value="0" calcext:value-type="float">
            <text:p>0.00</text:p>
          </table:table-cell>
          <table:table-cell table:style-name="ce36" table:formula="of:=[$'Plantation example'.DT20]" office:value-type="float" office:value="0" calcext:value-type="float">
            <text:p>0.00</text:p>
          </table:table-cell>
          <table:table-cell table:style-name="ce36" table:formula="of:=[$'Plantation example'.DU20]" office:value-type="float" office:value="0" calcext:value-type="float">
            <text:p>0.00</text:p>
          </table:table-cell>
          <table:table-cell table:style-name="ce36" table:formula="of:=[$'Plantation example'.DV20]" office:value-type="float" office:value="0" calcext:value-type="float">
            <text:p>0.00</text:p>
          </table:table-cell>
          <table:table-cell table:style-name="ce36" table:formula="of:=[$'Plantation example'.DW20]" office:value-type="float" office:value="0" calcext:value-type="float">
            <text:p>0.00</text:p>
          </table:table-cell>
          <table:table-cell table:style-name="ce36" table:formula="of:=[$'Plantation example'.DX20]" office:value-type="float" office:value="0" calcext:value-type="float">
            <text:p>0.00</text:p>
          </table:table-cell>
          <table:table-cell table:style-name="ce36" table:formula="of:=[$'Plantation example'.DY20]" office:value-type="float" office:value="0" calcext:value-type="float">
            <text:p>0.00</text:p>
          </table:table-cell>
          <table:table-cell table:style-name="ce36" table:formula="of:=[$'Plantation example'.DZ20]" office:value-type="float" office:value="0" calcext:value-type="float">
            <text:p>0.00</text:p>
          </table:table-cell>
          <table:table-cell table:style-name="ce36" table:formula="of:=[$'Plantation example'.EA20]" office:value-type="float" office:value="0" calcext:value-type="float">
            <text:p>0.00</text:p>
          </table:table-cell>
          <table:table-cell table:style-name="ce36" table:formula="of:=[$'Plantation example'.EB20]" office:value-type="float" office:value="0" calcext:value-type="float">
            <text:p>0.00</text:p>
          </table:table-cell>
          <table:table-cell table:style-name="ce36" table:formula="of:=[$'Plantation example'.EC20]" office:value-type="float" office:value="0" calcext:value-type="float">
            <text:p>0.00</text:p>
          </table:table-cell>
          <table:table-cell table:style-name="ce36" table:formula="of:=[$'Plantation example'.ED20]" office:value-type="float" office:value="0" calcext:value-type="float">
            <text:p>0.00</text:p>
          </table:table-cell>
          <table:table-cell table:style-name="ce36" table:formula="of:=[$'Plantation example'.EE20]" office:value-type="float" office:value="0" calcext:value-type="float">
            <text:p>0.00</text:p>
          </table:table-cell>
          <table:table-cell table:style-name="ce36" table:formula="of:=[$'Plantation example'.EF20]" office:value-type="float" office:value="0" calcext:value-type="float">
            <text:p>0.00</text:p>
          </table:table-cell>
          <table:table-cell table:style-name="ce36" table:formula="of:=[$'Plantation example'.EG20]" office:value-type="float" office:value="0" calcext:value-type="float">
            <text:p>0.00</text:p>
          </table:table-cell>
          <table:table-cell table:style-name="ce36" table:formula="of:=[$'Plantation example'.EH20]" office:value-type="float" office:value="0" calcext:value-type="float">
            <text:p>0.00</text:p>
          </table:table-cell>
          <table:table-cell table:style-name="ce36" table:formula="of:=[$'Plantation example'.EI20]" office:value-type="float" office:value="0" calcext:value-type="float">
            <text:p>0.00</text:p>
          </table:table-cell>
          <table:table-cell table:style-name="ce36" table:formula="of:=[$'Plantation example'.EJ20]" office:value-type="float" office:value="0" calcext:value-type="float">
            <text:p>0.00</text:p>
          </table:table-cell>
          <table:table-cell table:style-name="ce36" table:formula="of:=[$'Plantation example'.EK20]" office:value-type="float" office:value="0" calcext:value-type="float">
            <text:p>0.00</text:p>
          </table:table-cell>
          <table:table-cell table:style-name="ce36" table:formula="of:=[$'Plantation example'.EL20]" office:value-type="float" office:value="0" calcext:value-type="float">
            <text:p>0.00</text:p>
          </table:table-cell>
          <table:table-cell table:style-name="ce36" table:formula="of:=[$'Plantation example'.EM20]" office:value-type="float" office:value="0" calcext:value-type="float">
            <text:p>0.00</text:p>
          </table:table-cell>
          <table:table-cell table:style-name="ce36" table:formula="of:=[$'Plantation example'.EN20]" office:value-type="float" office:value="0" calcext:value-type="float">
            <text:p>0.00</text:p>
          </table:table-cell>
          <table:table-cell table:style-name="ce36" table:formula="of:=[$'Plantation example'.EO20]" office:value-type="float" office:value="0" calcext:value-type="float">
            <text:p>0.00</text:p>
          </table:table-cell>
          <table:table-cell table:style-name="ce36" table:formula="of:=[$'Plantation example'.EP20]" office:value-type="float" office:value="0" calcext:value-type="float">
            <text:p>0.00</text:p>
          </table:table-cell>
          <table:table-cell table:number-columns-repeated="149"/>
          <table:table-cell table:style-name="Default" table:number-columns-repeated="16089"/>
        </table:table-row>
        <table:table-row table:style-name="ro1">
          <table:table-cell table:number-columns-repeated="101"/>
          <table:table-cell table:style-name="ce41"/>
          <table:table-cell table:number-columns-repeated="193"/>
          <table:table-cell table:style-name="Default" table:number-columns-repeated="16089"/>
        </table:table-row>
        <table:table-row table:style-name="ro1">
          <table:table-cell office:value-type="string" calcext:value-type="string">
            <text:p>Warming 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ce4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43"/>
          <table:table-cell table:style-name="Default" table:number-columns-repeated="16089"/>
        </table:table-row>
        <table:table-row table:style-name="ro1">
          <table:table-cell office:value-type="string" calcext:value-type="string">
            <text:p>W[Carbon,u] “kernel”, from a solution for SMDAMAGE FitW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810628" calcext:value-type="float">
            <text:p>0.0008</text:p>
          </table:table-cell>
          <table:table-cell table:style-name="ce39" office:value-type="float" office:value="0.001371235" calcext:value-type="float">
            <text:p>0.0014</text:p>
          </table:table-cell>
          <table:table-cell table:style-name="ce39" office:value-type="float" office:value="0.001782009" calcext:value-type="float">
            <text:p>0.0018</text:p>
          </table:table-cell>
          <table:table-cell table:style-name="ce39" office:value-type="float" office:value="0.002046314" calcext:value-type="float">
            <text:p>0.0020</text:p>
          </table:table-cell>
          <table:table-cell table:style-name="ce39" office:value-type="float" office:value="0.002224353" calcext:value-type="float">
            <text:p>0.0022</text:p>
          </table:table-cell>
          <table:table-cell table:style-name="ce39" office:value-type="float" office:value="0.002351114" calcext:value-type="float">
            <text:p>0.0024</text:p>
          </table:table-cell>
          <table:table-cell table:style-name="ce39" office:value-type="float" office:value="0.002443458" calcext:value-type="float">
            <text:p>0.0024</text:p>
          </table:table-cell>
          <table:table-cell table:style-name="ce39" office:value-type="float" office:value="0.002509201" calcext:value-type="float">
            <text:p>0.0025</text:p>
          </table:table-cell>
          <table:table-cell table:style-name="ce39" office:value-type="float" office:value="0.002558329" calcext:value-type="float">
            <text:p>0.0026</text:p>
          </table:table-cell>
          <table:table-cell table:style-name="ce39" office:value-type="float" office:value="0.002590824" calcext:value-type="float">
            <text:p>0.0026</text:p>
          </table:table-cell>
          <table:table-cell table:style-name="ce39" office:value-type="float" office:value="0.002611596" calcext:value-type="float">
            <text:p>0.0026</text:p>
          </table:table-cell>
          <table:table-cell table:style-name="ce39" office:value-type="float" office:value="0.002625164" calcext:value-type="float">
            <text:p>0.0026</text:p>
          </table:table-cell>
          <table:table-cell table:style-name="ce39" office:value-type="float" office:value="0.002629826" calcext:value-type="float">
            <text:p>0.0026</text:p>
          </table:table-cell>
          <table:table-cell table:style-name="ce39" office:value-type="float" office:value="0.002629549" calcext:value-type="float">
            <text:p>0.0026</text:p>
          </table:table-cell>
          <table:table-cell table:style-name="ce39" office:value-type="float" office:value="0.002626513" calcext:value-type="float">
            <text:p>0.0026</text:p>
          </table:table-cell>
          <table:table-cell table:style-name="ce39" office:value-type="float" office:value="0.002621047" calcext:value-type="float">
            <text:p>0.0026</text:p>
          </table:table-cell>
          <table:table-cell table:style-name="ce39" office:value-type="float" office:value="0.002608917" calcext:value-type="float">
            <text:p>0.0026</text:p>
          </table:table-cell>
          <table:table-cell table:style-name="ce39" office:value-type="float" office:value="0.002594681" calcext:value-type="float">
            <text:p>0.0026</text:p>
          </table:table-cell>
          <table:table-cell table:style-name="ce39" office:value-type="float" office:value="0.002581921" calcext:value-type="float">
            <text:p>0.0026</text:p>
          </table:table-cell>
          <table:table-cell table:style-name="ce39" office:value-type="float" office:value="0.00256672" calcext:value-type="float">
            <text:p>0.0026</text:p>
          </table:table-cell>
          <table:table-cell table:style-name="ce39" office:value-type="float" office:value="0.002547936" calcext:value-type="float">
            <text:p>0.0025</text:p>
          </table:table-cell>
          <table:table-cell table:style-name="ce39" office:value-type="float" office:value="0.002530647" calcext:value-type="float">
            <text:p>0.0025</text:p>
          </table:table-cell>
          <table:table-cell table:style-name="ce39" office:value-type="float" office:value="0.002513368" calcext:value-type="float">
            <text:p>0.0025</text:p>
          </table:table-cell>
          <table:table-cell table:style-name="ce39" office:value-type="float" office:value="0.00249398" calcext:value-type="float">
            <text:p>0.0025</text:p>
          </table:table-cell>
          <table:table-cell table:style-name="ce39" office:value-type="float" office:value="0.002474633" calcext:value-type="float">
            <text:p>0.0025</text:p>
          </table:table-cell>
          <table:table-cell table:style-name="ce39" office:value-type="float" office:value="0.002454967" calcext:value-type="float">
            <text:p>0.0025</text:p>
          </table:table-cell>
          <table:table-cell table:style-name="ce39" office:value-type="float" office:value="0.002435273" calcext:value-type="float">
            <text:p>0.0024</text:p>
          </table:table-cell>
          <table:table-cell table:style-name="ce39" office:value-type="float" office:value="0.00241557" calcext:value-type="float">
            <text:p>0.0024</text:p>
          </table:table-cell>
          <table:table-cell table:style-name="ce39" office:value-type="float" office:value="0.002397998" calcext:value-type="float">
            <text:p>0.0024</text:p>
          </table:table-cell>
          <table:table-cell table:style-name="ce39" office:value-type="float" office:value="0.002380466" calcext:value-type="float">
            <text:p>0.0024</text:p>
          </table:table-cell>
          <table:table-cell table:style-name="ce39" office:value-type="float" office:value="0.002362705" calcext:value-type="float">
            <text:p>0.0024</text:p>
          </table:table-cell>
          <table:table-cell table:style-name="ce39" office:value-type="float" office:value="0.002345028" calcext:value-type="float">
            <text:p>0.0023</text:p>
          </table:table-cell>
          <table:table-cell table:style-name="ce39" office:value-type="float" office:value="0.002325004" calcext:value-type="float">
            <text:p>0.0023</text:p>
          </table:table-cell>
          <table:table-cell table:style-name="ce39" office:value-type="float" office:value="0.002313421" calcext:value-type="float">
            <text:p>0.0023</text:p>
          </table:table-cell>
          <table:table-cell table:style-name="ce39" office:value-type="float" office:value="0.002298453" calcext:value-type="float">
            <text:p>0.0023</text:p>
          </table:table-cell>
          <table:table-cell table:style-name="ce39" office:value-type="float" office:value="0.002283075" calcext:value-type="float">
            <text:p>0.0023</text:p>
          </table:table-cell>
          <table:table-cell table:style-name="ce39" office:value-type="float" office:value="0.002267619" calcext:value-type="float">
            <text:p>0.0023</text:p>
          </table:table-cell>
          <table:table-cell table:style-name="ce39" office:value-type="float" office:value="0.002249917" calcext:value-type="float">
            <text:p>0.0022</text:p>
          </table:table-cell>
          <table:table-cell table:style-name="ce39" office:value-type="float" office:value="0.002236422" calcext:value-type="float">
            <text:p>0.0022</text:p>
          </table:table-cell>
          <table:table-cell table:style-name="ce39" office:value-type="float" office:value="0.002219432" calcext:value-type="float">
            <text:p>0.0022</text:p>
          </table:table-cell>
          <table:table-cell table:style-name="ce39" office:value-type="float" office:value="0.00220099" calcext:value-type="float">
            <text:p>0.0022</text:p>
          </table:table-cell>
          <table:table-cell table:style-name="ce39" office:value-type="float" office:value="0.002179592" calcext:value-type="float">
            <text:p>0.0022</text:p>
          </table:table-cell>
          <table:table-cell table:style-name="ce39" office:value-type="float" office:value="0.002164619" calcext:value-type="float">
            <text:p>0.0022</text:p>
          </table:table-cell>
          <table:table-cell table:style-name="ce39" office:value-type="float" office:value="0.002147621" calcext:value-type="float">
            <text:p>0.0021</text:p>
          </table:table-cell>
          <table:table-cell table:style-name="ce39" office:value-type="float" office:value="0.002130811" calcext:value-type="float">
            <text:p>0.0021</text:p>
          </table:table-cell>
          <table:table-cell table:style-name="ce39" office:value-type="float" office:value="0.002120102" calcext:value-type="float">
            <text:p>0.0021</text:p>
          </table:table-cell>
          <table:table-cell table:style-name="ce39" office:value-type="float" office:value="0.002102948" calcext:value-type="float">
            <text:p>0.0021</text:p>
          </table:table-cell>
          <table:table-cell table:style-name="ce39" office:value-type="float" office:value="0.002091885" calcext:value-type="float">
            <text:p>0.0021</text:p>
          </table:table-cell>
          <table:table-cell table:style-name="ce39" office:value-type="float" office:value="0.002081073" calcext:value-type="float">
            <text:p>0.0021</text:p>
          </table:table-cell>
          <table:table-cell table:style-name="ce39" office:value-type="float" office:value="0.002066112" calcext:value-type="float">
            <text:p>0.0021</text:p>
          </table:table-cell>
          <table:table-cell table:style-name="ce39" office:value-type="float" office:value="0.00205582" calcext:value-type="float">
            <text:p>0.0021</text:p>
          </table:table-cell>
          <table:table-cell table:style-name="ce39" office:value-type="float" office:value="0.002037398" calcext:value-type="float">
            <text:p>0.0020</text:p>
          </table:table-cell>
          <table:table-cell table:style-name="ce39" office:value-type="float" office:value="0.002026768" calcext:value-type="float">
            <text:p>0.0020</text:p>
          </table:table-cell>
          <table:table-cell table:style-name="ce39" office:value-type="float" office:value="0.002014009" calcext:value-type="float">
            <text:p>0.0020</text:p>
          </table:table-cell>
          <table:table-cell table:style-name="ce39" office:value-type="float" office:value="0.002005162" calcext:value-type="float">
            <text:p>0.0020</text:p>
          </table:table-cell>
          <table:table-cell table:style-name="ce39" office:value-type="float" office:value="0.001998105" calcext:value-type="float">
            <text:p>0.0020</text:p>
          </table:table-cell>
          <table:table-cell table:style-name="ce39" office:value-type="float" office:value="0.001989367" calcext:value-type="float">
            <text:p>0.0020</text:p>
          </table:table-cell>
          <table:table-cell table:style-name="ce39" office:value-type="float" office:value="0.001978528" calcext:value-type="float">
            <text:p>0.0020</text:p>
          </table:table-cell>
          <table:table-cell table:style-name="ce39" office:value-type="float" office:value="0.001968593" calcext:value-type="float">
            <text:p>0.0020</text:p>
          </table:table-cell>
          <table:table-cell table:style-name="ce39" office:value-type="float" office:value="0.001960273" calcext:value-type="float">
            <text:p>0.0020</text:p>
          </table:table-cell>
          <table:table-cell table:style-name="ce39" office:value-type="float" office:value="0.001949699" calcext:value-type="float">
            <text:p>0.0019</text:p>
          </table:table-cell>
          <table:table-cell table:style-name="ce39" office:value-type="float" office:value="0.001941456" calcext:value-type="float">
            <text:p>0.0019</text:p>
          </table:table-cell>
          <table:table-cell table:style-name="ce39" office:value-type="float" office:value="0.001931482" calcext:value-type="float">
            <text:p>0.0019</text:p>
          </table:table-cell>
          <table:table-cell table:style-name="ce39" office:value-type="float" office:value="0.00192284" calcext:value-type="float">
            <text:p>0.0019</text:p>
          </table:table-cell>
          <table:table-cell table:style-name="ce39" office:value-type="float" office:value="0.001914272" calcext:value-type="float">
            <text:p>0.0019</text:p>
          </table:table-cell>
          <table:table-cell table:style-name="ce39" office:value-type="float" office:value="0.001906424" calcext:value-type="float">
            <text:p>0.0019</text:p>
          </table:table-cell>
          <table:table-cell table:style-name="ce39" office:value-type="float" office:value="0.001900075" calcext:value-type="float">
            <text:p>0.0019</text:p>
          </table:table-cell>
          <table:table-cell table:style-name="ce39" office:value-type="float" office:value="0.001892102" calcext:value-type="float">
            <text:p>0.0019</text:p>
          </table:table-cell>
          <table:table-cell table:style-name="ce39" office:value-type="float" office:value="0.001885921" calcext:value-type="float">
            <text:p>0.0019</text:p>
          </table:table-cell>
          <table:table-cell table:style-name="ce39" office:value-type="float" office:value="0.001879774" calcext:value-type="float">
            <text:p>0.0019</text:p>
          </table:table-cell>
          <table:table-cell table:style-name="ce39" office:value-type="float" office:value="0.001869948" calcext:value-type="float">
            <text:p>0.0019</text:p>
          </table:table-cell>
          <table:table-cell table:style-name="ce39" office:value-type="float" office:value="0.001863941" calcext:value-type="float">
            <text:p>0.0019</text:p>
          </table:table-cell>
          <table:table-cell table:style-name="ce39" office:value-type="float" office:value="0.001855957" calcext:value-type="float">
            <text:p>0.0019</text:p>
          </table:table-cell>
          <table:table-cell table:style-name="ce39" office:value-type="float" office:value="0.001851842" calcext:value-type="float">
            <text:p>0.0019</text:p>
          </table:table-cell>
          <table:table-cell table:style-name="ce39" office:value-type="float" office:value="0.001841667" calcext:value-type="float">
            <text:p>0.0018</text:p>
          </table:table-cell>
          <table:table-cell table:style-name="ce39" office:value-type="float" office:value="0.001833609" calcext:value-type="float">
            <text:p>0.0018</text:p>
          </table:table-cell>
          <table:table-cell table:style-name="ce39" office:value-type="float" office:value="0.001829512" calcext:value-type="float">
            <text:p>0.0018</text:p>
          </table:table-cell>
          <table:table-cell table:style-name="ce39" office:value-type="float" office:value="0.001821593" calcext:value-type="float">
            <text:p>0.0018</text:p>
          </table:table-cell>
          <table:table-cell table:style-name="ce39" office:value-type="float" office:value="0.001815792" calcext:value-type="float">
            <text:p>0.0018</text:p>
          </table:table-cell>
          <table:table-cell table:style-name="ce39" office:value-type="float" office:value="0.001809341" calcext:value-type="float">
            <text:p>0.0018</text:p>
          </table:table-cell>
          <table:table-cell table:style-name="ce39" office:value-type="float" office:value="0.001803371" calcext:value-type="float">
            <text:p>0.0018</text:p>
          </table:table-cell>
          <table:table-cell table:style-name="ce39" office:value-type="float" office:value="0.00179802" calcext:value-type="float">
            <text:p>0.0018</text:p>
          </table:table-cell>
          <table:table-cell table:style-name="ce39" office:value-type="float" office:value="0.001789594" calcext:value-type="float">
            <text:p>0.0018</text:p>
          </table:table-cell>
          <table:table-cell table:style-name="ce39" office:value-type="float" office:value="0.001785239" calcext:value-type="float">
            <text:p>0.0018</text:p>
          </table:table-cell>
          <table:table-cell table:style-name="ce39" office:value-type="float" office:value="0.001777986" calcext:value-type="float">
            <text:p>0.0018</text:p>
          </table:table-cell>
          <table:table-cell table:style-name="ce39" office:value-type="float" office:value="0.001771512" calcext:value-type="float">
            <text:p>0.0018</text:p>
          </table:table-cell>
          <table:table-cell table:style-name="ce39" office:value-type="float" office:value="0.001765262" calcext:value-type="float">
            <text:p>0.0018</text:p>
          </table:table-cell>
          <table:table-cell table:style-name="ce39" office:value-type="float" office:value="0.001760534" calcext:value-type="float">
            <text:p>0.0018</text:p>
          </table:table-cell>
          <table:table-cell table:style-name="ce39" office:value-type="float" office:value="0.001754719" calcext:value-type="float">
            <text:p>0.0018</text:p>
          </table:table-cell>
          <table:table-cell table:style-name="ce39" office:value-type="float" office:value="0.001747698" calcext:value-type="float">
            <text:p>0.0017</text:p>
          </table:table-cell>
          <table:table-cell table:style-name="ce39" office:value-type="float" office:value="0.001742777" calcext:value-type="float">
            <text:p>0.0017</text:p>
          </table:table-cell>
          <table:table-cell table:style-name="ce39" office:value-type="float" office:value="0.001737629" calcext:value-type="float">
            <text:p>0.0017</text:p>
          </table:table-cell>
          <table:table-cell table:style-name="ce39" office:value-type="float" office:value="0.001728559" calcext:value-type="float">
            <text:p>0.0017</text:p>
          </table:table-cell>
          <table:table-cell table:style-name="ce39" office:value-type="float" office:value="0.001722733" calcext:value-type="float">
            <text:p>0.0017</text:p>
          </table:table-cell>
          <table:table-cell table:style-name="ce39" office:value-type="float" office:value="0.001712962" calcext:value-type="float">
            <text:p>0.0017</text:p>
          </table:table-cell>
          <table:table-cell table:style-name="ce39" office:value-type="float" office:value="0.001708024" calcext:value-type="float">
            <text:p>0.0017</text:p>
          </table:table-cell>
          <table:table-cell table:style-name="ce39" office:value-type="float" office:value="0.001697598" calcext:value-type="float">
            <text:p>0.0017</text:p>
          </table:table-cell>
          <table:table-cell table:style-name="ce39" office:value-type="float" office:value="0.001691429" calcext:value-type="float">
            <text:p>0.0017</text:p>
          </table:table-cell>
          <table:table-cell table:style-name="ce39" office:value-type="float" office:value="0.001685464" calcext:value-type="float">
            <text:p>0.0017</text:p>
          </table:table-cell>
          <table:table-cell table:style-name="ce44" office:value-type="float" office:value="0.001681741" calcext:value-type="float">
            <text:p>0.0017</text:p>
          </table:table-cell>
          <table:table-cell table:style-name="ce39" office:value-type="float" office:value="0.001676029" calcext:value-type="float">
            <text:p>0.0017</text:p>
          </table:table-cell>
          <table:table-cell table:style-name="ce39" office:value-type="float" office:value="0.001668527" calcext:value-type="float">
            <text:p>0.0017</text:p>
          </table:table-cell>
          <table:table-cell table:style-name="ce39" office:value-type="float" office:value="0.001662831" calcext:value-type="float">
            <text:p>0.0017</text:p>
          </table:table-cell>
          <table:table-cell table:style-name="ce39" office:value-type="float" office:value="0.001657143" calcext:value-type="float">
            <text:p>0.0017</text:p>
          </table:table-cell>
          <table:table-cell table:style-name="ce39" office:value-type="float" office:value="0.00164965" calcext:value-type="float">
            <text:p>0.0016</text:p>
          </table:table-cell>
          <table:table-cell table:style-name="ce39" office:value-type="float" office:value="0.001646093" calcext:value-type="float">
            <text:p>0.0016</text:p>
          </table:table-cell>
          <table:table-cell table:style-name="ce39" office:value-type="float" office:value="0.001638629" calcext:value-type="float">
            <text:p>0.0016</text:p>
          </table:table-cell>
          <table:table-cell table:style-name="ce39" office:value-type="float" office:value="0.001632972" calcext:value-type="float">
            <text:p>0.0016</text:p>
          </table:table-cell>
          <table:table-cell table:style-name="ce39" office:value-type="float" office:value="0.001629437" calcext:value-type="float">
            <text:p>0.0016</text:p>
          </table:table-cell>
          <table:table-cell table:style-name="ce39" office:value-type="float" office:value="0.001621997" calcext:value-type="float">
            <text:p>0.0016</text:p>
          </table:table-cell>
          <table:table-cell table:style-name="ce39" office:value-type="float" office:value="0.001616362" calcext:value-type="float">
            <text:p>0.0016</text:p>
          </table:table-cell>
          <table:table-cell table:style-name="ce39" office:value-type="float" office:value="0.001608937" calcext:value-type="float">
            <text:p>0.0016</text:p>
          </table:table-cell>
          <table:table-cell table:style-name="ce39" office:value-type="float" office:value="0.001603635" calcext:value-type="float">
            <text:p>0.0016</text:p>
          </table:table-cell>
          <table:table-cell table:style-name="ce39" office:value-type="float" office:value="0.001598023" calcext:value-type="float">
            <text:p>0.0016</text:p>
          </table:table-cell>
          <table:table-cell table:style-name="ce39" office:value-type="float" office:value="0.001594534" calcext:value-type="float">
            <text:p>0.0016</text:p>
          </table:table-cell>
          <table:table-cell table:style-name="ce39" office:value-type="float" office:value="0.001589255" calcext:value-type="float">
            <text:p>0.0016</text:p>
          </table:table-cell>
          <table:table-cell table:style-name="ce39" office:value-type="float" office:value="0.001583666" calcext:value-type="float">
            <text:p>0.0016</text:p>
          </table:table-cell>
          <table:table-cell table:style-name="ce39" office:value-type="float" office:value="0.001578084" calcext:value-type="float">
            <text:p>0.0016</text:p>
          </table:table-cell>
          <table:table-cell table:style-name="ce39" office:value-type="float" office:value="0.001572828" calcext:value-type="float">
            <text:p>0.0016</text:p>
          </table:table-cell>
          <table:table-cell table:style-name="ce39" office:value-type="float" office:value="0.001565463" calcext:value-type="float">
            <text:p>0.0016</text:p>
          </table:table-cell>
          <table:table-cell table:style-name="ce39" office:value-type="float" office:value="0.00156202" calcext:value-type="float">
            <text:p>0.0016</text:p>
          </table:table-cell>
          <table:table-cell table:style-name="ce39" office:value-type="float" office:value="0.001556469" calcext:value-type="float">
            <text:p>0.0016</text:p>
          </table:table-cell>
          <table:table-cell table:style-name="ce39" office:value-type="float" office:value="0.001551242" calcext:value-type="float">
            <text:p>0.0016</text:p>
          </table:table-cell>
          <table:table-cell table:style-name="ce39" office:value-type="float" office:value="0.001543907" calcext:value-type="float">
            <text:p>0.0015</text:p>
          </table:table-cell>
          <table:table-cell table:style-name="ce39" office:value-type="float" office:value="0.001538378" calcext:value-type="float">
            <text:p>0.0015</text:p>
          </table:table-cell>
          <table:table-cell table:style-name="ce39" office:value-type="float" office:value="0.00153529" calcext:value-type="float">
            <text:p>0.0015</text:p>
          </table:table-cell>
          <table:table-cell table:style-name="ce39" office:value-type="float" office:value="0.001529776" calcext:value-type="float">
            <text:p>0.0015</text:p>
          </table:table-cell>
          <table:table-cell table:style-name="ce39" office:value-type="float" office:value="0.00152427" calcext:value-type="float">
            <text:p>0.0015</text:p>
          </table:table-cell>
          <table:table-cell table:style-name="ce39" office:value-type="float" office:value="0.001523305" calcext:value-type="float">
            <text:p>0.0015</text:p>
          </table:table-cell>
          <table:table-cell table:style-name="ce39" office:value-type="float" office:value="0.001518089" calcext:value-type="float">
            <text:p>0.0015</text:p>
          </table:table-cell>
          <table:table-cell table:style-name="ce39" office:value-type="float" office:value="0.001510763" calcext:value-type="float">
            <text:p>0.0015</text:p>
          </table:table-cell>
          <table:table-cell table:style-name="ce39" office:value-type="float" office:value="0.001507365" calcext:value-type="float">
            <text:p>0.0015</text:p>
          </table:table-cell>
          <table:table-cell table:style-name="ce39" office:value-type="float" office:value="0.001500057" calcext:value-type="float">
            <text:p>0.0015</text:p>
          </table:table-cell>
          <table:table-cell table:style-name="ce39" office:value-type="float" office:value="0.001496675" calcext:value-type="float">
            <text:p>0.0015</text:p>
          </table:table-cell>
          <table:table-cell table:style-name="ce39" office:value-type="float" office:value="0.001489385" calcext:value-type="float">
            <text:p>0.0015</text:p>
          </table:table-cell>
          <table:table-cell table:style-name="ce39" office:value-type="float" office:value="0.00148422" calcext:value-type="float">
            <text:p>0.0015</text:p>
          </table:table-cell>
          <table:table-cell table:style-name="ce39" office:value-type="float" office:value="0.001480862" calcext:value-type="float">
            <text:p>0.0015</text:p>
          </table:table-cell>
          <table:table-cell table:style-name="ce39" office:value-type="float" office:value="0.001475714" calcext:value-type="float">
            <text:p>0.0015</text:p>
          </table:table-cell>
          <table:table-cell table:style-name="ce39" office:value-type="float" office:value="0.001468133" calcext:value-type="float">
            <text:p>0.0015</text:p>
          </table:table-cell>
          <table:table-cell table:style-name="ce39" office:value-type="float" office:value="0.001463001" calcext:value-type="float">
            <text:p>0.0015</text:p>
          </table:table-cell>
          <table:table-cell table:style-name="ce39" office:value-type="float" office:value="0.001457875" calcext:value-type="float">
            <text:p>0.0015</text:p>
          </table:table-cell>
          <table:table-cell table:style-name="ce39" office:value-type="float" office:value="0.001454554" calcext:value-type="float">
            <text:p>0.0015</text:p>
          </table:table-cell>
          <table:table-cell table:style-name="ce39" office:value-type="float" office:value="0.001445525" calcext:value-type="float">
            <text:p>0.0014</text:p>
          </table:table-cell>
          <table:table-cell table:style-name="ce39" office:value-type="float" office:value="0.001444018" calcext:value-type="float">
            <text:p>0.0014</text:p>
          </table:table-cell>
          <table:table-cell table:style-name="ce39" office:value-type="float" office:value="0.001438922" calcext:value-type="float">
            <text:p>0.0014</text:p>
          </table:table-cell>
          <table:table-cell table:style-name="ce39" office:value-type="float" office:value="0.001431714" calcext:value-type="float">
            <text:p>0.0014</text:p>
          </table:table-cell>
          <table:table-cell table:style-name="ce39" office:value-type="float" office:value="0.001428429" calcext:value-type="float">
            <text:p>0.0014</text:p>
          </table:table-cell>
          <table:table-cell table:style-name="ce39" office:value-type="float" office:value="0.001421234" calcext:value-type="float">
            <text:p>0.0014</text:p>
          </table:table-cell>
          <table:table-cell table:style-name="ce39" office:value-type="float" office:value="0.001414416" calcext:value-type="float">
            <text:p>0.0014</text:p>
          </table:table-cell>
          <table:table-cell table:style-name="ce39" office:value-type="float" office:value="0.001409025" calcext:value-type="float">
            <text:p>0.0014</text:p>
          </table:table-cell>
          <table:table-cell table:style-name="ce39" office:value-type="float" office:value="0.001403961" calcext:value-type="float">
            <text:p>0.0014</text:p>
          </table:table-cell>
          <table:table-cell table:style-name="ce39" office:value-type="float" office:value="0.001398582" calcext:value-type="float">
            <text:p>0.0014</text:p>
          </table:table-cell>
          <table:table-cell table:style-name="ce39" office:value-type="float" office:value="0.00139353" calcext:value-type="float">
            <text:p>0.0014</text:p>
          </table:table-cell>
          <table:table-cell table:style-name="ce39" office:value-type="float" office:value="0.001388486" calcext:value-type="float">
            <text:p>0.0014</text:p>
          </table:table-cell>
          <table:table-cell table:style-name="ce39" office:value-type="float" office:value="0.001383127" calcext:value-type="float">
            <text:p>0.0014</text:p>
          </table:table-cell>
          <table:table-cell table:style-name="ce39" office:value-type="float" office:value="0.001378101" calcext:value-type="float">
            <text:p>0.0014</text:p>
          </table:table-cell>
          <table:table-cell table:style-name="ce39" office:value-type="string" calcext:value-type="string">
            <text:p>0.001373081,0.001365947</text:p>
          </table:table-cell>
          <table:table-cell table:style-name="ce39" office:value-type="float" office:value="0.001360937" calcext:value-type="float">
            <text:p>0.0014</text:p>
          </table:table-cell>
          <table:table-cell table:style-name="ce39" office:value-type="float" office:value="0.001355637" calcext:value-type="float">
            <text:p>0.0014</text:p>
          </table:table-cell>
          <table:table-cell table:style-name="ce39" office:value-type="float" office:value="0.001350664" calcext:value-type="float">
            <text:p>0.0014</text:p>
          </table:table-cell>
          <table:table-cell table:style-name="ce39" office:value-type="float" office:value="0.00134358" calcext:value-type="float">
            <text:p>0.0013</text:p>
          </table:table-cell>
          <table:table-cell table:style-name="ce39" office:value-type="float" office:value="0.001340419" calcext:value-type="float">
            <text:p>0.0013</text:p>
          </table:table-cell>
          <table:table-cell table:style-name="ce39" office:value-type="float" office:value="0.001333678" calcext:value-type="float">
            <text:p>0.0013</text:p>
          </table:table-cell>
          <table:table-cell table:style-name="ce39" office:value-type="float" office:value="0.001328422" calcext:value-type="float">
            <text:p>0.0013</text:p>
          </table:table-cell>
          <table:table-cell table:style-name="ce39" office:value-type="float" office:value="0.001323499" calcext:value-type="float">
            <text:p>0.0013</text:p>
          </table:table-cell>
          <table:table-cell table:style-name="ce39" office:value-type="float" office:value="0.001322499" calcext:value-type="float">
            <text:p>0.0013</text:p>
          </table:table-cell>
          <table:table-cell table:style-name="ce39" office:value-type="float" office:value="0.001313676" calcext:value-type="float">
            <text:p>0.0013</text:p>
          </table:table-cell>
          <table:table-cell table:style-name="ce39" office:value-type="float" office:value="0.001306657" calcext:value-type="float">
            <text:p>0.0013</text:p>
          </table:table-cell>
          <table:table-cell table:style-name="ce39" office:value-type="float" office:value="0.001303562" calcext:value-type="float">
            <text:p>0.0013</text:p>
          </table:table-cell>
          <table:table-cell table:style-name="ce39" office:value-type="float" office:value="0.001298673" calcext:value-type="float">
            <text:p>0.0013</text:p>
          </table:table-cell>
          <table:table-cell table:style-name="ce39" office:value-type="float" office:value="0.001291687" calcext:value-type="float">
            <text:p>0.0013</text:p>
          </table:table-cell>
          <table:table-cell table:style-name="ce39" office:value-type="float" office:value="0.001286831" calcext:value-type="float">
            <text:p>0.0013</text:p>
          </table:table-cell>
          <table:table-cell table:style-name="ce39" office:value-type="float" office:value="0.001283786" calcext:value-type="float">
            <text:p>0.0013</text:p>
          </table:table-cell>
          <table:table-cell table:style-name="ce39" office:value-type="float" office:value="0.001276838" calcext:value-type="float">
            <text:p>0.0013</text:p>
          </table:table-cell>
          <table:table-cell table:style-name="ce39" office:value-type="float" office:value="0.001272021" calcext:value-type="float">
            <text:p>0.0013</text:p>
          </table:table-cell>
          <table:table-cell table:style-name="ce39" office:value-type="float" office:value="0.001267212" calcext:value-type="float">
            <text:p>0.0013</text:p>
          </table:table-cell>
          <table:table-cell table:style-name="ce39" office:value-type="float" office:value="0.001260293" calcext:value-type="float">
            <text:p>0.0013</text:p>
          </table:table-cell>
          <table:table-cell table:style-name="ce39" office:value-type="float" office:value="0.001259416" calcext:value-type="float">
            <text:p>0.0013</text:p>
          </table:table-cell>
          <table:table-cell table:style-name="ce39" office:value-type="float" office:value="0.001252513" calcext:value-type="float">
            <text:p>0.0013</text:p>
          </table:table-cell>
          <table:table-cell table:style-name="ce39" office:value-type="float" office:value="0.001247736" calcext:value-type="float">
            <text:p>0.0012</text:p>
          </table:table-cell>
          <table:table-cell table:style-name="ce39" office:value-type="float" office:value="0.001242968" calcext:value-type="float">
            <text:p>0.0012</text:p>
          </table:table-cell>
          <table:table-cell table:style-name="ce39" office:value-type="float" office:value="0.001237888" calcext:value-type="float">
            <text:p>0.0012</text:p>
          </table:table-cell>
          <table:table-cell table:style-name="ce39" office:value-type="float" office:value="0.001233457" calcext:value-type="float">
            <text:p>0.0012</text:p>
          </table:table-cell>
          <table:table-cell table:style-name="ce39" office:value-type="float" office:value="0.001226597" calcext:value-type="float">
            <text:p>0.0012</text:p>
          </table:table-cell>
          <table:table-cell table:style-name="ce39" office:value-type="float" office:value="0.001223664" calcext:value-type="float">
            <text:p>0.0012</text:p>
          </table:table-cell>
          <table:table-cell table:style-name="ce39" office:value-type="float" office:value="0.001218938" calcext:value-type="float">
            <text:p>0.0012</text:p>
          </table:table-cell>
          <table:table-cell table:style-name="ce39" office:value-type="float" office:value="0.001212101" calcext:value-type="float">
            <text:p>0.0012</text:p>
          </table:table-cell>
          <table:table-cell table:style-name="ce39" office:value-type="float" office:value="0.001207388" calcext:value-type="float">
            <text:p>0.0012</text:p>
          </table:table-cell>
          <table:table-cell table:style-name="ce39" office:value-type="float" office:value="0.001202681" calcext:value-type="float">
            <text:p>0.0012</text:p>
          </table:table-cell>
          <table:table-cell table:style-name="ce39" office:value-type="float" office:value="0.001197659" calcext:value-type="float">
            <text:p>0.0012</text:p>
          </table:table-cell>
          <table:table-cell table:style-name="ce39" office:value-type="float" office:value="0.001192959" calcext:value-type="float">
            <text:p>0.0012</text:p>
          </table:table-cell>
          <table:table-cell table:style-name="ce39" office:value-type="float" office:value="0.00118646" calcext:value-type="float">
            <text:p>0.0012</text:p>
          </table:table-cell>
          <table:table-cell table:style-name="ce39" office:value-type="float" office:value="0.001181438" calcext:value-type="float">
            <text:p>0.0012</text:p>
          </table:table-cell>
          <table:table-cell table:style-name="ce39" office:value-type="float" office:value="0.001178862" calcext:value-type="float">
            <text:p>0.0012</text:p>
          </table:table-cell>
          <table:table-cell table:style-name="ce39" office:value-type="float" office:value="0.001172053" calcext:value-type="float">
            <text:p>0.0012</text:p>
          </table:table-cell>
          <table:table-cell table:style-name="ce39" office:value-type="float" office:value="0.001169166" calcext:value-type="float">
            <text:p>0.0012</text:p>
          </table:table-cell>
          <table:table-cell table:style-name="ce39" office:value-type="float" office:value="0.00116449" calcext:value-type="float">
            <text:p>0.0012</text:p>
          </table:table-cell>
          <table:table-cell table:style-name="ce39" office:value-type="float" office:value="0.001159228" calcext:value-type="float">
            <text:p>0.0012</text:p>
          </table:table-cell>
          <table:table-cell table:style-name="ce39" office:value-type="float" office:value="0.001156347" calcext:value-type="float">
            <text:p>0.0012</text:p>
          </table:table-cell>
          <table:table-cell table:style-name="ce39" office:value-type="float" office:value="0.001149877" calcext:value-type="float">
            <text:p>0.0011</text:p>
          </table:table-cell>
          <table:table-cell table:style-name="ce39" office:value-type="float" office:value="0.00114489" calcext:value-type="float">
            <text:p>0.0011</text:p>
          </table:table-cell>
          <table:table-cell table:style-name="ce39" office:value-type="float" office:value="0.001138432" calcext:value-type="float">
            <text:p>0.0011</text:p>
          </table:table-cell>
          <table:table-cell table:style-name="ce39" office:value-type="float" office:value="0.001135578" calcext:value-type="float">
            <text:p>0.0011</text:p>
          </table:table-cell>
          <table:table-cell table:style-name="ce39" office:value-type="float" office:value="0.001130933" calcext:value-type="float">
            <text:p>0.0011</text:p>
          </table:table-cell>
          <table:table-cell table:style-name="ce39" office:value-type="float" office:value="0.001124174" calcext:value-type="float">
            <text:p>0.0011</text:p>
          </table:table-cell>
          <table:table-cell table:style-name="ce39" office:value-type="float" office:value="0.001121662" calcext:value-type="float">
            <text:p>0.0011</text:p>
          </table:table-cell>
          <table:table-cell table:style-name="ce39" office:value-type="float" office:value="0.001116715" calcext:value-type="float">
            <text:p>0.0011</text:p>
          </table:table-cell>
          <table:table-cell table:style-name="ce39" office:value-type="float" office:value="0.001112096" calcext:value-type="float">
            <text:p>0.0011</text:p>
          </table:table-cell>
          <table:table-cell table:style-name="ce39" office:value-type="float" office:value="0.001105685" calcext:value-type="float">
            <text:p>0.0011</text:p>
          </table:table-cell>
          <table:table-cell table:style-name="ce39" office:value-type="float" office:value="0.001100759" calcext:value-type="float">
            <text:p>0.0011</text:p>
          </table:table-cell>
          <table:table-cell table:style-name="ce39" office:value-type="float" office:value="0.001094361" calcext:value-type="float">
            <text:p>0.0011</text:p>
          </table:table-cell>
          <table:table-cell table:style-name="ce39" office:value-type="float" office:value="0.001091567" calcext:value-type="float">
            <text:p>0.0011</text:p>
          </table:table-cell>
          <table:table-cell table:style-name="ce39" office:value-type="float" office:value="0.001086981" calcext:value-type="float">
            <text:p>0.0011</text:p>
          </table:table-cell>
          <table:table-cell table:style-name="ce39" office:value-type="float" office:value="0.001082402" calcext:value-type="float">
            <text:p>0.0011</text:p>
          </table:table-cell>
          <table:table-cell table:style-name="ce39" office:value-type="float" office:value="0.001077509" calcext:value-type="float">
            <text:p>0.0011</text:p>
          </table:table-cell>
          <table:table-cell table:style-name="ce39" office:value-type="float" office:value="0.001072943" calcext:value-type="float">
            <text:p>0.0011</text:p>
          </table:table-cell>
          <table:table-cell table:style-name="ce39" office:value-type="float" office:value="0.001066264" calcext:value-type="float">
            <text:p>0.0011</text:p>
          </table:table-cell>
          <table:table-cell table:style-name="ce39" office:value-type="float" office:value="0.001061711" calcext:value-type="float">
            <text:p>0.0011</text:p>
          </table:table-cell>
          <table:table-cell table:style-name="ce39" office:value-type="float" office:value="0.001056843" calcext:value-type="float">
            <text:p>0.0011</text:p>
          </table:table-cell>
          <table:table-cell table:style-name="ce39" office:value-type="float" office:value="0.001052304" calcext:value-type="float">
            <text:p>0.0011</text:p>
          </table:table-cell>
          <table:table-cell table:style-name="ce39" office:value-type="float" office:value="0.001045651" calcext:value-type="float">
            <text:p>0.0010</text:p>
          </table:table-cell>
          <table:table-cell table:style-name="ce39" office:value-type="float" office:value="0.001040803" calcext:value-type="float">
            <text:p>0.0010</text:p>
          </table:table-cell>
          <table:table-cell table:style-name="ce39" office:value-type="float" office:value="0.001034163" calcext:value-type="float">
            <text:p>0.0010</text:p>
          </table:table-cell>
          <table:table-cell table:style-name="ce39" office:value-type="float" office:value="0.00102965" calcext:value-type="float">
            <text:p>0.0010</text:p>
          </table:table-cell>
          <table:table-cell table:style-name="ce39" office:value-type="float" office:value="0.001023023" calcext:value-type="float">
            <text:p>0.0010</text:p>
          </table:table-cell>
          <table:table-cell table:style-name="ce39" office:value-type="float" office:value="0.001020321" calcext:value-type="float">
            <text:p>0.0010</text:p>
          </table:table-cell>
          <table:table-cell table:style-name="ce39" office:value-type="float" office:value="0.001015506" calcext:value-type="float">
            <text:p>0.0010</text:p>
          </table:table-cell>
          <table:table-cell table:style-name="ce39" office:value-type="float" office:value="0.001011018" calcext:value-type="float">
            <text:p>0.0010</text:p>
          </table:table-cell>
          <table:table-cell table:style-name="ce39" office:value-type="float" office:value="0.001004417" calcext:value-type="float">
            <text:p>0.0010</text:p>
          </table:table-cell>
          <table:table-cell table:style-name="ce39" office:value-type="float" office:value="0.000999621" calcext:value-type="float">
            <text:p>0.0010</text:p>
          </table:table-cell>
          <table:table-cell table:style-name="ce39" office:value-type="float" office:value="0.000993033" calcext:value-type="float">
            <text:p>0.0010</text:p>
          </table:table-cell>
          <table:table-cell table:style-name="ce39" office:value-type="float" office:value="0.00098825" calcext:value-type="float">
            <text:p>0.0010</text:p>
          </table:table-cell>
          <table:table-cell table:style-name="ce39" office:value-type="float" office:value="0.000983795" calcext:value-type="float">
            <text:p>0.0010</text:p>
          </table:table-cell>
          <table:table-cell table:style-name="ce39" office:value-type="float" office:value="0.000975107" calcext:value-type="float">
            <text:p>0.0010</text:p>
          </table:table-cell>
          <table:table-cell table:style-name="ce39" office:value-type="float" office:value="0.000972463" calcext:value-type="float">
            <text:p>0.0010</text:p>
          </table:table-cell>
          <table:table-cell table:style-name="ce39" office:value-type="float" office:value="0.000967705" calcext:value-type="float">
            <text:p>0.0010</text:p>
          </table:table-cell>
          <table:table-cell table:style-name="ce39" office:value-type="float" office:value="0.000963276" calcext:value-type="float">
            <text:p>0.0010</text:p>
          </table:table-cell>
          <table:table-cell table:style-name="ce39" office:value-type="float" office:value="0.000954613" calcext:value-type="float">
            <text:p>0.0010</text:p>
          </table:table-cell>
          <table:table-cell table:style-name="ce39" office:value-type="float" office:value="0.000949875" calcext:value-type="float">
            <text:p>0.0009</text:p>
          </table:table-cell>
          <table:table-cell table:style-name="ce39" office:value-type="float" office:value="0.000945464" calcext:value-type="float">
            <text:p>0.0009</text:p>
          </table:table-cell>
          <table:table-cell table:style-name="ce39" office:value-type="float" office:value="0.000940739" calcext:value-type="float">
            <text:p>0.0009</text:p>
          </table:table-cell>
          <table:table-cell table:style-name="ce39" office:value-type="float" office:value="0.000932102" calcext:value-type="float">
            <text:p>0.0009</text:p>
          </table:table-cell>
          <table:table-cell table:style-name="ce39" office:value-type="float" office:value="0.000929509" calcext:value-type="float">
            <text:p>0.0009</text:p>
          </table:table-cell>
          <table:table-cell table:style-name="ce39" office:value-type="float" office:value="0.000923004" calcext:value-type="float">
            <text:p>0.0009</text:p>
          </table:table-cell>
          <table:table-cell table:style-name="ce39" office:value-type="float" office:value="0.000918304" calcext:value-type="float">
            <text:p>0.0009</text:p>
          </table:table-cell>
          <table:table-cell table:style-name="ce39" office:value-type="string" calcext:value-type="string">
            <text:p>0.000911812,0.000907124</text:p>
          </table:table-cell>
          <table:table-cell table:style-name="ce39" office:value-type="float" office:value="0.000900645" calcext:value-type="float">
            <text:p>0.0009</text:p>
          </table:table-cell>
          <table:table-cell table:style-name="ce39" office:value-type="float" office:value="0.00089597" calcext:value-type="float">
            <text:p>0.0009</text:p>
          </table:table-cell>
          <table:table-cell table:style-name="ce39" office:value-type="float" office:value="0.000891301" calcext:value-type="float">
            <text:p>0.0009</text:p>
          </table:table-cell>
          <table:table-cell table:style-name="ce39" office:value-type="float" office:value="0.00088484" calcext:value-type="float">
            <text:p>0.0009</text:p>
          </table:table-cell>
          <table:table-cell table:style-name="ce39" office:value-type="float" office:value="0.000880184" calcext:value-type="float">
            <text:p>0.0009</text:p>
          </table:table-cell>
          <table:table-cell table:style-name="ce39" office:value-type="float" office:value="0.000875535" calcext:value-type="float">
            <text:p>0.0009</text:p>
          </table:table-cell>
          <table:table-cell table:style-name="ce39" office:value-type="float" office:value="0.000869093" calcext:value-type="float">
            <text:p>0.0009</text:p>
          </table:table-cell>
          <table:table-cell table:style-name="ce39" office:value-type="float" office:value="0.000866575" calcext:value-type="float">
            <text:p>0.0009</text:p>
          </table:table-cell>
          <table:table-cell table:style-name="ce39" office:value-type="float" office:value="0.000858026" calcext:value-type="float">
            <text:p>0.0009</text:p>
          </table:table-cell>
          <table:table-cell table:style-name="ce39" office:value-type="float" office:value="0.000853401" calcext:value-type="float">
            <text:p>0.0009</text:p>
          </table:table-cell>
          <table:table-cell table:style-name="ce39" office:value-type="float" office:value="0.000848782" calcext:value-type="float">
            <text:p>0.0008</text:p>
          </table:table-cell>
          <table:table-cell table:style-name="ce39" office:value-type="float" office:value="0.00084417" calcext:value-type="float">
            <text:p>0.0008</text:p>
          </table:table-cell>
          <table:table-cell table:style-name="ce39" office:value-type="float" office:value="0.000837765" calcext:value-type="float">
            <text:p>0.0008</text:p>
          </table:table-cell>
          <table:table-cell table:style-name="ce39" office:value-type="float" office:value="0.000829247" calcext:value-type="float">
            <text:p>0.0008</text:p>
          </table:table-cell>
          <table:table-cell table:style-name="ce39" office:value-type="float" office:value="0.000826773" calcext:value-type="float">
            <text:p>0.0008</text:p>
          </table:table-cell>
          <table:table-cell table:style-name="ce39" office:value-type="float" office:value="0.000820387" calcext:value-type="float">
            <text:p>0.0008</text:p>
          </table:table-cell>
          <table:table-cell table:style-name="ce39" office:value-type="float" office:value="0.000817604" calcext:value-type="float">
            <text:p>0.0008</text:p>
          </table:table-cell>
          <table:table-cell table:style-name="ce39" office:value-type="float" office:value="0.00081123" calcext:value-type="float">
            <text:p>0.0008</text:p>
          </table:table-cell>
          <table:table-cell table:style-name="ce39" office:value-type="float" office:value="0.000804862" calcext:value-type="float">
            <text:p>0.0008</text:p>
          </table:table-cell>
          <table:table-cell table:style-name="ce39" office:value-type="float" office:value="0.000800299" calcext:value-type="float">
            <text:p>0.0008</text:p>
          </table:table-cell>
          <table:table-cell table:style-name="ce39" office:value-type="float" office:value="0.000793623" calcext:value-type="float">
            <text:p>0.0008</text:p>
          </table:table-cell>
          <table:table-cell table:style-name="ce39" office:value-type="float" office:value="0.000789393" calcext:value-type="float">
            <text:p>0.0008</text:p>
          </table:table-cell>
          <table:table-cell table:style-name="ce39" office:value-type="float" office:value="0.000782729" calcext:value-type="float">
            <text:p>0.0008</text:p>
          </table:table-cell>
          <table:table-cell table:style-name="ce39" office:value-type="float" office:value="0.00077819" calcext:value-type="float">
            <text:p>0.0008</text:p>
          </table:table-cell>
          <table:table-cell table:style-name="ce39" office:value-type="float" office:value="0.000771859" calcext:value-type="float">
            <text:p>0.0008</text:p>
          </table:table-cell>
          <table:table-cell table:style-name="ce39" office:value-type="float" office:value="0.000765534" calcext:value-type="float">
            <text:p>0.0008</text:p>
          </table:table-cell>
          <table:table-cell table:style-name="ce39" office:value-type="float" office:value="0.000763134" calcext:value-type="float">
            <text:p>0.0008</text:p>
          </table:table-cell>
          <table:table-cell table:style-name="ce39" office:value-type="float" office:value="0.0007565" calcext:value-type="float">
            <text:p>0.0008</text:p>
          </table:table-cell>
          <table:table-cell table:style-name="ce39" office:value-type="float" office:value="0.000752313" calcext:value-type="float">
            <text:p>0.0008</text:p>
          </table:table-cell>
          <table:table-cell table:style-name="ce39" office:value-type="float" office:value="0.000745691" calcext:value-type="float">
            <text:p>0.0007</text:p>
          </table:table-cell>
          <table:table-cell table:style-name="ce39" office:value-type="float" office:value="0.000741195" calcext:value-type="float">
            <text:p>0.0007</text:p>
          </table:table-cell>
          <table:table-cell table:style-name="ce39" office:value-type="float" office:value="0.000736541" calcext:value-type="float">
            <text:p>0.0007</text:p>
          </table:table-cell>
          <table:table-cell table:style-name="ce39" office:value-type="float" office:value="0.000731893" calcext:value-type="float">
            <text:p>0.0007</text:p>
          </table:table-cell>
          <table:table-cell table:style-name="ce39" office:value-type="float" office:value="0.00072725" calcext:value-type="float">
            <text:p>0.0007</text:p>
          </table:table-cell>
          <table:table-cell table:style-name="ce39" office:value-type="float" office:value="0.000722613" calcext:value-type="float">
            <text:p>0.0007</text:p>
          </table:table-cell>
          <table:table-cell table:style-name="ce39" office:value-type="float" office:value="0.000717982" calcext:value-type="float">
            <text:p>0.0007</text:p>
          </table:table-cell>
          <table:table-cell table:style-name="ce39" office:value-type="float" office:value="0.000713356" calcext:value-type="float">
            <text:p>0.0007</text:p>
          </table:table-cell>
          <table:table-cell table:style-name="ce39" office:value-type="float" office:value="0.000708735" calcext:value-type="float">
            <text:p>0.0007</text:p>
          </table:table-cell>
          <table:table-cell table:style-name="ce39" office:value-type="float" office:value="0.00070412" calcext:value-type="float">
            <text:p>0.0007</text:p>
          </table:table-cell>
          <table:table-cell table:style-name="ce39" office:value-type="float" office:value="0.00069951" calcext:value-type="float">
            <text:p>0.0007</text:p>
          </table:table-cell>
          <table:table-cell table:style-name="ce39" office:value-type="float" office:value="0.000694906" calcext:value-type="float">
            <text:p>0.0007</text:p>
          </table:table-cell>
          <table:table-cell table:style-name="ce39" office:value-type="float" office:value="0.000689385" calcext:value-type="float">
            <text:p>0.0007</text:p>
          </table:table-cell>
          <table:table-cell table:style-name="ce39" office:value-type="float" office:value="0.000684791" calcext:value-type="float">
            <text:p>0.0007</text:p>
          </table:table-cell>
          <table:table-cell table:style-name="ce39" office:value-type="float" office:value="0.000680203" calcext:value-type="float">
            <text:p>0.0007</text:p>
          </table:table-cell>
          <table:table-cell table:style-name="ce39" office:value-type="float" office:value="0.000675621" calcext:value-type="float">
            <text:p>0.0007</text:p>
          </table:table-cell>
          <table:table-cell table:style-name="ce39" office:value-type="float" office:value="0.000671044" calcext:value-type="float">
            <text:p>0.0007</text:p>
          </table:table-cell>
          <table:table-cell table:style-name="ce39" office:value-type="float" office:value="0.000667394" calcext:value-type="float">
            <text:p>0.0007</text:p>
          </table:table-cell>
          <table:table-cell table:style-name="Default" table:number-columns-repeated="16089"/>
        </table:table-row>
        <table:table-row table:style-name="ro1">
          <table:table-cell office:value-type="string" calcext:value-type="string">
            <text:p>W[forestry,u], total warming in warming year, by convolution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" calcext:value-type="float">
            <text:p>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092761706264437" calcext:value-type="float">
            <text:p>0.00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26570839490067" calcext:value-type="float">
            <text:p>0.00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511344959897327" calcext:value-type="float">
            <text:p>0.000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0818701912315901" calcext:value-type="float">
            <text:p>0.000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118023390519716" calcext:value-type="float">
            <text:p>0.00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159042479727512" calcext:value-type="float">
            <text:p>0.00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204457794417912" calcext:value-type="float">
            <text:p>0.002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253821341047771" calcext:value-type="float">
            <text:p>0.002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306753296578527" calcext:value-type="float">
            <text:p>0.003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362851676042029" calcext:value-type="float">
            <text:p>0.00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421751004983709" calcext:value-type="float">
            <text:p>0.00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483129710474926" calcext:value-type="float">
            <text:p>0.004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546648998840605" calcext:value-type="float">
            <text:p>0.00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612014601119336" calcext:value-type="float">
            <text:p>0.00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678964687880727" calcext:value-type="float">
            <text:p>0.006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74725276955387" calcext:value-type="float">
            <text:p>0.00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816595522312145" calcext:value-type="float">
            <text:p>0.00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886764387708448" calcext:value-type="float">
            <text:p>0.00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0957583571885517" calcext:value-type="float">
            <text:p>0.009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02885064406005" calcext:value-type="float">
            <text:p>0.01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10035927339555" calcext:value-type="float">
            <text:p>0.01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17196765142776" calcext:value-type="float">
            <text:p>0.011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24353316918672" calcext:value-type="float">
            <text:p>0.01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31490107137172" calcext:value-type="float">
            <text:p>0.013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3859482992888" calcext:value-type="float">
            <text:p>0.01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45655863091855" calcext:value-type="float">
            <text:p>0.014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52662866898521" calcext:value-type="float">
            <text:p>0.01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5960646653804" calcext:value-type="float">
            <text:p>0.01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66480617925039" calcext:value-type="float">
            <text:p>0.01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73278128063124" calcext:value-type="float">
            <text:p>0.01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7999223101495" calcext:value-type="float">
            <text:p>0.018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86617148618291" calcext:value-type="float">
            <text:p>0.01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93144968390378" calcext:value-type="float">
            <text:p>0.01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99580242679935" calcext:value-type="float">
            <text:p>0.020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05916244171406" calcext:value-type="float">
            <text:p>0.020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12149371695101" calcext:value-type="float">
            <text:p>0.02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18276744824575" calcext:value-type="float">
            <text:p>0.02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2429338436844" calcext:value-type="float">
            <text:p>0.02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0201620016508" calcext:value-type="float">
            <text:p>0.02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5996180466594" calcext:value-type="float">
            <text:p>0.02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1673717667951" calcext:value-type="float">
            <text:p>0.02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7229191903156" calcext:value-type="float">
            <text:p>0.024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2668031084731" calcext:value-type="float">
            <text:p>0.02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798760931349" calcext:value-type="float">
            <text:p>0.025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318763647508" calcext:value-type="float">
            <text:p>0.026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8274848482243" calcext:value-type="float">
            <text:p>0.026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32430318427" calcext:value-type="float">
            <text:p>0.02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8099118564375" calcext:value-type="float">
            <text:p>0.027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2844743407727" calcext:value-type="float">
            <text:p>0.02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7476612746775" calcext:value-type="float">
            <text:p>0.02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2000748116164" calcext:value-type="float">
            <text:p>0.029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6409560726887" calcext:value-type="float">
            <text:p>0.029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0712092056181" calcext:value-type="float">
            <text:p>0.03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4907730103057" calcext:value-type="float">
            <text:p>0.030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9002360399169" calcext:value-type="float">
            <text:p>0.030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3000253913808" calcext:value-type="float">
            <text:p>0.031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6902028332699" calcext:value-type="float">
            <text:p>0.031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0707420368372" calcext:value-type="float">
            <text:p>0.03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4419153380822" calcext:value-type="float">
            <text:p>0.03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8040943460687" calcext:value-type="float">
            <text:p>0.032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1572380109767" calcext:value-type="float">
            <text:p>0.033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5017804829741" calcext:value-type="float">
            <text:p>0.033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8377363614648" calcext:value-type="float">
            <text:p>0.033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1654313293757" calcext:value-type="float">
            <text:p>0.03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4850714362464" calcext:value-type="float">
            <text:p>0.034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7969336110842" calcext:value-type="float">
            <text:p>0.034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101393583606" calcext:value-type="float">
            <text:p>0.035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3984935694302" calcext:value-type="float">
            <text:p>0.035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6886262677776" calcext:value-type="float">
            <text:p>0.035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9720135730862" calcext:value-type="float">
            <text:p>0.03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2484450329312" calcext:value-type="float">
            <text:p>0.03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5184875821051" calcext:value-type="float">
            <text:p>0.036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7821194429066" calcext:value-type="float">
            <text:p>0.036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0399407910139" calcext:value-type="float">
            <text:p>0.037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2914880713591" calcext:value-type="float">
            <text:p>0.03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5371027365832" calcext:value-type="float">
            <text:p>0.03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7773795899082" calcext:value-type="float">
            <text:p>0.037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0120976556171" calcext:value-type="float">
            <text:p>0.038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2416296237604" calcext:value-type="float">
            <text:p>0.03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4660701915673" calcext:value-type="float">
            <text:p>0.038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6856237787232" calcext:value-type="float">
            <text:p>0.03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9005147295959" calcext:value-type="float">
            <text:p>0.03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1105509018288" calcext:value-type="float">
            <text:p>0.039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3162902096728" calcext:value-type="float">
            <text:p>0.03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5175725414417" calcext:value-type="float">
            <text:p>0.039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7145928743381" calcext:value-type="float">
            <text:p>0.039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9074953058777" calcext:value-type="float">
            <text:p>0.03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0965727986839" calcext:value-type="float">
            <text:p>0.04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2818455271267" calcext:value-type="float">
            <text:p>0.04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4632916854345" calcext:value-type="float">
            <text:p>0.040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6412393449529" calcext:value-type="float">
            <text:p>0.040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8157895908934" calcext:value-type="float">
            <text:p>0.040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9866102737588" calcext:value-type="float">
            <text:p>0.04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1541064733176" calcext:value-type="float">
            <text:p>0.04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3179267807811" calcext:value-type="float">
            <text:p>0.041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4786422518961" calcext:value-type="float">
            <text:p>0.041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6357416701841" calcext:value-type="float">
            <text:p>0.04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789714712183" calcext:value-type="float">
            <text:p>0.04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9406757987561" calcext:value-type="float">
            <text:p>0.0419</text:p>
          </table:table-cell>
          <table:table-cell table:style-name="ce45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20889729984365" calcext:value-type="float">
            <text:p>0.04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21311468682758" calcext:value-type="float">
            <text:p>0.04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20997498669354" calcext:value-type="float">
            <text:p>0.042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20146666309876" calcext:value-type="float">
            <text:p>0.042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8950221379949" calcext:value-type="float">
            <text:p>0.041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7519010746907" calcext:value-type="float">
            <text:p>0.04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5924545725746" calcext:value-type="float">
            <text:p>0.041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4208106256321" calcext:value-type="float">
            <text:p>0.041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2406344911027" calcext:value-type="float">
            <text:p>0.04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10543631244736" calcext:value-type="float">
            <text:p>0.041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8637684940309" calcext:value-type="float">
            <text:p>0.040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6705498974183" calcext:value-type="float">
            <text:p>0.040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4754445260543" calcext:value-type="float">
            <text:p>0.040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2798101687622" calcext:value-type="float">
            <text:p>0.04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00842553772835" calcext:value-type="float">
            <text:p>0.04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8893762556241" calcext:value-type="float">
            <text:p>0.03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6953173730697" calcext:value-type="float">
            <text:p>0.039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5028900533611" calcext:value-type="float">
            <text:p>0.039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3123469356712" calcext:value-type="float">
            <text:p>0.03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91235182024944" calcext:value-type="float">
            <text:p>0.039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9364625436841" calcext:value-type="float">
            <text:p>0.03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7520295394157" calcext:value-type="float">
            <text:p>0.038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5698084435589" calcext:value-type="float">
            <text:p>0.038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3898120097176" calcext:value-type="float">
            <text:p>0.038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2120513970478" calcext:value-type="float">
            <text:p>0.03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80366672949705" calcext:value-type="float">
            <text:p>0.038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8639581314275" calcext:value-type="float">
            <text:p>0.03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6936762680266" calcext:value-type="float">
            <text:p>0.037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5257978835605" calcext:value-type="float">
            <text:p>0.03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3605455110888" calcext:value-type="float">
            <text:p>0.037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1974944803134" calcext:value-type="float">
            <text:p>0.03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70364076372613" calcext:value-type="float">
            <text:p>0.037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8776572623549" calcext:value-type="float">
            <text:p>0.036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7211105957929" calcext:value-type="float">
            <text:p>0.036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566073255265" calcext:value-type="float">
            <text:p>0.03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4125523882084" calcext:value-type="float">
            <text:p>0.036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2607822776183" calcext:value-type="float">
            <text:p>0.036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61109640993099" calcext:value-type="float">
            <text:p>0.03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963199508209" calcext:value-type="float">
            <text:p>0.03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8166529603282" calcext:value-type="float">
            <text:p>0.035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671985929402" calcext:value-type="float">
            <text:p>0.035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5293693561928" calcext:value-type="float">
            <text:p>0.03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3893704866471" calcext:value-type="float">
            <text:p>0.035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2505334956115" calcext:value-type="float">
            <text:p>0.03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5113884256516" calcext:value-type="float">
            <text:p>0.035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9790489320341" calcext:value-type="float">
            <text:p>0.035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8449912917679" calcext:value-type="float">
            <text:p>0.034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7129298445274" calcext:value-type="float">
            <text:p>0.034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5816633809615" calcext:value-type="float">
            <text:p>0.034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45115130608" calcext:value-type="float">
            <text:p>0.034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3220457188661" calcext:value-type="float">
            <text:p>0.034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1937754964247" calcext:value-type="float">
            <text:p>0.03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40673393558974" calcext:value-type="float">
            <text:p>0.034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9417646435692" calcext:value-type="float">
            <text:p>0.03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8173216907602" calcext:value-type="float">
            <text:p>0.033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6934712409653" calcext:value-type="float">
            <text:p>0.033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5700160270995" calcext:value-type="float">
            <text:p>0.03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290048176336" calcext:value-type="float">
            <text:p>0.033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31401097122352" calcext:value-type="float">
            <text:p>0.033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9931943429905" calcext:value-type="float">
            <text:p>0.03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8489710710701" calcext:value-type="float">
            <text:p>0.032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7073411003394" calcext:value-type="float">
            <text:p>0.032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568276122473" calcext:value-type="float">
            <text:p>0.032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4314989624254" calcext:value-type="float">
            <text:p>0.032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2968531185729" calcext:value-type="float">
            <text:p>0.032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1642516711037" calcext:value-type="float">
            <text:p>0.032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20339498173912" calcext:value-type="float">
            <text:p>0.032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9048436141181" calcext:value-type="float">
            <text:p>0.031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7771743817995" calcext:value-type="float">
            <text:p>0.031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6510372189917" calcext:value-type="float">
            <text:p>0.031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5261851218914" calcext:value-type="float">
            <text:p>0.031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4027755480135" calcext:value-type="float">
            <text:p>0.031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2804527941083" calcext:value-type="float">
            <text:p>0.031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1596174114945" calcext:value-type="float">
            <text:p>0.031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10393080211804" calcext:value-type="float">
            <text:p>0.031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9204464705038" calcext:value-type="float">
            <text:p>0.030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8027122001438" calcext:value-type="float">
            <text:p>0.030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685312267542" calcext:value-type="float">
            <text:p>0.030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5693437845511" calcext:value-type="float">
            <text:p>0.030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4538873981182" calcext:value-type="float">
            <text:p>0.030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3391875570071" calcext:value-type="float">
            <text:p>0.030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225149775244" calcext:value-type="float">
            <text:p>0.030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301116278515966" calcext:value-type="float">
            <text:p>0.030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9990528364237" calcext:value-type="float">
            <text:p>0.030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8866044545981" calcext:value-type="float">
            <text:p>0.029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7750353627159" calcext:value-type="float">
            <text:p>0.029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6640548497785" calcext:value-type="float">
            <text:p>0.029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5533698456487" calcext:value-type="float">
            <text:p>0.029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4429661349612" calcext:value-type="float">
            <text:p>0.029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3329682550887" calcext:value-type="float">
            <text:p>0.029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2234790549741" calcext:value-type="float">
            <text:p>0.029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114246102238" calcext:value-type="float">
            <text:p>0.029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90050807240386" calcext:value-type="float">
            <text:p>0.029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8966051006884" calcext:value-type="float">
            <text:p>0.028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7886677255355" calcext:value-type="float">
            <text:p>0.028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6813220440787" calcext:value-type="float">
            <text:p>0.028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5743443612555" calcext:value-type="float">
            <text:p>0.028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4682601877746" calcext:value-type="float">
            <text:p>0.028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3624463776449" calcext:value-type="float">
            <text:p>0.028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257129218774" calcext:value-type="float">
            <text:p>0.028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1516407166886" calcext:value-type="float">
            <text:p>0.028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8046361104434" calcext:value-type="float">
            <text:p>0.028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9413382376287" calcext:value-type="float">
            <text:p>0.027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8367121558481" calcext:value-type="float">
            <text:p>0.027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732311271424" calcext:value-type="float">
            <text:p>0.027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6281195480473" calcext:value-type="float">
            <text:p>0.027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5240733893252" calcext:value-type="float">
            <text:p>0.027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4204364251969" calcext:value-type="float">
            <text:p>0.027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3170039309205" calcext:value-type="float">
            <text:p>0.027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2132974102885" calcext:value-type="float">
            <text:p>0.027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109948561224" calcext:value-type="float">
            <text:p>0.027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70065513647266" calcext:value-type="float">
            <text:p>0.027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9037121446317" calcext:value-type="float">
            <text:p>0.026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800993311868" calcext:value-type="float">
            <text:p>0.026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6984364307003" calcext:value-type="float">
            <text:p>0.026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5957357331198" calcext:value-type="float">
            <text:p>0.026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4931534248534" calcext:value-type="float">
            <text:p>0.026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3904888280974" calcext:value-type="float">
            <text:p>0.026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2879435950936" calcext:value-type="float">
            <text:p>0.026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1854449754273" calcext:value-type="float">
            <text:p>0.026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60832980215708" calcext:value-type="float">
            <text:p>0.026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9807637729389" calcext:value-type="float">
            <text:p>0.026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8782822140279" calcext:value-type="float">
            <text:p>0.025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7756085121905" calcext:value-type="float">
            <text:p>0.025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6732211579343" calcext:value-type="float">
            <text:p>0.025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5706573336223" calcext:value-type="float">
            <text:p>0.025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4680233915682" calcext:value-type="float">
            <text:p>0.025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3654382549656" calcext:value-type="float">
            <text:p>0.025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2629412080715" calcext:value-type="float">
            <text:p>0.025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1597205644008" calcext:value-type="float">
            <text:p>0.025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50564959080542" calcext:value-type="float">
            <text:p>0.025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9533366531081" calcext:value-type="float">
            <text:p>0.025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8499160064506" calcext:value-type="float">
            <text:p>0.024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7467799843298" calcext:value-type="float">
            <text:p>0.024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6429555306577" calcext:value-type="float">
            <text:p>0.024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5395635524218" calcext:value-type="float">
            <text:p>0.024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4361442750964" calcext:value-type="float">
            <text:p>0.0244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3325136280024" calcext:value-type="float">
            <text:p>0.024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2284316654707" calcext:value-type="float">
            <text:p>0.024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1245873478732" calcext:value-type="float">
            <text:p>0.0241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40207170564988" calcext:value-type="float">
            <text:p>0.024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9168032491623" calcext:value-type="float">
            <text:p>0.023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8121795389899" calcext:value-type="float">
            <text:p>0.0238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7082003344911" calcext:value-type="float">
            <text:p>0.0237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603513845897" calcext:value-type="float">
            <text:p>0.0236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4987643238272" calcext:value-type="float">
            <text:p>0.0235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2896900553246" calcext:value-type="float">
            <text:p>0.0233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1658774377096" calcext:value-type="float">
            <text:p>0.0232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30437692707103" calcext:value-type="float">
            <text:p>0.0230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29232314617887" calcext:value-type="float">
            <text:p>0.0229</text:p>
          </table:table-cell>
          <table:table-cell table:style-name="ce40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228037958510837" calcext:value-type="float">
            <text:p>0.0228</text:p>
          </table:table-cell>
          <table:table-cell table:style-name="ce39" table:number-columns-repeated="43"/>
          <table:table-cell table:style-name="Default" table:number-columns-repeated="16089"/>
        </table:table-row>
        <table:table-row table:style-name="ro1">
          <table:table-cell office:value-type="string" calcext:value-type="string">
            <text:p>Discounted bid</text:p>
          </table:table-cell>
          <table:table-cell table:style-name="ce46" table:formula="of:=['Plantation example'.$D$4]/(1+['Plantation example'.$C$42])^[.B8]" office:value-type="currency" office:currency="USD" office:value="2197.22856550931" calcext:value-type="currency">
            <text:p>$2,197</text:p>
          </table:table-cell>
          <table:table-cell table:style-name="ce46" table:formula="of:=['Plantation example'.$D$4]/(1+['Plantation example'.$C$42])^[.C8]" office:value-type="currency" office:currency="USD" office:value="2133.23161699933" calcext:value-type="currency">
            <text:p>$2,133</text:p>
          </table:table-cell>
          <table:table-cell table:style-name="ce46" table:formula="of:=['Plantation example'.$D$4]/(1+['Plantation example'.$C$42])^[.D8]" office:value-type="currency" office:currency="USD" office:value="2071.0986572809" calcext:value-type="currency">
            <text:p>$2,071</text:p>
          </table:table-cell>
          <table:table-cell table:style-name="ce46" table:formula="of:=['Plantation example'.$D$4]/(1+['Plantation example'.$C$42])^[.E8]" office:value-type="currency" office:currency="USD" office:value="2010.77539541835" calcext:value-type="currency">
            <text:p>$2,011</text:p>
          </table:table-cell>
          <table:table-cell table:style-name="ce46" table:formula="of:=['Plantation example'.$D$4]/(1+['Plantation example'.$C$42])^[.F8]" office:value-type="currency" office:currency="USD" office:value="1952.20912176539" calcext:value-type="currency">
            <text:p>$1,952</text:p>
          </table:table-cell>
          <table:table-cell table:style-name="ce46" table:formula="of:=['Plantation example'.$D$4]/(1+['Plantation example'.$C$42])^[.G8]" office:value-type="currency" office:currency="USD" office:value="1895.34866190814" calcext:value-type="currency">
            <text:p>$1,895</text:p>
          </table:table-cell>
          <table:table-cell table:style-name="ce46" table:formula="of:=['Plantation example'.$D$4]/(1+['Plantation example'.$C$42])^[.H8]" office:value-type="currency" office:currency="USD" office:value="1840.14433194965" calcext:value-type="currency">
            <text:p>$1,840</text:p>
          </table:table-cell>
          <table:table-cell table:style-name="ce46" table:formula="of:=['Plantation example'.$D$4]/(1+['Plantation example'.$C$42])^[.I8]" office:value-type="currency" office:currency="USD" office:value="1786.54789509675" calcext:value-type="currency">
            <text:p>$1,787</text:p>
          </table:table-cell>
          <table:table-cell table:style-name="ce46" table:formula="of:=['Plantation example'.$D$4]/(1+['Plantation example'.$C$42])^[.J8]" office:value-type="currency" office:currency="USD" office:value="1734.51251951141" calcext:value-type="currency">
            <text:p>$1,735</text:p>
          </table:table-cell>
          <table:table-cell table:style-name="ce46" table:formula="of:=['Plantation example'.$D$4]/(1+['Plantation example'.$C$42])^[.K8]" office:value-type="currency" office:currency="USD" office:value="1683.99273738972" calcext:value-type="currency">
            <text:p>$1,684</text:p>
          </table:table-cell>
          <table:table-cell table:style-name="ce46" table:formula="of:=['Plantation example'.$D$4]/(1+['Plantation example'.$C$42])^[.L8]" office:value-type="currency" office:currency="USD" office:value="1634.94440523273" calcext:value-type="currency">
            <text:p>$1,635</text:p>
          </table:table-cell>
          <table:table-cell table:style-name="ce46" table:formula="of:=['Plantation example'.$D$4]/(1+['Plantation example'.$C$42])^[.M8]" office:value-type="currency" office:currency="USD" office:value="1587.3246652745" calcext:value-type="currency">
            <text:p>$1,587</text:p>
          </table:table-cell>
          <table:table-cell table:style-name="ce46" table:formula="of:=['Plantation example'.$D$4]/(1+['Plantation example'.$C$42])^[.N8]" office:value-type="currency" office:currency="USD" office:value="1541.09190803349" calcext:value-type="currency">
            <text:p>$1,541</text:p>
          </table:table-cell>
          <table:table-cell table:style-name="ce46" table:formula="of:=['Plantation example'.$D$4]/(1+['Plantation example'.$C$42])^[.O8]" office:value-type="currency" office:currency="USD" office:value="1496.20573595485" calcext:value-type="currency">
            <text:p>$1,496</text:p>
          </table:table-cell>
          <table:table-cell table:style-name="ce46" table:formula="of:=['Plantation example'.$D$4]/(1+['Plantation example'.$C$42])^[.P8]" office:value-type="currency" office:currency="USD" office:value="1452.6269281115" calcext:value-type="currency">
            <text:p>$1,453</text:p>
          </table:table-cell>
          <table:table-cell table:style-name="ce46" table:formula="of:=['Plantation example'.$D$4]/(1+['Plantation example'.$C$42])^[.Q8]" office:value-type="currency" office:currency="USD" office:value="1410.3174059335" calcext:value-type="currency">
            <text:p>$1,410</text:p>
          </table:table-cell>
          <table:table-cell table:style-name="ce46" table:formula="of:=['Plantation example'.$D$4]/(1+['Plantation example'.$C$42])^[.R8]" office:value-type="currency" office:currency="USD" office:value="1369.24019993544" calcext:value-type="currency">
            <text:p>$1,369</text:p>
          </table:table-cell>
          <table:table-cell table:style-name="ce46" table:formula="of:=['Plantation example'.$D$4]/(1+['Plantation example'.$C$42])^[.S8]" office:value-type="currency" office:currency="USD" office:value="1329.35941741304" calcext:value-type="currency">
            <text:p>$1,329</text:p>
          </table:table-cell>
          <table:table-cell table:style-name="ce46" table:formula="of:=['Plantation example'.$D$4]/(1+['Plantation example'.$C$42])^[.T8]" office:value-type="currency" office:currency="USD" office:value="1290.64021108063" calcext:value-type="currency">
            <text:p>$1,291</text:p>
          </table:table-cell>
          <table:table-cell table:style-name="ce46" table:formula="of:=['Plantation example'.$D$4]/(1+['Plantation example'.$C$42])^[.U8]" office:value-type="currency" office:currency="USD" office:value="1253.04874862197" calcext:value-type="currency">
            <text:p>$1,253</text:p>
          </table:table-cell>
          <table:table-cell table:style-name="ce46" table:formula="of:=['Plantation example'.$D$4]/(1+['Plantation example'.$C$42])^[.V8]" office:value-type="currency" office:currency="USD" office:value="1216.55218312812" calcext:value-type="currency">
            <text:p>$1,217</text:p>
          </table:table-cell>
          <table:table-cell table:style-name="ce46" table:formula="of:=['Plantation example'.$D$4]/(1+['Plantation example'.$C$42])^[.W8]" office:value-type="currency" office:currency="USD" office:value="1181.11862439624" calcext:value-type="currency">
            <text:p>$1,181</text:p>
          </table:table-cell>
          <table:table-cell table:style-name="ce46" table:formula="of:=['Plantation example'.$D$4]/(1+['Plantation example'.$C$42])^[.X8]" office:value-type="currency" office:currency="USD" office:value="1146.71711106431" calcext:value-type="currency">
            <text:p>$1,147</text:p>
          </table:table-cell>
          <table:table-cell table:style-name="ce46" table:formula="of:=['Plantation example'.$D$4]/(1+['Plantation example'.$C$42])^[.Y8]" office:value-type="currency" office:currency="USD" office:value="1113.31758355758" calcext:value-type="currency">
            <text:p>$1,113</text:p>
          </table:table-cell>
          <table:table-cell table:style-name="ce46" table:formula="of:=['Plantation example'.$D$4]/(1+['Plantation example'.$C$42])^[.Z8]" office:value-type="currency" office:currency="USD" office:value="1080.89085782289" calcext:value-type="currency">
            <text:p>$1,081</text:p>
          </table:table-cell>
          <table:table-cell table:style-name="ce46" table:formula="of:=['Plantation example'.$D$4]/(1+['Plantation example'.$C$42])^[.AA8]" office:value-type="currency" office:currency="USD" office:value="1049.40859982805" calcext:value-type="currency">
            <text:p>$1,049</text:p>
          </table:table-cell>
          <table:table-cell table:style-name="ce46" table:formula="of:=['Plantation example'.$D$4]/(1+['Plantation example'.$C$42])^[.AB8]" office:value-type="currency" office:currency="USD" office:value="1018.84330080393" calcext:value-type="currency">
            <text:p>$1,019</text:p>
          </table:table-cell>
          <table:table-cell table:style-name="ce46" table:formula="of:=['Plantation example'.$D$4]/(1+['Plantation example'.$C$42])^[.AC8]" office:value-type="currency" office:currency="USD" office:value="989.168253207701" calcext:value-type="currency">
            <text:p>$989</text:p>
          </table:table-cell>
          <table:table-cell table:style-name="ce46" table:formula="of:=['Plantation example'.$D$4]/(1+['Plantation example'.$C$42])^[.AD8]" office:value-type="currency" office:currency="USD" office:value="960.357527386118" calcext:value-type="currency">
            <text:p>$960</text:p>
          </table:table-cell>
          <table:table-cell table:style-name="ce46" table:formula="of:=['Plantation example'.$D$4]/(1+['Plantation example'.$C$42])^[.AE8]" office:value-type="currency" office:currency="USD" office:value="932.385948918561" calcext:value-type="currency">
            <text:p>$932</text:p>
          </table:table-cell>
          <table:table-cell table:style-name="ce46" table:formula="of:=['Plantation example'.$D$4]/(1+['Plantation example'.$C$42])^[.AF8]" office:value-type="currency" office:currency="USD" office:value="905.229076619962" calcext:value-type="currency">
            <text:p>$905</text:p>
          </table:table-cell>
          <table:table-cell table:style-name="ce46" table:formula="of:=['Plantation example'.$D$4]/(1+['Plantation example'.$C$42])^[.AG8]" office:value-type="currency" office:currency="USD" office:value="878.863181184429" calcext:value-type="currency">
            <text:p>$879</text:p>
          </table:table-cell>
          <table:table-cell table:style-name="ce46" table:formula="of:=['Plantation example'.$D$4]/(1+['Plantation example'.$C$42])^[.AH8]" office:value-type="currency" office:currency="USD" office:value="853.265224450902" calcext:value-type="currency">
            <text:p>$853</text:p>
          </table:table-cell>
          <table:table-cell table:style-name="ce46" table:formula="of:=['Plantation example'.$D$4]/(1+['Plantation example'.$C$42])^[.AI8]" office:value-type="currency" office:currency="USD" office:value="828.41283927272" calcext:value-type="currency">
            <text:p>$828</text:p>
          </table:table-cell>
          <table:table-cell table:style-name="ce46" table:formula="of:=['Plantation example'.$D$4]/(1+['Plantation example'.$C$42])^[.AJ8]" office:value-type="currency" office:currency="USD" office:value="804.284309973515" calcext:value-type="currency">
            <text:p>$804</text:p>
          </table:table-cell>
          <table:table-cell table:style-name="ce46" table:formula="of:=['Plantation example'.$D$4]/(1+['Plantation example'.$C$42])^[.AK8]" office:value-type="currency" office:currency="USD" office:value="780.858553372345" calcext:value-type="currency">
            <text:p>$781</text:p>
          </table:table-cell>
          <table:table-cell table:style-name="ce46" table:formula="of:=['Plantation example'.$D$4]/(1+['Plantation example'.$C$42])^[.AL8]" office:value-type="currency" office:currency="USD" office:value="758.1151003615" calcext:value-type="currency">
            <text:p>$758</text:p>
          </table:table-cell>
          <table:table-cell table:style-name="ce46" table:formula="of:=['Plantation example'.$D$4]/(1+['Plantation example'.$C$42])^[.AM8]" office:value-type="currency" office:currency="USD" office:value="736.034078020873" calcext:value-type="currency">
            <text:p>$736</text:p>
          </table:table-cell>
          <table:table-cell table:style-name="ce46" table:formula="of:=['Plantation example'.$D$4]/(1+['Plantation example'.$C$42])^[.AN8]" office:value-type="currency" office:currency="USD" office:value="714.596192253275" calcext:value-type="currency">
            <text:p>$715</text:p>
          </table:table-cell>
          <table:table-cell table:style-name="ce46" table:formula="of:=['Plantation example'.$D$4]/(1+['Plantation example'.$C$42])^[.AO8]" office:value-type="currency" office:currency="USD" office:value="693.78271092551" calcext:value-type="currency">
            <text:p>$694</text:p>
          </table:table-cell>
          <table:table-cell table:style-name="ce46" table:formula="of:=['Plantation example'.$D$4]/(1+['Plantation example'.$C$42])^[.AP8]" office:value-type="currency" office:currency="USD" office:value="673.575447500495" calcext:value-type="currency">
            <text:p>$674</text:p>
          </table:table-cell>
          <table:table-cell table:style-name="ce46" table:formula="of:=['Plantation example'.$D$4]/(1+['Plantation example'.$C$42])^[.AQ8]" office:value-type="currency" office:currency="USD" office:value="653.956745146112" calcext:value-type="currency">
            <text:p>$654</text:p>
          </table:table-cell>
          <table:table-cell table:style-name="ce46" table:formula="of:=['Plantation example'.$D$4]/(1+['Plantation example'.$C$42])^[.AR8]" office:value-type="currency" office:currency="USD" office:value="634.909461306904" calcext:value-type="currency">
            <text:p>$635</text:p>
          </table:table-cell>
          <table:table-cell table:style-name="ce46" table:formula="of:=['Plantation example'.$D$4]/(1+['Plantation example'.$C$42])^[.AS8]" office:value-type="currency" office:currency="USD" office:value="616.41695272515" calcext:value-type="currency">
            <text:p>$616</text:p>
          </table:table-cell>
          <table:table-cell table:style-name="ce46" table:formula="of:=['Plantation example'.$D$4]/(1+['Plantation example'.$C$42])^[.AT8]" office:value-type="currency" office:currency="USD" office:value="598.463060898204" calcext:value-type="currency">
            <text:p>$598</text:p>
          </table:table-cell>
          <table:table-cell table:style-name="ce46" table:formula="of:=['Plantation example'.$D$4]/(1+['Plantation example'.$C$42])^[.AU8]" office:value-type="currency" office:currency="USD" office:value="581.032097959421" calcext:value-type="currency">
            <text:p>$581</text:p>
          </table:table-cell>
          <table:table-cell table:style-name="ce46" table:formula="of:=['Plantation example'.$D$4]/(1+['Plantation example'.$C$42])^[.AV8]" office:value-type="currency" office:currency="USD" office:value="564.108832970312" calcext:value-type="currency">
            <text:p>$564</text:p>
          </table:table-cell>
          <table:table-cell table:style-name="ce46" table:formula="of:=['Plantation example'.$D$4]/(1+['Plantation example'.$C$42])^[.AW8]" office:value-type="currency" office:currency="USD" office:value="547.678478611953" calcext:value-type="currency">
            <text:p>$548</text:p>
          </table:table-cell>
          <table:table-cell table:style-name="ce46" table:formula="of:=['Plantation example'.$D$4]/(1+['Plantation example'.$C$42])^[.AX8]" office:value-type="currency" office:currency="USD" office:value="531.726678264032" calcext:value-type="currency">
            <text:p>$532</text:p>
          </table:table-cell>
          <table:table-cell table:style-name="ce46" table:formula="of:=['Plantation example'.$D$4]/(1+['Plantation example'.$C$42])^[.AY8]" office:value-type="currency" office:currency="USD" office:value="516.239493460225" calcext:value-type="currency">
            <text:p>$516</text:p>
          </table:table-cell>
          <table:table-cell table:style-name="ce46" table:formula="of:=['Plantation example'.$D$4]/(1+['Plantation example'.$C$42])^[.AZ8]" office:value-type="currency" office:currency="USD" office:value="501.203391708957" calcext:value-type="currency">
            <text:p>$501</text:p>
          </table:table-cell>
          <table:table-cell table:style-name="ce46" table:formula="of:=['Plantation example'.$D$4]/(1+['Plantation example'.$C$42])^[.BA8]" office:value-type="currency" office:currency="USD" office:value="486.60523466889" calcext:value-type="currency">
            <text:p>$487</text:p>
          </table:table-cell>
          <table:table-cell table:style-name="ce46" table:formula="of:=['Plantation example'.$D$4]/(1+['Plantation example'.$C$42])^[.BB8]" office:value-type="currency" office:currency="USD" office:value="472.432266668825" calcext:value-type="currency">
            <text:p>$472</text:p>
          </table:table-cell>
          <table:table-cell table:style-name="ce46" table:formula="of:=['Plantation example'.$D$4]/(1+['Plantation example'.$C$42])^[.BC8]" office:value-type="currency" office:currency="USD" office:value="458.672103561966" calcext:value-type="currency">
            <text:p>$459</text:p>
          </table:table-cell>
          <table:table-cell table:style-name="ce46" table:formula="of:=['Plantation example'.$D$4]/(1+['Plantation example'.$C$42])^[.BD8]" office:value-type="currency" office:currency="USD" office:value="445.312721904822" calcext:value-type="currency">
            <text:p>$445</text:p>
          </table:table-cell>
          <table:table-cell table:style-name="ce46" table:formula="of:=['Plantation example'.$D$4]/(1+['Plantation example'.$C$42])^[.BE8]" office:value-type="currency" office:currency="USD" office:value="432.342448451283" calcext:value-type="currency">
            <text:p>$432</text:p>
          </table:table-cell>
          <table:table-cell table:style-name="ce46" table:formula="of:=['Plantation example'.$D$4]/(1+['Plantation example'.$C$42])^[.BF8]" office:value-type="currency" office:currency="USD" office:value="419.749949952702" calcext:value-type="currency">
            <text:p>$420</text:p>
          </table:table-cell>
          <table:table-cell table:style-name="ce46" table:formula="of:=['Plantation example'.$D$4]/(1+['Plantation example'.$C$42])^[.BG8]" office:value-type="currency" office:currency="USD" office:value="407.52422325505" calcext:value-type="currency">
            <text:p>$408</text:p>
          </table:table-cell>
          <table:table-cell table:style-name="ce46" table:formula="of:=['Plantation example'.$D$4]/(1+['Plantation example'.$C$42])^[.BH8]" office:value-type="currency" office:currency="USD" office:value="395.654585684515" calcext:value-type="currency">
            <text:p>$396</text:p>
          </table:table-cell>
          <table:table-cell table:style-name="ce46" table:formula="of:=['Plantation example'.$D$4]/(1+['Plantation example'.$C$42])^[.BI8]" office:value-type="currency" office:currency="USD" office:value="384.130665713121" calcext:value-type="currency">
            <text:p>$384</text:p>
          </table:table-cell>
          <table:table-cell table:style-name="ce46" table:formula="of:=['Plantation example'.$D$4]/(1+['Plantation example'.$C$42])^[.BJ8]" office:value-type="currency" office:currency="USD" office:value="372.942393896234" calcext:value-type="currency">
            <text:p>$373</text:p>
          </table:table-cell>
          <table:table-cell table:style-name="ce46" table:formula="of:=['Plantation example'.$D$4]/(1+['Plantation example'.$C$42])^[.BK8]" office:value-type="currency" office:currency="USD" office:value="362.079994074014" calcext:value-type="currency">
            <text:p>$362</text:p>
          </table:table-cell>
          <table:table-cell table:style-name="ce46" table:formula="of:=['Plantation example'.$D$4]/(1+['Plantation example'.$C$42])^[.BL8]" office:value-type="currency" office:currency="USD" office:value="351.53397482914" calcext:value-type="currency">
            <text:p>$352</text:p>
          </table:table-cell>
          <table:table-cell table:style-name="ce46" table:formula="of:=['Plantation example'.$D$4]/(1+['Plantation example'.$C$42])^[.BM8]" office:value-type="currency" office:currency="USD" office:value="341.295121193339" calcext:value-type="currency">
            <text:p>$341</text:p>
          </table:table-cell>
          <table:table-cell table:style-name="ce46" table:formula="of:=['Plantation example'.$D$4]/(1+['Plantation example'.$C$42])^[.BN8]" office:value-type="currency" office:currency="USD" office:value="331.354486595475" calcext:value-type="currency">
            <text:p>$331</text:p>
          </table:table-cell>
          <table:table-cell table:style-name="ce46" table:formula="of:=['Plantation example'.$D$4]/(1+['Plantation example'.$C$42])^[.BO8]" office:value-type="currency" office:currency="USD" office:value="321.703385044151" calcext:value-type="currency">
            <text:p>$322</text:p>
          </table:table-cell>
          <table:table-cell table:style-name="ce46" table:formula="of:=['Plantation example'.$D$4]/(1+['Plantation example'.$C$42])^[.BP8]" office:value-type="currency" office:currency="USD" office:value="312.33338353801" calcext:value-type="currency">
            <text:p>$312</text:p>
          </table:table-cell>
          <table:table-cell table:style-name="ce46" table:formula="of:=['Plantation example'.$D$4]/(1+['Plantation example'.$C$42])^[.BQ8]" office:value-type="currency" office:currency="USD" office:value="303.236294697097" calcext:value-type="currency">
            <text:p>$303</text:p>
          </table:table-cell>
          <table:table-cell table:style-name="ce46" table:formula="of:=['Plantation example'.$D$4]/(1+['Plantation example'.$C$42])^[.BR8]" office:value-type="currency" office:currency="USD" office:value="294.404169608832" calcext:value-type="currency">
            <text:p>$294</text:p>
          </table:table-cell>
          <table:table-cell table:style-name="ce46" table:formula="of:=['Plantation example'.$D$4]/(1+['Plantation example'.$C$42])^[.BS8]" office:value-type="currency" office:currency="USD" office:value="285.829290882362" calcext:value-type="currency">
            <text:p>$286</text:p>
          </table:table-cell>
          <table:table-cell table:style-name="ce46" table:formula="of:=['Plantation example'.$D$4]/(1+['Plantation example'.$C$42])^[.BT8]" office:value-type="currency" office:currency="USD" office:value="277.504165905205" calcext:value-type="currency">
            <text:p>$278</text:p>
          </table:table-cell>
          <table:table-cell table:style-name="ce46" table:formula="of:=['Plantation example'.$D$4]/(1+['Plantation example'.$C$42])^[.BU8]" office:value-type="currency" office:currency="USD" office:value="269.421520296316" calcext:value-type="currency">
            <text:p>$269</text:p>
          </table:table-cell>
          <table:table-cell table:style-name="ce46" table:formula="of:=['Plantation example'.$D$4]/(1+['Plantation example'.$C$42])^[.BV8]" office:value-type="currency" office:currency="USD" office:value="261.574291549821" calcext:value-type="currency">
            <text:p>$262</text:p>
          </table:table-cell>
          <table:table-cell table:style-name="ce46" table:formula="of:=['Plantation example'.$D$4]/(1+['Plantation example'.$C$42])^[.BW8]" office:value-type="currency" office:currency="USD" office:value="253.955622863904" calcext:value-type="currency">
            <text:p>$254</text:p>
          </table:table-cell>
          <table:table-cell table:style-name="ce46" table:formula="of:=['Plantation example'.$D$4]/(1+['Plantation example'.$C$42])^[.BX8]" office:value-type="currency" office:currency="USD" office:value="246.558857149422" calcext:value-type="currency">
            <text:p>$247</text:p>
          </table:table-cell>
          <table:table-cell table:style-name="ce46" table:formula="of:=['Plantation example'.$D$4]/(1+['Plantation example'.$C$42])^[.BY8]" office:value-type="currency" office:currency="USD" office:value="239.377531213031" calcext:value-type="currency">
            <text:p>$239</text:p>
          </table:table-cell>
          <table:table-cell table:style-name="ce46" table:formula="of:=['Plantation example'.$D$4]/(1+['Plantation example'.$C$42])^[.BZ8]" office:value-type="currency" office:currency="USD" office:value="232.405370109738" calcext:value-type="currency">
            <text:p>$232</text:p>
          </table:table-cell>
          <table:table-cell table:style-name="ce46" table:formula="of:=['Plantation example'.$D$4]/(1+['Plantation example'.$C$42])^[.CA8]" office:value-type="currency" office:currency="USD" office:value="225.63628165994" calcext:value-type="currency">
            <text:p>$226</text:p>
          </table:table-cell>
          <table:table-cell table:style-name="ce46" table:formula="of:=['Plantation example'.$D$4]/(1+['Plantation example'.$C$42])^[.CB8]" office:value-type="currency" office:currency="USD" office:value="219.064351126156" calcext:value-type="currency">
            <text:p>$219</text:p>
          </table:table-cell>
          <table:table-cell table:style-name="ce46" table:formula="of:=['Plantation example'.$D$4]/(1+['Plantation example'.$C$42])^[.CC8]" office:value-type="currency" office:currency="USD" office:value="212.683836044811" calcext:value-type="currency">
            <text:p>$213</text:p>
          </table:table-cell>
          <table:table-cell table:style-name="ce46" table:formula="of:=['Plantation example'.$D$4]/(1+['Plantation example'.$C$42])^[.CD8]" office:value-type="currency" office:currency="USD" office:value="206.489161208555" calcext:value-type="currency">
            <text:p>$206</text:p>
          </table:table-cell>
          <table:table-cell table:style-name="ce46" table:formula="of:=['Plantation example'.$D$4]/(1+['Plantation example'.$C$42])^[.CE8]" office:value-type="currency" office:currency="USD" office:value="200.474913794713" calcext:value-type="currency">
            <text:p>$200</text:p>
          </table:table-cell>
          <table:table-cell table:style-name="ce46" table:formula="of:=['Plantation example'.$D$4]/(1+['Plantation example'.$C$42])^[.CF8]" office:value-type="currency" office:currency="USD" office:value="194.635838635644" calcext:value-type="currency">
            <text:p>$195</text:p>
          </table:table-cell>
          <table:table-cell table:style-name="ce46" table:formula="of:=['Plantation example'.$D$4]/(1+['Plantation example'.$C$42])^[.CG8]" office:value-type="currency" office:currency="USD" office:value="188.966833626839" calcext:value-type="currency">
            <text:p>$189</text:p>
          </table:table-cell>
          <table:table-cell table:style-name="ce46" table:formula="of:=['Plantation example'.$D$4]/(1+['Plantation example'.$C$42])^[.CH8]" office:value-type="currency" office:currency="USD" office:value="183.462945268775" calcext:value-type="currency">
            <text:p>$183</text:p>
          </table:table-cell>
          <table:table-cell table:style-name="ce46" table:formula="of:=['Plantation example'.$D$4]/(1+['Plantation example'.$C$42])^[.CI8]" office:value-type="currency" office:currency="USD" office:value="178.119364338617" calcext:value-type="currency">
            <text:p>$178</text:p>
          </table:table-cell>
          <table:table-cell table:style-name="ce46" table:formula="of:=['Plantation example'.$D$4]/(1+['Plantation example'.$C$42])^[.CJ8]" office:value-type="currency" office:currency="USD" office:value="172.931421687978" calcext:value-type="currency">
            <text:p>$173</text:p>
          </table:table-cell>
          <table:table-cell table:style-name="ce46" table:formula="of:=['Plantation example'.$D$4]/(1+['Plantation example'.$C$42])^[.CK8]" office:value-type="currency" office:currency="USD" office:value="167.894584163085" calcext:value-type="currency">
            <text:p>$168</text:p>
          </table:table-cell>
          <table:table-cell table:style-name="ce46" table:formula="of:=['Plantation example'.$D$4]/(1+['Plantation example'.$C$42])^[.CL8]" office:value-type="currency" office:currency="USD" office:value="163.004450643772" calcext:value-type="currency">
            <text:p>$163</text:p>
          </table:table-cell>
          <table:table-cell table:style-name="ce46" table:formula="of:=['Plantation example'.$D$4]/(1+['Plantation example'.$C$42])^[.CM8]" office:value-type="currency" office:currency="USD" office:value="158.256748197837" calcext:value-type="currency">
            <text:p>$158</text:p>
          </table:table-cell>
          <table:table-cell table:style-name="ce46" table:formula="of:=['Plantation example'.$D$4]/(1+['Plantation example'.$C$42])^[.CN8]" office:value-type="currency" office:currency="USD" office:value="153.647328347414" calcext:value-type="currency">
            <text:p>$154</text:p>
          </table:table-cell>
          <table:table-cell table:style-name="ce46" table:formula="of:=['Plantation example'.$D$4]/(1+['Plantation example'.$C$42])^[.CO8]" office:value-type="currency" office:currency="USD" office:value="149.172163444092" calcext:value-type="currency">
            <text:p>$149</text:p>
          </table:table-cell>
          <table:table-cell table:style-name="ce46" table:formula="of:=['Plantation example'.$D$4]/(1+['Plantation example'.$C$42])^[.CP8]" office:value-type="currency" office:currency="USD" office:value="144.827343149603" calcext:value-type="currency">
            <text:p>$145</text:p>
          </table:table-cell>
          <table:table-cell table:style-name="ce46" table:formula="of:=['Plantation example'.$D$4]/(1+['Plantation example'.$C$42])^[.CQ8]" office:value-type="currency" office:currency="USD" office:value="140.609071019032" calcext:value-type="currency">
            <text:p>$141</text:p>
          </table:table-cell>
          <table:table-cell table:style-name="ce46" table:formula="of:=['Plantation example'.$D$4]/(1+['Plantation example'.$C$42])^[.CR8]" office:value-type="currency" office:currency="USD" office:value="136.513661183527" calcext:value-type="currency">
            <text:p>$137</text:p>
          </table:table-cell>
          <table:table-cell table:style-name="ce46" table:formula="of:=['Plantation example'.$D$4]/(1+['Plantation example'.$C$42])^[.CS8]" office:value-type="currency" office:currency="USD" office:value="132.537535129638" calcext:value-type="currency">
            <text:p>$133</text:p>
          </table:table-cell>
          <table:table-cell table:style-name="ce46" table:formula="of:=['Plantation example'.$D$4]/(1+['Plantation example'.$C$42])^[.CT8]" office:value-type="currency" office:currency="USD" office:value="128.677218572464" calcext:value-type="currency">
            <text:p>$129</text:p>
          </table:table-cell>
          <table:table-cell table:style-name="ce46" table:formula="of:=['Plantation example'.$D$4]/(1+['Plantation example'.$C$42])^[.CU8]" office:value-type="currency" office:currency="USD" office:value="124.929338419868" calcext:value-type="currency">
            <text:p>$125</text:p>
          </table:table-cell>
          <table:table-cell table:style-name="ce46" table:formula="of:=['Plantation example'.$D$4]/(1+['Plantation example'.$C$42])^[.CV8]" office:value-type="currency" office:currency="USD" office:value="121.290619825114" calcext:value-type="currency">
            <text:p>$121</text:p>
          </table:table-cell>
          <table:table-cell table:style-name="ce46" table:formula="of:=['Plantation example'.$D$4]/(1+['Plantation example'.$C$42])^[.CW8]" office:value-type="currency" office:currency="USD" office:value="117.757883325354" calcext:value-type="currency">
            <text:p>$118</text:p>
          </table:table-cell>
          <table:table-cell table:style-name="ce46" table:formula="of:=['Plantation example'.$D$4]/(1+['Plantation example'.$C$42])^[.CX8]" office:value-type="currency" office:currency="USD" office:value="114.32804206345" calcext:value-type="currency">
            <text:p>$114</text:p>
          </table:table-cell>
          <table:table-cell table:style-name="ce46" table:formula="of:=['Plantation example'.$D$4]/(1+['Plantation example'.$C$42])^[.CY8]" office:value-type="currency" office:currency="USD" office:value="110.998099090728" calcext:value-type="currency">
            <text:p>$111</text:p>
          </table:table-cell>
          <table:table-cell table:style-name="ce46" table:formula="of:=['Plantation example'.$D$4]/(1+['Plantation example'.$C$42])^[.CZ8]" office:value-type="currency" office:currency="USD" office:value="107.76514474828" calcext:value-type="currency">
            <text:p>$108</text:p>
          </table:table-cell>
          <table:table-cell table:style-name="ce46" table:formula="of:=['Plantation example'.$D$4]/(1+['Plantation example'.$C$42])^[.DA8]" office:value-type="currency" office:currency="USD" office:value="104.626354124544" calcext:value-type="currency">
            <text:p>$105</text:p>
          </table:table-cell>
          <table:table-cell table:style-name="ce46" table:formula="of:=['Plantation example'.$D$4]/(1+['Plantation example'.$C$42])^[.DB8]" office:value-type="currency" office:currency="USD" office:value="101.578984586935" calcext:value-type="currency">
            <text:p>$102</text:p>
          </table:table-cell>
          <table:table-cell table:style-name="ce46" table:formula="of:=['Plantation example'.$D$4]/(1+['Plantation example'.$C$42])^[.DC8]" office:value-type="currency" office:currency="USD" office:value="98.6203733853742" calcext:value-type="currency">
            <text:p>$99</text:p>
          </table:table-cell>
          <table:table-cell table:style-name="ce46" table:formula="of:=['Plantation example'.$D$4]/(1+['Plantation example'.$C$42])^[.DD8]" office:value-type="currency" office:currency="USD" office:value="95.747935325606" calcext:value-type="currency">
            <text:p>$96</text:p>
          </table:table-cell>
          <table:table-cell table:style-name="ce46" table:formula="of:=['Plantation example'.$D$4]/(1+['Plantation example'.$C$42])^[.DE8]" office:value-type="currency" office:currency="USD" office:value="92.9591605102971" calcext:value-type="currency">
            <text:p>$93</text:p>
          </table:table-cell>
          <table:table-cell table:style-name="ce46" table:formula="of:=['Plantation example'.$D$4]/(1+['Plantation example'.$C$42])^[.DF8]" office:value-type="currency" office:currency="USD" office:value="90.2516121459195" calcext:value-type="currency">
            <text:p>$90</text:p>
          </table:table-cell>
          <table:table-cell table:style-name="ce46" table:formula="of:=['Plantation example'.$D$4]/(1+['Plantation example'.$C$42])^[.DG8]" office:value-type="currency" office:currency="USD" office:value="87.6229244135141" calcext:value-type="currency">
            <text:p>$88</text:p>
          </table:table-cell>
          <table:table-cell table:style-name="ce46" table:formula="of:=['Plantation example'.$D$4]/(1+['Plantation example'.$C$42])^[.DH8]" office:value-type="currency" office:currency="USD" office:value="85.07080040147" calcext:value-type="currency">
            <text:p>$85</text:p>
          </table:table-cell>
          <table:table-cell table:style-name="ce46" table:formula="of:=['Plantation example'.$D$4]/(1+['Plantation example'.$C$42])^[.DI8]" office:value-type="currency" office:currency="USD" office:value="82.5930100985146" calcext:value-type="currency">
            <text:p>$83</text:p>
          </table:table-cell>
          <table:table-cell table:style-name="ce46" table:formula="of:=['Plantation example'.$D$4]/(1+['Plantation example'.$C$42])^[.DJ8]" office:value-type="currency" office:currency="USD" office:value="80.1873884451598" calcext:value-type="currency">
            <text:p>$80</text:p>
          </table:table-cell>
          <table:table-cell table:style-name="ce46" table:formula="of:=['Plantation example'.$D$4]/(1+['Plantation example'.$C$42])^[.DK8]" office:value-type="currency" office:currency="USD" office:value="77.8518334419027" calcext:value-type="currency">
            <text:p>$78</text:p>
          </table:table-cell>
          <table:table-cell table:style-name="ce46" table:formula="of:=['Plantation example'.$D$4]/(1+['Plantation example'.$C$42])^[.DL8]" office:value-type="currency" office:currency="USD" office:value="75.5843043125269" calcext:value-type="currency">
            <text:p>$76</text:p>
          </table:table-cell>
          <table:table-cell table:style-name="ce46" table:formula="of:=['Plantation example'.$D$4]/(1+['Plantation example'.$C$42])^[.DM8]" office:value-type="currency" office:currency="USD" office:value="73.3828197208999" calcext:value-type="currency">
            <text:p>$73</text:p>
          </table:table-cell>
          <table:table-cell table:style-name="ce46" table:formula="of:=['Plantation example'.$D$4]/(1+['Plantation example'.$C$42])^[.DN8]" office:value-type="currency" office:currency="USD" office:value="71.2454560397086" calcext:value-type="currency">
            <text:p>$71</text:p>
          </table:table-cell>
          <table:table-cell table:style-name="ce46" table:formula="of:=['Plantation example'.$D$4]/(1+['Plantation example'.$C$42])^[.DO8]" office:value-type="currency" office:currency="USD" office:value="69.17034566962" calcext:value-type="currency">
            <text:p>$69</text:p>
          </table:table-cell>
          <table:table-cell table:style-name="ce46" table:formula="of:=['Plantation example'.$D$4]/(1+['Plantation example'.$C$42])^[.DP8]" office:value-type="currency" office:currency="USD" office:value="67.1556754073981" calcext:value-type="currency">
            <text:p>$67</text:p>
          </table:table-cell>
          <table:table-cell table:style-name="ce46" table:formula="of:=['Plantation example'.$D$4]/(1+['Plantation example'.$C$42])^[.DQ8]" office:value-type="currency" office:currency="USD" office:value="65.1996848615515" calcext:value-type="currency">
            <text:p>$65</text:p>
          </table:table-cell>
          <table:table-cell table:style-name="ce46" table:formula="of:=['Plantation example'.$D$4]/(1+['Plantation example'.$C$42])^[.DR8]" office:value-type="currency" office:currency="USD" office:value="63.3006649141277" calcext:value-type="currency">
            <text:p>$63</text:p>
          </table:table-cell>
          <table:table-cell table:style-name="ce46" table:formula="of:=['Plantation example'.$D$4]/(1+['Plantation example'.$C$42])^[.DS8]" office:value-type="currency" office:currency="USD" office:value="61.4569562273084" calcext:value-type="currency">
            <text:p>$61</text:p>
          </table:table-cell>
          <table:table-cell table:style-name="ce46" table:formula="of:=['Plantation example'.$D$4]/(1+['Plantation example'.$C$42])^[.DT8]" office:value-type="currency" office:currency="USD" office:value="59.6669477935033" calcext:value-type="currency">
            <text:p>$60</text:p>
          </table:table-cell>
          <table:table-cell table:style-name="ce46" table:formula="of:=['Plantation example'.$D$4]/(1+['Plantation example'.$C$42])^[.DU8]" office:value-type="currency" office:currency="USD" office:value="57.9290755276731" calcext:value-type="currency">
            <text:p>$58</text:p>
          </table:table-cell>
          <table:table-cell table:style-name="ce46" table:formula="of:=['Plantation example'.$D$4]/(1+['Plantation example'.$C$42])^[.DV8]" office:value-type="currency" office:currency="USD" office:value="56.2418209006535" calcext:value-type="currency">
            <text:p>$56</text:p>
          </table:table-cell>
          <table:table-cell table:style-name="ce46" table:formula="of:=['Plantation example'.$D$4]/(1+['Plantation example'.$C$42])^[.DW8]" office:value-type="currency" office:currency="USD" office:value="54.603709612285" calcext:value-type="currency">
            <text:p>$55</text:p>
          </table:table-cell>
          <table:table-cell table:style-name="ce46" table:formula="of:=['Plantation example'.$D$4]/(1+['Plantation example'.$C$42])^[.DX8]" office:value-type="currency" office:currency="USD" office:value="53.0133103031893" calcext:value-type="currency">
            <text:p>$53</text:p>
          </table:table-cell>
          <table:table-cell table:style-name="ce46" table:formula="of:=['Plantation example'.$D$4]/(1+['Plantation example'.$C$42])^[.DY8]" office:value-type="currency" office:currency="USD" office:value="51.4692333040673" calcext:value-type="currency">
            <text:p>$51</text:p>
          </table:table-cell>
          <table:table-cell table:style-name="ce46" table:formula="of:=['Plantation example'.$D$4]/(1+['Plantation example'.$C$42])^[.DZ8]" office:value-type="currency" office:currency="USD" office:value="49.9701294214245" calcext:value-type="currency">
            <text:p>$50</text:p>
          </table:table-cell>
          <table:table-cell table:style-name="ce46" table:formula="of:=['Plantation example'.$D$4]/(1+['Plantation example'.$C$42])^[.EA8]" office:value-type="currency" office:currency="USD" office:value="48.5146887586646" calcext:value-type="currency">
            <text:p>$49</text:p>
          </table:table-cell>
          <table:table-cell table:style-name="ce46" table:formula="of:=['Plantation example'.$D$4]/(1+['Plantation example'.$C$42])^[.EB8]" office:value-type="currency" office:currency="USD" office:value="47.101639571519" calcext:value-type="currency">
            <text:p>$47</text:p>
          </table:table-cell>
          <table:table-cell table:style-name="ce46" table:formula="of:=['Plantation example'.$D$4]/(1+['Plantation example'.$C$42])^[.EC8]" office:value-type="currency" office:currency="USD" office:value="45.7297471568146" calcext:value-type="currency">
            <text:p>$46</text:p>
          </table:table-cell>
          <table:table-cell table:style-name="ce46" table:formula="of:=['Plantation example'.$D$4]/(1+['Plantation example'.$C$42])^[.ED8]" office:value-type="currency" office:currency="USD" office:value="44.3978127736064" calcext:value-type="currency">
            <text:p>$44</text:p>
          </table:table-cell>
          <table:table-cell table:style-name="ce46" table:formula="of:=['Plantation example'.$D$4]/(1+['Plantation example'.$C$42])^[.EE8]" office:value-type="currency" office:currency="USD" office:value="43.1046725957344" calcext:value-type="currency">
            <text:p>$43</text:p>
          </table:table-cell>
          <table:table-cell table:style-name="ce46" table:formula="of:=['Plantation example'.$D$4]/(1+['Plantation example'.$C$42])^[.EF8]" office:value-type="currency" office:currency="USD" office:value="41.8491966948877" calcext:value-type="currency">
            <text:p>$42</text:p>
          </table:table-cell>
          <table:table-cell table:style-name="ce46" table:formula="of:=['Plantation example'.$D$4]/(1+['Plantation example'.$C$42])^[.EG8]" office:value-type="currency" office:currency="USD" office:value="40.6302880532891" calcext:value-type="currency">
            <text:p>$41</text:p>
          </table:table-cell>
          <table:table-cell table:style-name="ce46" table:formula="of:=['Plantation example'.$D$4]/(1+['Plantation example'.$C$42])^[.EH8]" office:value-type="currency" office:currency="USD" office:value="39.446881605135" calcext:value-type="currency">
            <text:p>$39</text:p>
          </table:table-cell>
          <table:table-cell table:style-name="ce46" table:formula="of:=['Plantation example'.$D$4]/(1+['Plantation example'.$C$42])^[.EI8]" office:value-type="currency" office:currency="USD" office:value="38.2979433059563" calcext:value-type="currency">
            <text:p>$38</text:p>
          </table:table-cell>
          <table:table-cell table:style-name="ce46" table:formula="of:=['Plantation example'.$D$4]/(1+['Plantation example'.$C$42])^[.EJ8]" office:value-type="currency" office:currency="USD" office:value="37.1824692290838" calcext:value-type="currency">
            <text:p>$37</text:p>
          </table:table-cell>
          <table:table-cell table:style-name="ce46" table:formula="of:=['Plantation example'.$D$4]/(1+['Plantation example'.$C$42])^[.EK8]" office:value-type="currency" office:currency="USD" office:value="36.0994846884309" calcext:value-type="currency">
            <text:p>$36</text:p>
          </table:table-cell>
          <table:table-cell table:style-name="ce46" table:formula="of:=['Plantation example'.$D$4]/(1+['Plantation example'.$C$42])^[.EL8]" office:value-type="currency" office:currency="USD" office:value="35.0480433868261" calcext:value-type="currency">
            <text:p>$35</text:p>
          </table:table-cell>
          <table:table-cell table:style-name="ce46" table:formula="of:=['Plantation example'.$D$4]/(1+['Plantation example'.$C$42])^[.EM8]" office:value-type="currency" office:currency="USD" office:value="34.0272265891515" calcext:value-type="currency">
            <text:p>$34</text:p>
          </table:table-cell>
          <table:table-cell table:style-name="ce46" table:formula="of:=['Plantation example'.$D$4]/(1+['Plantation example'.$C$42])^[.EN8]" office:value-type="currency" office:currency="USD" office:value="33.0361423195646" calcext:value-type="currency">
            <text:p>$33</text:p>
          </table:table-cell>
          <table:table-cell table:style-name="ce46" table:formula="of:=['Plantation example'.$D$4]/(1+['Plantation example'.$C$42])^[.EO8]" office:value-type="currency" office:currency="USD" office:value="32.0739245821016" calcext:value-type="currency">
            <text:p>$32</text:p>
          </table:table-cell>
          <table:table-cell table:style-name="ce46" table:formula="of:=['Plantation example'.$D$4]/(1+['Plantation example'.$C$42])^[.EP8]" office:value-type="currency" office:currency="USD" office:value="31.1397326039821" calcext:value-type="currency">
            <text:p>$31</text:p>
          </table:table-cell>
          <table:table-cell table:style-name="ce46" table:formula="of:=['Plantation example'.$D$4]/(1+['Plantation example'.$C$42])^[.EQ8]" office:value-type="currency" office:currency="USD" office:value="30.2327501009535" calcext:value-type="currency">
            <text:p>$30</text:p>
          </table:table-cell>
          <table:table-cell table:style-name="ce46" table:formula="of:=['Plantation example'.$D$4]/(1+['Plantation example'.$C$42])^[.ER8]" office:value-type="currency" office:currency="USD" office:value="29.3521845640325" calcext:value-type="currency">
            <text:p>$29</text:p>
          </table:table-cell>
          <table:table-cell table:style-name="ce46" table:formula="of:=['Plantation example'.$D$4]/(1+['Plantation example'.$C$42])^[.ES8]" office:value-type="currency" office:currency="USD" office:value="28.4972665670219" calcext:value-type="currency">
            <text:p>$28</text:p>
          </table:table-cell>
          <table:table-cell table:style-name="ce46" table:formula="of:=['Plantation example'.$D$4]/(1+['Plantation example'.$C$42])^[.ET8]" office:value-type="currency" office:currency="USD" office:value="27.667249094196" calcext:value-type="currency">
            <text:p>$28</text:p>
          </table:table-cell>
          <table:table-cell table:style-name="ce46" table:formula="of:=['Plantation example'.$D$4]/(1+['Plantation example'.$C$42])^[.EU8]" office:value-type="currency" office:currency="USD" office:value="26.8614068875689" calcext:value-type="currency">
            <text:p>$27</text:p>
          </table:table-cell>
          <table:table-cell table:style-name="ce46" table:formula="of:=['Plantation example'.$D$4]/(1+['Plantation example'.$C$42])^[.EV8]" office:value-type="currency" office:currency="USD" office:value="26.0790358131737" calcext:value-type="currency">
            <text:p>$26</text:p>
          </table:table-cell>
          <table:table-cell table:style-name="ce46" table:formula="of:=['Plantation example'.$D$4]/(1+['Plantation example'.$C$42])^[.EW8]" office:value-type="currency" office:currency="USD" office:value="25.3194522457997" calcext:value-type="currency">
            <text:p>$25</text:p>
          </table:table-cell>
          <table:table-cell table:style-name="ce46" table:formula="of:=['Plantation example'.$D$4]/(1+['Plantation example'.$C$42])^[.EX8]" office:value-type="currency" office:currency="USD" office:value="24.5819924716502" calcext:value-type="currency">
            <text:p>$25</text:p>
          </table:table-cell>
          <table:table-cell table:style-name="ce46" table:formula="of:=['Plantation example'.$D$4]/(1+['Plantation example'.$C$42])^[.EY8]" office:value-type="currency" office:currency="USD" office:value="23.8660121083982" calcext:value-type="currency">
            <text:p>$24</text:p>
          </table:table-cell>
          <table:table-cell table:style-name="ce46" table:formula="of:=['Plantation example'.$D$4]/(1+['Plantation example'.$C$42])^[.EZ8]" office:value-type="currency" office:currency="USD" office:value="23.1708855421342" calcext:value-type="currency">
            <text:p>$23</text:p>
          </table:table-cell>
          <table:table-cell table:style-name="ce46" table:formula="of:=['Plantation example'.$D$4]/(1+['Plantation example'.$C$42])^[.FA8]" office:value-type="currency" office:currency="USD" office:value="22.4960053807128" calcext:value-type="currency">
            <text:p>$22</text:p>
          </table:table-cell>
          <table:table-cell table:style-name="ce46" table:formula="of:=['Plantation example'.$D$4]/(1+['Plantation example'.$C$42])^[.FB8]" office:value-type="currency" office:currency="USD" office:value="21.8407819230222" calcext:value-type="currency">
            <text:p>$22</text:p>
          </table:table-cell>
          <table:table-cell table:style-name="ce46" table:formula="of:=['Plantation example'.$D$4]/(1+['Plantation example'.$C$42])^[.FC8]" office:value-type="currency" office:currency="USD" office:value="21.2046426437108" calcext:value-type="currency">
            <text:p>$21</text:p>
          </table:table-cell>
          <table:table-cell table:style-name="ce46" table:formula="of:=['Plantation example'.$D$4]/(1+['Plantation example'.$C$42])^[.FD8]" office:value-type="currency" office:currency="USD" office:value="20.5870316929231" calcext:value-type="currency">
            <text:p>$21</text:p>
          </table:table-cell>
          <table:table-cell table:style-name="ce46" table:formula="of:=['Plantation example'.$D$4]/(1+['Plantation example'.$C$42])^[.FE8]" office:value-type="currency" office:currency="USD" office:value="19.987409410605" calcext:value-type="currency">
            <text:p>$20</text:p>
          </table:table-cell>
          <table:table-cell table:style-name="ce46" table:formula="of:=['Plantation example'.$D$4]/(1+['Plantation example'.$C$42])^[.FF8]" office:value-type="currency" office:currency="USD" office:value="19.4052518549563" calcext:value-type="currency">
            <text:p>$19</text:p>
          </table:table-cell>
          <table:table-cell table:style-name="ce46" table:formula="of:=['Plantation example'.$D$4]/(1+['Plantation example'.$C$42])^[.FG8]" office:value-type="currency" office:currency="USD" office:value="18.8400503446178" calcext:value-type="currency">
            <text:p>$19</text:p>
          </table:table-cell>
          <table:table-cell table:style-name="ce46" table:formula="of:=['Plantation example'.$D$4]/(1+['Plantation example'.$C$42])^[.FH8]" office:value-type="currency" office:currency="USD" office:value="18.291311014192" calcext:value-type="currency">
            <text:p>$18</text:p>
          </table:table-cell>
          <table:table-cell table:style-name="ce46" table:formula="of:=['Plantation example'.$D$4]/(1+['Plantation example'.$C$42])^[.FI8]" office:value-type="currency" office:currency="USD" office:value="17.7585543827107" calcext:value-type="currency">
            <text:p>$18</text:p>
          </table:table-cell>
          <table:table-cell table:style-name="ce46" table:formula="of:=['Plantation example'.$D$4]/(1+['Plantation example'.$C$42])^[.FJ8]" office:value-type="currency" office:currency="USD" office:value="17.2413149346706" calcext:value-type="currency">
            <text:p>$17</text:p>
          </table:table-cell>
          <table:table-cell table:style-name="ce46" table:formula="of:=['Plantation example'.$D$4]/(1+['Plantation example'.$C$42])^[.FK8]" office:value-type="currency" office:currency="USD" office:value="16.7391407132724" calcext:value-type="currency">
            <text:p>$17</text:p>
          </table:table-cell>
          <table:table-cell table:style-name="ce46" table:formula="of:=['Plantation example'.$D$4]/(1+['Plantation example'.$C$42])^[.FL8]" office:value-type="currency" office:currency="USD" office:value="16.2515929255072" calcext:value-type="currency">
            <text:p>$16</text:p>
          </table:table-cell>
          <table:table-cell table:style-name="ce46" table:formula="of:=['Plantation example'.$D$4]/(1+['Plantation example'.$C$42])^[.FM8]" office:value-type="currency" office:currency="USD" office:value="15.7782455587448" calcext:value-type="currency">
            <text:p>$16</text:p>
          </table:table-cell>
          <table:table-cell table:style-name="ce46" table:formula="of:=['Plantation example'.$D$4]/(1+['Plantation example'.$C$42])^[.FN8]" office:value-type="currency" office:currency="USD" office:value="15.3186850084901" calcext:value-type="currency">
            <text:p>$15</text:p>
          </table:table-cell>
          <table:table-cell table:style-name="ce46" table:formula="of:=['Plantation example'.$D$4]/(1+['Plantation example'.$C$42])^[.FO8]" office:value-type="currency" office:currency="USD" office:value="14.8725097169807" calcext:value-type="currency">
            <text:p>$15</text:p>
          </table:table-cell>
          <table:table-cell table:style-name="ce46" table:formula="of:=['Plantation example'.$D$4]/(1+['Plantation example'.$C$42])^[.FP8]" office:value-type="currency" office:currency="USD" office:value="14.4393298223114" calcext:value-type="currency">
            <text:p>$14</text:p>
          </table:table-cell>
          <table:table-cell table:style-name="ce46" table:formula="of:=['Plantation example'.$D$4]/(1+['Plantation example'.$C$42])^[.FQ8]" office:value-type="currency" office:currency="USD" office:value="14.018766817778" calcext:value-type="currency">
            <text:p>$14</text:p>
          </table:table-cell>
          <table:table-cell table:style-name="ce46" table:formula="of:=['Plantation example'.$D$4]/(1+['Plantation example'.$C$42])^[.FR8]" office:value-type="currency" office:currency="USD" office:value="13.6104532211437" calcext:value-type="currency">
            <text:p>$14</text:p>
          </table:table-cell>
          <table:table-cell table:style-name="ce46" table:formula="of:=['Plantation example'.$D$4]/(1+['Plantation example'.$C$42])^[.FS8]" office:value-type="currency" office:currency="USD" office:value="13.2140322535376" calcext:value-type="currency">
            <text:p>$13</text:p>
          </table:table-cell>
          <table:table-cell table:style-name="ce46" table:formula="of:=['Plantation example'.$D$4]/(1+['Plantation example'.$C$42])^[.FT8]" office:value-type="currency" office:currency="USD" office:value="12.8291575277064" calcext:value-type="currency">
            <text:p>$13</text:p>
          </table:table-cell>
          <table:table-cell table:style-name="ce46" table:formula="of:=['Plantation example'.$D$4]/(1+['Plantation example'.$C$42])^[.FU8]" office:value-type="currency" office:currency="USD" office:value="12.455492745346" calcext:value-type="currency">
            <text:p>$12</text:p>
          </table:table-cell>
          <table:table-cell table:style-name="ce46" table:formula="of:=['Plantation example'.$D$4]/(1+['Plantation example'.$C$42])^[.FV8]" office:value-type="currency" office:currency="USD" office:value="12.0927114032486" calcext:value-type="currency">
            <text:p>$12</text:p>
          </table:table-cell>
          <table:table-cell table:style-name="ce46" table:formula="of:=['Plantation example'.$D$4]/(1+['Plantation example'.$C$42])^[.FW8]" office:value-type="currency" office:currency="USD" office:value="11.7404965080083" calcext:value-type="currency">
            <text:p>$12</text:p>
          </table:table-cell>
          <table:table-cell table:style-name="ce46" table:formula="of:=['Plantation example'.$D$4]/(1+['Plantation example'.$C$42])^[.FX8]" office:value-type="currency" office:currency="USD" office:value="11.3985402990372" calcext:value-type="currency">
            <text:p>$11</text:p>
          </table:table-cell>
          <table:table-cell table:style-name="ce46" table:formula="of:=['Plantation example'.$D$4]/(1+['Plantation example'.$C$42])^[.FY8]" office:value-type="currency" office:currency="USD" office:value="11.0665439796478" calcext:value-type="currency">
            <text:p>$11</text:p>
          </table:table-cell>
          <table:table-cell table:style-name="ce46" table:formula="of:=['Plantation example'.$D$4]/(1+['Plantation example'.$C$42])^[.FZ8]" office:value-type="currency" office:currency="USD" office:value="10.7442174559687" calcext:value-type="currency">
            <text:p>$11</text:p>
          </table:table-cell>
          <table:table-cell table:style-name="ce46" table:formula="of:=['Plantation example'.$D$4]/(1+['Plantation example'.$C$42])^[.GA8]" office:value-type="currency" office:currency="USD" office:value="10.4312790834648" calcext:value-type="currency">
            <text:p>$10</text:p>
          </table:table-cell>
          <table:table-cell table:style-name="ce46" table:formula="of:=['Plantation example'.$D$4]/(1+['Plantation example'.$C$42])^[.GB8]" office:value-type="currency" office:currency="USD" office:value="10.1274554208396" calcext:value-type="currency">
            <text:p>$10</text:p>
          </table:table-cell>
          <table:table-cell table:style-name="ce46" table:formula="of:=['Plantation example'.$D$4]/(1+['Plantation example'.$C$42])^[.GC8]" office:value-type="currency" office:currency="USD" office:value="9.83248099110638" calcext:value-type="currency">
            <text:p>$10</text:p>
          </table:table-cell>
          <table:table-cell table:style-name="ce46" table:formula="of:=['Plantation example'.$D$4]/(1+['Plantation example'.$C$42])^[.GD8]" office:value-type="currency" office:currency="USD" office:value="9.54609804961784" calcext:value-type="currency">
            <text:p>$10</text:p>
          </table:table-cell>
          <table:table-cell table:style-name="ce46" table:formula="of:=['Plantation example'.$D$4]/(1+['Plantation example'.$C$42])^[.GE8]" office:value-type="currency" office:currency="USD" office:value="9.26805635885227" calcext:value-type="currency">
            <text:p>$9</text:p>
          </table:table-cell>
          <table:table-cell table:style-name="ce46" table:formula="of:=['Plantation example'.$D$4]/(1+['Plantation example'.$C$42])^[.GF8]" office:value-type="currency" office:currency="USD" office:value="8.99811296975949" calcext:value-type="currency">
            <text:p>$9</text:p>
          </table:table-cell>
          <table:table-cell table:style-name="ce46" table:formula="of:=['Plantation example'.$D$4]/(1+['Plantation example'.$C$42])^[.GG8]" office:value-type="currency" office:currency="USD" office:value="8.73603200947523" calcext:value-type="currency">
            <text:p>$9</text:p>
          </table:table-cell>
          <table:table-cell table:style-name="ce46" table:formula="of:=['Plantation example'.$D$4]/(1+['Plantation example'.$C$42])^[.GH8]" office:value-type="currency" office:currency="USD" office:value="8.48158447521867" calcext:value-type="currency">
            <text:p>$8</text:p>
          </table:table-cell>
          <table:table-cell table:style-name="ce46" table:formula="of:=['Plantation example'.$D$4]/(1+['Plantation example'.$C$42])^[.GI8]" office:value-type="currency" office:currency="USD" office:value="8.23454803419289" calcext:value-type="currency">
            <text:p>$8</text:p>
          </table:table-cell>
          <table:table-cell table:style-name="ce46" table:formula="of:=['Plantation example'.$D$4]/(1+['Plantation example'.$C$42])^[.GJ8]" office:value-type="currency" office:currency="USD" office:value="7.99470682931348" calcext:value-type="currency">
            <text:p>$8</text:p>
          </table:table-cell>
          <table:table-cell table:style-name="ce46" table:formula="of:=['Plantation example'.$D$4]/(1+['Plantation example'.$C$42])^[.GK8]" office:value-type="currency" office:currency="USD" office:value="7.76185129059561" calcext:value-type="currency">
            <text:p>$8</text:p>
          </table:table-cell>
          <table:table-cell table:style-name="ce46" table:formula="of:=['Plantation example'.$D$4]/(1+['Plantation example'.$C$42])^[.GL8]" office:value-type="currency" office:currency="USD" office:value="7.53577795203457" calcext:value-type="currency">
            <text:p>$8</text:p>
          </table:table-cell>
          <table:table-cell table:style-name="ce46" table:formula="of:=['Plantation example'.$D$4]/(1+['Plantation example'.$C$42])^[.GM8]" office:value-type="currency" office:currency="USD" office:value="7.31628927381998" calcext:value-type="currency">
            <text:p>$7</text:p>
          </table:table-cell>
          <table:table-cell table:style-name="ce46" table:formula="of:=['Plantation example'.$D$4]/(1+['Plantation example'.$C$42])^[.GN8]" office:value-type="currency" office:currency="USD" office:value="7.10319346972813" calcext:value-type="currency">
            <text:p>$7</text:p>
          </table:table-cell>
          <table:table-cell table:style-name="ce46" table:formula="of:=['Plantation example'.$D$4]/(1+['Plantation example'.$C$42])^[.GO8]" office:value-type="currency" office:currency="USD" office:value="6.89630433954188" calcext:value-type="currency">
            <text:p>$7</text:p>
          </table:table-cell>
          <table:table-cell table:style-name="ce46" table:formula="of:=['Plantation example'.$D$4]/(1+['Plantation example'.$C$42])^[.GP8]" office:value-type="currency" office:currency="USD" office:value="6.69544110635133" calcext:value-type="currency">
            <text:p>$7</text:p>
          </table:table-cell>
          <table:table-cell table:style-name="ce46" table:formula="of:=['Plantation example'.$D$4]/(1+['Plantation example'.$C$42])^[.GQ8]" office:value-type="currency" office:currency="USD" office:value="6.50042825859353" calcext:value-type="currency">
            <text:p>$7</text:p>
          </table:table-cell>
          <table:table-cell table:style-name="ce46" table:formula="of:=['Plantation example'.$D$4]/(1+['Plantation example'.$C$42])^[.GR8]" office:value-type="currency" office:currency="USD" office:value="6.31109539669275" calcext:value-type="currency">
            <text:p>$6</text:p>
          </table:table-cell>
          <table:table-cell table:style-name="ce47" table:number-columns-repeated="52"/>
          <table:table-cell table:number-columns-repeated="43"/>
          <table:table-cell table:style-name="Default" table:number-columns-repeated="16089"/>
        </table:table-row>
        <table:table-row table:style-name="ro1">
          <table:table-cell office:value-type="string" calcext:value-type="string">
            <text:p>Bid score: 10^6*W[forestry,u]/bid</text:p>
          </table:table-cell>
          <table:table-cell table:style-name="ce36" table:formula="of:=1000000*[.B10]/[.B11]" office:value-type="float" office:value="0" calcext:value-type="float">
            <text:p>0.00</text:p>
          </table:table-cell>
          <table:table-cell table:style-name="ce36" table:formula="of:=1000000*[.C10]/[.C11]" office:value-type="float" office:value="0.0434841231140755" calcext:value-type="float">
            <text:p>0.04</text:p>
          </table:table-cell>
          <table:table-cell table:style-name="ce36" table:formula="of:=1000000*[.D10]/[.D11]" office:value-type="float" office:value="0.128293451384645" calcext:value-type="float">
            <text:p>0.13</text:p>
          </table:table-cell>
          <table:table-cell table:style-name="ce36" table:formula="of:=1000000*[.E10]/[.E11]" office:value-type="float" office:value="0.254302375622087" calcext:value-type="float">
            <text:p>0.25</text:p>
          </table:table-cell>
          <table:table-cell table:style-name="ce36" table:formula="of:=1000000*[.F10]/[.F11]" office:value-type="float" office:value="0.419372035089943" calcext:value-type="float">
            <text:p>0.42</text:p>
          </table:table-cell>
          <table:table-cell table:style-name="ce36" table:formula="of:=1000000*[.G10]/[.G11]" office:value-type="float" office:value="0.622700154814239" calcext:value-type="float">
            <text:p>0.62</text:p>
          </table:table-cell>
          <table:table-cell table:style-name="ce36" table:formula="of:=1000000*[.H10]/[.H11]" office:value-type="float" office:value="0.864293506580569" calcext:value-type="float">
            <text:p>0.86</text:p>
          </table:table-cell>
          <table:table-cell table:style-name="ce36" table:formula="of:=1000000*[.I10]/[.I11]" office:value-type="float" office:value="1.14442940477025" calcext:value-type="float">
            <text:p>1.14</text:p>
          </table:table-cell>
          <table:table-cell table:style-name="ce36" table:formula="of:=1000000*[.J10]/[.J11]" office:value-type="float" office:value="1.4633583683747" calcext:value-type="float">
            <text:p>1.46</text:p>
          </table:table-cell>
          <table:table-cell table:style-name="ce36" table:formula="of:=1000000*[.K10]/[.K11]" office:value-type="float" office:value="1.82158325132692" calcext:value-type="float">
            <text:p>1.82</text:p>
          </table:table-cell>
          <table:table-cell table:style-name="ce36" table:formula="of:=1000000*[.L10]/[.L11]" office:value-type="float" office:value="2.21935177049875" calcext:value-type="float">
            <text:p>2.22</text:p>
          </table:table-cell>
          <table:table-cell table:style-name="ce36" table:formula="of:=1000000*[.M10]/[.M11]" office:value-type="float" office:value="2.65699270105385" calcext:value-type="float">
            <text:p>2.66</text:p>
          </table:table-cell>
          <table:table-cell table:style-name="ce36" table:formula="of:=1000000*[.N10]/[.N11]" office:value-type="float" office:value="3.13498311136694" calcext:value-type="float">
            <text:p>3.13</text:p>
          </table:table-cell>
          <table:table-cell table:style-name="ce36" table:formula="of:=1000000*[.O10]/[.O11]" office:value-type="float" office:value="3.65356839440095" calcext:value-type="float">
            <text:p>3.65</text:p>
          </table:table-cell>
          <table:table-cell table:style-name="ce36" table:formula="of:=1000000*[.P10]/[.P11]" office:value-type="float" office:value="4.21315748232059" calcext:value-type="float">
            <text:p>4.21</text:p>
          </table:table-cell>
          <table:table-cell table:style-name="ce36" table:formula="of:=1000000*[.Q10]/[.Q11]" office:value-type="float" office:value="4.81426865345476" calcext:value-type="float">
            <text:p>4.81</text:p>
          </table:table-cell>
          <table:table-cell table:style-name="ce36" table:formula="of:=1000000*[.R10]/[.R11]" office:value-type="float" office:value="5.45742645876966" calcext:value-type="float">
            <text:p>5.46</text:p>
          </table:table-cell>
          <table:table-cell table:style-name="ce36" table:formula="of:=1000000*[.S10]/[.S11]" office:value-type="float" office:value="6.1427745695837" calcext:value-type="float">
            <text:p>6.14</text:p>
          </table:table-cell>
          <table:table-cell table:style-name="ce36" table:formula="of:=1000000*[.T10]/[.T11]" office:value-type="float" office:value="6.87073268053519" calcext:value-type="float">
            <text:p>6.87</text:p>
          </table:table-cell>
          <table:table-cell table:style-name="ce36" table:formula="of:=1000000*[.U10]/[.U11]" office:value-type="float" office:value="7.64202967313614" calcext:value-type="float">
            <text:p>7.64</text:p>
          </table:table-cell>
          <table:table-cell table:style-name="ce36" table:formula="of:=1000000*[.V10]/[.V11]" office:value-type="float" office:value="8.45710244351845" calcext:value-type="float">
            <text:p>8.46</text:p>
          </table:table-cell>
          <table:table-cell table:style-name="ce36" table:formula="of:=1000000*[.W10]/[.W11]" office:value-type="float" office:value="9.31624690922156" calcext:value-type="float">
            <text:p>9.32</text:p>
          </table:table-cell>
          <table:table-cell table:style-name="ce36" table:formula="of:=1000000*[.X10]/[.X11]" office:value-type="float" office:value="10.2201985138254" calcext:value-type="float">
            <text:p>10.22</text:p>
          </table:table-cell>
          <table:table-cell table:style-name="ce36" table:formula="of:=1000000*[.Y10]/[.Y11]" office:value-type="float" office:value="11.1696176145268" calcext:value-type="float">
            <text:p>11.17</text:p>
          </table:table-cell>
          <table:table-cell table:style-name="ce36" table:formula="of:=1000000*[.Z10]/[.Z11]" office:value-type="float" office:value="12.1649754168535" calcext:value-type="float">
            <text:p>12.16</text:p>
          </table:table-cell>
          <table:table-cell table:style-name="ce36" table:formula="of:=1000000*[.AA10]/[.AA11]" office:value-type="float" office:value="13.2069462696979" calcext:value-type="float">
            <text:p>13.21</text:p>
          </table:table-cell>
          <table:table-cell table:style-name="ce36" table:formula="of:=1000000*[.AB10]/[.AB11]" office:value-type="float" office:value="14.2961987360494" calcext:value-type="float">
            <text:p>14.30</text:p>
          </table:table-cell>
          <table:table-cell table:style-name="ce36" table:formula="of:=1000000*[.AC10]/[.AC11]" office:value-type="float" office:value="15.4334579990272" calcext:value-type="float">
            <text:p>15.43</text:p>
          </table:table-cell>
          <table:table-cell table:style-name="ce36" table:formula="of:=1000000*[.AD10]/[.AD11]" office:value-type="float" office:value="16.6194840969752" calcext:value-type="float">
            <text:p>16.62</text:p>
          </table:table-cell>
          <table:table-cell table:style-name="ce36" table:formula="of:=1000000*[.AE10]/[.AE11]" office:value-type="float" office:value="17.8553332038234" calcext:value-type="float">
            <text:p>17.86</text:p>
          </table:table-cell>
          <table:table-cell table:style-name="ce36" table:formula="of:=1000000*[.AF10]/[.AF11]" office:value-type="float" office:value="19.1419092181758" calcext:value-type="float">
            <text:p>19.14</text:p>
          </table:table-cell>
          <table:table-cell table:style-name="ce36" table:formula="of:=1000000*[.AG10]/[.AG11]" office:value-type="float" office:value="20.4801196441495" calcext:value-type="float">
            <text:p>20.48</text:p>
          </table:table-cell>
          <table:table-cell table:style-name="ce36" table:formula="of:=1000000*[.AH10]/[.AH11]" office:value-type="float" office:value="21.8709427351131" calcext:value-type="float">
            <text:p>21.87</text:p>
          </table:table-cell>
          <table:table-cell table:style-name="ce36" table:formula="of:=1000000*[.AI10]/[.AI11]" office:value-type="float" office:value="23.3150621566831" calcext:value-type="float">
            <text:p>23.32</text:p>
          </table:table-cell>
          <table:table-cell table:style-name="ce36" table:formula="of:=1000000*[.AJ10]/[.AJ11]" office:value-type="float" office:value="24.8146383318739" calcext:value-type="float">
            <text:p>24.81</text:p>
          </table:table-cell>
          <table:table-cell table:style-name="ce36" table:formula="of:=1000000*[.AK10]/[.AK11]" office:value-type="float" office:value="26.3704922334655" calcext:value-type="float">
            <text:p>26.37</text:p>
          </table:table-cell>
          <table:table-cell table:style-name="ce36" table:formula="of:=1000000*[.AL10]/[.AL11]" office:value-type="float" office:value="27.9837944916201" calcext:value-type="float">
            <text:p>27.98</text:p>
          </table:table-cell>
          <table:table-cell table:style-name="ce36" table:formula="of:=1000000*[.AM10]/[.AM11]" office:value-type="float" office:value="29.6557933039596" calcext:value-type="float">
            <text:p>29.66</text:p>
          </table:table-cell>
          <table:table-cell table:style-name="ce36" table:formula="of:=1000000*[.AN10]/[.AN11]" office:value-type="float" office:value="31.3874306636305" calcext:value-type="float">
            <text:p>31.39</text:p>
          </table:table-cell>
          <table:table-cell table:style-name="ce36" table:formula="of:=1000000*[.AO10]/[.AO11]" office:value-type="float" office:value="33.1806510008613" calcext:value-type="float">
            <text:p>33.18</text:p>
          </table:table-cell>
          <table:table-cell table:style-name="ce36" table:formula="of:=1000000*[.AP10]/[.AP11]" office:value-type="float" office:value="35.0363394839181" calcext:value-type="float">
            <text:p>35.04</text:p>
          </table:table-cell>
          <table:table-cell table:style-name="ce36" table:formula="of:=1000000*[.AQ10]/[.AQ11]" office:value-type="float" office:value="36.9556120434166" calcext:value-type="float">
            <text:p>36.96</text:p>
          </table:table-cell>
          <table:table-cell table:style-name="ce36" table:formula="of:=1000000*[.AR10]/[.AR11]" office:value-type="float" office:value="38.9392829954459" calcext:value-type="float">
            <text:p>38.94</text:p>
          </table:table-cell>
          <table:table-cell table:style-name="ce36" table:formula="of:=1000000*[.AS10]/[.AS11]" office:value-type="float" office:value="40.9897926991946" calcext:value-type="float">
            <text:p>40.99</text:p>
          </table:table-cell>
          <table:table-cell table:style-name="ce36" table:formula="of:=1000000*[.AT10]/[.AT11]" office:value-type="float" office:value="43.1083597584601" calcext:value-type="float">
            <text:p>43.11</text:p>
          </table:table-cell>
          <table:table-cell table:style-name="ce36" table:formula="of:=1000000*[.AU10]/[.AU11]" office:value-type="float" office:value="45.2965743888148" calcext:value-type="float">
            <text:p>45.30</text:p>
          </table:table-cell>
          <table:table-cell table:style-name="ce36" table:formula="of:=1000000*[.AV10]/[.AV11]" office:value-type="float" office:value="47.5572855453518" calcext:value-type="float">
            <text:p>47.56</text:p>
          </table:table-cell>
          <table:table-cell table:style-name="ce36" table:formula="of:=1000000*[.AW10]/[.AW11]" office:value-type="float" office:value="49.8911391470435" calcext:value-type="float">
            <text:p>49.89</text:p>
          </table:table-cell>
          <table:table-cell table:style-name="ce36" table:formula="of:=1000000*[.AX10]/[.AX11]" office:value-type="float" office:value="52.301140780129" calcext:value-type="float">
            <text:p>52.30</text:p>
          </table:table-cell>
          <table:table-cell table:style-name="ce36" table:formula="of:=1000000*[.AY10]/[.AY11]" office:value-type="float" office:value="54.7894430764855" calcext:value-type="float">
            <text:p>54.79</text:p>
          </table:table-cell>
          <table:table-cell table:style-name="ce36" table:formula="of:=1000000*[.AZ10]/[.AZ11]" office:value-type="float" office:value="57.3572760085608" calcext:value-type="float">
            <text:p>57.36</text:p>
          </table:table-cell>
          <table:table-cell table:style-name="ce36" table:formula="of:=1000000*[.BA10]/[.BA11]" office:value-type="float" office:value="60.0077285060149" calcext:value-type="float">
            <text:p>60.01</text:p>
          </table:table-cell>
          <table:table-cell table:style-name="ce36" table:formula="of:=1000000*[.BB10]/[.BB11]" office:value-type="float" office:value="62.7411761725983" calcext:value-type="float">
            <text:p>62.74</text:p>
          </table:table-cell>
          <table:table-cell table:style-name="ce36" table:formula="of:=1000000*[.BC10]/[.BC11]" office:value-type="float" office:value="65.5614522271803" calcext:value-type="float">
            <text:p>65.56</text:p>
          </table:table-cell>
          <table:table-cell table:style-name="ce36" table:formula="of:=1000000*[.BD10]/[.BD11]" office:value-type="float" office:value="68.4704736929178" calcext:value-type="float">
            <text:p>68.47</text:p>
          </table:table-cell>
          <table:table-cell table:style-name="ce36" table:formula="of:=1000000*[.BE10]/[.BE11]" office:value-type="float" office:value="71.471668235692" calcext:value-type="float">
            <text:p>71.47</text:p>
          </table:table-cell>
          <table:table-cell table:style-name="ce36" table:formula="of:=1000000*[.BF10]/[.BF11]" office:value-type="float" office:value="74.5682647369172" calcext:value-type="float">
            <text:p>74.57</text:p>
          </table:table-cell>
          <table:table-cell table:style-name="ce36" table:formula="of:=1000000*[.BG10]/[.BG11]" office:value-type="float" office:value="77.762746420687" calcext:value-type="float">
            <text:p>77.76</text:p>
          </table:table-cell>
          <table:table-cell table:style-name="ce36" table:formula="of:=1000000*[.BH10]/[.BH11]" office:value-type="float" office:value="81.0574253331404" calcext:value-type="float">
            <text:p>81.06</text:p>
          </table:table-cell>
          <table:table-cell table:style-name="ce36" table:formula="of:=1000000*[.BI10]/[.BI11]" office:value-type="float" office:value="84.4554164345489" calcext:value-type="float">
            <text:p>84.46</text:p>
          </table:table-cell>
          <table:table-cell table:style-name="ce36" table:formula="of:=1000000*[.BJ10]/[.BJ11]" office:value-type="float" office:value="87.9602182078445" calcext:value-type="float">
            <text:p>87.96</text:p>
          </table:table-cell>
          <table:table-cell table:style-name="ce36" table:formula="of:=1000000*[.BK10]/[.BK11]" office:value-type="float" office:value="91.5743442157673" calcext:value-type="float">
            <text:p>91.57</text:p>
          </table:table-cell>
          <table:table-cell table:style-name="ce36" table:formula="of:=1000000*[.BL10]/[.BL11]" office:value-type="float" office:value="95.3016859871292" calcext:value-type="float">
            <text:p>95.30</text:p>
          </table:table-cell>
          <table:table-cell table:style-name="ce36" table:formula="of:=1000000*[.BM10]/[.BM11]" office:value-type="float" office:value="99.1450925027906" calcext:value-type="float">
            <text:p>99.15</text:p>
          </table:table-cell>
          <table:table-cell table:style-name="ce36" table:formula="of:=1000000*[.BN10]/[.BN11]" office:value-type="float" office:value="103.108401157959" calcext:value-type="float">
            <text:p>103.11</text:p>
          </table:table-cell>
          <table:table-cell table:style-name="ce36" table:formula="of:=1000000*[.BO10]/[.BO11]" office:value-type="float" office:value="107.195239588522" calcext:value-type="float">
            <text:p>107.20</text:p>
          </table:table-cell>
          <table:table-cell table:style-name="ce36" table:formula="of:=1000000*[.BP10]/[.BP11]" office:value-type="float" office:value="111.409588103955" calcext:value-type="float">
            <text:p>111.41</text:p>
          </table:table-cell>
          <table:table-cell table:style-name="ce36" table:formula="of:=1000000*[.BQ10]/[.BQ11]" office:value-type="float" office:value="115.755911140745" calcext:value-type="float">
            <text:p>115.76</text:p>
          </table:table-cell>
          <table:table-cell table:style-name="ce36" table:formula="of:=1000000*[.BR10]/[.BR11]" office:value-type="float" office:value="120.237745329706" calcext:value-type="float">
            <text:p>120.24</text:p>
          </table:table-cell>
          <table:table-cell table:style-name="ce36" table:formula="of:=1000000*[.BS10]/[.BS11]" office:value-type="float" office:value="124.859933555466" calcext:value-type="float">
            <text:p>124.86</text:p>
          </table:table-cell>
          <table:table-cell table:style-name="ce36" table:formula="of:=1000000*[.BT10]/[.BT11]" office:value-type="float" office:value="129.626931746221" calcext:value-type="float">
            <text:p>129.63</text:p>
          </table:table-cell>
          <table:table-cell table:style-name="ce36" table:formula="of:=1000000*[.BU10]/[.BU11]" office:value-type="float" office:value="134.541758182733" calcext:value-type="float">
            <text:p>134.54</text:p>
          </table:table-cell>
          <table:table-cell table:style-name="ce36" table:formula="of:=1000000*[.BV10]/[.BV11]" office:value-type="float" office:value="139.610385125136" calcext:value-type="float">
            <text:p>139.61</text:p>
          </table:table-cell>
          <table:table-cell table:style-name="ce36" table:formula="of:=1000000*[.BW10]/[.BW11]" office:value-type="float" office:value="144.836798760775" calcext:value-type="float">
            <text:p>144.84</text:p>
          </table:table-cell>
          <table:table-cell table:style-name="ce36" table:formula="of:=1000000*[.BX10]/[.BX11]" office:value-type="float" office:value="150.227581435319" calcext:value-type="float">
            <text:p>150.23</text:p>
          </table:table-cell>
          <table:table-cell table:style-name="ce36" table:formula="of:=1000000*[.BY10]/[.BY11]" office:value-type="float" office:value="155.785248023851" calcext:value-type="float">
            <text:p>155.79</text:p>
          </table:table-cell>
          <table:table-cell table:style-name="ce36" table:formula="of:=1000000*[.BZ10]/[.BZ11]" office:value-type="float" office:value="161.515642770469" calcext:value-type="float">
            <text:p>161.52</text:p>
          </table:table-cell>
          <table:table-cell table:style-name="ce36" table:formula="of:=1000000*[.CA10]/[.CA11]" office:value-type="float" office:value="167.425997769468" calcext:value-type="float">
            <text:p>167.43</text:p>
          </table:table-cell>
          <table:table-cell table:style-name="ce36" table:formula="of:=1000000*[.CB10]/[.CB11]" office:value-type="float" office:value="173.520234854308" calcext:value-type="float">
            <text:p>173.52</text:p>
          </table:table-cell>
          <table:table-cell table:style-name="ce36" table:formula="of:=1000000*[.CC10]/[.CC11]" office:value-type="float" office:value="179.805058696154" calcext:value-type="float">
            <text:p>179.81</text:p>
          </table:table-cell>
          <table:table-cell table:style-name="ce36" table:formula="of:=1000000*[.CD10]/[.CD11]" office:value-type="float" office:value="186.286146771241" calcext:value-type="float">
            <text:p>186.29</text:p>
          </table:table-cell>
          <table:table-cell table:style-name="ce36" table:formula="of:=1000000*[.CE10]/[.CE11]" office:value-type="float" office:value="192.969898559664" calcext:value-type="float">
            <text:p>192.97</text:p>
          </table:table-cell>
          <table:table-cell table:style-name="ce36" table:formula="of:=1000000*[.CF10]/[.CF11]" office:value-type="float" office:value="199.863062230884" calcext:value-type="float">
            <text:p>199.86</text:p>
          </table:table-cell>
          <table:table-cell table:style-name="ce36" table:formula="of:=1000000*[.CG10]/[.CG11]" office:value-type="float" office:value="206.970451645828" calcext:value-type="float">
            <text:p>206.97</text:p>
          </table:table-cell>
          <table:table-cell table:style-name="ce36" table:formula="of:=1000000*[.CH10]/[.CH11]" office:value-type="float" office:value="214.3009867855" calcext:value-type="float">
            <text:p>214.30</text:p>
          </table:table-cell>
          <table:table-cell table:style-name="ce36" table:formula="of:=1000000*[.CI10]/[.CI11]" office:value-type="float" office:value="221.860058215322" calcext:value-type="float">
            <text:p>221.86</text:p>
          </table:table-cell>
          <table:table-cell table:style-name="ce36" table:formula="of:=1000000*[.CJ10]/[.CJ11]" office:value-type="float" office:value="229.655157441518" calcext:value-type="float">
            <text:p>229.66</text:p>
          </table:table-cell>
          <table:table-cell table:style-name="ce36" table:formula="of:=1000000*[.CK10]/[.CK11]" office:value-type="float" office:value="237.693761861392" calcext:value-type="float">
            <text:p>237.69</text:p>
          </table:table-cell>
          <table:table-cell table:style-name="ce36" table:formula="of:=1000000*[.CL10]/[.CL11]" office:value-type="float" office:value="245.984527663668" calcext:value-type="float">
            <text:p>245.98</text:p>
          </table:table-cell>
          <table:table-cell table:style-name="ce36" table:formula="of:=1000000*[.CM10]/[.CM11]" office:value-type="float" office:value="254.534773308816" calcext:value-type="float">
            <text:p>254.53</text:p>
          </table:table-cell>
          <table:table-cell table:style-name="ce36" table:formula="of:=1000000*[.CN10]/[.CN11]" office:value-type="float" office:value="263.351742725668" calcext:value-type="float">
            <text:p>263.35</text:p>
          </table:table-cell>
          <table:table-cell table:style-name="ce36" table:formula="of:=1000000*[.CO10]/[.CO11]" office:value-type="float" office:value="272.445196252616" calcext:value-type="float">
            <text:p>272.45</text:p>
          </table:table-cell>
          <table:table-cell table:style-name="ce36" table:formula="of:=1000000*[.CP10]/[.CP11]" office:value-type="float" office:value="281.823782051512" calcext:value-type="float">
            <text:p>281.82</text:p>
          </table:table-cell>
          <table:table-cell table:style-name="ce36" table:formula="of:=1000000*[.CQ10]/[.CQ11]" office:value-type="float" office:value="291.493357979806" calcext:value-type="float">
            <text:p>291.49</text:p>
          </table:table-cell>
          <table:table-cell table:style-name="ce36" table:formula="of:=1000000*[.CR10]/[.CR11]" office:value-type="float" office:value="301.465114308162" calcext:value-type="float">
            <text:p>301.47</text:p>
          </table:table-cell>
          <table:table-cell table:style-name="ce36" table:formula="of:=1000000*[.CS10]/[.CS11]" office:value-type="float" office:value="311.745097268991" calcext:value-type="float">
            <text:p>311.75</text:p>
          </table:table-cell>
          <table:table-cell table:style-name="ce36" table:formula="of:=1000000*[.CT10]/[.CT11]" office:value-type="float" office:value="322.346431730942" calcext:value-type="float">
            <text:p>322.35</text:p>
          </table:table-cell>
          <table:table-cell table:style-name="ce36" table:formula="of:=1000000*[.CU10]/[.CU11]" office:value-type="float" office:value="333.274330888178" calcext:value-type="float">
            <text:p>333.27</text:p>
          </table:table-cell>
          <table:table-cell table:style-name="ce36" table:formula="of:=1000000*[.CV10]/[.CV11]" office:value-type="float" office:value="344.542016294735" calcext:value-type="float">
            <text:p>344.54</text:p>
          </table:table-cell>
          <table:table-cell table:style-name="ce36" table:formula="of:=1000000*[.CW10]/[.CW11]" office:value-type="float" office:value="356.160238401009" calcext:value-type="float">
            <text:p>356.16</text:p>
          </table:table-cell>
          <table:table-cell table:style-name="ce36" table:formula="of:=1000000*[.CX10]/[.CX11]" office:value-type="float" office:value="368.142165638399" calcext:value-type="float">
            <text:p>368.14</text:p>
          </table:table-cell>
          <table:table-cell table:style-name="ce36" table:formula="of:=1000000*[.CY10]/[.CY11]" office:value-type="float" office:value="379.566381887661" calcext:value-type="float">
            <text:p>379.57</text:p>
          </table:table-cell>
          <table:table-cell table:style-name="ce36" table:formula="of:=1000000*[.CZ10]/[.CZ11]" office:value-type="float" office:value="390.662026810922" calcext:value-type="float">
            <text:p>390.66</text:p>
          </table:table-cell>
          <table:table-cell table:style-name="ce36" table:formula="of:=1000000*[.DA10]/[.DA11]" office:value-type="float" office:value="401.568677247176" calcext:value-type="float">
            <text:p>401.57</text:p>
          </table:table-cell>
          <table:table-cell table:style-name="ce36" table:formula="of:=1000000*[.DB10]/[.DB11]" office:value-type="float" office:value="412.437890655812" calcext:value-type="float">
            <text:p>412.44</text:p>
          </table:table-cell>
          <table:table-cell table:style-name="ce36" table:formula="of:=1000000*[.DC10]/[.DC11]" office:value-type="float" office:value="423.359795156512" calcext:value-type="float">
            <text:p>423.36</text:p>
          </table:table-cell>
          <table:table-cell table:style-name="ce36" table:formula="of:=1000000*[.DD10]/[.DD11]" office:value-type="float" office:value="434.395315482604" calcext:value-type="float">
            <text:p>434.40</text:p>
          </table:table-cell>
          <table:table-cell table:style-name="ce36" table:formula="of:=1000000*[.DE10]/[.DE11]" office:value-type="float" office:value="445.580730271805" calcext:value-type="float">
            <text:p>445.58</text:p>
          </table:table-cell>
          <table:table-cell table:style-name="ce36" table:formula="of:=1000000*[.DF10]/[.DF11]" office:value-type="float" office:value="456.951776378515" calcext:value-type="float">
            <text:p>456.95</text:p>
          </table:table-cell>
          <table:table-cell table:style-name="ce36" table:formula="of:=1000000*[.DG10]/[.DG11]" office:value-type="float" office:value="468.534500523264" calcext:value-type="float">
            <text:p>468.53</text:p>
          </table:table-cell>
          <table:table-cell table:style-name="ce36" table:formula="of:=1000000*[.DH10]/[.DH11]" office:value-type="float" office:value="480.350111920714" calcext:value-type="float">
            <text:p>480.35</text:p>
          </table:table-cell>
          <table:table-cell table:style-name="ce36" table:formula="of:=1000000*[.DI10]/[.DI11]" office:value-type="float" office:value="492.421209118153" calcext:value-type="float">
            <text:p>492.42</text:p>
          </table:table-cell>
          <table:table-cell table:style-name="ce36" table:formula="of:=1000000*[.DJ10]/[.DJ11]" office:value-type="float" office:value="504.760727476933" calcext:value-type="float">
            <text:p>504.76</text:p>
          </table:table-cell>
          <table:table-cell table:style-name="ce36" table:formula="of:=1000000*[.DK10]/[.DK11]" office:value-type="float" office:value="517.390643070997" calcext:value-type="float">
            <text:p>517.39</text:p>
          </table:table-cell>
          <table:table-cell table:style-name="ce36" table:formula="of:=1000000*[.DL10]/[.DL11]" office:value-type="float" office:value="530.325121622376" calcext:value-type="float">
            <text:p>530.33</text:p>
          </table:table-cell>
          <table:table-cell table:style-name="ce36" table:formula="of:=1000000*[.DM10]/[.DM11]" office:value-type="float" office:value="543.579224774097" calcext:value-type="float">
            <text:p>543.58</text:p>
          </table:table-cell>
          <table:table-cell table:style-name="ce36" table:formula="of:=1000000*[.DN10]/[.DN11]" office:value-type="float" office:value="557.162794367483" calcext:value-type="float">
            <text:p>557.16</text:p>
          </table:table-cell>
          <table:table-cell table:style-name="ce36" table:formula="of:=1000000*[.DO10]/[.DO11]" office:value-type="float" office:value="571.095744439962" calcext:value-type="float">
            <text:p>571.10</text:p>
          </table:table-cell>
          <table:table-cell table:style-name="ce36" table:formula="of:=1000000*[.DP10]/[.DP11]" office:value-type="float" office:value="585.391282228701" calcext:value-type="float">
            <text:p>585.39</text:p>
          </table:table-cell>
          <table:table-cell table:style-name="ce36" table:formula="of:=1000000*[.DQ10]/[.DQ11]" office:value-type="float" office:value="600.056860482859" calcext:value-type="float">
            <text:p>600.06</text:p>
          </table:table-cell>
          <table:table-cell table:style-name="ce36" table:formula="of:=1000000*[.DR10]/[.DR11]" office:value-type="float" office:value="615.103531637535" calcext:value-type="float">
            <text:p>615.10</text:p>
          </table:table-cell>
          <table:table-cell table:style-name="ce36" table:formula="of:=1000000*[.DS10]/[.DS11]" office:value-type="float" office:value="630.555626544293" calcext:value-type="float">
            <text:p>630.56</text:p>
          </table:table-cell>
          <table:table-cell table:style-name="ce36" table:formula="of:=1000000*[.DT10]/[.DT11]" office:value-type="float" office:value="646.418324883018" calcext:value-type="float">
            <text:p>646.42</text:p>
          </table:table-cell>
          <table:table-cell table:style-name="ce36" table:formula="of:=1000000*[.DU10]/[.DU11]" office:value-type="float" office:value="662.703688260629" calcext:value-type="float">
            <text:p>662.70</text:p>
          </table:table-cell>
          <table:table-cell table:style-name="ce36" table:formula="of:=1000000*[.DV10]/[.DV11]" office:value-type="float" office:value="679.424150660879" calcext:value-type="float">
            <text:p>679.42</text:p>
          </table:table-cell>
          <table:table-cell table:style-name="ce36" table:formula="of:=1000000*[.DW10]/[.DW11]" office:value-type="float" office:value="696.594930363721" calcext:value-type="float">
            <text:p>696.59</text:p>
          </table:table-cell>
          <table:table-cell table:style-name="ce36" table:formula="of:=1000000*[.DX10]/[.DX11]" office:value-type="float" office:value="714.234932979645" calcext:value-type="float">
            <text:p>714.23</text:p>
          </table:table-cell>
          <table:table-cell table:style-name="ce36" table:formula="of:=1000000*[.DY10]/[.DY11]" office:value-type="float" office:value="732.353560530848" calcext:value-type="float">
            <text:p>732.35</text:p>
          </table:table-cell>
          <table:table-cell table:style-name="ce36" table:formula="of:=1000000*[.DZ10]/[.DZ11]" office:value-type="float" office:value="750.964592608628" calcext:value-type="float">
            <text:p>750.96</text:p>
          </table:table-cell>
          <table:table-cell table:style-name="ce36" table:formula="of:=1000000*[.EA10]/[.EA11]" office:value-type="float" office:value="770.087296590485" calcext:value-type="float">
            <text:p>770.09</text:p>
          </table:table-cell>
          <table:table-cell table:style-name="ce36" table:formula="of:=1000000*[.EB10]/[.EB11]" office:value-type="float" office:value="789.728230666639" calcext:value-type="float">
            <text:p>789.73</text:p>
          </table:table-cell>
          <table:table-cell table:style-name="ce36" table:formula="of:=1000000*[.EC10]/[.EC11]" office:value-type="float" office:value="809.897494299665" calcext:value-type="float">
            <text:p>809.90</text:p>
          </table:table-cell>
          <table:table-cell table:style-name="ce36" table:formula="of:=1000000*[.ED10]/[.ED11]" office:value-type="float" office:value="830.618784091948" calcext:value-type="float">
            <text:p>830.62</text:p>
          </table:table-cell>
          <table:table-cell table:style-name="ce36" table:formula="of:=1000000*[.EE10]/[.EE11]" office:value-type="float" office:value="851.905568108337" calcext:value-type="float">
            <text:p>851.91</text:p>
          </table:table-cell>
          <table:table-cell table:style-name="ce36" table:formula="of:=1000000*[.EF10]/[.EF11]" office:value-type="float" office:value="873.758068090514" calcext:value-type="float">
            <text:p>873.76</text:p>
          </table:table-cell>
          <table:table-cell table:style-name="ce36" table:formula="of:=1000000*[.EG10]/[.EG11]" office:value-type="float" office:value="896.192326779746" calcext:value-type="float">
            <text:p>896.19</text:p>
          </table:table-cell>
          <table:table-cell table:number-columns-repeated="158"/>
          <table:table-cell table:style-name="Default" table:number-columns-repeated="16089"/>
        </table:table-row>
        <table:table-row table:style-name="ro1">
          <table:table-cell>
            <draw:frame draw:z-index="0" draw:style-name="gr1" draw:text-style-name="P1" svg:width="6.2988in" svg:height="3.5429in" svg:x="0.8134in" svg:y="0.1618in">
              <draw:object draw:notify-on-update-of-ranges="Convolution.B10:Convolution.IR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94"/>
          <table:table-cell table:style-name="Default" table:number-columns-repeated="16089"/>
        </table:table-row>
        <table:table-row table:style-name="ro1">
          <table:table-cell table:number-columns-repeated="4"/>
          <table:table-cell>
            <draw:frame draw:z-index="1" draw:style-name="gr1" draw:text-style-name="P1" svg:width="6.2988in" svg:height="3.5429in" svg:x="0.1472in" svg:y="0.1055in">
              <draw:object draw:notify-on-update-of-ranges="Convolution.B11:Convolution.GR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draw:z-index="2" draw:style-name="gr1" draw:text-style-name="P1" svg:width="6.2988in" svg:height="3.5429in" svg:x="0.6701in" svg:y="0.2008in">
              <draw:object draw:notify-on-update-of-ranges="Convolution.B12:Convolution.EG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85"/>
          <table:table-cell table:style-name="Default" table:number-columns-repeated="16089"/>
        </table:table-row>
        <table:table-row table:style-name="ro1" table:number-rows-repeated="1048559">
          <table:table-cell table:number-columns-repeated="295"/>
          <table:table-cell table:style-name="Default" table:number-columns-repeated="16089"/>
        </table:table-row>
        <table:table-row table:style-name="ro1">
          <table:table-cell table:number-columns-repeated="295"/>
          <table:table-cell table:style-name="Default" table:number-columns-repeated="160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6" number:min-decimal-places="6"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4" number:min-decimal-places="14" number:min-integer-digits="1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 loext:blank-width-char=")1">-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4" number:min-decimal-places="4" number:min-integer-digits="1"/>
    </number:number-style>
    <number:number-style style:name="N173">
      <number:number number:decimal-places="1" number:min-decimal-places="1" number:min-integer-digits="1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number-style style:name="N176">
      <number:number number:decimal-places="5" number:min-decimal-places="5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number-style style:name="N178">
      <number:number number:decimal-places="7" number:min-decimal-places="7" number:min-integer-digits="1" number:grouping="true"/>
    </number:number-style>
    <number:number-style style:name="N179">
      <number:number number:decimal-places="8" number:min-decimal-places="8" number:min-integer-digits="1" number:grouping="true"/>
    </number:number-style>
    <number:number-style style:name="N180">
      <number:number number:decimal-places="9" number:min-decimal-places="9" number:min-integer-digits="1" number:grouping="true"/>
    </number:number-style>
    <number:number-style style:name="N181">
      <number:number number:decimal-places="10" number:min-decimal-places="10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83P0"/>
    </number:currency-style>
    <number:number-style style:name="N184">
      <number:number number:decimal-places="16" number:min-decimal-places="1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4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49P0"/>
    </number:currency-style>
    <number:number-style style:name="N10150" number:language="en" number:country="US">
      <number:number number:decimal-places="1" number:min-decimal-places="1" number:min-integer-digits="1" number:grouping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8:56:41.69987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tation_20_example" style:display-name="PageStyle_Plantation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 F. Raffensperger</meta:initial-creator>
    <meta:creation-date>2026-07-02T19:58:07</meta:creation-date>
    <dc:date>2026-07-09T10:23:30.474656100</dc:date>
    <meta:editing-cycles>18</meta:editing-cycles>
    <meta:editing-duration>PT18H8M23S</meta:editing-duration>
    <meta:generator>LibreOffice/26.2.4.2$Windows_X86_64 LibreOffice_project/0229ac93fcf0d7cbc6376066c6f35021cef002dc</meta:generator>
    <meta:document-statistic meta:table-count="2" meta:cell-count="214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49cm" svg:y="4.205cm" style:legend-expansion="high" chart:style-name="ch2"/>
        <chart:plot-area chart:style-name="ch3" svg:x="0.32cm" svg:y="0.18cm" svg:width="13.409cm" svg:height="8.64cm">
          <chart:coordinate-region svg:x="1.454cm" svg:y="0.375cm" svg:width="12.275cm" svg:height="7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volution.B10:Convolution.IR10" chart:class="chart:bar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onvolution.B10:Convolution.IR10</svg:desc>
                </draw:g>
              </table:table-cell>
              <table:table-cell office:value-type="float" office:value="0.000092761706264437">
                <text:p>0.000092761706264437</text:p>
              </table:table-cell>
              <table:table-cell office:value-type="float" office:value="0.00026570839490067">
                <text:p>0.00026570839490067</text:p>
              </table:table-cell>
              <table:table-cell office:value-type="float" office:value="0.000511344959897327">
                <text:p>0.000511344959897327</text:p>
              </table:table-cell>
              <table:table-cell office:value-type="float" office:value="0.000818701912315901">
                <text:p>0.000818701912315901</text:p>
              </table:table-cell>
              <table:table-cell office:value-type="float" office:value="0.00118023390519716">
                <text:p>0.00118023390519716</text:p>
              </table:table-cell>
              <table:table-cell office:value-type="float" office:value="0.00159042479727512">
                <text:p>0.00159042479727512</text:p>
              </table:table-cell>
              <table:table-cell office:value-type="float" office:value="0.00204457794417912">
                <text:p>0.00204457794417912</text:p>
              </table:table-cell>
              <table:table-cell office:value-type="float" office:value="0.00253821341047771">
                <text:p>0.00253821341047771</text:p>
              </table:table-cell>
              <table:table-cell office:value-type="float" office:value="0.00306753296578527">
                <text:p>0.00306753296578527</text:p>
              </table:table-cell>
              <table:table-cell office:value-type="float" office:value="0.00362851676042029">
                <text:p>0.00362851676042029</text:p>
              </table:table-cell>
              <table:table-cell office:value-type="float" office:value="0.00421751004983709">
                <text:p>0.00421751004983709</text:p>
              </table:table-cell>
              <table:table-cell office:value-type="float" office:value="0.00483129710474926">
                <text:p>0.00483129710474926</text:p>
              </table:table-cell>
              <table:table-cell office:value-type="float" office:value="0.00546648998840605">
                <text:p>0.00546648998840605</text:p>
              </table:table-cell>
              <table:table-cell office:value-type="float" office:value="0.00612014601119336">
                <text:p>0.00612014601119336</text:p>
              </table:table-cell>
              <table:table-cell office:value-type="float" office:value="0.00678964687880727">
                <text:p>0.00678964687880727</text:p>
              </table:table-cell>
              <table:table-cell office:value-type="float" office:value="0.0074725276955387">
                <text:p>0.0074725276955387</text:p>
              </table:table-cell>
              <table:table-cell office:value-type="float" office:value="0.00816595522312145">
                <text:p>0.00816595522312145</text:p>
              </table:table-cell>
              <table:table-cell office:value-type="float" office:value="0.00886764387708448">
                <text:p>0.00886764387708448</text:p>
              </table:table-cell>
              <table:table-cell office:value-type="float" office:value="0.00957583571885517">
                <text:p>0.00957583571885517</text:p>
              </table:table-cell>
              <table:table-cell office:value-type="float" office:value="0.0102885064406005">
                <text:p>0.0102885064406005</text:p>
              </table:table-cell>
              <table:table-cell office:value-type="float" office:value="0.0110035927339555">
                <text:p>0.0110035927339555</text:p>
              </table:table-cell>
              <table:table-cell office:value-type="float" office:value="0.0117196765142776">
                <text:p>0.0117196765142776</text:p>
              </table:table-cell>
              <table:table-cell office:value-type="float" office:value="0.0124353316918672">
                <text:p>0.0124353316918672</text:p>
              </table:table-cell>
              <table:table-cell office:value-type="float" office:value="0.0131490107137172">
                <text:p>0.0131490107137172</text:p>
              </table:table-cell>
              <table:table-cell office:value-type="float" office:value="0.013859482992888">
                <text:p>0.013859482992888</text:p>
              </table:table-cell>
              <table:table-cell office:value-type="float" office:value="0.0145655863091855">
                <text:p>0.0145655863091855</text:p>
              </table:table-cell>
              <table:table-cell office:value-type="float" office:value="0.0152662866898521">
                <text:p>0.0152662866898521</text:p>
              </table:table-cell>
              <table:table-cell office:value-type="float" office:value="0.015960646653804">
                <text:p>0.015960646653804</text:p>
              </table:table-cell>
              <table:table-cell office:value-type="float" office:value="0.0166480617925039">
                <text:p>0.0166480617925039</text:p>
              </table:table-cell>
              <table:table-cell office:value-type="float" office:value="0.0173278128063124">
                <text:p>0.0173278128063124</text:p>
              </table:table-cell>
              <table:table-cell office:value-type="float" office:value="0.017999223101495">
                <text:p>0.017999223101495</text:p>
              </table:table-cell>
              <table:table-cell office:value-type="float" office:value="0.0186617148618291">
                <text:p>0.0186617148618291</text:p>
              </table:table-cell>
              <table:table-cell office:value-type="float" office:value="0.0193144968390378">
                <text:p>0.0193144968390378</text:p>
              </table:table-cell>
              <table:table-cell office:value-type="float" office:value="0.0199580242679935">
                <text:p>0.0199580242679935</text:p>
              </table:table-cell>
              <table:table-cell office:value-type="float" office:value="0.0205916244171406">
                <text:p>0.0205916244171406</text:p>
              </table:table-cell>
              <table:table-cell office:value-type="float" office:value="0.0212149371695101">
                <text:p>0.0212149371695101</text:p>
              </table:table-cell>
              <table:table-cell office:value-type="float" office:value="0.0218276744824575">
                <text:p>0.0218276744824575</text:p>
              </table:table-cell>
              <table:table-cell office:value-type="float" office:value="0.022429338436844">
                <text:p>0.022429338436844</text:p>
              </table:table-cell>
              <table:table-cell office:value-type="float" office:value="0.0230201620016508">
                <text:p>0.0230201620016508</text:p>
              </table:table-cell>
              <table:table-cell office:value-type="float" office:value="0.0235996180466594">
                <text:p>0.0235996180466594</text:p>
              </table:table-cell>
              <table:table-cell office:value-type="float" office:value="0.0241673717667951">
                <text:p>0.0241673717667951</text:p>
              </table:table-cell>
              <table:table-cell office:value-type="float" office:value="0.0247229191903156">
                <text:p>0.0247229191903156</text:p>
              </table:table-cell>
              <table:table-cell office:value-type="float" office:value="0.0252668031084731">
                <text:p>0.0252668031084731</text:p>
              </table:table-cell>
              <table:table-cell office:value-type="float" office:value="0.025798760931349">
                <text:p>0.025798760931349</text:p>
              </table:table-cell>
              <table:table-cell office:value-type="float" office:value="0.026318763647508">
                <text:p>0.026318763647508</text:p>
              </table:table-cell>
              <table:table-cell office:value-type="float" office:value="0.0268274848482243">
                <text:p>0.0268274848482243</text:p>
              </table:table-cell>
              <table:table-cell office:value-type="float" office:value="0.02732430318427">
                <text:p>0.02732430318427</text:p>
              </table:table-cell>
              <table:table-cell office:value-type="float" office:value="0.0278099118564375">
                <text:p>0.0278099118564375</text:p>
              </table:table-cell>
              <table:table-cell office:value-type="float" office:value="0.0282844743407727">
                <text:p>0.0282844743407727</text:p>
              </table:table-cell>
              <table:table-cell office:value-type="float" office:value="0.0287476612746775">
                <text:p>0.0287476612746775</text:p>
              </table:table-cell>
              <table:table-cell office:value-type="float" office:value="0.0292000748116164">
                <text:p>0.0292000748116164</text:p>
              </table:table-cell>
              <table:table-cell office:value-type="float" office:value="0.0296409560726887">
                <text:p>0.0296409560726887</text:p>
              </table:table-cell>
              <table:table-cell office:value-type="float" office:value="0.0300712092056181">
                <text:p>0.0300712092056181</text:p>
              </table:table-cell>
              <table:table-cell office:value-type="float" office:value="0.0304907730103057">
                <text:p>0.0304907730103057</text:p>
              </table:table-cell>
              <table:table-cell office:value-type="float" office:value="0.0309002360399169">
                <text:p>0.0309002360399169</text:p>
              </table:table-cell>
              <table:table-cell office:value-type="float" office:value="0.0313000253913808">
                <text:p>0.0313000253913808</text:p>
              </table:table-cell>
              <table:table-cell office:value-type="float" office:value="0.0316902028332699">
                <text:p>0.0316902028332699</text:p>
              </table:table-cell>
              <table:table-cell office:value-type="float" office:value="0.0320707420368372">
                <text:p>0.0320707420368372</text:p>
              </table:table-cell>
              <table:table-cell office:value-type="float" office:value="0.0324419153380822">
                <text:p>0.0324419153380822</text:p>
              </table:table-cell>
              <table:table-cell office:value-type="float" office:value="0.0328040943460687">
                <text:p>0.0328040943460687</text:p>
              </table:table-cell>
              <table:table-cell office:value-type="float" office:value="0.0331572380109767">
                <text:p>0.0331572380109767</text:p>
              </table:table-cell>
              <table:table-cell office:value-type="float" office:value="0.0335017804829741">
                <text:p>0.0335017804829741</text:p>
              </table:table-cell>
              <table:table-cell office:value-type="float" office:value="0.0338377363614648">
                <text:p>0.0338377363614648</text:p>
              </table:table-cell>
              <table:table-cell office:value-type="float" office:value="0.0341654313293757">
                <text:p>0.0341654313293757</text:p>
              </table:table-cell>
              <table:table-cell office:value-type="float" office:value="0.0344850714362464">
                <text:p>0.0344850714362464</text:p>
              </table:table-cell>
              <table:table-cell office:value-type="float" office:value="0.0347969336110842">
                <text:p>0.0347969336110842</text:p>
              </table:table-cell>
              <table:table-cell office:value-type="float" office:value="0.035101393583606">
                <text:p>0.035101393583606</text:p>
              </table:table-cell>
              <table:table-cell office:value-type="float" office:value="0.0353984935694302">
                <text:p>0.0353984935694302</text:p>
              </table:table-cell>
              <table:table-cell office:value-type="float" office:value="0.0356886262677776">
                <text:p>0.0356886262677776</text:p>
              </table:table-cell>
              <table:table-cell office:value-type="float" office:value="0.0359720135730862">
                <text:p>0.0359720135730862</text:p>
              </table:table-cell>
              <table:table-cell office:value-type="float" office:value="0.0362484450329312">
                <text:p>0.0362484450329312</text:p>
              </table:table-cell>
              <table:table-cell office:value-type="float" office:value="0.0365184875821051">
                <text:p>0.0365184875821051</text:p>
              </table:table-cell>
              <table:table-cell office:value-type="float" office:value="0.0367821194429066">
                <text:p>0.0367821194429066</text:p>
              </table:table-cell>
              <table:table-cell office:value-type="float" office:value="0.0370399407910139">
                <text:p>0.0370399407910139</text:p>
              </table:table-cell>
              <table:table-cell office:value-type="float" office:value="0.0372914880713591">
                <text:p>0.0372914880713591</text:p>
              </table:table-cell>
              <table:table-cell office:value-type="float" office:value="0.0375371027365832">
                <text:p>0.0375371027365832</text:p>
              </table:table-cell>
              <table:table-cell office:value-type="float" office:value="0.0377773795899082">
                <text:p>0.0377773795899082</text:p>
              </table:table-cell>
              <table:table-cell office:value-type="float" office:value="0.0380120976556171">
                <text:p>0.0380120976556171</text:p>
              </table:table-cell>
              <table:table-cell office:value-type="float" office:value="0.0382416296237604">
                <text:p>0.0382416296237604</text:p>
              </table:table-cell>
              <table:table-cell office:value-type="float" office:value="0.0384660701915673">
                <text:p>0.0384660701915673</text:p>
              </table:table-cell>
              <table:table-cell office:value-type="float" office:value="0.0386856237787232">
                <text:p>0.0386856237787232</text:p>
              </table:table-cell>
              <table:table-cell office:value-type="float" office:value="0.0389005147295959">
                <text:p>0.0389005147295959</text:p>
              </table:table-cell>
              <table:table-cell office:value-type="float" office:value="0.0391105509018288">
                <text:p>0.0391105509018288</text:p>
              </table:table-cell>
              <table:table-cell office:value-type="float" office:value="0.0393162902096728">
                <text:p>0.0393162902096728</text:p>
              </table:table-cell>
              <table:table-cell office:value-type="float" office:value="0.0395175725414417">
                <text:p>0.0395175725414417</text:p>
              </table:table-cell>
              <table:table-cell office:value-type="float" office:value="0.0397145928743381">
                <text:p>0.0397145928743381</text:p>
              </table:table-cell>
              <table:table-cell office:value-type="float" office:value="0.0399074953058777">
                <text:p>0.0399074953058777</text:p>
              </table:table-cell>
              <table:table-cell office:value-type="float" office:value="0.0400965727986839">
                <text:p>0.0400965727986839</text:p>
              </table:table-cell>
              <table:table-cell office:value-type="float" office:value="0.0402818455271267">
                <text:p>0.0402818455271267</text:p>
              </table:table-cell>
              <table:table-cell office:value-type="float" office:value="0.0404632916854345">
                <text:p>0.0404632916854345</text:p>
              </table:table-cell>
              <table:table-cell office:value-type="float" office:value="0.0406412393449529">
                <text:p>0.0406412393449529</text:p>
              </table:table-cell>
              <table:table-cell office:value-type="float" office:value="0.0408157895908934">
                <text:p>0.0408157895908934</text:p>
              </table:table-cell>
              <table:table-cell office:value-type="float" office:value="0.0409866102737588">
                <text:p>0.0409866102737588</text:p>
              </table:table-cell>
              <table:table-cell office:value-type="float" office:value="0.0411541064733176">
                <text:p>0.0411541064733176</text:p>
              </table:table-cell>
              <table:table-cell office:value-type="float" office:value="0.0413179267807811">
                <text:p>0.0413179267807811</text:p>
              </table:table-cell>
              <table:table-cell office:value-type="float" office:value="0.0414786422518961">
                <text:p>0.0414786422518961</text:p>
              </table:table-cell>
              <table:table-cell office:value-type="float" office:value="0.0416357416701841">
                <text:p>0.0416357416701841</text:p>
              </table:table-cell>
              <table:table-cell office:value-type="float" office:value="0.041789714712183">
                <text:p>0.041789714712183</text:p>
              </table:table-cell>
              <table:table-cell office:value-type="float" office:value="0.0419406757987561">
                <text:p>0.0419406757987561</text:p>
              </table:table-cell>
              <table:table-cell office:value-type="float" office:value="0.0420889729984365">
                <text:p>0.0420889729984365</text:p>
              </table:table-cell>
              <table:table-cell office:value-type="float" office:value="0.0421311468682758">
                <text:p>0.0421311468682758</text:p>
              </table:table-cell>
              <table:table-cell office:value-type="float" office:value="0.0420997498669354">
                <text:p>0.0420997498669354</text:p>
              </table:table-cell>
              <table:table-cell office:value-type="float" office:value="0.0420146666309876">
                <text:p>0.0420146666309876</text:p>
              </table:table-cell>
              <table:table-cell office:value-type="float" office:value="0.0418950221379949">
                <text:p>0.0418950221379949</text:p>
              </table:table-cell>
              <table:table-cell office:value-type="float" office:value="0.0417519010746907">
                <text:p>0.0417519010746907</text:p>
              </table:table-cell>
              <table:table-cell office:value-type="float" office:value="0.0415924545725746">
                <text:p>0.0415924545725746</text:p>
              </table:table-cell>
              <table:table-cell office:value-type="float" office:value="0.0414208106256321">
                <text:p>0.0414208106256321</text:p>
              </table:table-cell>
              <table:table-cell office:value-type="float" office:value="0.0412406344911027">
                <text:p>0.0412406344911027</text:p>
              </table:table-cell>
              <table:table-cell office:value-type="float" office:value="0.0410543631244736">
                <text:p>0.0410543631244736</text:p>
              </table:table-cell>
              <table:table-cell office:value-type="float" office:value="0.0408637684940309">
                <text:p>0.0408637684940309</text:p>
              </table:table-cell>
              <table:table-cell office:value-type="float" office:value="0.0406705498974183">
                <text:p>0.0406705498974183</text:p>
              </table:table-cell>
              <table:table-cell office:value-type="float" office:value="0.0404754445260543">
                <text:p>0.0404754445260543</text:p>
              </table:table-cell>
              <table:table-cell office:value-type="float" office:value="0.0402798101687622">
                <text:p>0.0402798101687622</text:p>
              </table:table-cell>
              <table:table-cell office:value-type="float" office:value="0.0400842553772835">
                <text:p>0.0400842553772835</text:p>
              </table:table-cell>
              <table:table-cell office:value-type="float" office:value="0.0398893762556241">
                <text:p>0.0398893762556241</text:p>
              </table:table-cell>
              <table:table-cell office:value-type="float" office:value="0.0396953173730697">
                <text:p>0.0396953173730697</text:p>
              </table:table-cell>
              <table:table-cell office:value-type="float" office:value="0.0395028900533611">
                <text:p>0.0395028900533611</text:p>
              </table:table-cell>
              <table:table-cell office:value-type="float" office:value="0.0393123469356712">
                <text:p>0.0393123469356712</text:p>
              </table:table-cell>
              <table:table-cell office:value-type="float" office:value="0.0391235182024944">
                <text:p>0.0391235182024944</text:p>
              </table:table-cell>
              <table:table-cell office:value-type="float" office:value="0.0389364625436841">
                <text:p>0.0389364625436841</text:p>
              </table:table-cell>
              <table:table-cell office:value-type="float" office:value="0.0387520295394157">
                <text:p>0.0387520295394157</text:p>
              </table:table-cell>
              <table:table-cell office:value-type="float" office:value="0.0385698084435589">
                <text:p>0.0385698084435589</text:p>
              </table:table-cell>
              <table:table-cell office:value-type="float" office:value="0.0383898120097176">
                <text:p>0.0383898120097176</text:p>
              </table:table-cell>
              <table:table-cell office:value-type="float" office:value="0.0382120513970478">
                <text:p>0.0382120513970478</text:p>
              </table:table-cell>
              <table:table-cell office:value-type="float" office:value="0.0380366672949705">
                <text:p>0.0380366672949705</text:p>
              </table:table-cell>
              <table:table-cell office:value-type="float" office:value="0.0378639581314275">
                <text:p>0.0378639581314275</text:p>
              </table:table-cell>
              <table:table-cell office:value-type="float" office:value="0.0376936762680266">
                <text:p>0.0376936762680266</text:p>
              </table:table-cell>
              <table:table-cell office:value-type="float" office:value="0.0375257978835605">
                <text:p>0.0375257978835605</text:p>
              </table:table-cell>
              <table:table-cell office:value-type="float" office:value="0.0373605455110888">
                <text:p>0.0373605455110888</text:p>
              </table:table-cell>
              <table:table-cell office:value-type="float" office:value="0.0371974944803134">
                <text:p>0.0371974944803134</text:p>
              </table:table-cell>
              <table:table-cell office:value-type="float" office:value="0.0370364076372613">
                <text:p>0.0370364076372613</text:p>
              </table:table-cell>
              <table:table-cell office:value-type="float" office:value="0.0368776572623549">
                <text:p>0.0368776572623549</text:p>
              </table:table-cell>
              <table:table-cell office:value-type="float" office:value="0.0367211105957929">
                <text:p>0.0367211105957929</text:p>
              </table:table-cell>
              <table:table-cell office:value-type="float" office:value="0.036566073255265">
                <text:p>0.036566073255265</text:p>
              </table:table-cell>
              <table:table-cell office:value-type="float" office:value="0.0364125523882084">
                <text:p>0.0364125523882084</text:p>
              </table:table-cell>
              <table:table-cell office:value-type="float" office:value="0.0362607822776183">
                <text:p>0.0362607822776183</text:p>
              </table:table-cell>
              <table:table-cell office:value-type="float" office:value="0.0361109640993099">
                <text:p>0.0361109640993099</text:p>
              </table:table-cell>
              <table:table-cell office:value-type="float" office:value="0.035963199508209">
                <text:p>0.035963199508209</text:p>
              </table:table-cell>
              <table:table-cell office:value-type="float" office:value="0.0358166529603282">
                <text:p>0.0358166529603282</text:p>
              </table:table-cell>
              <table:table-cell office:value-type="float" office:value="0.035671985929402">
                <text:p>0.035671985929402</text:p>
              </table:table-cell>
              <table:table-cell office:value-type="float" office:value="0.0355293693561928">
                <text:p>0.0355293693561928</text:p>
              </table:table-cell>
              <table:table-cell office:value-type="float" office:value="0.0353893704866471">
                <text:p>0.0353893704866471</text:p>
              </table:table-cell>
              <table:table-cell office:value-type="float" office:value="0.0352505334956115">
                <text:p>0.0352505334956115</text:p>
              </table:table-cell>
              <table:table-cell office:value-type="float" office:value="0.035113884256516">
                <text:p>0.035113884256516</text:p>
              </table:table-cell>
              <table:table-cell office:value-type="float" office:value="0.0349790489320341">
                <text:p>0.0349790489320341</text:p>
              </table:table-cell>
              <table:table-cell office:value-type="float" office:value="0.0348449912917679">
                <text:p>0.0348449912917679</text:p>
              </table:table-cell>
              <table:table-cell office:value-type="float" office:value="0.0347129298445274">
                <text:p>0.0347129298445274</text:p>
              </table:table-cell>
              <table:table-cell office:value-type="float" office:value="0.0345816633809615">
                <text:p>0.0345816633809615</text:p>
              </table:table-cell>
              <table:table-cell office:value-type="float" office:value="0.03445115130608">
                <text:p>0.03445115130608</text:p>
              </table:table-cell>
              <table:table-cell office:value-type="float" office:value="0.0343220457188661">
                <text:p>0.0343220457188661</text:p>
              </table:table-cell>
              <table:table-cell office:value-type="float" office:value="0.0341937754964247">
                <text:p>0.0341937754964247</text:p>
              </table:table-cell>
              <table:table-cell office:value-type="float" office:value="0.0340673393558974">
                <text:p>0.0340673393558974</text:p>
              </table:table-cell>
              <table:table-cell office:value-type="float" office:value="0.0339417646435692">
                <text:p>0.0339417646435692</text:p>
              </table:table-cell>
              <table:table-cell office:value-type="float" office:value="0.0338173216907602">
                <text:p>0.0338173216907602</text:p>
              </table:table-cell>
              <table:table-cell office:value-type="float" office:value="0.0336934712409653">
                <text:p>0.0336934712409653</text:p>
              </table:table-cell>
              <table:table-cell office:value-type="float" office:value="0.0335700160270995">
                <text:p>0.0335700160270995</text:p>
              </table:table-cell>
              <table:table-cell office:value-type="float" office:value="0.033290048176336">
                <text:p>0.033290048176336</text:p>
              </table:table-cell>
              <table:table-cell office:value-type="float" office:value="0.0331401097122352">
                <text:p>0.0331401097122352</text:p>
              </table:table-cell>
              <table:table-cell office:value-type="float" office:value="0.0329931943429905">
                <text:p>0.0329931943429905</text:p>
              </table:table-cell>
              <table:table-cell office:value-type="float" office:value="0.0328489710710701">
                <text:p>0.0328489710710701</text:p>
              </table:table-cell>
              <table:table-cell office:value-type="float" office:value="0.0327073411003394">
                <text:p>0.0327073411003394</text:p>
              </table:table-cell>
              <table:table-cell office:value-type="float" office:value="0.032568276122473">
                <text:p>0.032568276122473</text:p>
              </table:table-cell>
              <table:table-cell office:value-type="float" office:value="0.0324314989624254">
                <text:p>0.0324314989624254</text:p>
              </table:table-cell>
              <table:table-cell office:value-type="float" office:value="0.0322968531185729">
                <text:p>0.0322968531185729</text:p>
              </table:table-cell>
              <table:table-cell office:value-type="float" office:value="0.0321642516711037">
                <text:p>0.0321642516711037</text:p>
              </table:table-cell>
              <table:table-cell office:value-type="float" office:value="0.0320339498173912">
                <text:p>0.0320339498173912</text:p>
              </table:table-cell>
              <table:table-cell office:value-type="float" office:value="0.0319048436141181">
                <text:p>0.0319048436141181</text:p>
              </table:table-cell>
              <table:table-cell office:value-type="float" office:value="0.0317771743817995">
                <text:p>0.0317771743817995</text:p>
              </table:table-cell>
              <table:table-cell office:value-type="float" office:value="0.0316510372189917">
                <text:p>0.0316510372189917</text:p>
              </table:table-cell>
              <table:table-cell office:value-type="float" office:value="0.0315261851218914">
                <text:p>0.0315261851218914</text:p>
              </table:table-cell>
              <table:table-cell office:value-type="float" office:value="0.0314027755480135">
                <text:p>0.0314027755480135</text:p>
              </table:table-cell>
              <table:table-cell office:value-type="float" office:value="0.0312804527941083">
                <text:p>0.0312804527941083</text:p>
              </table:table-cell>
              <table:table-cell office:value-type="float" office:value="0.0311596174114945">
                <text:p>0.0311596174114945</text:p>
              </table:table-cell>
              <table:table-cell office:value-type="float" office:value="0.0310393080211804">
                <text:p>0.0310393080211804</text:p>
              </table:table-cell>
              <table:table-cell office:value-type="float" office:value="0.0309204464705038">
                <text:p>0.0309204464705038</text:p>
              </table:table-cell>
              <table:table-cell office:value-type="float" office:value="0.0308027122001438">
                <text:p>0.0308027122001438</text:p>
              </table:table-cell>
              <table:table-cell office:value-type="float" office:value="0.030685312267542">
                <text:p>0.030685312267542</text:p>
              </table:table-cell>
              <table:table-cell office:value-type="float" office:value="0.0305693437845511">
                <text:p>0.0305693437845511</text:p>
              </table:table-cell>
              <table:table-cell office:value-type="float" office:value="0.0304538873981182">
                <text:p>0.0304538873981182</text:p>
              </table:table-cell>
              <table:table-cell office:value-type="float" office:value="0.0303391875570071">
                <text:p>0.0303391875570071</text:p>
              </table:table-cell>
              <table:table-cell office:value-type="float" office:value="0.030225149775244">
                <text:p>0.030225149775244</text:p>
              </table:table-cell>
              <table:table-cell office:value-type="float" office:value="0.0301116278515966">
                <text:p>0.0301116278515966</text:p>
              </table:table-cell>
              <table:table-cell office:value-type="float" office:value="0.0299990528364237">
                <text:p>0.0299990528364237</text:p>
              </table:table-cell>
              <table:table-cell office:value-type="float" office:value="0.0298866044545981">
                <text:p>0.0298866044545981</text:p>
              </table:table-cell>
              <table:table-cell office:value-type="float" office:value="0.0297750353627159">
                <text:p>0.0297750353627159</text:p>
              </table:table-cell>
              <table:table-cell office:value-type="float" office:value="0.0296640548497785">
                <text:p>0.0296640548497785</text:p>
              </table:table-cell>
              <table:table-cell office:value-type="float" office:value="0.0295533698456487">
                <text:p>0.0295533698456487</text:p>
              </table:table-cell>
              <table:table-cell office:value-type="float" office:value="0.0294429661349612">
                <text:p>0.0294429661349612</text:p>
              </table:table-cell>
              <table:table-cell office:value-type="float" office:value="0.0293329682550887">
                <text:p>0.0293329682550887</text:p>
              </table:table-cell>
              <table:table-cell office:value-type="float" office:value="0.0292234790549741">
                <text:p>0.0292234790549741</text:p>
              </table:table-cell>
              <table:table-cell office:value-type="float" office:value="0.029114246102238">
                <text:p>0.029114246102238</text:p>
              </table:table-cell>
              <table:table-cell office:value-type="float" office:value="0.0290050807240386">
                <text:p>0.0290050807240386</text:p>
              </table:table-cell>
              <table:table-cell office:value-type="float" office:value="0.0288966051006884">
                <text:p>0.0288966051006884</text:p>
              </table:table-cell>
              <table:table-cell office:value-type="float" office:value="0.0287886677255355">
                <text:p>0.0287886677255355</text:p>
              </table:table-cell>
              <table:table-cell office:value-type="float" office:value="0.0286813220440787">
                <text:p>0.0286813220440787</text:p>
              </table:table-cell>
              <table:table-cell office:value-type="float" office:value="0.0285743443612555">
                <text:p>0.0285743443612555</text:p>
              </table:table-cell>
              <table:table-cell office:value-type="float" office:value="0.0284682601877746">
                <text:p>0.0284682601877746</text:p>
              </table:table-cell>
              <table:table-cell office:value-type="float" office:value="0.0283624463776449">
                <text:p>0.0283624463776449</text:p>
              </table:table-cell>
              <table:table-cell office:value-type="float" office:value="0.028257129218774">
                <text:p>0.028257129218774</text:p>
              </table:table-cell>
              <table:table-cell office:value-type="float" office:value="0.0281516407166886">
                <text:p>0.0281516407166886</text:p>
              </table:table-cell>
              <table:table-cell office:value-type="float" office:value="0.028046361104434">
                <text:p>0.028046361104434</text:p>
              </table:table-cell>
              <table:table-cell office:value-type="float" office:value="0.0279413382376287">
                <text:p>0.0279413382376287</text:p>
              </table:table-cell>
              <table:table-cell office:value-type="float" office:value="0.0278367121558481">
                <text:p>0.0278367121558481</text:p>
              </table:table-cell>
              <table:table-cell office:value-type="float" office:value="0.027732311271424">
                <text:p>0.027732311271424</text:p>
              </table:table-cell>
              <table:table-cell office:value-type="float" office:value="0.0276281195480473">
                <text:p>0.0276281195480473</text:p>
              </table:table-cell>
              <table:table-cell office:value-type="float" office:value="0.0275240733893252">
                <text:p>0.0275240733893252</text:p>
              </table:table-cell>
              <table:table-cell office:value-type="float" office:value="0.0274204364251969">
                <text:p>0.0274204364251969</text:p>
              </table:table-cell>
              <table:table-cell office:value-type="float" office:value="0.0273170039309205">
                <text:p>0.0273170039309205</text:p>
              </table:table-cell>
              <table:table-cell office:value-type="float" office:value="0.0272132974102885">
                <text:p>0.0272132974102885</text:p>
              </table:table-cell>
              <table:table-cell office:value-type="float" office:value="0.027109948561224">
                <text:p>0.027109948561224</text:p>
              </table:table-cell>
              <table:table-cell office:value-type="float" office:value="0.0270065513647266">
                <text:p>0.0270065513647266</text:p>
              </table:table-cell>
              <table:table-cell office:value-type="float" office:value="0.0269037121446317">
                <text:p>0.0269037121446317</text:p>
              </table:table-cell>
              <table:table-cell office:value-type="float" office:value="0.026800993311868">
                <text:p>0.026800993311868</text:p>
              </table:table-cell>
              <table:table-cell office:value-type="float" office:value="0.0266984364307003">
                <text:p>0.0266984364307003</text:p>
              </table:table-cell>
              <table:table-cell office:value-type="float" office:value="0.0265957357331198">
                <text:p>0.0265957357331198</text:p>
              </table:table-cell>
              <table:table-cell office:value-type="float" office:value="0.0264931534248534">
                <text:p>0.0264931534248534</text:p>
              </table:table-cell>
              <table:table-cell office:value-type="float" office:value="0.0263904888280974">
                <text:p>0.0263904888280974</text:p>
              </table:table-cell>
              <table:table-cell office:value-type="float" office:value="0.0262879435950936">
                <text:p>0.0262879435950936</text:p>
              </table:table-cell>
              <table:table-cell office:value-type="float" office:value="0.0261854449754273">
                <text:p>0.0261854449754273</text:p>
              </table:table-cell>
              <table:table-cell office:value-type="float" office:value="0.0260832980215708">
                <text:p>0.0260832980215708</text:p>
              </table:table-cell>
              <table:table-cell office:value-type="float" office:value="0.0259807637729389">
                <text:p>0.0259807637729389</text:p>
              </table:table-cell>
              <table:table-cell office:value-type="float" office:value="0.0258782822140279">
                <text:p>0.0258782822140279</text:p>
              </table:table-cell>
              <table:table-cell office:value-type="float" office:value="0.0257756085121905">
                <text:p>0.0257756085121905</text:p>
              </table:table-cell>
              <table:table-cell office:value-type="float" office:value="0.0256732211579343">
                <text:p>0.0256732211579343</text:p>
              </table:table-cell>
              <table:table-cell office:value-type="float" office:value="0.0255706573336223">
                <text:p>0.0255706573336223</text:p>
              </table:table-cell>
              <table:table-cell office:value-type="float" office:value="0.0254680233915682">
                <text:p>0.0254680233915682</text:p>
              </table:table-cell>
              <table:table-cell office:value-type="float" office:value="0.0253654382549656">
                <text:p>0.0253654382549656</text:p>
              </table:table-cell>
              <table:table-cell office:value-type="float" office:value="0.0252629412080715">
                <text:p>0.0252629412080715</text:p>
              </table:table-cell>
              <table:table-cell office:value-type="float" office:value="0.0251597205644008">
                <text:p>0.0251597205644008</text:p>
              </table:table-cell>
              <table:table-cell office:value-type="float" office:value="0.0250564959080542">
                <text:p>0.0250564959080542</text:p>
              </table:table-cell>
              <table:table-cell office:value-type="float" office:value="0.0249533366531081">
                <text:p>0.0249533366531081</text:p>
              </table:table-cell>
              <table:table-cell office:value-type="float" office:value="0.0248499160064506">
                <text:p>0.0248499160064506</text:p>
              </table:table-cell>
              <table:table-cell office:value-type="float" office:value="0.0247467799843298">
                <text:p>0.0247467799843298</text:p>
              </table:table-cell>
              <table:table-cell office:value-type="float" office:value="0.0246429555306577">
                <text:p>0.0246429555306577</text:p>
              </table:table-cell>
              <table:table-cell office:value-type="float" office:value="0.0245395635524218">
                <text:p>0.0245395635524218</text:p>
              </table:table-cell>
              <table:table-cell office:value-type="float" office:value="0.0244361442750964">
                <text:p>0.0244361442750964</text:p>
              </table:table-cell>
              <table:table-cell office:value-type="float" office:value="0.0243325136280024">
                <text:p>0.0243325136280024</text:p>
              </table:table-cell>
              <table:table-cell office:value-type="float" office:value="0.0242284316654707">
                <text:p>0.0242284316654707</text:p>
              </table:table-cell>
              <table:table-cell office:value-type="float" office:value="0.0241245873478732">
                <text:p>0.0241245873478732</text:p>
              </table:table-cell>
              <table:table-cell office:value-type="float" office:value="0.0240207170564988">
                <text:p>0.0240207170564988</text:p>
              </table:table-cell>
              <table:table-cell office:value-type="float" office:value="0.0239168032491623">
                <text:p>0.0239168032491623</text:p>
              </table:table-cell>
              <table:table-cell office:value-type="float" office:value="0.0238121795389899">
                <text:p>0.0238121795389899</text:p>
              </table:table-cell>
              <table:table-cell office:value-type="float" office:value="0.0237082003344911">
                <text:p>0.0237082003344911</text:p>
              </table:table-cell>
              <table:table-cell office:value-type="float" office:value="0.023603513845897">
                <text:p>0.023603513845897</text:p>
              </table:table-cell>
              <table:table-cell office:value-type="float" office:value="0.0234987643238272">
                <text:p>0.0234987643238272</text:p>
              </table:table-cell>
              <table:table-cell office:value-type="float" office:value="0.0232896900553246">
                <text:p>0.0232896900553246</text:p>
              </table:table-cell>
              <table:table-cell office:value-type="float" office:value="0.0231658774377096">
                <text:p>0.0231658774377096</text:p>
              </table:table-cell>
              <table:table-cell office:value-type="float" office:value="0.0230437692707103">
                <text:p>0.0230437692707103</text:p>
              </table:table-cell>
              <table:table-cell office:value-type="float" office:value="0.0229232314617887">
                <text:p>0.0229232314617887</text:p>
              </table:table-cell>
              <table:table-cell office:value-type="float" office:value="0.0228037958510837">
                <text:p>0.0228037958510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49cm" svg:y="4.205cm" style:legend-expansion="high" chart:style-name="ch2"/>
        <chart:plot-area chart:style-name="ch3" svg:x="0.32cm" svg:y="0.18cm" svg:width="13.409cm" svg:height="8.64cm">
          <chart:coordinate-region svg:x="1.65cm" svg:y="0.375cm" svg:width="12.079cm" svg:height="7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volution.B11:Convolution.GR11" chart:class="chart:ba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197.22856550931">
                <text:p>2197.22856550931</text:p>
                <draw:g>
                  <svg:desc>Convolution.B11:Convolution.GR11</svg:desc>
                </draw:g>
              </table:table-cell>
              <table:table-cell office:value-type="float" office:value="2133.23161699933">
                <text:p>2133.23161699933</text:p>
              </table:table-cell>
              <table:table-cell office:value-type="float" office:value="2071.0986572809">
                <text:p>2071.0986572809</text:p>
              </table:table-cell>
              <table:table-cell office:value-type="float" office:value="2010.77539541835">
                <text:p>2010.77539541835</text:p>
              </table:table-cell>
              <table:table-cell office:value-type="float" office:value="1952.20912176539">
                <text:p>1952.20912176539</text:p>
              </table:table-cell>
              <table:table-cell office:value-type="float" office:value="1895.34866190814">
                <text:p>1895.34866190814</text:p>
              </table:table-cell>
              <table:table-cell office:value-type="float" office:value="1840.14433194965">
                <text:p>1840.14433194965</text:p>
              </table:table-cell>
              <table:table-cell office:value-type="float" office:value="1786.54789509675">
                <text:p>1786.54789509675</text:p>
              </table:table-cell>
              <table:table-cell office:value-type="float" office:value="1734.51251951141">
                <text:p>1734.51251951141</text:p>
              </table:table-cell>
              <table:table-cell office:value-type="float" office:value="1683.99273738972">
                <text:p>1683.99273738972</text:p>
              </table:table-cell>
              <table:table-cell office:value-type="float" office:value="1634.94440523273">
                <text:p>1634.94440523273</text:p>
              </table:table-cell>
              <table:table-cell office:value-type="float" office:value="1587.3246652745">
                <text:p>1587.3246652745</text:p>
              </table:table-cell>
              <table:table-cell office:value-type="float" office:value="1541.09190803349">
                <text:p>1541.09190803349</text:p>
              </table:table-cell>
              <table:table-cell office:value-type="float" office:value="1496.20573595485">
                <text:p>1496.20573595485</text:p>
              </table:table-cell>
              <table:table-cell office:value-type="float" office:value="1452.6269281115">
                <text:p>1452.6269281115</text:p>
              </table:table-cell>
              <table:table-cell office:value-type="float" office:value="1410.3174059335">
                <text:p>1410.3174059335</text:p>
              </table:table-cell>
              <table:table-cell office:value-type="float" office:value="1369.24019993544">
                <text:p>1369.24019993544</text:p>
              </table:table-cell>
              <table:table-cell office:value-type="float" office:value="1329.35941741304">
                <text:p>1329.35941741304</text:p>
              </table:table-cell>
              <table:table-cell office:value-type="float" office:value="1290.64021108063">
                <text:p>1290.64021108063</text:p>
              </table:table-cell>
              <table:table-cell office:value-type="float" office:value="1253.04874862197">
                <text:p>1253.04874862197</text:p>
              </table:table-cell>
              <table:table-cell office:value-type="float" office:value="1216.55218312812">
                <text:p>1216.55218312812</text:p>
              </table:table-cell>
              <table:table-cell office:value-type="float" office:value="1181.11862439624">
                <text:p>1181.11862439624</text:p>
              </table:table-cell>
              <table:table-cell office:value-type="float" office:value="1146.71711106431">
                <text:p>1146.71711106431</text:p>
              </table:table-cell>
              <table:table-cell office:value-type="float" office:value="1113.31758355758">
                <text:p>1113.31758355758</text:p>
              </table:table-cell>
              <table:table-cell office:value-type="float" office:value="1080.89085782289">
                <text:p>1080.89085782289</text:p>
              </table:table-cell>
              <table:table-cell office:value-type="float" office:value="1049.40859982805">
                <text:p>1049.40859982805</text:p>
              </table:table-cell>
              <table:table-cell office:value-type="float" office:value="1018.84330080393">
                <text:p>1018.84330080393</text:p>
              </table:table-cell>
              <table:table-cell office:value-type="float" office:value="989.168253207701">
                <text:p>989.168253207701</text:p>
              </table:table-cell>
              <table:table-cell office:value-type="float" office:value="960.357527386118">
                <text:p>960.357527386118</text:p>
              </table:table-cell>
              <table:table-cell office:value-type="float" office:value="932.385948918561">
                <text:p>932.385948918561</text:p>
              </table:table-cell>
              <table:table-cell office:value-type="float" office:value="905.229076619962">
                <text:p>905.229076619962</text:p>
              </table:table-cell>
              <table:table-cell office:value-type="float" office:value="878.863181184429">
                <text:p>878.863181184429</text:p>
              </table:table-cell>
              <table:table-cell office:value-type="float" office:value="853.265224450902">
                <text:p>853.265224450902</text:p>
              </table:table-cell>
              <table:table-cell office:value-type="float" office:value="828.41283927272">
                <text:p>828.41283927272</text:p>
              </table:table-cell>
              <table:table-cell office:value-type="float" office:value="804.284309973515">
                <text:p>804.284309973515</text:p>
              </table:table-cell>
              <table:table-cell office:value-type="float" office:value="780.858553372345">
                <text:p>780.858553372345</text:p>
              </table:table-cell>
              <table:table-cell office:value-type="float" office:value="758.1151003615">
                <text:p>758.1151003615</text:p>
              </table:table-cell>
              <table:table-cell office:value-type="float" office:value="736.034078020873">
                <text:p>736.034078020873</text:p>
              </table:table-cell>
              <table:table-cell office:value-type="float" office:value="714.596192253275">
                <text:p>714.596192253275</text:p>
              </table:table-cell>
              <table:table-cell office:value-type="float" office:value="693.78271092551">
                <text:p>693.78271092551</text:p>
              </table:table-cell>
              <table:table-cell office:value-type="float" office:value="673.575447500495">
                <text:p>673.575447500495</text:p>
              </table:table-cell>
              <table:table-cell office:value-type="float" office:value="653.956745146112">
                <text:p>653.956745146112</text:p>
              </table:table-cell>
              <table:table-cell office:value-type="float" office:value="634.909461306904">
                <text:p>634.909461306904</text:p>
              </table:table-cell>
              <table:table-cell office:value-type="float" office:value="616.41695272515">
                <text:p>616.41695272515</text:p>
              </table:table-cell>
              <table:table-cell office:value-type="float" office:value="598.463060898204">
                <text:p>598.463060898204</text:p>
              </table:table-cell>
              <table:table-cell office:value-type="float" office:value="581.032097959421">
                <text:p>581.032097959421</text:p>
              </table:table-cell>
              <table:table-cell office:value-type="float" office:value="564.108832970312">
                <text:p>564.108832970312</text:p>
              </table:table-cell>
              <table:table-cell office:value-type="float" office:value="547.678478611953">
                <text:p>547.678478611953</text:p>
              </table:table-cell>
              <table:table-cell office:value-type="float" office:value="531.726678264032">
                <text:p>531.726678264032</text:p>
              </table:table-cell>
              <table:table-cell office:value-type="float" office:value="516.239493460225">
                <text:p>516.239493460225</text:p>
              </table:table-cell>
              <table:table-cell office:value-type="float" office:value="501.203391708957">
                <text:p>501.203391708957</text:p>
              </table:table-cell>
              <table:table-cell office:value-type="float" office:value="486.60523466889">
                <text:p>486.60523466889</text:p>
              </table:table-cell>
              <table:table-cell office:value-type="float" office:value="472.432266668825">
                <text:p>472.432266668825</text:p>
              </table:table-cell>
              <table:table-cell office:value-type="float" office:value="458.672103561966">
                <text:p>458.672103561966</text:p>
              </table:table-cell>
              <table:table-cell office:value-type="float" office:value="445.312721904822">
                <text:p>445.312721904822</text:p>
              </table:table-cell>
              <table:table-cell office:value-type="float" office:value="432.342448451283">
                <text:p>432.342448451283</text:p>
              </table:table-cell>
              <table:table-cell office:value-type="float" office:value="419.749949952702">
                <text:p>419.749949952702</text:p>
              </table:table-cell>
              <table:table-cell office:value-type="float" office:value="407.52422325505">
                <text:p>407.52422325505</text:p>
              </table:table-cell>
              <table:table-cell office:value-type="float" office:value="395.654585684515">
                <text:p>395.654585684515</text:p>
              </table:table-cell>
              <table:table-cell office:value-type="float" office:value="384.130665713121">
                <text:p>384.130665713121</text:p>
              </table:table-cell>
              <table:table-cell office:value-type="float" office:value="372.942393896234">
                <text:p>372.942393896234</text:p>
              </table:table-cell>
              <table:table-cell office:value-type="float" office:value="362.079994074014">
                <text:p>362.079994074014</text:p>
              </table:table-cell>
              <table:table-cell office:value-type="float" office:value="351.53397482914">
                <text:p>351.53397482914</text:p>
              </table:table-cell>
              <table:table-cell office:value-type="float" office:value="341.295121193339">
                <text:p>341.295121193339</text:p>
              </table:table-cell>
              <table:table-cell office:value-type="float" office:value="331.354486595475">
                <text:p>331.354486595475</text:p>
              </table:table-cell>
              <table:table-cell office:value-type="float" office:value="321.703385044151">
                <text:p>321.703385044151</text:p>
              </table:table-cell>
              <table:table-cell office:value-type="float" office:value="312.33338353801">
                <text:p>312.33338353801</text:p>
              </table:table-cell>
              <table:table-cell office:value-type="float" office:value="303.236294697097">
                <text:p>303.236294697097</text:p>
              </table:table-cell>
              <table:table-cell office:value-type="float" office:value="294.404169608832">
                <text:p>294.404169608832</text:p>
              </table:table-cell>
              <table:table-cell office:value-type="float" office:value="285.829290882362">
                <text:p>285.829290882362</text:p>
              </table:table-cell>
              <table:table-cell office:value-type="float" office:value="277.504165905205">
                <text:p>277.504165905205</text:p>
              </table:table-cell>
              <table:table-cell office:value-type="float" office:value="269.421520296316">
                <text:p>269.421520296316</text:p>
              </table:table-cell>
              <table:table-cell office:value-type="float" office:value="261.574291549821">
                <text:p>261.574291549821</text:p>
              </table:table-cell>
              <table:table-cell office:value-type="float" office:value="253.955622863904">
                <text:p>253.955622863904</text:p>
              </table:table-cell>
              <table:table-cell office:value-type="float" office:value="246.558857149422">
                <text:p>246.558857149422</text:p>
              </table:table-cell>
              <table:table-cell office:value-type="float" office:value="239.377531213031">
                <text:p>239.377531213031</text:p>
              </table:table-cell>
              <table:table-cell office:value-type="float" office:value="232.405370109738">
                <text:p>232.405370109738</text:p>
              </table:table-cell>
              <table:table-cell office:value-type="float" office:value="225.63628165994">
                <text:p>225.63628165994</text:p>
              </table:table-cell>
              <table:table-cell office:value-type="float" office:value="219.064351126156">
                <text:p>219.064351126156</text:p>
              </table:table-cell>
              <table:table-cell office:value-type="float" office:value="212.683836044811">
                <text:p>212.683836044811</text:p>
              </table:table-cell>
              <table:table-cell office:value-type="float" office:value="206.489161208555">
                <text:p>206.489161208555</text:p>
              </table:table-cell>
              <table:table-cell office:value-type="float" office:value="200.474913794713">
                <text:p>200.474913794713</text:p>
              </table:table-cell>
              <table:table-cell office:value-type="float" office:value="194.635838635644">
                <text:p>194.635838635644</text:p>
              </table:table-cell>
              <table:table-cell office:value-type="float" office:value="188.966833626839">
                <text:p>188.966833626839</text:p>
              </table:table-cell>
              <table:table-cell office:value-type="float" office:value="183.462945268775">
                <text:p>183.462945268775</text:p>
              </table:table-cell>
              <table:table-cell office:value-type="float" office:value="178.119364338617">
                <text:p>178.119364338617</text:p>
              </table:table-cell>
              <table:table-cell office:value-type="float" office:value="172.931421687978">
                <text:p>172.931421687978</text:p>
              </table:table-cell>
              <table:table-cell office:value-type="float" office:value="167.894584163085">
                <text:p>167.894584163085</text:p>
              </table:table-cell>
              <table:table-cell office:value-type="float" office:value="163.004450643772">
                <text:p>163.004450643772</text:p>
              </table:table-cell>
              <table:table-cell office:value-type="float" office:value="158.256748197837">
                <text:p>158.256748197837</text:p>
              </table:table-cell>
              <table:table-cell office:value-type="float" office:value="153.647328347414">
                <text:p>153.647328347414</text:p>
              </table:table-cell>
              <table:table-cell office:value-type="float" office:value="149.172163444092">
                <text:p>149.172163444092</text:p>
              </table:table-cell>
              <table:table-cell office:value-type="float" office:value="144.827343149603">
                <text:p>144.827343149603</text:p>
              </table:table-cell>
              <table:table-cell office:value-type="float" office:value="140.609071019032">
                <text:p>140.609071019032</text:p>
              </table:table-cell>
              <table:table-cell office:value-type="float" office:value="136.513661183527">
                <text:p>136.513661183527</text:p>
              </table:table-cell>
              <table:table-cell office:value-type="float" office:value="132.537535129638">
                <text:p>132.537535129638</text:p>
              </table:table-cell>
              <table:table-cell office:value-type="float" office:value="128.677218572464">
                <text:p>128.677218572464</text:p>
              </table:table-cell>
              <table:table-cell office:value-type="float" office:value="124.929338419868">
                <text:p>124.929338419868</text:p>
              </table:table-cell>
              <table:table-cell office:value-type="float" office:value="121.290619825114">
                <text:p>121.290619825114</text:p>
              </table:table-cell>
              <table:table-cell office:value-type="float" office:value="117.757883325354">
                <text:p>117.757883325354</text:p>
              </table:table-cell>
              <table:table-cell office:value-type="float" office:value="114.32804206345">
                <text:p>114.32804206345</text:p>
              </table:table-cell>
              <table:table-cell office:value-type="float" office:value="110.998099090728">
                <text:p>110.998099090728</text:p>
              </table:table-cell>
              <table:table-cell office:value-type="float" office:value="107.76514474828">
                <text:p>107.76514474828</text:p>
              </table:table-cell>
              <table:table-cell office:value-type="float" office:value="104.626354124544">
                <text:p>104.626354124544</text:p>
              </table:table-cell>
              <table:table-cell office:value-type="float" office:value="101.578984586935">
                <text:p>101.578984586935</text:p>
              </table:table-cell>
              <table:table-cell office:value-type="float" office:value="98.6203733853742">
                <text:p>98.6203733853742</text:p>
              </table:table-cell>
              <table:table-cell office:value-type="float" office:value="95.747935325606">
                <text:p>95.747935325606</text:p>
              </table:table-cell>
              <table:table-cell office:value-type="float" office:value="92.9591605102971">
                <text:p>92.9591605102971</text:p>
              </table:table-cell>
              <table:table-cell office:value-type="float" office:value="90.2516121459195">
                <text:p>90.2516121459195</text:p>
              </table:table-cell>
              <table:table-cell office:value-type="float" office:value="87.6229244135141">
                <text:p>87.6229244135141</text:p>
              </table:table-cell>
              <table:table-cell office:value-type="float" office:value="85.07080040147">
                <text:p>85.07080040147</text:p>
              </table:table-cell>
              <table:table-cell office:value-type="float" office:value="82.5930100985146">
                <text:p>82.5930100985146</text:p>
              </table:table-cell>
              <table:table-cell office:value-type="float" office:value="80.1873884451598">
                <text:p>80.1873884451598</text:p>
              </table:table-cell>
              <table:table-cell office:value-type="float" office:value="77.8518334419027">
                <text:p>77.8518334419027</text:p>
              </table:table-cell>
              <table:table-cell office:value-type="float" office:value="75.5843043125269">
                <text:p>75.5843043125269</text:p>
              </table:table-cell>
              <table:table-cell office:value-type="float" office:value="73.3828197208999">
                <text:p>73.3828197208999</text:p>
              </table:table-cell>
              <table:table-cell office:value-type="float" office:value="71.2454560397086">
                <text:p>71.2454560397086</text:p>
              </table:table-cell>
              <table:table-cell office:value-type="float" office:value="69.17034566962">
                <text:p>69.17034566962</text:p>
              </table:table-cell>
              <table:table-cell office:value-type="float" office:value="67.1556754073981">
                <text:p>67.1556754073981</text:p>
              </table:table-cell>
              <table:table-cell office:value-type="float" office:value="65.1996848615515">
                <text:p>65.1996848615515</text:p>
              </table:table-cell>
              <table:table-cell office:value-type="float" office:value="63.3006649141277">
                <text:p>63.3006649141277</text:p>
              </table:table-cell>
              <table:table-cell office:value-type="float" office:value="61.4569562273084">
                <text:p>61.4569562273084</text:p>
              </table:table-cell>
              <table:table-cell office:value-type="float" office:value="59.6669477935033">
                <text:p>59.6669477935033</text:p>
              </table:table-cell>
              <table:table-cell office:value-type="float" office:value="57.9290755276731">
                <text:p>57.9290755276731</text:p>
              </table:table-cell>
              <table:table-cell office:value-type="float" office:value="56.2418209006535">
                <text:p>56.2418209006535</text:p>
              </table:table-cell>
              <table:table-cell office:value-type="float" office:value="54.603709612285">
                <text:p>54.603709612285</text:p>
              </table:table-cell>
              <table:table-cell office:value-type="float" office:value="53.0133103031893">
                <text:p>53.0133103031893</text:p>
              </table:table-cell>
              <table:table-cell office:value-type="float" office:value="51.4692333040673">
                <text:p>51.4692333040673</text:p>
              </table:table-cell>
              <table:table-cell office:value-type="float" office:value="49.9701294214245">
                <text:p>49.9701294214245</text:p>
              </table:table-cell>
              <table:table-cell office:value-type="float" office:value="48.5146887586646">
                <text:p>48.5146887586646</text:p>
              </table:table-cell>
              <table:table-cell office:value-type="float" office:value="47.101639571519">
                <text:p>47.101639571519</text:p>
              </table:table-cell>
              <table:table-cell office:value-type="float" office:value="45.7297471568146">
                <text:p>45.7297471568146</text:p>
              </table:table-cell>
              <table:table-cell office:value-type="float" office:value="44.3978127736064">
                <text:p>44.3978127736064</text:p>
              </table:table-cell>
              <table:table-cell office:value-type="float" office:value="43.1046725957344">
                <text:p>43.1046725957344</text:p>
              </table:table-cell>
              <table:table-cell office:value-type="float" office:value="41.8491966948877">
                <text:p>41.8491966948877</text:p>
              </table:table-cell>
              <table:table-cell office:value-type="float" office:value="40.6302880532891">
                <text:p>40.6302880532891</text:p>
              </table:table-cell>
              <table:table-cell office:value-type="float" office:value="39.446881605135">
                <text:p>39.446881605135</text:p>
              </table:table-cell>
              <table:table-cell office:value-type="float" office:value="38.2979433059563">
                <text:p>38.2979433059563</text:p>
              </table:table-cell>
              <table:table-cell office:value-type="float" office:value="37.1824692290838">
                <text:p>37.1824692290838</text:p>
              </table:table-cell>
              <table:table-cell office:value-type="float" office:value="36.0994846884309">
                <text:p>36.0994846884309</text:p>
              </table:table-cell>
              <table:table-cell office:value-type="float" office:value="35.0480433868261">
                <text:p>35.0480433868261</text:p>
              </table:table-cell>
              <table:table-cell office:value-type="float" office:value="34.0272265891515">
                <text:p>34.0272265891515</text:p>
              </table:table-cell>
              <table:table-cell office:value-type="float" office:value="33.0361423195646">
                <text:p>33.0361423195646</text:p>
              </table:table-cell>
              <table:table-cell office:value-type="float" office:value="32.0739245821016">
                <text:p>32.0739245821016</text:p>
              </table:table-cell>
              <table:table-cell office:value-type="float" office:value="31.1397326039821">
                <text:p>31.1397326039821</text:p>
              </table:table-cell>
              <table:table-cell office:value-type="float" office:value="30.2327501009535">
                <text:p>30.2327501009535</text:p>
              </table:table-cell>
              <table:table-cell office:value-type="float" office:value="29.3521845640325">
                <text:p>29.3521845640325</text:p>
              </table:table-cell>
              <table:table-cell office:value-type="float" office:value="28.4972665670219">
                <text:p>28.4972665670219</text:p>
              </table:table-cell>
              <table:table-cell office:value-type="float" office:value="27.667249094196">
                <text:p>27.667249094196</text:p>
              </table:table-cell>
              <table:table-cell office:value-type="float" office:value="26.8614068875689">
                <text:p>26.8614068875689</text:p>
              </table:table-cell>
              <table:table-cell office:value-type="float" office:value="26.0790358131737">
                <text:p>26.0790358131737</text:p>
              </table:table-cell>
              <table:table-cell office:value-type="float" office:value="25.3194522457997">
                <text:p>25.3194522457997</text:p>
              </table:table-cell>
              <table:table-cell office:value-type="float" office:value="24.5819924716502">
                <text:p>24.5819924716502</text:p>
              </table:table-cell>
              <table:table-cell office:value-type="float" office:value="23.8660121083982">
                <text:p>23.8660121083982</text:p>
              </table:table-cell>
              <table:table-cell office:value-type="float" office:value="23.1708855421342">
                <text:p>23.1708855421342</text:p>
              </table:table-cell>
              <table:table-cell office:value-type="float" office:value="22.4960053807128">
                <text:p>22.4960053807128</text:p>
              </table:table-cell>
              <table:table-cell office:value-type="float" office:value="21.8407819230222">
                <text:p>21.8407819230222</text:p>
              </table:table-cell>
              <table:table-cell office:value-type="float" office:value="21.2046426437108">
                <text:p>21.2046426437108</text:p>
              </table:table-cell>
              <table:table-cell office:value-type="float" office:value="20.5870316929231">
                <text:p>20.5870316929231</text:p>
              </table:table-cell>
              <table:table-cell office:value-type="float" office:value="19.987409410605">
                <text:p>19.987409410605</text:p>
              </table:table-cell>
              <table:table-cell office:value-type="float" office:value="19.4052518549563">
                <text:p>19.4052518549563</text:p>
              </table:table-cell>
              <table:table-cell office:value-type="float" office:value="18.8400503446178">
                <text:p>18.8400503446178</text:p>
              </table:table-cell>
              <table:table-cell office:value-type="float" office:value="18.291311014192">
                <text:p>18.291311014192</text:p>
              </table:table-cell>
              <table:table-cell office:value-type="float" office:value="17.7585543827107">
                <text:p>17.7585543827107</text:p>
              </table:table-cell>
              <table:table-cell office:value-type="float" office:value="17.2413149346706">
                <text:p>17.2413149346706</text:p>
              </table:table-cell>
              <table:table-cell office:value-type="float" office:value="16.7391407132724">
                <text:p>16.7391407132724</text:p>
              </table:table-cell>
              <table:table-cell office:value-type="float" office:value="16.2515929255072">
                <text:p>16.2515929255072</text:p>
              </table:table-cell>
              <table:table-cell office:value-type="float" office:value="15.7782455587448">
                <text:p>15.7782455587448</text:p>
              </table:table-cell>
              <table:table-cell office:value-type="float" office:value="15.3186850084901">
                <text:p>15.3186850084901</text:p>
              </table:table-cell>
              <table:table-cell office:value-type="float" office:value="14.8725097169807">
                <text:p>14.8725097169807</text:p>
              </table:table-cell>
              <table:table-cell office:value-type="float" office:value="14.4393298223114">
                <text:p>14.4393298223114</text:p>
              </table:table-cell>
              <table:table-cell office:value-type="float" office:value="14.018766817778">
                <text:p>14.018766817778</text:p>
              </table:table-cell>
              <table:table-cell office:value-type="float" office:value="13.6104532211437">
                <text:p>13.6104532211437</text:p>
              </table:table-cell>
              <table:table-cell office:value-type="float" office:value="13.2140322535376">
                <text:p>13.2140322535376</text:p>
              </table:table-cell>
              <table:table-cell office:value-type="float" office:value="12.8291575277064">
                <text:p>12.8291575277064</text:p>
              </table:table-cell>
              <table:table-cell office:value-type="float" office:value="12.455492745346">
                <text:p>12.455492745346</text:p>
              </table:table-cell>
              <table:table-cell office:value-type="float" office:value="12.0927114032486">
                <text:p>12.0927114032486</text:p>
              </table:table-cell>
              <table:table-cell office:value-type="float" office:value="11.7404965080083">
                <text:p>11.7404965080083</text:p>
              </table:table-cell>
              <table:table-cell office:value-type="float" office:value="11.3985402990372">
                <text:p>11.3985402990372</text:p>
              </table:table-cell>
              <table:table-cell office:value-type="float" office:value="11.0665439796478">
                <text:p>11.0665439796478</text:p>
              </table:table-cell>
              <table:table-cell office:value-type="float" office:value="10.7442174559687">
                <text:p>10.7442174559687</text:p>
              </table:table-cell>
              <table:table-cell office:value-type="float" office:value="10.4312790834648">
                <text:p>10.4312790834648</text:p>
              </table:table-cell>
              <table:table-cell office:value-type="float" office:value="10.1274554208396">
                <text:p>10.1274554208396</text:p>
              </table:table-cell>
              <table:table-cell office:value-type="float" office:value="9.83248099110638">
                <text:p>9.83248099110638</text:p>
              </table:table-cell>
              <table:table-cell office:value-type="float" office:value="9.54609804961784">
                <text:p>9.54609804961784</text:p>
              </table:table-cell>
              <table:table-cell office:value-type="float" office:value="9.26805635885227">
                <text:p>9.26805635885227</text:p>
              </table:table-cell>
              <table:table-cell office:value-type="float" office:value="8.99811296975949">
                <text:p>8.99811296975949</text:p>
              </table:table-cell>
              <table:table-cell office:value-type="float" office:value="8.73603200947523">
                <text:p>8.73603200947523</text:p>
              </table:table-cell>
              <table:table-cell office:value-type="float" office:value="8.48158447521867">
                <text:p>8.48158447521867</text:p>
              </table:table-cell>
              <table:table-cell office:value-type="float" office:value="8.23454803419289">
                <text:p>8.23454803419289</text:p>
              </table:table-cell>
              <table:table-cell office:value-type="float" office:value="7.99470682931348">
                <text:p>7.99470682931348</text:p>
              </table:table-cell>
              <table:table-cell office:value-type="float" office:value="7.76185129059561">
                <text:p>7.76185129059561</text:p>
              </table:table-cell>
              <table:table-cell office:value-type="float" office:value="7.53577795203457">
                <text:p>7.53577795203457</text:p>
              </table:table-cell>
              <table:table-cell office:value-type="float" office:value="7.31628927381998">
                <text:p>7.31628927381998</text:p>
              </table:table-cell>
              <table:table-cell office:value-type="float" office:value="7.10319346972813">
                <text:p>7.10319346972813</text:p>
              </table:table-cell>
              <table:table-cell office:value-type="float" office:value="6.89630433954188">
                <text:p>6.89630433954188</text:p>
              </table:table-cell>
              <table:table-cell office:value-type="float" office:value="6.69544110635133">
                <text:p>6.69544110635133</text:p>
              </table:table-cell>
              <table:table-cell office:value-type="float" office:value="6.50042825859353">
                <text:p>6.50042825859353</text:p>
              </table:table-cell>
              <table:table-cell office:value-type="float" office:value="6.31109539669275">
                <text:p>6.31109539669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49cm" svg:y="4.205cm" style:legend-expansion="high" chart:style-name="ch2"/>
        <chart:plot-area chart:style-name="ch3" svg:x="0.32cm" svg:y="0.18cm" svg:width="13.409cm" svg:height="8.64cm">
          <chart:coordinate-region svg:x="1.944cm" svg:y="0.375cm" svg:width="11.785cm" svg:height="7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volution.B12:Convolution.EG12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onvolution.B12:Convolution.EG12</svg:desc>
                </draw:g>
              </table:table-cell>
              <table:table-cell office:value-type="float" office:value="0.0434841231140755">
                <text:p>0.0434841231140755</text:p>
              </table:table-cell>
              <table:table-cell office:value-type="float" office:value="0.128293451384645">
                <text:p>0.128293451384645</text:p>
              </table:table-cell>
              <table:table-cell office:value-type="float" office:value="0.254302375622087">
                <text:p>0.254302375622087</text:p>
              </table:table-cell>
              <table:table-cell office:value-type="float" office:value="0.419372035089943">
                <text:p>0.419372035089943</text:p>
              </table:table-cell>
              <table:table-cell office:value-type="float" office:value="0.622700154814239">
                <text:p>0.622700154814239</text:p>
              </table:table-cell>
              <table:table-cell office:value-type="float" office:value="0.864293506580569">
                <text:p>0.864293506580569</text:p>
              </table:table-cell>
              <table:table-cell office:value-type="float" office:value="1.14442940477025">
                <text:p>1.14442940477025</text:p>
              </table:table-cell>
              <table:table-cell office:value-type="float" office:value="1.4633583683747">
                <text:p>1.4633583683747</text:p>
              </table:table-cell>
              <table:table-cell office:value-type="float" office:value="1.82158325132692">
                <text:p>1.82158325132692</text:p>
              </table:table-cell>
              <table:table-cell office:value-type="float" office:value="2.21935177049875">
                <text:p>2.21935177049875</text:p>
              </table:table-cell>
              <table:table-cell office:value-type="float" office:value="2.65699270105385">
                <text:p>2.65699270105385</text:p>
              </table:table-cell>
              <table:table-cell office:value-type="float" office:value="3.13498311136694">
                <text:p>3.13498311136694</text:p>
              </table:table-cell>
              <table:table-cell office:value-type="float" office:value="3.65356839440095">
                <text:p>3.65356839440095</text:p>
              </table:table-cell>
              <table:table-cell office:value-type="float" office:value="4.21315748232059">
                <text:p>4.21315748232059</text:p>
              </table:table-cell>
              <table:table-cell office:value-type="float" office:value="4.81426865345476">
                <text:p>4.81426865345476</text:p>
              </table:table-cell>
              <table:table-cell office:value-type="float" office:value="5.45742645876966">
                <text:p>5.45742645876966</text:p>
              </table:table-cell>
              <table:table-cell office:value-type="float" office:value="6.1427745695837">
                <text:p>6.1427745695837</text:p>
              </table:table-cell>
              <table:table-cell office:value-type="float" office:value="6.87073268053519">
                <text:p>6.87073268053519</text:p>
              </table:table-cell>
              <table:table-cell office:value-type="float" office:value="7.64202967313614">
                <text:p>7.64202967313614</text:p>
              </table:table-cell>
              <table:table-cell office:value-type="float" office:value="8.45710244351845">
                <text:p>8.45710244351845</text:p>
              </table:table-cell>
              <table:table-cell office:value-type="float" office:value="9.31624690922156">
                <text:p>9.31624690922156</text:p>
              </table:table-cell>
              <table:table-cell office:value-type="float" office:value="10.2201985138254">
                <text:p>10.2201985138254</text:p>
              </table:table-cell>
              <table:table-cell office:value-type="float" office:value="11.1696176145268">
                <text:p>11.1696176145268</text:p>
              </table:table-cell>
              <table:table-cell office:value-type="float" office:value="12.1649754168535">
                <text:p>12.1649754168535</text:p>
              </table:table-cell>
              <table:table-cell office:value-type="float" office:value="13.2069462696979">
                <text:p>13.2069462696979</text:p>
              </table:table-cell>
              <table:table-cell office:value-type="float" office:value="14.2961987360494">
                <text:p>14.2961987360494</text:p>
              </table:table-cell>
              <table:table-cell office:value-type="float" office:value="15.4334579990272">
                <text:p>15.4334579990272</text:p>
              </table:table-cell>
              <table:table-cell office:value-type="float" office:value="16.6194840969752">
                <text:p>16.6194840969752</text:p>
              </table:table-cell>
              <table:table-cell office:value-type="float" office:value="17.8553332038234">
                <text:p>17.8553332038234</text:p>
              </table:table-cell>
              <table:table-cell office:value-type="float" office:value="19.1419092181758">
                <text:p>19.1419092181758</text:p>
              </table:table-cell>
              <table:table-cell office:value-type="float" office:value="20.4801196441495">
                <text:p>20.4801196441495</text:p>
              </table:table-cell>
              <table:table-cell office:value-type="float" office:value="21.8709427351131">
                <text:p>21.8709427351131</text:p>
              </table:table-cell>
              <table:table-cell office:value-type="float" office:value="23.3150621566831">
                <text:p>23.3150621566831</text:p>
              </table:table-cell>
              <table:table-cell office:value-type="float" office:value="24.8146383318739">
                <text:p>24.8146383318739</text:p>
              </table:table-cell>
              <table:table-cell office:value-type="float" office:value="26.3704922334655">
                <text:p>26.3704922334655</text:p>
              </table:table-cell>
              <table:table-cell office:value-type="float" office:value="27.9837944916201">
                <text:p>27.9837944916201</text:p>
              </table:table-cell>
              <table:table-cell office:value-type="float" office:value="29.6557933039596">
                <text:p>29.6557933039596</text:p>
              </table:table-cell>
              <table:table-cell office:value-type="float" office:value="31.3874306636305">
                <text:p>31.3874306636305</text:p>
              </table:table-cell>
              <table:table-cell office:value-type="float" office:value="33.1806510008613">
                <text:p>33.1806510008613</text:p>
              </table:table-cell>
              <table:table-cell office:value-type="float" office:value="35.0363394839181">
                <text:p>35.0363394839181</text:p>
              </table:table-cell>
              <table:table-cell office:value-type="float" office:value="36.9556120434166">
                <text:p>36.9556120434166</text:p>
              </table:table-cell>
              <table:table-cell office:value-type="float" office:value="38.9392829954459">
                <text:p>38.9392829954459</text:p>
              </table:table-cell>
              <table:table-cell office:value-type="float" office:value="40.9897926991946">
                <text:p>40.9897926991946</text:p>
              </table:table-cell>
              <table:table-cell office:value-type="float" office:value="43.1083597584601">
                <text:p>43.1083597584601</text:p>
              </table:table-cell>
              <table:table-cell office:value-type="float" office:value="45.2965743888148">
                <text:p>45.2965743888148</text:p>
              </table:table-cell>
              <table:table-cell office:value-type="float" office:value="47.5572855453518">
                <text:p>47.5572855453518</text:p>
              </table:table-cell>
              <table:table-cell office:value-type="float" office:value="49.8911391470435">
                <text:p>49.8911391470435</text:p>
              </table:table-cell>
              <table:table-cell office:value-type="float" office:value="52.301140780129">
                <text:p>52.301140780129</text:p>
              </table:table-cell>
              <table:table-cell office:value-type="float" office:value="54.7894430764855">
                <text:p>54.7894430764855</text:p>
              </table:table-cell>
              <table:table-cell office:value-type="float" office:value="57.3572760085608">
                <text:p>57.3572760085608</text:p>
              </table:table-cell>
              <table:table-cell office:value-type="float" office:value="60.0077285060149">
                <text:p>60.0077285060149</text:p>
              </table:table-cell>
              <table:table-cell office:value-type="float" office:value="62.7411761725983">
                <text:p>62.7411761725983</text:p>
              </table:table-cell>
              <table:table-cell office:value-type="float" office:value="65.5614522271803">
                <text:p>65.5614522271803</text:p>
              </table:table-cell>
              <table:table-cell office:value-type="float" office:value="68.4704736929178">
                <text:p>68.4704736929178</text:p>
              </table:table-cell>
              <table:table-cell office:value-type="float" office:value="71.471668235692">
                <text:p>71.471668235692</text:p>
              </table:table-cell>
              <table:table-cell office:value-type="float" office:value="74.5682647369172">
                <text:p>74.5682647369172</text:p>
              </table:table-cell>
              <table:table-cell office:value-type="float" office:value="77.762746420687">
                <text:p>77.762746420687</text:p>
              </table:table-cell>
              <table:table-cell office:value-type="float" office:value="81.0574253331404">
                <text:p>81.0574253331404</text:p>
              </table:table-cell>
              <table:table-cell office:value-type="float" office:value="84.4554164345489">
                <text:p>84.4554164345489</text:p>
              </table:table-cell>
              <table:table-cell office:value-type="float" office:value="87.9602182078445">
                <text:p>87.9602182078445</text:p>
              </table:table-cell>
              <table:table-cell office:value-type="float" office:value="91.5743442157673">
                <text:p>91.5743442157673</text:p>
              </table:table-cell>
              <table:table-cell office:value-type="float" office:value="95.3016859871292">
                <text:p>95.3016859871292</text:p>
              </table:table-cell>
              <table:table-cell office:value-type="float" office:value="99.1450925027906">
                <text:p>99.1450925027906</text:p>
              </table:table-cell>
              <table:table-cell office:value-type="float" office:value="103.108401157959">
                <text:p>103.108401157959</text:p>
              </table:table-cell>
              <table:table-cell office:value-type="float" office:value="107.195239588522">
                <text:p>107.195239588522</text:p>
              </table:table-cell>
              <table:table-cell office:value-type="float" office:value="111.409588103955">
                <text:p>111.409588103955</text:p>
              </table:table-cell>
              <table:table-cell office:value-type="float" office:value="115.755911140745">
                <text:p>115.755911140745</text:p>
              </table:table-cell>
              <table:table-cell office:value-type="float" office:value="120.237745329706">
                <text:p>120.237745329706</text:p>
              </table:table-cell>
              <table:table-cell office:value-type="float" office:value="124.859933555466">
                <text:p>124.859933555466</text:p>
              </table:table-cell>
              <table:table-cell office:value-type="float" office:value="129.626931746221">
                <text:p>129.626931746221</text:p>
              </table:table-cell>
              <table:table-cell office:value-type="float" office:value="134.541758182733">
                <text:p>134.541758182733</text:p>
              </table:table-cell>
              <table:table-cell office:value-type="float" office:value="139.610385125136">
                <text:p>139.610385125136</text:p>
              </table:table-cell>
              <table:table-cell office:value-type="float" office:value="144.836798760775">
                <text:p>144.836798760775</text:p>
              </table:table-cell>
              <table:table-cell office:value-type="float" office:value="150.227581435319">
                <text:p>150.227581435319</text:p>
              </table:table-cell>
              <table:table-cell office:value-type="float" office:value="155.785248023851">
                <text:p>155.785248023851</text:p>
              </table:table-cell>
              <table:table-cell office:value-type="float" office:value="161.515642770469">
                <text:p>161.515642770469</text:p>
              </table:table-cell>
              <table:table-cell office:value-type="float" office:value="167.425997769468">
                <text:p>167.425997769468</text:p>
              </table:table-cell>
              <table:table-cell office:value-type="float" office:value="173.520234854308">
                <text:p>173.520234854308</text:p>
              </table:table-cell>
              <table:table-cell office:value-type="float" office:value="179.805058696154">
                <text:p>179.805058696154</text:p>
              </table:table-cell>
              <table:table-cell office:value-type="float" office:value="186.286146771241">
                <text:p>186.286146771241</text:p>
              </table:table-cell>
              <table:table-cell office:value-type="float" office:value="192.969898559664">
                <text:p>192.969898559664</text:p>
              </table:table-cell>
              <table:table-cell office:value-type="float" office:value="199.863062230884">
                <text:p>199.863062230884</text:p>
              </table:table-cell>
              <table:table-cell office:value-type="float" office:value="206.970451645828">
                <text:p>206.970451645828</text:p>
              </table:table-cell>
              <table:table-cell office:value-type="float" office:value="214.3009867855">
                <text:p>214.3009867855</text:p>
              </table:table-cell>
              <table:table-cell office:value-type="float" office:value="221.860058215322">
                <text:p>221.860058215322</text:p>
              </table:table-cell>
              <table:table-cell office:value-type="float" office:value="229.655157441518">
                <text:p>229.655157441518</text:p>
              </table:table-cell>
              <table:table-cell office:value-type="float" office:value="237.693761861392">
                <text:p>237.693761861392</text:p>
              </table:table-cell>
              <table:table-cell office:value-type="float" office:value="245.984527663668">
                <text:p>245.984527663668</text:p>
              </table:table-cell>
              <table:table-cell office:value-type="float" office:value="254.534773308816">
                <text:p>254.534773308816</text:p>
              </table:table-cell>
              <table:table-cell office:value-type="float" office:value="263.351742725668">
                <text:p>263.351742725668</text:p>
              </table:table-cell>
              <table:table-cell office:value-type="float" office:value="272.445196252616">
                <text:p>272.445196252616</text:p>
              </table:table-cell>
              <table:table-cell office:value-type="float" office:value="281.823782051512">
                <text:p>281.823782051512</text:p>
              </table:table-cell>
              <table:table-cell office:value-type="float" office:value="291.493357979806">
                <text:p>291.493357979806</text:p>
              </table:table-cell>
              <table:table-cell office:value-type="float" office:value="301.465114308162">
                <text:p>301.465114308162</text:p>
              </table:table-cell>
              <table:table-cell office:value-type="float" office:value="311.745097268991">
                <text:p>311.745097268991</text:p>
              </table:table-cell>
              <table:table-cell office:value-type="float" office:value="322.346431730942">
                <text:p>322.346431730942</text:p>
              </table:table-cell>
              <table:table-cell office:value-type="float" office:value="333.274330888178">
                <text:p>333.274330888178</text:p>
              </table:table-cell>
              <table:table-cell office:value-type="float" office:value="344.542016294735">
                <text:p>344.542016294735</text:p>
              </table:table-cell>
              <table:table-cell office:value-type="float" office:value="356.160238401009">
                <text:p>356.160238401009</text:p>
              </table:table-cell>
              <table:table-cell office:value-type="float" office:value="368.142165638399">
                <text:p>368.142165638399</text:p>
              </table:table-cell>
              <table:table-cell office:value-type="float" office:value="379.566381887661">
                <text:p>379.566381887661</text:p>
              </table:table-cell>
              <table:table-cell office:value-type="float" office:value="390.662026810922">
                <text:p>390.662026810922</text:p>
              </table:table-cell>
              <table:table-cell office:value-type="float" office:value="401.568677247176">
                <text:p>401.568677247176</text:p>
              </table:table-cell>
              <table:table-cell office:value-type="float" office:value="412.437890655812">
                <text:p>412.437890655812</text:p>
              </table:table-cell>
              <table:table-cell office:value-type="float" office:value="423.359795156512">
                <text:p>423.359795156512</text:p>
              </table:table-cell>
              <table:table-cell office:value-type="float" office:value="434.395315482604">
                <text:p>434.395315482604</text:p>
              </table:table-cell>
              <table:table-cell office:value-type="float" office:value="445.580730271805">
                <text:p>445.580730271805</text:p>
              </table:table-cell>
              <table:table-cell office:value-type="float" office:value="456.951776378515">
                <text:p>456.951776378515</text:p>
              </table:table-cell>
              <table:table-cell office:value-type="float" office:value="468.534500523264">
                <text:p>468.534500523264</text:p>
              </table:table-cell>
              <table:table-cell office:value-type="float" office:value="480.350111920714">
                <text:p>480.350111920714</text:p>
              </table:table-cell>
              <table:table-cell office:value-type="float" office:value="492.421209118153">
                <text:p>492.421209118153</text:p>
              </table:table-cell>
              <table:table-cell office:value-type="float" office:value="504.760727476933">
                <text:p>504.760727476933</text:p>
              </table:table-cell>
              <table:table-cell office:value-type="float" office:value="517.390643070997">
                <text:p>517.390643070997</text:p>
              </table:table-cell>
              <table:table-cell office:value-type="float" office:value="530.325121622376">
                <text:p>530.325121622376</text:p>
              </table:table-cell>
              <table:table-cell office:value-type="float" office:value="543.579224774097">
                <text:p>543.579224774097</text:p>
              </table:table-cell>
              <table:table-cell office:value-type="float" office:value="557.162794367483">
                <text:p>557.162794367483</text:p>
              </table:table-cell>
              <table:table-cell office:value-type="float" office:value="571.095744439962">
                <text:p>571.095744439962</text:p>
              </table:table-cell>
              <table:table-cell office:value-type="float" office:value="585.391282228701">
                <text:p>585.391282228701</text:p>
              </table:table-cell>
              <table:table-cell office:value-type="float" office:value="600.056860482859">
                <text:p>600.056860482859</text:p>
              </table:table-cell>
              <table:table-cell office:value-type="float" office:value="615.103531637535">
                <text:p>615.103531637535</text:p>
              </table:table-cell>
              <table:table-cell office:value-type="float" office:value="630.555626544293">
                <text:p>630.555626544293</text:p>
              </table:table-cell>
              <table:table-cell office:value-type="float" office:value="646.418324883018">
                <text:p>646.418324883018</text:p>
              </table:table-cell>
              <table:table-cell office:value-type="float" office:value="662.703688260629">
                <text:p>662.703688260629</text:p>
              </table:table-cell>
              <table:table-cell office:value-type="float" office:value="679.424150660879">
                <text:p>679.424150660879</text:p>
              </table:table-cell>
              <table:table-cell office:value-type="float" office:value="696.594930363721">
                <text:p>696.594930363721</text:p>
              </table:table-cell>
              <table:table-cell office:value-type="float" office:value="714.234932979645">
                <text:p>714.234932979645</text:p>
              </table:table-cell>
              <table:table-cell office:value-type="float" office:value="732.353560530848">
                <text:p>732.353560530848</text:p>
              </table:table-cell>
              <table:table-cell office:value-type="float" office:value="750.964592608628">
                <text:p>750.964592608628</text:p>
              </table:table-cell>
              <table:table-cell office:value-type="float" office:value="770.087296590485">
                <text:p>770.087296590485</text:p>
              </table:table-cell>
              <table:table-cell office:value-type="float" office:value="789.728230666639">
                <text:p>789.728230666639</text:p>
              </table:table-cell>
              <table:table-cell office:value-type="float" office:value="809.897494299665">
                <text:p>809.897494299665</text:p>
              </table:table-cell>
              <table:table-cell office:value-type="float" office:value="830.618784091948">
                <text:p>830.618784091948</text:p>
              </table:table-cell>
              <table:table-cell office:value-type="float" office:value="851.905568108337">
                <text:p>851.905568108337</text:p>
              </table:table-cell>
              <table:table-cell office:value-type="float" office:value="873.758068090514">
                <text:p>873.758068090514</text:p>
              </table:table-cell>
              <table:table-cell office:value-type="float" office:value="896.192326779746">
                <text:p>896.1923267797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