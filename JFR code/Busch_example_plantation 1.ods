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453in"/>
    </style:style>
    <style:style style:name="co2" style:family="table-column">
      <style:table-column-properties fo:break-before="auto" style:column-width="0.71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Plantation_20_example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0004" number:language="en" number:country="US">
      <number:number number:decimal-places="2" number:min-decimal-places="2" number:min-integer-digits="1" number:grouping="true"/>
    </number:number-style>
    <number:currency-style style:name="N10103P0" style:volatile="true" number:language="en" number:country="US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03" number:language="en" number:country="US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03P0"/>
    </number:currency-style>
    <style:style style:name="ce1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padding="0.028in"/>
    </style:style>
    <style:style style:name="ce4" style:family="table-cell" style:parent-style-name="Default">
      <style:table-cell-properties fo:wrap-option="wrap" fo:padding="0.028in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36" style:family="table-cell" style:parent-style-name="Default" style:data-style-name="N4">
      <style:table-cell-properties fo:background-color="#e6e6e6" fo:border="0.54pt solid #a0a0a0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fo:padding="0.028in"/>
      <style:text-properties fo:color="#bf0041"/>
    </style:style>
    <style:style style:name="ce21" style:family="table-cell" style:parent-style-name="Default">
      <style:table-cell-properties style:text-align-source="fix" style:repeat-content="false" fo:padding="0.028in"/>
      <style:paragraph-properties fo:text-align="end" fo:margin-left="0in"/>
    </style:style>
    <style:style style:name="ce5" style:family="table-cell" style:parent-style-name="Default" style:data-style-name="N11">
      <style:table-cell-properties fo:padding="0.028in"/>
    </style:style>
    <style:style style:name="ce28" style:family="table-cell" style:parent-style-name="Default" style:data-style-name="N10103">
      <style:table-cell-properties fo:padding="0.028in"/>
      <style:text-properties fo:color="#bf0041"/>
    </style:style>
    <style:style style:name="ce7" style:family="table-cell" style:parent-style-name="Default" style:data-style-name="N10">
      <style:table-cell-properties fo:padding="0.028in"/>
    </style:style>
    <style:style style:name="ce8" style:family="table-cell" style:parent-style-name="Default" style:data-style-name="N10103">
      <style:table-cell-properties fo:background-color="#eeeeee" style:diagonal-bl-tr="none" style:diagonal-tl-br="none" fo:border="0.74pt solid #999999" fo:padding="0.028in" style:rotation-align="none"/>
    </style:style>
    <style:style style:name="ce25" style:family="table-cell" style:parent-style-name="Default">
      <style:table-cell-properties fo:padding="0.028in"/>
      <style:text-properties style:text-underline-style="none" fo:font-weight="bold" style:font-weight-asian="bold" style:font-weight-complex="bold"/>
    </style:style>
    <style:style style:name="ce49" style:family="table-cell" style:parent-style-name="Default" style:data-style-name="N10004">
      <style:table-cell-properties fo:padding="0.028in"/>
      <style:text-properties fo:color="#bf0041"/>
    </style:style>
    <style:style style:name="ce50" style:family="table-cell" style:parent-style-name="Default" style:data-style-name="N104">
      <style:table-cell-properties fo:background-color="#eeeeee" style:diagonal-bl-tr="none" style:diagonal-tl-br="none" fo:border="0.74pt solid #999999" fo:padding="0.028in" style:rotation-align="none"/>
    </style:style>
    <style:style style:name="ce46" style:family="table-cell" style:parent-style-name="Default" style:data-style-name="N103">
      <style:table-cell-properties fo:background-color="#e6e6e6" fo:border="0.54pt solid #a0a0a0"/>
      <style:text-properties fo:font-weight="normal" style:font-weight-asian="normal" style:font-weight-complex="normal"/>
    </style:style>
    <style:style style:name="ce52" style:family="table-cell" style:parent-style-name="Default" style:data-style-name="N3">
      <style:table-cell-properties fo:background-color="#e6e6e6" fo:border="0.54pt solid #a0a0a0"/>
    </style:style>
    <style:style style:name="ce53" style:family="table-cell" style:parent-style-name="Default" style:data-style-name="N135">
      <style:table-cell-properties fo:background-color="#e6e6e6" fo:border="0.54pt solid #a0a0a0"/>
    </style:style>
    <style:style style:name="ce39" style:family="table-cell" style:parent-style-name="Default" style:data-style-name="N175"/>
    <style:style style:name="ce6" style:family="table-cell" style:parent-style-name="Default" style:data-style-name="N10103">
      <style:table-cell-properties fo:padding="0.028in"/>
    </style:style>
    <style:style style:name="ce41" style:family="table-cell" style:parent-style-name="Default">
      <style:text-properties fo:font-weight="normal" style:font-weight-asian="normal" style:font-weight-complex="normal"/>
    </style:style>
    <style:style style:name="ce44" style:family="table-cell" style:parent-style-name="Default" style:data-style-name="N175">
      <style:text-properties fo:font-weight="normal" style:font-weight-asian="normal" style:font-weight-complex="normal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 table:null-year="1950"/>
      <table:table table:name="Plantation example" table:style-name="ta1">
        <office:forms form:automatic-focus="false" form:apply-design-mode="false"/>
        <table:shapes>
          <draw:frame draw:z-index="0" draw:style-name="gr1" draw:text-style-name="P1" svg:width="9.3449in" svg:height="5.2563in" svg:x="8.9606in" svg:y="0.7787in">
            <draw:object draw:notify-on-update-of-ranges="'Plantation example'.L32:'Plantation example'.DQ32 'Plantation example'.L36:'Plantation example'.DQ3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251" table:default-cell-style-name="ce2"/>
        <table:table-column table:style-name="co2" table:number-columns-repeated="16131" table:default-cell-style-name="Default"/>
        <table:table-row table:style-name="ro1">
          <table:table-cell table:style-name="ce1" office:value-type="string" calcext:value-type="string">
            <text:p>Busch 2024 plantation example (same baseline pixel assumptions as NR sheet). I think this is the best I can do: calculate the score for a bid[1,Y] without harvest, where Y is the deadline.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Default"/>
          <table:table-cell table:style-name="ce23" office:value-type="string" calcext:value-type="string">
            <text:p>Rando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so</text:p>
          </table:table-cell>
          <table:table-cell table:style-name="ce21" office:value-type="string" calcext:value-type="string">
            <text:p>BRA</text:p>
          </table:table-cell>
          <table:table-cell/>
          <table:table-cell table:style-name="Default" table:number-columns-repeated="2"/>
          <table:table-cell table:style-name="ce21" office:value-type="string" calcext:value-type="string">
            <text:p>BRA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lantation_genus</text:p>
          </table:table-cell>
          <table:table-cell table:style-name="ce21" office:value-type="string" calcext:value-type="string">
            <text:p>pinu</text:p>
          </table:table-cell>
          <table:table-cell/>
          <table:table-cell table:style-name="Default" table:number-columns-repeated="2"/>
          <table:table-cell table:style-name="ce21" office:value-type="string" calcext:value-type="string">
            <text:p>pinu</text:p>
          </table:table-cell>
          <table:table-cell table:style-name="Default" table:number-columns-repeated="118"/>
          <table:table-cell table:number-columns-repeated="16259"/>
        </table:table-row>
        <table:table-row table:style-name="ro1">
          <table:table-cell table:style-name="ce4" office:value-type="string" calcext:value-type="string">
            <text:p>PLANTATION_SOIL_C</text:p>
          </table:table-cell>
          <table:table-cell table:style-name="ce23" table:formula="of:=RAND()*2*[.F5]" office:value-type="float" office:value="0.108128952221135" calcext:value-type="float">
            <text:p>0.108128952221135</text:p>
          </table:table-cell>
          <table:table-cell table:number-columns-repeated="2"/>
          <table:table-cell table:style-name="Default" office:value-type="float" office:value="0.146299856398338" calcext:value-type="float">
            <text:p>0.146299856398338</text:p>
          </table:table-cell>
          <table:table-cell office:value-type="float" office:value="0.092749069" calcext:value-type="float">
            <text:p>0.092749069</text:p>
          </table:table-cell>
          <table:table-cell table:style-name="Default" table:number-columns-repeated="118"/>
          <table:table-cell table:number-columns-repeated="16259"/>
        </table:table-row>
        <table:table-row table:style-name="ro1">
          <table:table-cell table:style-name="ce10" office:value-type="string" calcext:value-type="string">
            <text:p>pl_rootshoot</text:p>
          </table:table-cell>
          <table:table-cell table:style-name="ce23" table:formula="of:=RAND()*2*[.F6]" office:value-type="float" office:value="0.187121742340694" calcext:value-type="float">
            <text:p>0.187121742340694</text:p>
          </table:table-cell>
          <table:table-cell table:style-name="Default" table:number-columns-repeated="2"/>
          <table:table-cell table:style-name="Default" office:value-type="float" office:value="0.137419203069018" calcext:value-type="float">
            <text:p>0.137419203069018</text:p>
          </table:table-cell>
          <table:table-cell office:value-type="float" office:value="0.26" calcext:value-type="float">
            <text:p>0.26</text:p>
          </table:table-cell>
          <table:table-cell table:style-name="Default" table:number-columns-repeated="118"/>
          <table:table-cell table:number-columns-repeated="16259"/>
        </table:table-row>
        <table:table-row table:style-name="ro1">
          <table:table-cell table:style-name="ce10" office:value-type="string" calcext:value-type="string">
            <text:p>w (wood storage share)</text:p>
          </table:table-cell>
          <table:table-cell table:style-name="ce23" table:formula="of:=RAND()*2*[.F7]" office:value-type="float" office:value="0.193747685033678" calcext:value-type="float">
            <text:p>0.193747685033678</text:p>
          </table:table-cell>
          <table:table-cell table:style-name="Default" table:number-columns-repeated="2"/>
          <table:table-cell table:style-name="Default" office:value-type="float" office:value="0.178351926446948" calcext:value-type="float">
            <text:p>0.178351926446948</text:p>
          </table:table-cell>
          <table:table-cell office:value-type="float" office:value="0.268" calcext:value-type="float">
            <text:p>0.268</text:p>
          </table:table-cell>
          <table:table-cell table:style-name="Default" table:number-columns-repeated="118"/>
          <table:table-cell table:number-columns-repeated="16259"/>
        </table:table-row>
        <table:table-row table:style-name="ro1">
          <table:table-cell table:style-name="ce11" office:value-type="string" calcext:value-type="string">
            <text:p>AGB_C_POOL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Binary switch, include pool or no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18"/>
          <table:table-cell table:number-columns-repeated="16259"/>
        </table:table-row>
        <table:table-row table:style-name="ro1">
          <table:table-cell table:style-name="ce11" office:value-type="string" calcext:value-type="string">
            <text:p>BGB_C_POOL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Binary switch, include pool or no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18"/>
          <table:table-cell table:number-columns-repeated="16259"/>
        </table:table-row>
        <table:table-row table:style-name="ro1">
          <table:table-cell table:style-name="ce11" office:value-type="string" calcext:value-type="string">
            <text:p>SOIL_C_POOL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Binary switch, include pool or no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HARVEST_C_POOL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Binary switch, include pool or no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number-columns-repeated="16376"/>
        </table:table-row>
        <table:table-row table:style-name="ro1">
          <table:table-cell office:value-type="string" calcext:value-type="string">
            <text:p>cost_inflator_2011_to_2020</text:p>
          </table:table-cell>
          <table:table-cell table:style-name="ce5" office:value-type="percentage" office:value="1.1577" calcext:value-type="percentage">
            <text:p>115.77%</text:p>
          </table:table-cell>
          <table:table-cell table:style-name="Default"/>
          <table:table-cell/>
          <table:table-cell office:value-type="float" office:value="1.1577" calcext:value-type="float">
            <text:p>1.1577</text:p>
          </table:table-cell>
          <table:table-cell table:style-name="ce5" office:value-type="percentage" office:value="1.1577" calcext:value-type="percentage">
            <text:p>115.7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p_cost_2011_USD_per_ha, Exotic plantation establishment cost per hectare in 2020 USD.</text:p>
          </table:table-cell>
          <table:table-cell table:style-name="ce28" table:formula="of:=RAND()*2*[.F13]" office:value-type="currency" office:currency="USD" office:value="864.776114351686" calcext:value-type="currency">
            <text:p>$865</text:p>
          </table:table-cell>
          <table:table-cell table:style-name="Default"/>
          <table:table-cell/>
          <table:table-cell office:value-type="float" office:value="146.767749996302" calcext:value-type="float">
            <text:p>146.767749996302</text:p>
          </table:table-cell>
          <table:table-cell table:style-name="ce6" office:value-type="currency" office:currency="USD" office:value="500" calcext:value-type="currency">
            <text:p>$5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otic_share, Country-level share of plantations that are exotic species.</text:p>
          </table:table-cell>
          <table:table-cell table:style-name="ce7" office:value-type="percentage" office:value="0.97" calcext:value-type="percentage">
            <text:p>97%</text:p>
          </table:table-cell>
          <table:table-cell table:style-name="Default"/>
          <table:table-cell/>
          <table:table-cell office:value-type="float" office:value="0.97" calcext:value-type="float">
            <text:p>0.97</text:p>
          </table:table-cell>
          <table:table-cell table:style-name="ce7" office:value-type="percentage" office:value="0.97" calcext:value-type="percentage">
            <text:p>9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p_cost_2011_USD_per_ha, Native plantation establishment cost per hectare in 2020 USD.</text:p>
          </table:table-cell>
          <table:table-cell table:style-name="ce28" table:formula="of:=RAND()*2*[.F15]" office:value-type="currency" office:currency="USD" office:value="135.278007748992" calcext:value-type="currency">
            <text:p>$135</text:p>
          </table:table-cell>
          <table:table-cell table:style-name="Default"/>
          <table:table-cell/>
          <table:table-cell office:value-type="float" office:value="799.548755423708" calcext:value-type="float">
            <text:p>799.548755423708</text:p>
          </table:table-cell>
          <table:table-cell table:style-name="ce6" office:value-type="currency" office:currency="USD" office:value="500" calcext:value-type="currency">
            <text:p>$5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tup cost</text:p>
          </table:table-cell>
          <table:table-cell table:style-name="ce8" table:formula="of:=[.B12]*([.B13]*[.B14]+[.B15]*(1-[.B14]))" office:value-type="currency" office:currency="USD" office:value="975.815108844529" calcext:value-type="currency">
            <text:p>$976</text:p>
          </table:table-cell>
          <table:table-cell table:number-columns-repeated="10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Opportunity cost of land $/ha/year, crop_va_USD_per_ha_per_year</text:p>
          </table:table-cell>
          <table:table-cell table:style-name="ce28" table:formula="of:=RAND()*2*[.F17]" office:value-type="currency" office:currency="USD" office:value="9.34482870445683" calcext:value-type="currency">
            <text:p>$9</text:p>
          </table:table-cell>
          <table:table-cell table:number-columns-repeated="2"/>
          <table:table-cell office:value-type="float" office:value="63.7462629530422" calcext:value-type="float">
            <text:p>63.7462629530422</text:p>
          </table:table-cell>
          <table:table-cell table:style-name="ce6" office:value-type="currency" office:currency="USD" office:value="50" calcext:value-type="currency">
            <text:p>$50</text:p>
          </table:table-cell>
          <table:table-cell table:number-columns-repeated="6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Discount_rate</text:p>
          </table:table-cell>
          <table:table-cell table:style-name="ce7" office:value-type="percentage" office:value="0.03" calcext:value-type="percentage">
            <text:p>3%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table:style-name="ce7" office:value-type="percentage" office:value="0.03" calcext:value-type="percentage">
            <text:p>3%</text:p>
          </table:table-cell>
          <table:table-cell table:number-columns-repeated="6"/>
          <table:table-cell table:style-name="Default"/>
          <table:table-cell table:number-columns-repeated="16370"/>
        </table:table-row>
        <table:table-row table:style-name="ro1">
          <table:table-cell table:style-name="ce3" office:value-type="string" calcext:value-type="string">
            <text:p>selected_plantation_rotation_year (mapped)</text:p>
          </table:table-cell>
          <table:table-cell table:style-name="ce25" office:value-type="float" office:value="120" calcext:value-type="float">
            <text:p>120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table:style-name="ce25" office:value-type="float" office:value="120" calcext:value-type="float">
            <text:p>120</text:p>
          </table:table-cell>
          <table:table-cell table:style-name="Default" table:number-columns-repeated="118"/>
          <table:table-cell table:number-columns-repeated="16259"/>
        </table:table-row>
        <table:table-row table:style-name="ro1">
          <table:table-cell office:value-type="string" calcext:value-type="string">
            <text:p>Present value of land opportunity costs, Plantation net present value establishment cost per hectare, pl_npv_estcost_USD_per_ha = init_cost</text:p>
          </table:table-cell>
          <table:table-cell table:style-name="ce8" table:formula="of:=[.B17]*(1-(1+[.B18])^(-[.$B$19]))/[.B18]" office:value-type="currency" office:currency="USD" office:value="302.520350890317" calcext:value-type="currency">
            <text:p>$303</text:p>
          </table:table-cell>
          <table:table-cell office:value-type="string" calcext:value-type="string">
            <text:p>Payments at end of year.</text:p>
          </table:table-cell>
          <table:table-cell table:number-columns-repeated="9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Wood-product revenue with harvest, p_USD_per_tC_harvested</text:p>
          </table:table-cell>
          <table:table-cell table:style-name="ce28" table:formula="of:=RAND()*2*[.F21]" office:value-type="currency" office:currency="USD" office:value="24.1523884878522" calcext:value-type="currency">
            <text:p>$24</text:p>
          </table:table-cell>
          <table:table-cell office:value-type="string" calcext:value-type="string">
            <text:p>Present value of harvest revenue is small, while the warming impact is large. Should probably never harvest!</text:p>
          </table:table-cell>
          <table:table-cell table:number-columns-repeated="2"/>
          <table:table-cell table:style-name="ce6" office:value-type="currency" office:currency="USD" office:value="61.04" calcext:value-type="currency">
            <text:p>$61</text:p>
          </table:table-cell>
          <table:table-cell table:number-columns-repeated="6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Chapman growth factor, pl_A</text:p>
          </table:table-cell>
          <table:table-cell table:style-name="ce49" table:formula="of:=RAND()*2*[.F22]" office:value-type="float" office:value="17.0183181947632" calcext:value-type="float">
            <text:p>17.02</text:p>
          </table:table-cell>
          <table:table-cell/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style-name="Default" table:number-columns-repeated="118"/>
          <table:table-cell table:number-columns-repeated="16259"/>
        </table:table-row>
        <table:table-row table:style-name="ro1">
          <table:table-cell office:value-type="string" calcext:value-type="string">
            <text:p>Chapman growth factor, pl_k</text:p>
          </table:table-cell>
          <table:table-cell table:style-name="ce49" table:formula="of:=RAND()*2*[.F23]" office:value-type="float" office:value="0.0170741106089556" calcext:value-type="float">
            <text:p>0.02</text:p>
          </table:table-cell>
          <table:table-cell table:style-name="Default"/>
          <table:table-cell/>
          <table:table-cell table:style-name="Default"/>
          <table:table-cell office:value-type="float" office:value="0.03" calcext:value-type="float">
            <text:p>0.03</text:p>
          </table:table-cell>
          <table:table-cell table:style-name="Default" table:number-columns-repeated="118"/>
          <table:table-cell table:number-columns-repeated="16259"/>
        </table:table-row>
        <table:table-row table:style-name="ro1">
          <table:table-cell office:value-type="string" calcext:value-type="string">
            <text:p>Present value of wood harvest revenue, from plantation harvested C/ha over the time horizon, pl_harvested_tC_per_ha, from g_harvested_cum_tC_per_ha</text:p>
          </table:table-cell>
          <table:table-cell table:style-name="ce8" table:formula="of:=-[.B21]*[.B22]*(1-EXP(-[.B23]*[.B19]))^2/(1+[.B18])^[.B19]" office:value-type="currency" office:currency="USD" office:value="-8.98603831176732" calcext:value-type="currency">
            <text:p>-$9</text:p>
          </table:table-cell>
          <table:table-cell table:number-columns-repeated="10"/>
          <table:table-cell table:style-name="Default"/>
          <table:table-cell table:number-columns-repeated="16370"/>
        </table:table-row>
        <table:table-row table:style-name="ro1"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table:style-name="ce3" office:value-type="string" calcext:value-type="string">
            <text:p>SMDAMAGE bid $/ha discounted to year 0 of contract </text:p>
          </table:table-cell>
          <table:table-cell table:style-name="ce50" table:formula="of:=[.B16]+[.B20]+[.B24]" office:value-type="currency" office:currency="USD" office:value="1269.34942142308" calcext:value-type="currency">
            <text:p>$1,269.35</text:p>
          </table:table-cell>
          <table:table-cell table:number-columns-repeated="10"/>
          <table:table-cell table:style-name="Default"/>
          <table:table-cell table:number-columns-repeated="16370"/>
        </table:table-row>
        <table:table-row table:style-name="ro1">
          <table:table-cell table:style-name="ce3" office:value-type="string" calcext:value-type="string">
            <text:p>SMDAMAGE bid $/ha discounted to year 0 of contract, collected terms</text:p>
          </table:table-cell>
          <table:table-cell table:style-name="ce50" table:formula="of:=[.B12]*([.B13]*[.B14]+[.B15]*(1-[.B14])) + [.B17]*(1-(1+[.B18])^(-[.B19]))/[.B18] - [.B21]*[.B22]*(1-EXP(-[.B23]*[.B19]))^2/(1+[.B18])^[.B19]" office:value-type="currency" office:currency="USD" office:value="1269.34942142308" calcext:value-type="currency">
            <text:p>$1,269.35</text:p>
          </table:table-cell>
          <table:table-cell table:number-columns-repeated="10"/>
          <table:table-cell table:style-name="Default"/>
          <table:table-cell table:number-columns-repeated="16370"/>
        </table:table-row>
        <table:table-row table:style-name="ro1">
          <table:table-cell table:style-name="Default" table:number-columns-repeated="252"/>
          <table:table-cell table:number-columns-repeated="16131"/>
        </table:table-row>
        <table:table-row table:style-name="ro1">
          <table:table-cell table:style-name="ce1" office:value-type="string" calcext:value-type="string">
            <text:p>Planting yea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120" calcext:value-type="float">
            <text:p>120</text:p>
          </table:table-cell>
          <table:table-cell table:number-columns-repeated="16262"/>
        </table:table-row>
        <table:table-row table:style-name="ro1">
          <table:table-cell table:style-name="ce36" table:formula="of:=&quot;Carbon schedule tC/ha/year = annual_pl(t) - harvest[&quot;&amp;[.B19]&amp;&quot;], calculus&quot;" office:value-type="string" office:string-value="Carbon schedule tC/ha/year = annual_pl(t) - harvest[120], calculus" calcext:value-type="string">
            <text:p>Carbon schedule tC/ha/year = annual_pl(t) - harvest[120], calculus</text:p>
          </table:table-cell>
          <table:table-cell table:style-name="ce36" table:formula="of:=IF([.B29]&lt;=[.$B$19]-[.$B$11];2*[.$B$23]*[.$B$22]*([.$B$8]+[.$B$9]*[.$B$6])*(EXP(-[.$B$23]*[.B29]) - EXP(-2*[.$B$23]*[.B29])) + [.$B$10]*[.$B$5]; -[.$B$22]*(1-EXP(-[.$B$23]*[.B$29]))^2*IF([.B29]=[.$B$19];1;0))" office:value-type="float" office:value="0.119610503312896" calcext:value-type="float">
            <text:p>0.12</text:p>
          </table:table-cell>
          <table:table-cell table:style-name="ce36" table:formula="of:=IF([.C29]&lt;=[.$B$19]-[.$B$11];2*[.$B$23]*[.$B$22]*([.$B$8]+[.$B$9]*[.$B$6])*(EXP(-[.$B$23]*[.C29]) - EXP(-2*[.$B$23]*[.C29])) + [.$B$10]*[.$B$5]; -[.$B$22]*(1-EXP(-[.$B$23]*[.C$29]))^2*IF([.C29]=[.$B$19];1;0))" office:value-type="float" office:value="0.130512225451866" calcext:value-type="float">
            <text:p>0.13</text:p>
          </table:table-cell>
          <table:table-cell table:style-name="ce36" table:formula="of:=IF([.D29]&lt;=[.$B$19]-[.$B$11];2*[.$B$23]*[.$B$22]*([.$B$8]+[.$B$9]*[.$B$6])*(EXP(-[.$B$23]*[.D29]) - EXP(-2*[.$B$23]*[.D29])) + [.$B$10]*[.$B$5]; -[.$B$22]*(1-EXP(-[.$B$23]*[.D$29]))^2*IF([.D29]=[.$B$19];1;0))" office:value-type="float" office:value="0.140856875088697" calcext:value-type="float">
            <text:p>0.14</text:p>
          </table:table-cell>
          <table:table-cell table:style-name="ce36" table:formula="of:=IF([.E29]&lt;=[.$B$19]-[.$B$11];2*[.$B$23]*[.$B$22]*([.$B$8]+[.$B$9]*[.$B$6])*(EXP(-[.$B$23]*[.E29]) - EXP(-2*[.$B$23]*[.E29])) + [.$B$10]*[.$B$5]; -[.$B$22]*(1-EXP(-[.$B$23]*[.E$29]))^2*IF([.E29]=[.$B$19];1;0))" office:value-type="float" office:value="0.150666388993384" calcext:value-type="float">
            <text:p>0.15</text:p>
          </table:table-cell>
          <table:table-cell table:style-name="ce36" table:formula="of:=IF([.F29]&lt;=[.$B$19]-[.$B$11];2*[.$B$23]*[.$B$22]*([.$B$8]+[.$B$9]*[.$B$6])*(EXP(-[.$B$23]*[.F29]) - EXP(-2*[.$B$23]*[.F29])) + [.$B$10]*[.$B$5]; -[.$B$22]*(1-EXP(-[.$B$23]*[.F$29]))^2*IF([.F29]=[.$B$19];1;0))" office:value-type="float" office:value="0.159961912716455" calcext:value-type="float">
            <text:p>0.16</text:p>
          </table:table-cell>
          <table:table-cell table:style-name="ce36" table:formula="of:=IF([.G29]&lt;=[.$B$19]-[.$B$11];2*[.$B$23]*[.$B$22]*([.$B$8]+[.$B$9]*[.$B$6])*(EXP(-[.$B$23]*[.G29]) - EXP(-2*[.$B$23]*[.G29])) + [.$B$10]*[.$B$5]; -[.$B$22]*(1-EXP(-[.$B$23]*[.G$29]))^2*IF([.G29]=[.$B$19];1;0))" office:value-type="float" office:value="0.16876382807869" calcext:value-type="float">
            <text:p>0.17</text:p>
          </table:table-cell>
          <table:table-cell table:style-name="ce36" table:formula="of:=IF([.H29]&lt;=[.$B$19]-[.$B$11];2*[.$B$23]*[.$B$22]*([.$B$8]+[.$B$9]*[.$B$6])*(EXP(-[.$B$23]*[.H29]) - EXP(-2*[.$B$23]*[.H29])) + [.$B$10]*[.$B$5]; -[.$B$22]*(1-EXP(-[.$B$23]*[.H$29]))^2*IF([.H29]=[.$B$19];1;0))" office:value-type="float" office:value="0.177091779722284" calcext:value-type="float">
            <text:p>0.18</text:p>
          </table:table-cell>
          <table:table-cell table:style-name="ce36" table:formula="of:=IF([.I29]&lt;=[.$B$19]-[.$B$11];2*[.$B$23]*[.$B$22]*([.$B$8]+[.$B$9]*[.$B$6])*(EXP(-[.$B$23]*[.I29]) - EXP(-2*[.$B$23]*[.I29])) + [.$B$10]*[.$B$5]; -[.$B$22]*(1-EXP(-[.$B$23]*[.I$29]))^2*IF([.I29]=[.$B$19];1;0))" office:value-type="float" office:value="0.184964700755194" calcext:value-type="float">
            <text:p>0.18</text:p>
          </table:table-cell>
          <table:table-cell table:style-name="ce36" table:formula="of:=IF([.J29]&lt;=[.$B$19]-[.$B$11];2*[.$B$23]*[.$B$22]*([.$B$8]+[.$B$9]*[.$B$6])*(EXP(-[.$B$23]*[.J29]) - EXP(-2*[.$B$23]*[.J29])) + [.$B$10]*[.$B$5]; -[.$B$22]*(1-EXP(-[.$B$23]*[.J$29]))^2*IF([.J29]=[.$B$19];1;0))" office:value-type="float" office:value="0.192400837519408" calcext:value-type="float">
            <text:p>0.19</text:p>
          </table:table-cell>
          <table:table-cell table:style-name="ce36" table:formula="of:=IF([.K29]&lt;=[.$B$19]-[.$B$11];2*[.$B$23]*[.$B$22]*([.$B$8]+[.$B$9]*[.$B$6])*(EXP(-[.$B$23]*[.K29]) - EXP(-2*[.$B$23]*[.K29])) + [.$B$10]*[.$B$5]; -[.$B$22]*(1-EXP(-[.$B$23]*[.K$29]))^2*IF([.K29]=[.$B$19];1;0))" office:value-type="float" office:value="0.199417773512777" calcext:value-type="float">
            <text:p>0.20</text:p>
          </table:table-cell>
          <table:table-cell table:style-name="ce36" table:formula="of:=IF([.L29]&lt;=[.$B$19]-[.$B$11];2*[.$B$23]*[.$B$22]*([.$B$8]+[.$B$9]*[.$B$6])*(EXP(-[.$B$23]*[.L29]) - EXP(-2*[.$B$23]*[.L29])) + [.$B$10]*[.$B$5]; -[.$B$22]*(1-EXP(-[.$B$23]*[.L$29]))^2*IF([.L29]=[.$B$19];1;0))" office:value-type="float" office:value="0.206032452493093" calcext:value-type="float">
            <text:p>0.21</text:p>
          </table:table-cell>
          <table:table-cell table:style-name="ce36" table:formula="of:=IF([.M29]&lt;=[.$B$19]-[.$B$11];2*[.$B$23]*[.$B$22]*([.$B$8]+[.$B$9]*[.$B$6])*(EXP(-[.$B$23]*[.M29]) - EXP(-2*[.$B$23]*[.M29])) + [.$B$10]*[.$B$5]; -[.$B$22]*(1-EXP(-[.$B$23]*[.M$29]))^2*IF([.M29]=[.$B$19];1;0))" office:value-type="float" office:value="0.212261200792119" calcext:value-type="float">
            <text:p>0.21</text:p>
          </table:table-cell>
          <table:table-cell table:style-name="ce36" table:formula="of:=IF([.N29]&lt;=[.$B$19]-[.$B$11];2*[.$B$23]*[.$B$22]*([.$B$8]+[.$B$9]*[.$B$6])*(EXP(-[.$B$23]*[.N29]) - EXP(-2*[.$B$23]*[.N29])) + [.$B$10]*[.$B$5]; -[.$B$22]*(1-EXP(-[.$B$23]*[.N$29]))^2*IF([.N29]=[.$B$19];1;0))" office:value-type="float" office:value="0.218119748866319" calcext:value-type="float">
            <text:p>0.22</text:p>
          </table:table-cell>
          <table:table-cell table:style-name="ce36" table:formula="of:=IF([.O29]&lt;=[.$B$19]-[.$B$11];2*[.$B$23]*[.$B$22]*([.$B$8]+[.$B$9]*[.$B$6])*(EXP(-[.$B$23]*[.O29]) - EXP(-2*[.$B$23]*[.O29])) + [.$B$10]*[.$B$5]; -[.$B$22]*(1-EXP(-[.$B$23]*[.O$29]))^2*IF([.O29]=[.$B$19];1;0))" office:value-type="float" office:value="0.223623252110174" calcext:value-type="float">
            <text:p>0.22</text:p>
          </table:table-cell>
          <table:table-cell table:style-name="ce36" table:formula="of:=IF([.P29]&lt;=[.$B$19]-[.$B$11];2*[.$B$23]*[.$B$22]*([.$B$8]+[.$B$9]*[.$B$6])*(EXP(-[.$B$23]*[.P29]) - EXP(-2*[.$B$23]*[.P29])) + [.$B$10]*[.$B$5]; -[.$B$22]*(1-EXP(-[.$B$23]*[.P$29]))^2*IF([.P29]=[.$B$19];1;0))" office:value-type="float" office:value="0.228786310957066" calcext:value-type="float">
            <text:p>0.23</text:p>
          </table:table-cell>
          <table:table-cell table:style-name="ce36" table:formula="of:=IF([.Q29]&lt;=[.$B$19]-[.$B$11];2*[.$B$23]*[.$B$22]*([.$B$8]+[.$B$9]*[.$B$6])*(EXP(-[.$B$23]*[.Q29]) - EXP(-2*[.$B$23]*[.Q29])) + [.$B$10]*[.$B$5]; -[.$B$22]*(1-EXP(-[.$B$23]*[.Q$29]))^2*IF([.Q29]=[.$B$19];1;0))" office:value-type="float" office:value="0.233622990291879" calcext:value-type="float">
            <text:p>0.23</text:p>
          </table:table-cell>
          <table:table-cell table:style-name="ce36" table:formula="of:=IF([.R29]&lt;=[.$B$19]-[.$B$11];2*[.$B$23]*[.$B$22]*([.$B$8]+[.$B$9]*[.$B$6])*(EXP(-[.$B$23]*[.R29]) - EXP(-2*[.$B$23]*[.R29])) + [.$B$10]*[.$B$5]; -[.$B$22]*(1-EXP(-[.$B$23]*[.R$29]))^2*IF([.R29]=[.$B$19];1;0))" office:value-type="float" office:value="0.238146838198651" calcext:value-type="float">
            <text:p>0.24</text:p>
          </table:table-cell>
          <table:table-cell table:style-name="ce36" table:formula="of:=IF([.S29]&lt;=[.$B$19]-[.$B$11];2*[.$B$23]*[.$B$22]*([.$B$8]+[.$B$9]*[.$B$6])*(EXP(-[.$B$23]*[.S29]) - EXP(-2*[.$B$23]*[.S29])) + [.$B$10]*[.$B$5]; -[.$B$22]*(1-EXP(-[.$B$23]*[.S$29]))^2*IF([.S29]=[.$B$19];1;0))" office:value-type="float" office:value="0.242370904065834" calcext:value-type="float">
            <text:p>0.24</text:p>
          </table:table-cell>
          <table:table-cell table:style-name="ce36" table:formula="of:=IF([.T29]&lt;=[.$B$19]-[.$B$11];2*[.$B$23]*[.$B$22]*([.$B$8]+[.$B$9]*[.$B$6])*(EXP(-[.$B$23]*[.T29]) - EXP(-2*[.$B$23]*[.T29])) + [.$B$10]*[.$B$5]; -[.$B$22]*(1-EXP(-[.$B$23]*[.T$29]))^2*IF([.T29]=[.$B$19];1;0))" office:value-type="float" office:value="0.246307756070935" calcext:value-type="float">
            <text:p>0.25</text:p>
          </table:table-cell>
          <table:table-cell table:style-name="ce36" table:formula="of:=IF([.U29]&lt;=[.$B$19]-[.$B$11];2*[.$B$23]*[.$B$22]*([.$B$8]+[.$B$9]*[.$B$6])*(EXP(-[.$B$23]*[.U29]) - EXP(-2*[.$B$23]*[.U29])) + [.$B$10]*[.$B$5]; -[.$B$22]*(1-EXP(-[.$B$23]*[.U$29]))^2*IF([.U29]=[.$B$19];1;0))" office:value-type="float" office:value="0.249969498065597" calcext:value-type="float">
            <text:p>0.25</text:p>
          </table:table-cell>
          <table:table-cell table:style-name="ce36" table:formula="of:=IF([.V29]&lt;=[.$B$19]-[.$B$11];2*[.$B$23]*[.$B$22]*([.$B$8]+[.$B$9]*[.$B$6])*(EXP(-[.$B$23]*[.V29]) - EXP(-2*[.$B$23]*[.V29])) + [.$B$10]*[.$B$5]; -[.$B$22]*(1-EXP(-[.$B$23]*[.V$29]))^2*IF([.V29]=[.$B$19];1;0))" office:value-type="float" office:value="0.253367785881464" calcext:value-type="float">
            <text:p>0.25</text:p>
          </table:table-cell>
          <table:table-cell table:style-name="ce36" table:formula="of:=IF([.W29]&lt;=[.$B$19]-[.$B$11];2*[.$B$23]*[.$B$22]*([.$B$8]+[.$B$9]*[.$B$6])*(EXP(-[.$B$23]*[.W29]) - EXP(-2*[.$B$23]*[.W29])) + [.$B$10]*[.$B$5]; -[.$B$22]*(1-EXP(-[.$B$23]*[.W$29]))^2*IF([.W29]=[.$B$19];1;0))" office:value-type="float" office:value="0.256513843076477" calcext:value-type="float">
            <text:p>0.26</text:p>
          </table:table-cell>
          <table:table-cell table:style-name="ce36" table:formula="of:=IF([.X29]&lt;=[.$B$19]-[.$B$11];2*[.$B$23]*[.$B$22]*([.$B$8]+[.$B$9]*[.$B$6])*(EXP(-[.$B$23]*[.X29]) - EXP(-2*[.$B$23]*[.X29])) + [.$B$10]*[.$B$5]; -[.$B$22]*(1-EXP(-[.$B$23]*[.X$29]))^2*IF([.X29]=[.$B$19];1;0))" office:value-type="float" office:value="0.259418476140593" calcext:value-type="float">
            <text:p>0.26</text:p>
          </table:table-cell>
          <table:table-cell table:style-name="ce36" table:formula="of:=IF([.Y29]&lt;=[.$B$19]-[.$B$11];2*[.$B$23]*[.$B$22]*([.$B$8]+[.$B$9]*[.$B$6])*(EXP(-[.$B$23]*[.Y29]) - EXP(-2*[.$B$23]*[.Y29])) + [.$B$10]*[.$B$5]; -[.$B$22]*(1-EXP(-[.$B$23]*[.Y$29]))^2*IF([.Y29]=[.$B$19];1;0))" office:value-type="float" office:value="0.262092089179294" calcext:value-type="float">
            <text:p>0.26</text:p>
          </table:table-cell>
          <table:table-cell table:style-name="ce36" table:formula="of:=IF([.Z29]&lt;=[.$B$19]-[.$B$11];2*[.$B$23]*[.$B$22]*([.$B$8]+[.$B$9]*[.$B$6])*(EXP(-[.$B$23]*[.Z29]) - EXP(-2*[.$B$23]*[.Z29])) + [.$B$10]*[.$B$5]; -[.$B$22]*(1-EXP(-[.$B$23]*[.Z$29]))^2*IF([.Z29]=[.$B$19];1;0))" office:value-type="float" office:value="0.264544698092581" calcext:value-type="float">
            <text:p>0.26</text:p>
          </table:table-cell>
          <table:table-cell table:style-name="ce36" table:formula="of:=IF([.AA29]&lt;=[.$B$19]-[.$B$11];2*[.$B$23]*[.$B$22]*([.$B$8]+[.$B$9]*[.$B$6])*(EXP(-[.$B$23]*[.AA29]) - EXP(-2*[.$B$23]*[.AA29])) + [.$B$10]*[.$B$5]; -[.$B$22]*(1-EXP(-[.$B$23]*[.AA$29]))^2*IF([.AA29]=[.$B$19];1;0))" office:value-type="float" office:value="0.266785944266632" calcext:value-type="float">
            <text:p>0.27</text:p>
          </table:table-cell>
          <table:table-cell table:style-name="ce36" table:formula="of:=IF([.AB29]&lt;=[.$B$19]-[.$B$11];2*[.$B$23]*[.$B$22]*([.$B$8]+[.$B$9]*[.$B$6])*(EXP(-[.$B$23]*[.AB29]) - EXP(-2*[.$B$23]*[.AB29])) + [.$B$10]*[.$B$5]; -[.$B$22]*(1-EXP(-[.$B$23]*[.AB$29]))^2*IF([.AB29]=[.$B$19];1;0))" office:value-type="float" office:value="0.268825107794628" calcext:value-type="float">
            <text:p>0.27</text:p>
          </table:table-cell>
          <table:table-cell table:style-name="ce36" table:formula="of:=IF([.AC29]&lt;=[.$B$19]-[.$B$11];2*[.$B$23]*[.$B$22]*([.$B$8]+[.$B$9]*[.$B$6])*(EXP(-[.$B$23]*[.AC29]) - EXP(-2*[.$B$23]*[.AC29])) + [.$B$10]*[.$B$5]; -[.$B$22]*(1-EXP(-[.$B$23]*[.AC$29]))^2*IF([.AC29]=[.$B$19];1;0))" office:value-type="float" office:value="0.270671120242787" calcext:value-type="float">
            <text:p>0.27</text:p>
          </table:table-cell>
          <table:table-cell table:style-name="ce36" table:formula="of:=IF([.AD29]&lt;=[.$B$19]-[.$B$11];2*[.$B$23]*[.$B$22]*([.$B$8]+[.$B$9]*[.$B$6])*(EXP(-[.$B$23]*[.AD29]) - EXP(-2*[.$B$23]*[.AD29])) + [.$B$10]*[.$B$5]; -[.$B$22]*(1-EXP(-[.$B$23]*[.AD$29]))^2*IF([.AD29]=[.$B$19];1;0))" office:value-type="float" office:value="0.272332576977029" calcext:value-type="float">
            <text:p>0.27</text:p>
          </table:table-cell>
          <table:table-cell table:style-name="ce36" table:formula="of:=IF([.AE29]&lt;=[.$B$19]-[.$B$11];2*[.$B$23]*[.$B$22]*([.$B$8]+[.$B$9]*[.$B$6])*(EXP(-[.$B$23]*[.AE29]) - EXP(-2*[.$B$23]*[.AE29])) + [.$B$10]*[.$B$5]; -[.$B$22]*(1-EXP(-[.$B$23]*[.AE$29]))^2*IF([.AE29]=[.$B$19];1;0))" office:value-type="float" office:value="0.273817749065216" calcext:value-type="float">
            <text:p>0.27</text:p>
          </table:table-cell>
          <table:table-cell table:style-name="ce36" table:formula="of:=IF([.AF29]&lt;=[.$B$19]-[.$B$11];2*[.$B$23]*[.$B$22]*([.$B$8]+[.$B$9]*[.$B$6])*(EXP(-[.$B$23]*[.AF29]) - EXP(-2*[.$B$23]*[.AF29])) + [.$B$10]*[.$B$5]; -[.$B$22]*(1-EXP(-[.$B$23]*[.AF$29]))^2*IF([.AF29]=[.$B$19];1;0))" office:value-type="float" office:value="0.275134594769397" calcext:value-type="float">
            <text:p>0.28</text:p>
          </table:table-cell>
          <table:table-cell table:style-name="ce36" table:formula="of:=IF([.AG29]&lt;=[.$B$19]-[.$B$11];2*[.$B$23]*[.$B$22]*([.$B$8]+[.$B$9]*[.$B$6])*(EXP(-[.$B$23]*[.AG29]) - EXP(-2*[.$B$23]*[.AG29])) + [.$B$10]*[.$B$5]; -[.$B$22]*(1-EXP(-[.$B$23]*[.AG$29]))^2*IF([.AG29]=[.$B$19];1;0))" office:value-type="float" office:value="0.276290770641998" calcext:value-type="float">
            <text:p>0.28</text:p>
          </table:table-cell>
          <table:table-cell table:style-name="ce36" table:formula="of:=IF([.AH29]&lt;=[.$B$19]-[.$B$11];2*[.$B$23]*[.$B$22]*([.$B$8]+[.$B$9]*[.$B$6])*(EXP(-[.$B$23]*[.AH29]) - EXP(-2*[.$B$23]*[.AH29])) + [.$B$10]*[.$B$5]; -[.$B$22]*(1-EXP(-[.$B$23]*[.AH$29]))^2*IF([.AH29]=[.$B$19];1;0))" office:value-type="float" office:value="0.277293642239418" calcext:value-type="float">
            <text:p>0.28</text:p>
          </table:table-cell>
          <table:table-cell table:style-name="ce36" table:formula="of:=IF([.AI29]&lt;=[.$B$19]-[.$B$11];2*[.$B$23]*[.$B$22]*([.$B$8]+[.$B$9]*[.$B$6])*(EXP(-[.$B$23]*[.AI29]) - EXP(-2*[.$B$23]*[.AI29])) + [.$B$10]*[.$B$5]; -[.$B$22]*(1-EXP(-[.$B$23]*[.AI$29]))^2*IF([.AI29]=[.$B$19];1;0))" office:value-type="float" office:value="0.278150294466062" calcext:value-type="float">
            <text:p>0.28</text:p>
          </table:table-cell>
          <table:table-cell table:style-name="ce36" table:formula="of:=IF([.AJ29]&lt;=[.$B$19]-[.$B$11];2*[.$B$23]*[.$B$22]*([.$B$8]+[.$B$9]*[.$B$6])*(EXP(-[.$B$23]*[.AJ29]) - EXP(-2*[.$B$23]*[.AJ29])) + [.$B$10]*[.$B$5]; -[.$B$22]*(1-EXP(-[.$B$23]*[.AJ$29]))^2*IF([.AJ29]=[.$B$19];1;0))" office:value-type="float" office:value="0.278867541561368" calcext:value-type="float">
            <text:p>0.28</text:p>
          </table:table-cell>
          <table:table-cell table:style-name="ce36" table:formula="of:=IF([.AK29]&lt;=[.$B$19]-[.$B$11];2*[.$B$23]*[.$B$22]*([.$B$8]+[.$B$9]*[.$B$6])*(EXP(-[.$B$23]*[.AK29]) - EXP(-2*[.$B$23]*[.AK29])) + [.$B$10]*[.$B$5]; -[.$B$22]*(1-EXP(-[.$B$23]*[.AK$29]))^2*IF([.AK29]=[.$B$19];1;0))" office:value-type="float" office:value="0.279451936741989" calcext:value-type="float">
            <text:p>0.28</text:p>
          </table:table-cell>
          <table:table-cell table:style-name="ce36" table:formula="of:=IF([.AL29]&lt;=[.$B$19]-[.$B$11];2*[.$B$23]*[.$B$22]*([.$B$8]+[.$B$9]*[.$B$6])*(EXP(-[.$B$23]*[.AL29]) - EXP(-2*[.$B$23]*[.AL29])) + [.$B$10]*[.$B$5]; -[.$B$22]*(1-EXP(-[.$B$23]*[.AL$29]))^2*IF([.AL29]=[.$B$19];1;0))" office:value-type="float" office:value="0.279909781510869" calcext:value-type="float">
            <text:p>0.28</text:p>
          </table:table-cell>
          <table:table-cell table:style-name="ce36" table:formula="of:=IF([.AM29]&lt;=[.$B$19]-[.$B$11];2*[.$B$23]*[.$B$22]*([.$B$8]+[.$B$9]*[.$B$6])*(EXP(-[.$B$23]*[.AM29]) - EXP(-2*[.$B$23]*[.AM29])) + [.$B$10]*[.$B$5]; -[.$B$22]*(1-EXP(-[.$B$23]*[.AM$29]))^2*IF([.AM29]=[.$B$19];1;0))" office:value-type="float" office:value="0.280247134644549" calcext:value-type="float">
            <text:p>0.28</text:p>
          </table:table-cell>
          <table:table-cell table:style-name="ce36" table:formula="of:=IF([.AN29]&lt;=[.$B$19]-[.$B$11];2*[.$B$23]*[.$B$22]*([.$B$8]+[.$B$9]*[.$B$6])*(EXP(-[.$B$23]*[.AN29]) - EXP(-2*[.$B$23]*[.AN29])) + [.$B$10]*[.$B$5]; -[.$B$22]*(1-EXP(-[.$B$23]*[.AN$29]))^2*IF([.AN29]=[.$B$19];1;0))" office:value-type="float" office:value="0.280469820869663" calcext:value-type="float">
            <text:p>0.28</text:p>
          </table:table-cell>
          <table:table-cell table:style-name="ce36" table:formula="of:=IF([.AO29]&lt;=[.$B$19]-[.$B$11];2*[.$B$23]*[.$B$22]*([.$B$8]+[.$B$9]*[.$B$6])*(EXP(-[.$B$23]*[.AO29]) - EXP(-2*[.$B$23]*[.AO29])) + [.$B$10]*[.$B$5]; -[.$B$22]*(1-EXP(-[.$B$23]*[.AO$29]))^2*IF([.AO29]=[.$B$19];1;0))" office:value-type="float" office:value="0.280583439239224" calcext:value-type="float">
            <text:p>0.28</text:p>
          </table:table-cell>
          <table:table-cell table:style-name="ce36" table:formula="of:=IF([.AP29]&lt;=[.$B$19]-[.$B$11];2*[.$B$23]*[.$B$22]*([.$B$8]+[.$B$9]*[.$B$6])*(EXP(-[.$B$23]*[.AP29]) - EXP(-2*[.$B$23]*[.AP29])) + [.$B$10]*[.$B$5]; -[.$B$22]*(1-EXP(-[.$B$23]*[.AP$29]))^2*IF([.AP29]=[.$B$19];1;0))" office:value-type="float" office:value="0.280593371218906" calcext:value-type="float">
            <text:p>0.28</text:p>
          </table:table-cell>
          <table:table-cell table:style-name="ce36" table:formula="of:=IF([.AQ29]&lt;=[.$B$19]-[.$B$11];2*[.$B$23]*[.$B$22]*([.$B$8]+[.$B$9]*[.$B$6])*(EXP(-[.$B$23]*[.AQ29]) - EXP(-2*[.$B$23]*[.AQ29])) + [.$B$10]*[.$B$5]; -[.$B$22]*(1-EXP(-[.$B$23]*[.AQ$29]))^2*IF([.AQ29]=[.$B$19];1;0))" office:value-type="float" office:value="0.280504788493235" calcext:value-type="float">
            <text:p>0.28</text:p>
          </table:table-cell>
          <table:table-cell table:style-name="ce36" table:formula="of:=IF([.AR29]&lt;=[.$B$19]-[.$B$11];2*[.$B$23]*[.$B$22]*([.$B$8]+[.$B$9]*[.$B$6])*(EXP(-[.$B$23]*[.AR29]) - EXP(-2*[.$B$23]*[.AR29])) + [.$B$10]*[.$B$5]; -[.$B$22]*(1-EXP(-[.$B$23]*[.AR$29]))^2*IF([.AR29]=[.$B$19];1;0))" office:value-type="float" office:value="0.280322660501215" calcext:value-type="float">
            <text:p>0.28</text:p>
          </table:table-cell>
          <table:table-cell table:style-name="ce36" table:formula="of:=IF([.AS29]&lt;=[.$B$19]-[.$B$11];2*[.$B$23]*[.$B$22]*([.$B$8]+[.$B$9]*[.$B$6])*(EXP(-[.$B$23]*[.AS29]) - EXP(-2*[.$B$23]*[.AS29])) + [.$B$10]*[.$B$5]; -[.$B$22]*(1-EXP(-[.$B$23]*[.AS$29]))^2*IF([.AS29]=[.$B$19];1;0))" office:value-type="float" office:value="0.280051761710629" calcext:value-type="float">
            <text:p>0.28</text:p>
          </table:table-cell>
          <table:table-cell table:style-name="ce36" table:formula="of:=IF([.AT29]&lt;=[.$B$19]-[.$B$11];2*[.$B$23]*[.$B$22]*([.$B$8]+[.$B$9]*[.$B$6])*(EXP(-[.$B$23]*[.AT29]) - EXP(-2*[.$B$23]*[.AT29])) + [.$B$10]*[.$B$5]; -[.$B$22]*(1-EXP(-[.$B$23]*[.AT$29]))^2*IF([.AT29]=[.$B$19];1;0))" office:value-type="float" office:value="0.279696678639926" calcext:value-type="float">
            <text:p>0.28</text:p>
          </table:table-cell>
          <table:table-cell table:style-name="ce36" table:formula="of:=IF([.AU29]&lt;=[.$B$19]-[.$B$11];2*[.$B$23]*[.$B$22]*([.$B$8]+[.$B$9]*[.$B$6])*(EXP(-[.$B$23]*[.AU29]) - EXP(-2*[.$B$23]*[.AU29])) + [.$B$10]*[.$B$5]; -[.$B$22]*(1-EXP(-[.$B$23]*[.AU$29]))^2*IF([.AU29]=[.$B$19];1;0))" office:value-type="float" office:value="0.279261816636304" calcext:value-type="float">
            <text:p>0.28</text:p>
          </table:table-cell>
          <table:table-cell table:style-name="ce36" table:formula="of:=IF([.AV29]&lt;=[.$B$19]-[.$B$11];2*[.$B$23]*[.$B$22]*([.$B$8]+[.$B$9]*[.$B$6])*(EXP(-[.$B$23]*[.AV29]) - EXP(-2*[.$B$23]*[.AV29])) + [.$B$10]*[.$B$5]; -[.$B$22]*(1-EXP(-[.$B$23]*[.AV$29]))^2*IF([.AV29]=[.$B$19];1;0))" office:value-type="float" office:value="0.278751406418315" calcext:value-type="float">
            <text:p>0.28</text:p>
          </table:table-cell>
          <table:table-cell table:style-name="ce36" table:formula="of:=IF([.AW29]&lt;=[.$B$19]-[.$B$11];2*[.$B$23]*[.$B$22]*([.$B$8]+[.$B$9]*[.$B$6])*(EXP(-[.$B$23]*[.AW29]) - EXP(-2*[.$B$23]*[.AW29])) + [.$B$10]*[.$B$5]; -[.$B$22]*(1-EXP(-[.$B$23]*[.AW$29]))^2*IF([.AW29]=[.$B$19];1;0))" office:value-type="float" office:value="0.278169510391029" calcext:value-type="float">
            <text:p>0.28</text:p>
          </table:table-cell>
          <table:table-cell table:style-name="ce36" table:formula="of:=IF([.AX29]&lt;=[.$B$19]-[.$B$11];2*[.$B$23]*[.$B$22]*([.$B$8]+[.$B$9]*[.$B$6])*(EXP(-[.$B$23]*[.AX29]) - EXP(-2*[.$B$23]*[.AX29])) + [.$B$10]*[.$B$5]; -[.$B$22]*(1-EXP(-[.$B$23]*[.AX$29]))^2*IF([.AX29]=[.$B$19];1;0))" office:value-type="float" office:value="0.277520028741529" calcext:value-type="float">
            <text:p>0.28</text:p>
          </table:table-cell>
          <table:table-cell table:style-name="ce36" table:formula="of:=IF([.AY29]&lt;=[.$B$19]-[.$B$11];2*[.$B$23]*[.$B$22]*([.$B$8]+[.$B$9]*[.$B$6])*(EXP(-[.$B$23]*[.AY29]) - EXP(-2*[.$B$23]*[.AY29])) + [.$B$10]*[.$B$5]; -[.$B$22]*(1-EXP(-[.$B$23]*[.AY$29]))^2*IF([.AY29]=[.$B$19];1;0))" office:value-type="float" office:value="0.276806705322228" calcext:value-type="float">
            <text:p>0.28</text:p>
          </table:table-cell>
          <table:table-cell table:style-name="ce36" table:formula="of:=IF([.AZ29]&lt;=[.$B$19]-[.$B$11];2*[.$B$23]*[.$B$22]*([.$B$8]+[.$B$9]*[.$B$6])*(EXP(-[.$B$23]*[.AZ29]) - EXP(-2*[.$B$23]*[.AZ29])) + [.$B$10]*[.$B$5]; -[.$B$22]*(1-EXP(-[.$B$23]*[.AZ$29]))^2*IF([.AZ29]=[.$B$19];1;0))" office:value-type="float" office:value="0.276033133329278" calcext:value-type="float">
            <text:p>0.28</text:p>
          </table:table-cell>
          <table:table-cell table:style-name="ce36" table:formula="of:=IF([.BA29]&lt;=[.$B$19]-[.$B$11];2*[.$B$23]*[.$B$22]*([.$B$8]+[.$B$9]*[.$B$6])*(EXP(-[.$B$23]*[.BA29]) - EXP(-2*[.$B$23]*[.BA29])) + [.$B$10]*[.$B$5]; -[.$B$22]*(1-EXP(-[.$B$23]*[.BA$29]))^2*IF([.BA29]=[.$B$19];1;0))" office:value-type="float" office:value="0.275202760783062" calcext:value-type="float">
            <text:p>0.28</text:p>
          </table:table-cell>
          <table:table-cell table:style-name="ce36" table:formula="of:=IF([.BB29]&lt;=[.$B$19]-[.$B$11];2*[.$B$23]*[.$B$22]*([.$B$8]+[.$B$9]*[.$B$6])*(EXP(-[.$B$23]*[.BB29]) - EXP(-2*[.$B$23]*[.BB29])) + [.$B$10]*[.$B$5]; -[.$B$22]*(1-EXP(-[.$B$23]*[.BB$29]))^2*IF([.BB29]=[.$B$19];1;0))" office:value-type="float" office:value="0.27431889581754" calcext:value-type="float">
            <text:p>0.27</text:p>
          </table:table-cell>
          <table:table-cell table:style-name="ce36" table:formula="of:=IF([.BC29]&lt;=[.$B$19]-[.$B$11];2*[.$B$23]*[.$B$22]*([.$B$8]+[.$B$9]*[.$B$6])*(EXP(-[.$B$23]*[.BC29]) - EXP(-2*[.$B$23]*[.BC29])) + [.$B$10]*[.$B$5]; -[.$B$22]*(1-EXP(-[.$B$23]*[.BC$29]))^2*IF([.BC29]=[.$B$19];1;0))" office:value-type="float" office:value="0.273384711784985" calcext:value-type="float">
            <text:p>0.27</text:p>
          </table:table-cell>
          <table:table-cell table:style-name="ce36" table:formula="of:=IF([.BD29]&lt;=[.$B$19]-[.$B$11];2*[.$B$23]*[.$B$22]*([.$B$8]+[.$B$9]*[.$B$6])*(EXP(-[.$B$23]*[.BD29]) - EXP(-2*[.$B$23]*[.BD29])) + [.$B$10]*[.$B$5]; -[.$B$22]*(1-EXP(-[.$B$23]*[.BD$29]))^2*IF([.BD29]=[.$B$19];1;0))" office:value-type="float" office:value="0.272403252182436" calcext:value-type="float">
            <text:p>0.27</text:p>
          </table:table-cell>
          <table:table-cell table:style-name="ce36" table:formula="of:=IF([.BE29]&lt;=[.$B$19]-[.$B$11];2*[.$B$23]*[.$B$22]*([.$B$8]+[.$B$9]*[.$B$6])*(EXP(-[.$B$23]*[.BE29]) - EXP(-2*[.$B$23]*[.BE29])) + [.$B$10]*[.$B$5]; -[.$B$22]*(1-EXP(-[.$B$23]*[.BE$29]))^2*IF([.BE29]=[.$B$19];1;0))" office:value-type="float" office:value="0.271377435405956" calcext:value-type="float">
            <text:p>0.27</text:p>
          </table:table-cell>
          <table:table-cell table:style-name="ce36" table:formula="of:=IF([.BF29]&lt;=[.$B$19]-[.$B$11];2*[.$B$23]*[.$B$22]*([.$B$8]+[.$B$9]*[.$B$6])*(EXP(-[.$B$23]*[.BF29]) - EXP(-2*[.$B$23]*[.BF29])) + [.$B$10]*[.$B$5]; -[.$B$22]*(1-EXP(-[.$B$23]*[.BF$29]))^2*IF([.BF29]=[.$B$19];1;0))" office:value-type="float" office:value="0.270310059338597" calcext:value-type="float">
            <text:p>0.27</text:p>
          </table:table-cell>
          <table:table-cell table:style-name="ce36" table:formula="of:=IF([.BG29]&lt;=[.$B$19]-[.$B$11];2*[.$B$23]*[.$B$22]*([.$B$8]+[.$B$9]*[.$B$6])*(EXP(-[.$B$23]*[.BG29]) - EXP(-2*[.$B$23]*[.BG29])) + [.$B$10]*[.$B$5]; -[.$B$22]*(1-EXP(-[.$B$23]*[.BG$29]))^2*IF([.BG29]=[.$B$19];1;0))" office:value-type="float" office:value="0.269203805777777" calcext:value-type="float">
            <text:p>0.27</text:p>
          </table:table-cell>
          <table:table-cell table:style-name="ce36" table:formula="of:=IF([.BH29]&lt;=[.$B$19]-[.$B$11];2*[.$B$23]*[.$B$22]*([.$B$8]+[.$B$9]*[.$B$6])*(EXP(-[.$B$23]*[.BH29]) - EXP(-2*[.$B$23]*[.BH29])) + [.$B$10]*[.$B$5]; -[.$B$22]*(1-EXP(-[.$B$23]*[.BH$29]))^2*IF([.BH29]=[.$B$19];1;0))" office:value-type="float" office:value="0.268061244707552" calcext:value-type="float">
            <text:p>0.27</text:p>
          </table:table-cell>
          <table:table-cell table:style-name="ce36" table:formula="of:=IF([.BI29]&lt;=[.$B$19]-[.$B$11];2*[.$B$23]*[.$B$22]*([.$B$8]+[.$B$9]*[.$B$6])*(EXP(-[.$B$23]*[.BI29]) - EXP(-2*[.$B$23]*[.BI29])) + [.$B$10]*[.$B$5]; -[.$B$22]*(1-EXP(-[.$B$23]*[.BI$29]))^2*IF([.BI29]=[.$B$19];1;0))" office:value-type="float" office:value="0.266884838421121" calcext:value-type="float">
            <text:p>0.27</text:p>
          </table:table-cell>
          <table:table-cell table:style-name="ce36" table:formula="of:=IF([.BJ29]&lt;=[.$B$19]-[.$B$11];2*[.$B$23]*[.$B$22]*([.$B$8]+[.$B$9]*[.$B$6])*(EXP(-[.$B$23]*[.BJ29]) - EXP(-2*[.$B$23]*[.BJ29])) + [.$B$10]*[.$B$5]; -[.$B$22]*(1-EXP(-[.$B$23]*[.BJ$29]))^2*IF([.BJ29]=[.$B$19];1;0))" office:value-type="float" office:value="0.26567694549868" calcext:value-type="float">
            <text:p>0.27</text:p>
          </table:table-cell>
          <table:table-cell table:style-name="ce36" table:formula="of:=IF([.BK29]&lt;=[.$B$19]-[.$B$11];2*[.$B$23]*[.$B$22]*([.$B$8]+[.$B$9]*[.$B$6])*(EXP(-[.$B$23]*[.BK29]) - EXP(-2*[.$B$23]*[.BK29])) + [.$B$10]*[.$B$5]; -[.$B$22]*(1-EXP(-[.$B$23]*[.BK$29]))^2*IF([.BK29]=[.$B$19];1;0))" office:value-type="float" office:value="0.264439824645602" calcext:value-type="float">
            <text:p>0.26</text:p>
          </table:table-cell>
          <table:table-cell table:style-name="ce36" table:formula="of:=IF([.BL29]&lt;=[.$B$19]-[.$B$11];2*[.$B$23]*[.$B$22]*([.$B$8]+[.$B$9]*[.$B$6])*(EXP(-[.$B$23]*[.BL29]) - EXP(-2*[.$B$23]*[.BL29])) + [.$B$10]*[.$B$5]; -[.$B$22]*(1-EXP(-[.$B$23]*[.BL$29]))^2*IF([.BL29]=[.$B$19];1;0))" office:value-type="float" office:value="0.263175638395726" calcext:value-type="float">
            <text:p>0.26</text:p>
          </table:table-cell>
          <table:table-cell table:style-name="ce36" table:formula="of:=IF([.BM29]&lt;=[.$B$19]-[.$B$11];2*[.$B$23]*[.$B$22]*([.$B$8]+[.$B$9]*[.$B$6])*(EXP(-[.$B$23]*[.BM29]) - EXP(-2*[.$B$23]*[.BM29])) + [.$B$10]*[.$B$5]; -[.$B$22]*(1-EXP(-[.$B$23]*[.BM$29]))^2*IF([.BM29]=[.$B$19];1;0))" office:value-type="float" office:value="0.261886456684394" calcext:value-type="float">
            <text:p>0.26</text:p>
          </table:table-cell>
          <table:table-cell table:style-name="ce36" table:formula="of:=IF([.BN29]&lt;=[.$B$19]-[.$B$11];2*[.$B$23]*[.$B$22]*([.$B$8]+[.$B$9]*[.$B$6])*(EXP(-[.$B$23]*[.BN29]) - EXP(-2*[.$B$23]*[.BN29])) + [.$B$10]*[.$B$5]; -[.$B$22]*(1-EXP(-[.$B$23]*[.BN$29]))^2*IF([.BN29]=[.$B$19];1;0))" office:value-type="float" office:value="0.2605742602957" calcext:value-type="float">
            <text:p>0.26</text:p>
          </table:table-cell>
          <table:table-cell table:style-name="ce36" table:formula="of:=IF([.BO29]&lt;=[.$B$19]-[.$B$11];2*[.$B$23]*[.$B$22]*([.$B$8]+[.$B$9]*[.$B$6])*(EXP(-[.$B$23]*[.BO29]) - EXP(-2*[.$B$23]*[.BO29])) + [.$B$10]*[.$B$5]; -[.$B$22]*(1-EXP(-[.$B$23]*[.BO$29]))^2*IF([.BO29]=[.$B$19];1;0))" office:value-type="float" office:value="0.259240944188279" calcext:value-type="float">
            <text:p>0.26</text:p>
          </table:table-cell>
          <table:table-cell table:style-name="ce36" table:formula="of:=IF([.BP29]&lt;=[.$B$19]-[.$B$11];2*[.$B$23]*[.$B$22]*([.$B$8]+[.$B$9]*[.$B$6])*(EXP(-[.$B$23]*[.BP29]) - EXP(-2*[.$B$23]*[.BP29])) + [.$B$10]*[.$B$5]; -[.$B$22]*(1-EXP(-[.$B$23]*[.BP$29]))^2*IF([.BP29]=[.$B$19];1;0))" office:value-type="float" office:value="0.25788832070381" calcext:value-type="float">
            <text:p>0.26</text:p>
          </table:table-cell>
          <table:table-cell table:style-name="ce36" table:formula="of:=IF([.BQ29]&lt;=[.$B$19]-[.$B$11];2*[.$B$23]*[.$B$22]*([.$B$8]+[.$B$9]*[.$B$6])*(EXP(-[.$B$23]*[.BQ29]) - EXP(-2*[.$B$23]*[.BQ29])) + [.$B$10]*[.$B$5]; -[.$B$22]*(1-EXP(-[.$B$23]*[.BQ$29]))^2*IF([.BQ29]=[.$B$19];1;0))" office:value-type="float" office:value="0.256518122662264" calcext:value-type="float">
            <text:p>0.26</text:p>
          </table:table-cell>
          <table:table-cell table:style-name="ce36" table:formula="of:=IF([.BR29]&lt;=[.$B$19]-[.$B$11];2*[.$B$23]*[.$B$22]*([.$B$8]+[.$B$9]*[.$B$6])*(EXP(-[.$B$23]*[.BR29]) - EXP(-2*[.$B$23]*[.BR29])) + [.$B$10]*[.$B$5]; -[.$B$22]*(1-EXP(-[.$B$23]*[.BR$29]))^2*IF([.BR29]=[.$B$19];1;0))" office:value-type="float" office:value="0.255132006347796" calcext:value-type="float">
            <text:p>0.26</text:p>
          </table:table-cell>
          <table:table-cell table:style-name="ce36" table:formula="of:=IF([.BS29]&lt;=[.$B$19]-[.$B$11];2*[.$B$23]*[.$B$22]*([.$B$8]+[.$B$9]*[.$B$6])*(EXP(-[.$B$23]*[.BS29]) - EXP(-2*[.$B$23]*[.BS29])) + [.$B$10]*[.$B$5]; -[.$B$22]*(1-EXP(-[.$B$23]*[.BS$29]))^2*IF([.BS29]=[.$B$19];1;0))" office:value-type="float" office:value="0.253731554389034" calcext:value-type="float">
            <text:p>0.25</text:p>
          </table:table-cell>
          <table:table-cell table:style-name="ce36" table:formula="of:=IF([.BT29]&lt;=[.$B$19]-[.$B$11];2*[.$B$23]*[.$B$22]*([.$B$8]+[.$B$9]*[.$B$6])*(EXP(-[.$B$23]*[.BT29]) - EXP(-2*[.$B$23]*[.BT29])) + [.$B$10]*[.$B$5]; -[.$B$22]*(1-EXP(-[.$B$23]*[.BT$29]))^2*IF([.BT29]=[.$B$19];1;0))" office:value-type="float" office:value="0.252318278537423" calcext:value-type="float">
            <text:p>0.25</text:p>
          </table:table-cell>
          <table:table-cell table:style-name="ce36" table:formula="of:=IF([.BU29]&lt;=[.$B$19]-[.$B$11];2*[.$B$23]*[.$B$22]*([.$B$8]+[.$B$9]*[.$B$6])*(EXP(-[.$B$23]*[.BU29]) - EXP(-2*[.$B$23]*[.BU29])) + [.$B$10]*[.$B$5]; -[.$B$22]*(1-EXP(-[.$B$23]*[.BU$29]))^2*IF([.BU29]=[.$B$19];1;0))" office:value-type="float" office:value="0.250893622347109" calcext:value-type="float">
            <text:p>0.25</text:p>
          </table:table-cell>
          <table:table-cell table:style-name="ce36" table:formula="of:=IF([.BV29]&lt;=[.$B$19]-[.$B$11];2*[.$B$23]*[.$B$22]*([.$B$8]+[.$B$9]*[.$B$6])*(EXP(-[.$B$23]*[.BV29]) - EXP(-2*[.$B$23]*[.BV29])) + [.$B$10]*[.$B$5]; -[.$B$22]*(1-EXP(-[.$B$23]*[.BV$29]))^2*IF([.BV29]=[.$B$19];1;0))" office:value-type="float" office:value="0.249458963759774" calcext:value-type="float">
            <text:p>0.25</text:p>
          </table:table-cell>
          <table:table-cell table:style-name="ce36" table:formula="of:=IF([.BW29]&lt;=[.$B$19]-[.$B$11];2*[.$B$23]*[.$B$22]*([.$B$8]+[.$B$9]*[.$B$6])*(EXP(-[.$B$23]*[.BW29]) - EXP(-2*[.$B$23]*[.BW29])) + [.$B$10]*[.$B$5]; -[.$B$22]*(1-EXP(-[.$B$23]*[.BW$29]))^2*IF([.BW29]=[.$B$19];1;0))" office:value-type="float" office:value="0.248015617597698" calcext:value-type="float">
            <text:p>0.25</text:p>
          </table:table-cell>
          <table:table-cell table:style-name="ce36" table:formula="of:=IF([.BX29]&lt;=[.$B$19]-[.$B$11];2*[.$B$23]*[.$B$22]*([.$B$8]+[.$B$9]*[.$B$6])*(EXP(-[.$B$23]*[.BX29]) - EXP(-2*[.$B$23]*[.BX29])) + [.$B$10]*[.$B$5]; -[.$B$22]*(1-EXP(-[.$B$23]*[.BX$29]))^2*IF([.BX29]=[.$B$19];1;0))" office:value-type="float" office:value="0.246564837968198" calcext:value-type="float">
            <text:p>0.25</text:p>
          </table:table-cell>
          <table:table-cell table:style-name="ce36" table:formula="of:=IF([.BY29]&lt;=[.$B$19]-[.$B$11];2*[.$B$23]*[.$B$22]*([.$B$8]+[.$B$9]*[.$B$6])*(EXP(-[.$B$23]*[.BY29]) - EXP(-2*[.$B$23]*[.BY29])) + [.$B$10]*[.$B$5]; -[.$B$22]*(1-EXP(-[.$B$23]*[.BY$29]))^2*IF([.BY29]=[.$B$19];1;0))" office:value-type="float" office:value="0.245107820582529" calcext:value-type="float">
            <text:p>0.25</text:p>
          </table:table-cell>
          <table:table-cell table:style-name="ce36" table:formula="of:=IF([.BZ29]&lt;=[.$B$19]-[.$B$11];2*[.$B$23]*[.$B$22]*([.$B$8]+[.$B$9]*[.$B$6])*(EXP(-[.$B$23]*[.BZ29]) - EXP(-2*[.$B$23]*[.BZ29])) + [.$B$10]*[.$B$5]; -[.$B$22]*(1-EXP(-[.$B$23]*[.BZ$29]))^2*IF([.BZ29]=[.$B$19];1;0))" office:value-type="float" office:value="0.243645704992169" calcext:value-type="float">
            <text:p>0.24</text:p>
          </table:table-cell>
          <table:table-cell table:style-name="ce36" table:formula="of:=IF([.CA29]&lt;=[.$B$19]-[.$B$11];2*[.$B$23]*[.$B$22]*([.$B$8]+[.$B$9]*[.$B$6])*(EXP(-[.$B$23]*[.CA29]) - EXP(-2*[.$B$23]*[.CA29])) + [.$B$10]*[.$B$5]; -[.$B$22]*(1-EXP(-[.$B$23]*[.CA$29]))^2*IF([.CA29]=[.$B$19];1;0))" office:value-type="float" office:value="0.242179576745375" calcext:value-type="float">
            <text:p>0.24</text:p>
          </table:table-cell>
          <table:table-cell table:style-name="ce36" table:formula="of:=IF([.CB29]&lt;=[.$B$19]-[.$B$11];2*[.$B$23]*[.$B$22]*([.$B$8]+[.$B$9]*[.$B$6])*(EXP(-[.$B$23]*[.CB29]) - EXP(-2*[.$B$23]*[.CB29])) + [.$B$10]*[.$B$5]; -[.$B$22]*(1-EXP(-[.$B$23]*[.CB$29]))^2*IF([.CB29]=[.$B$19];1;0))" office:value-type="float" office:value="0.240710469466734" calcext:value-type="float">
            <text:p>0.24</text:p>
          </table:table-cell>
          <table:table-cell table:style-name="ce36" table:formula="of:=IF([.CC29]&lt;=[.$B$19]-[.$B$11];2*[.$B$23]*[.$B$22]*([.$B$8]+[.$B$9]*[.$B$6])*(EXP(-[.$B$23]*[.CC29]) - EXP(-2*[.$B$23]*[.CC29])) + [.$B$10]*[.$B$5]; -[.$B$22]*(1-EXP(-[.$B$23]*[.CC$29]))^2*IF([.CC29]=[.$B$19];1;0))" office:value-type="float" office:value="0.239239366862397" calcext:value-type="float">
            <text:p>0.24</text:p>
          </table:table-cell>
          <table:table-cell table:style-name="ce36" table:formula="of:=IF([.CD29]&lt;=[.$B$19]-[.$B$11];2*[.$B$23]*[.$B$22]*([.$B$8]+[.$B$9]*[.$B$6])*(EXP(-[.$B$23]*[.CD29]) - EXP(-2*[.$B$23]*[.CD29])) + [.$B$10]*[.$B$5]; -[.$B$22]*(1-EXP(-[.$B$23]*[.CD$29]))^2*IF([.CD29]=[.$B$19];1;0))" office:value-type="float" office:value="0.237767204653553" calcext:value-type="float">
            <text:p>0.24</text:p>
          </table:table-cell>
          <table:table-cell table:style-name="ce36" table:formula="of:=IF([.CE29]&lt;=[.$B$19]-[.$B$11];2*[.$B$23]*[.$B$22]*([.$B$8]+[.$B$9]*[.$B$6])*(EXP(-[.$B$23]*[.CE29]) - EXP(-2*[.$B$23]*[.CE29])) + [.$B$10]*[.$B$5]; -[.$B$22]*(1-EXP(-[.$B$23]*[.CE$29]))^2*IF([.CE29]=[.$B$19];1;0))" office:value-type="float" office:value="0.236294872440634" calcext:value-type="float">
            <text:p>0.24</text:p>
          </table:table-cell>
          <table:table-cell table:style-name="ce36" table:formula="of:=IF([.CF29]&lt;=[.$B$19]-[.$B$11];2*[.$B$23]*[.$B$22]*([.$B$8]+[.$B$9]*[.$B$6])*(EXP(-[.$B$23]*[.CF29]) - EXP(-2*[.$B$23]*[.CF29])) + [.$B$10]*[.$B$5]; -[.$B$22]*(1-EXP(-[.$B$23]*[.CF$29]))^2*IF([.CF29]=[.$B$19];1;0))" office:value-type="float" office:value="0.234823215500643" calcext:value-type="float">
            <text:p>0.23</text:p>
          </table:table-cell>
          <table:table-cell table:style-name="ce36" table:formula="of:=IF([.CG29]&lt;=[.$B$19]-[.$B$11];2*[.$B$23]*[.$B$22]*([.$B$8]+[.$B$9]*[.$B$6])*(EXP(-[.$B$23]*[.CG29]) - EXP(-2*[.$B$23]*[.CG29])) + [.$B$10]*[.$B$5]; -[.$B$22]*(1-EXP(-[.$B$23]*[.CG$29]))^2*IF([.CG29]=[.$B$19];1;0))" office:value-type="float" office:value="0.233353036519934" calcext:value-type="float">
            <text:p>0.23</text:p>
          </table:table-cell>
          <table:table-cell table:style-name="ce36" table:formula="of:=IF([.CH29]&lt;=[.$B$19]-[.$B$11];2*[.$B$23]*[.$B$22]*([.$B$8]+[.$B$9]*[.$B$6])*(EXP(-[.$B$23]*[.CH29]) - EXP(-2*[.$B$23]*[.CH29])) + [.$B$10]*[.$B$5]; -[.$B$22]*(1-EXP(-[.$B$23]*[.CH$29]))^2*IF([.CH29]=[.$B$19];1;0))" office:value-type="float" office:value="0.231885097264671" calcext:value-type="float">
            <text:p>0.23</text:p>
          </table:table-cell>
          <table:table-cell table:style-name="ce36" table:formula="of:=IF([.CI29]&lt;=[.$B$19]-[.$B$11];2*[.$B$23]*[.$B$22]*([.$B$8]+[.$B$9]*[.$B$6])*(EXP(-[.$B$23]*[.CI29]) - EXP(-2*[.$B$23]*[.CI29])) + [.$B$10]*[.$B$5]; -[.$B$22]*(1-EXP(-[.$B$23]*[.CI$29]))^2*IF([.CI29]=[.$B$19];1;0))" office:value-type="float" office:value="0.230420120191137" calcext:value-type="float">
            <text:p>0.23</text:p>
          </table:table-cell>
          <table:table-cell table:style-name="ce36" table:formula="of:=IF([.CJ29]&lt;=[.$B$19]-[.$B$11];2*[.$B$23]*[.$B$22]*([.$B$8]+[.$B$9]*[.$B$6])*(EXP(-[.$B$23]*[.CJ29]) - EXP(-2*[.$B$23]*[.CJ29])) + [.$B$10]*[.$B$5]; -[.$B$22]*(1-EXP(-[.$B$23]*[.CJ$29]))^2*IF([.CJ29]=[.$B$19];1;0))" office:value-type="float" office:value="0.22895878999797" calcext:value-type="float">
            <text:p>0.23</text:p>
          </table:table-cell>
          <table:table-cell table:style-name="ce36" table:formula="of:=IF([.CK29]&lt;=[.$B$19]-[.$B$11];2*[.$B$23]*[.$B$22]*([.$B$8]+[.$B$9]*[.$B$6])*(EXP(-[.$B$23]*[.CK29]) - EXP(-2*[.$B$23]*[.CK29])) + [.$B$10]*[.$B$5]; -[.$B$22]*(1-EXP(-[.$B$23]*[.CK$29]))^2*IF([.CK29]=[.$B$19];1;0))" office:value-type="float" office:value="0.227501755122367" calcext:value-type="float">
            <text:p>0.23</text:p>
          </table:table-cell>
          <table:table-cell table:style-name="ce36" table:formula="of:=IF([.CL29]&lt;=[.$B$19]-[.$B$11];2*[.$B$23]*[.$B$22]*([.$B$8]+[.$B$9]*[.$B$6])*(EXP(-[.$B$23]*[.CL29]) - EXP(-2*[.$B$23]*[.CL29])) + [.$B$10]*[.$B$5]; -[.$B$22]*(1-EXP(-[.$B$23]*[.CL$29]))^2*IF([.CL29]=[.$B$19];1;0))" office:value-type="float" office:value="0.226049629182167" calcext:value-type="float">
            <text:p>0.23</text:p>
          </table:table-cell>
          <table:table-cell table:style-name="ce36" table:formula="of:=IF([.CM29]&lt;=[.$B$19]-[.$B$11];2*[.$B$23]*[.$B$22]*([.$B$8]+[.$B$9]*[.$B$6])*(EXP(-[.$B$23]*[.CM29]) - EXP(-2*[.$B$23]*[.CM29])) + [.$B$10]*[.$B$5]; -[.$B$22]*(1-EXP(-[.$B$23]*[.CM$29]))^2*IF([.CM29]=[.$B$19];1;0))" office:value-type="float" office:value="0.224602992365731" calcext:value-type="float">
            <text:p>0.22</text:p>
          </table:table-cell>
          <table:table-cell table:style-name="ce36" table:formula="of:=IF([.CN29]&lt;=[.$B$19]-[.$B$11];2*[.$B$23]*[.$B$22]*([.$B$8]+[.$B$9]*[.$B$6])*(EXP(-[.$B$23]*[.CN29]) - EXP(-2*[.$B$23]*[.CN29])) + [.$B$10]*[.$B$5]; -[.$B$22]*(1-EXP(-[.$B$23]*[.CN$29]))^2*IF([.CN29]=[.$B$19];1;0))" office:value-type="float" office:value="0.22316239277142" calcext:value-type="float">
            <text:p>0.22</text:p>
          </table:table-cell>
          <table:table-cell table:style-name="ce36" table:formula="of:=IF([.CO29]&lt;=[.$B$19]-[.$B$11];2*[.$B$23]*[.$B$22]*([.$B$8]+[.$B$9]*[.$B$6])*(EXP(-[.$B$23]*[.CO29]) - EXP(-2*[.$B$23]*[.CO29])) + [.$B$10]*[.$B$5]; -[.$B$22]*(1-EXP(-[.$B$23]*[.CO$29]))^2*IF([.CO29]=[.$B$19];1;0))" office:value-type="float" office:value="0.221728347698417" calcext:value-type="float">
            <text:p>0.22</text:p>
          </table:table-cell>
          <table:table-cell table:style-name="ce36" table:formula="of:=IF([.CP29]&lt;=[.$B$19]-[.$B$11];2*[.$B$23]*[.$B$22]*([.$B$8]+[.$B$9]*[.$B$6])*(EXP(-[.$B$23]*[.CP29]) - EXP(-2*[.$B$23]*[.CP29])) + [.$B$10]*[.$B$5]; -[.$B$22]*(1-EXP(-[.$B$23]*[.CP$29]))^2*IF([.CP29]=[.$B$19];1;0))" office:value-type="float" office:value="0.220301344890613" calcext:value-type="float">
            <text:p>0.22</text:p>
          </table:table-cell>
          <table:table-cell table:style-name="ce36" table:formula="of:=IF([.CQ29]&lt;=[.$B$19]-[.$B$11];2*[.$B$23]*[.$B$22]*([.$B$8]+[.$B$9]*[.$B$6])*(EXP(-[.$B$23]*[.CQ29]) - EXP(-2*[.$B$23]*[.CQ29])) + [.$B$10]*[.$B$5]; -[.$B$22]*(1-EXP(-[.$B$23]*[.CQ$29]))^2*IF([.CQ29]=[.$B$19];1;0))" office:value-type="float" office:value="0.218881843735172" calcext:value-type="float">
            <text:p>0.22</text:p>
          </table:table-cell>
          <table:table-cell table:style-name="ce36" table:formula="of:=IF([.CR29]&lt;=[.$B$19]-[.$B$11];2*[.$B$23]*[.$B$22]*([.$B$8]+[.$B$9]*[.$B$6])*(EXP(-[.$B$23]*[.CR29]) - EXP(-2*[.$B$23]*[.CR29])) + [.$B$10]*[.$B$5]; -[.$B$22]*(1-EXP(-[.$B$23]*[.CR$29]))^2*IF([.CR29]=[.$B$19];1;0))" office:value-type="float" office:value="0.217470276417364" calcext:value-type="float">
            <text:p>0.22</text:p>
          </table:table-cell>
          <table:table-cell table:style-name="ce36" table:formula="of:=IF([.CS29]&lt;=[.$B$19]-[.$B$11];2*[.$B$23]*[.$B$22]*([.$B$8]+[.$B$9]*[.$B$6])*(EXP(-[.$B$23]*[.CS29]) - EXP(-2*[.$B$23]*[.CS29])) + [.$B$10]*[.$B$5]; -[.$B$22]*(1-EXP(-[.$B$23]*[.CS$29]))^2*IF([.CS29]=[.$B$19];1;0))" office:value-type="float" office:value="0.216067049033199" calcext:value-type="float">
            <text:p>0.22</text:p>
          </table:table-cell>
          <table:table-cell table:style-name="ce36" table:formula="of:=IF([.CT29]&lt;=[.$B$19]-[.$B$11];2*[.$B$23]*[.$B$22]*([.$B$8]+[.$B$9]*[.$B$6])*(EXP(-[.$B$23]*[.CT29]) - EXP(-2*[.$B$23]*[.CT29])) + [.$B$10]*[.$B$5]; -[.$B$22]*(1-EXP(-[.$B$23]*[.CT$29]))^2*IF([.CT29]=[.$B$19];1;0))" office:value-type="float" office:value="0.214672542661331" calcext:value-type="float">
            <text:p>0.21</text:p>
          </table:table-cell>
          <table:table-cell table:style-name="ce36" table:formula="of:=IF([.CU29]&lt;=[.$B$19]-[.$B$11];2*[.$B$23]*[.$B$22]*([.$B$8]+[.$B$9]*[.$B$6])*(EXP(-[.$B$23]*[.CU29]) - EXP(-2*[.$B$23]*[.CU29])) + [.$B$10]*[.$B$5]; -[.$B$22]*(1-EXP(-[.$B$23]*[.CU$29]))^2*IF([.CU29]=[.$B$19];1;0))" office:value-type="float" office:value="0.213287114395654" calcext:value-type="float">
            <text:p>0.21</text:p>
          </table:table-cell>
          <table:table-cell table:style-name="ce36" table:formula="of:=IF([.CV29]&lt;=[.$B$19]-[.$B$11];2*[.$B$23]*[.$B$22]*([.$B$8]+[.$B$9]*[.$B$6])*(EXP(-[.$B$23]*[.CV29]) - EXP(-2*[.$B$23]*[.CV29])) + [.$B$10]*[.$B$5]; -[.$B$22]*(1-EXP(-[.$B$23]*[.CV$29]))^2*IF([.CV29]=[.$B$19];1;0))" office:value-type="float" office:value="0.211911098339972" calcext:value-type="float">
            <text:p>0.21</text:p>
          </table:table-cell>
          <table:table-cell table:style-name="ce36" table:formula="of:=IF([.CW29]&lt;=[.$B$19]-[.$B$11];2*[.$B$23]*[.$B$22]*([.$B$8]+[.$B$9]*[.$B$6])*(EXP(-[.$B$23]*[.CW29]) - EXP(-2*[.$B$23]*[.CW29])) + [.$B$10]*[.$B$5]; -[.$B$22]*(1-EXP(-[.$B$23]*[.CW$29]))^2*IF([.CW29]=[.$B$19];1;0))" office:value-type="float" office:value="0.210544806566068" calcext:value-type="float">
            <text:p>0.21</text:p>
          </table:table-cell>
          <table:table-cell table:style-name="ce36" table:formula="of:=IF([.CX29]&lt;=[.$B$19]-[.$B$11];2*[.$B$23]*[.$B$22]*([.$B$8]+[.$B$9]*[.$B$6])*(EXP(-[.$B$23]*[.CX29]) - EXP(-2*[.$B$23]*[.CX29])) + [.$B$10]*[.$B$5]; -[.$B$22]*(1-EXP(-[.$B$23]*[.CX$29]))^2*IF([.CX29]=[.$B$19];1;0))" office:value-type="float" office:value="0.209188530036457" calcext:value-type="float">
            <text:p>0.21</text:p>
          </table:table-cell>
          <table:table-cell table:style-name="ce36" table:formula="of:=IF([.CY29]&lt;=[.$B$19]-[.$B$11];2*[.$B$23]*[.$B$22]*([.$B$8]+[.$B$9]*[.$B$6])*(EXP(-[.$B$23]*[.CY29]) - EXP(-2*[.$B$23]*[.CY29])) + [.$B$10]*[.$B$5]; -[.$B$22]*(1-EXP(-[.$B$23]*[.CY$29]))^2*IF([.CY29]=[.$B$19];1;0))" office:value-type="float" office:value="0.207842539493062" calcext:value-type="float">
            <text:p>0.21</text:p>
          </table:table-cell>
          <table:table-cell table:style-name="ce36" table:formula="of:=IF([.CZ29]&lt;=[.$B$19]-[.$B$11];2*[.$B$23]*[.$B$22]*([.$B$8]+[.$B$9]*[.$B$6])*(EXP(-[.$B$23]*[.CZ29]) - EXP(-2*[.$B$23]*[.CZ29])) + [.$B$10]*[.$B$5]; -[.$B$22]*(1-EXP(-[.$B$23]*[.CZ$29]))^2*IF([.CZ29]=[.$B$19];1;0))" office:value-type="float" office:value="0.206507086313002" calcext:value-type="float">
            <text:p>0.21</text:p>
          </table:table-cell>
          <table:table-cell table:style-name="ce36" table:formula="of:=IF([.DA29]&lt;=[.$B$19]-[.$B$11];2*[.$B$23]*[.$B$22]*([.$B$8]+[.$B$9]*[.$B$6])*(EXP(-[.$B$23]*[.DA29]) - EXP(-2*[.$B$23]*[.DA29])) + [.$B$10]*[.$B$5]; -[.$B$22]*(1-EXP(-[.$B$23]*[.DA$29]))^2*IF([.DA29]=[.$B$19];1;0))" office:value-type="float" office:value="0.20518240333266" calcext:value-type="float">
            <text:p>0.21</text:p>
          </table:table-cell>
          <table:table-cell table:style-name="ce36" table:formula="of:=IF([.DB29]&lt;=[.$B$19]-[.$B$11];2*[.$B$23]*[.$B$22]*([.$B$8]+[.$B$9]*[.$B$6])*(EXP(-[.$B$23]*[.DB29]) - EXP(-2*[.$B$23]*[.DB29])) + [.$B$10]*[.$B$5]; -[.$B$22]*(1-EXP(-[.$B$23]*[.DB$29]))^2*IF([.DB29]=[.$B$19];1;0))" office:value-type="float" office:value="0.203868705641143" calcext:value-type="float">
            <text:p>0.20</text:p>
          </table:table-cell>
          <table:table-cell table:style-name="ce36" table:formula="of:=IF([.DC29]&lt;=[.$B$19]-[.$B$11];2*[.$B$23]*[.$B$22]*([.$B$8]+[.$B$9]*[.$B$6])*(EXP(-[.$B$23]*[.DC29]) - EXP(-2*[.$B$23]*[.DC29])) + [.$B$10]*[.$B$5]; -[.$B$22]*(1-EXP(-[.$B$23]*[.DC$29]))^2*IF([.DC29]=[.$B$19];1;0))" office:value-type="float" office:value="0.202566191344199" calcext:value-type="float">
            <text:p>0.20</text:p>
          </table:table-cell>
          <table:table-cell table:style-name="ce36" table:formula="of:=IF([.DD29]&lt;=[.$B$19]-[.$B$11];2*[.$B$23]*[.$B$22]*([.$B$8]+[.$B$9]*[.$B$6])*(EXP(-[.$B$23]*[.DD29]) - EXP(-2*[.$B$23]*[.DD29])) + [.$B$10]*[.$B$5]; -[.$B$22]*(1-EXP(-[.$B$23]*[.DD$29]))^2*IF([.DD29]=[.$B$19];1;0))" office:value-type="float" office:value="0.201275042299653" calcext:value-type="float">
            <text:p>0.20</text:p>
          </table:table-cell>
          <table:table-cell table:style-name="ce36" table:formula="of:=IF([.DE29]&lt;=[.$B$19]-[.$B$11];2*[.$B$23]*[.$B$22]*([.$B$8]+[.$B$9]*[.$B$6])*(EXP(-[.$B$23]*[.DE29]) - EXP(-2*[.$B$23]*[.DE29])) + [.$B$10]*[.$B$5]; -[.$B$22]*(1-EXP(-[.$B$23]*[.DE$29]))^2*IF([.DE29]=[.$B$19];1;0))" office:value-type="float" office:value="0.199995424825348" calcext:value-type="float">
            <text:p>0.20</text:p>
          </table:table-cell>
          <table:table-cell table:style-name="ce36" table:formula="of:=IF([.DF29]&lt;=[.$B$19]-[.$B$11];2*[.$B$23]*[.$B$22]*([.$B$8]+[.$B$9]*[.$B$6])*(EXP(-[.$B$23]*[.DF29]) - EXP(-2*[.$B$23]*[.DF29])) + [.$B$10]*[.$B$5]; -[.$B$22]*(1-EXP(-[.$B$23]*[.DF$29]))^2*IF([.DF29]=[.$B$19];1;0))" office:value-type="float" office:value="0.198727490380572" calcext:value-type="float">
            <text:p>0.20</text:p>
          </table:table-cell>
          <table:table-cell table:style-name="ce36" table:formula="of:=IF([.DG29]&lt;=[.$B$19]-[.$B$11];2*[.$B$23]*[.$B$22]*([.$B$8]+[.$B$9]*[.$B$6])*(EXP(-[.$B$23]*[.DG29]) - EXP(-2*[.$B$23]*[.DG29])) + [.$B$10]*[.$B$5]; -[.$B$22]*(1-EXP(-[.$B$23]*[.DG$29]))^2*IF([.DG29]=[.$B$19];1;0))" office:value-type="float" office:value="0.197471376221902" calcext:value-type="float">
            <text:p>0.20</text:p>
          </table:table-cell>
          <table:table-cell table:style-name="ce36" table:formula="of:=IF([.DH29]&lt;=[.$B$19]-[.$B$11];2*[.$B$23]*[.$B$22]*([.$B$8]+[.$B$9]*[.$B$6])*(EXP(-[.$B$23]*[.DH29]) - EXP(-2*[.$B$23]*[.DH29])) + [.$B$10]*[.$B$5]; -[.$B$22]*(1-EXP(-[.$B$23]*[.DH$29]))^2*IF([.DH29]=[.$B$19];1;0))" office:value-type="float" office:value="0.196227206034375" calcext:value-type="float">
            <text:p>0.20</text:p>
          </table:table-cell>
          <table:table-cell table:style-name="ce36" table:formula="of:=IF([.DI29]&lt;=[.$B$19]-[.$B$11];2*[.$B$23]*[.$B$22]*([.$B$8]+[.$B$9]*[.$B$6])*(EXP(-[.$B$23]*[.DI29]) - EXP(-2*[.$B$23]*[.DI29])) + [.$B$10]*[.$B$5]; -[.$B$22]*(1-EXP(-[.$B$23]*[.DI$29]))^2*IF([.DI29]=[.$B$19];1;0))" office:value-type="float" office:value="0.194995090538853" calcext:value-type="float">
            <text:p>0.19</text:p>
          </table:table-cell>
          <table:table-cell table:style-name="ce36" table:formula="of:=IF([.DJ29]&lt;=[.$B$19]-[.$B$11];2*[.$B$23]*[.$B$22]*([.$B$8]+[.$B$9]*[.$B$6])*(EXP(-[.$B$23]*[.DJ29]) - EXP(-2*[.$B$23]*[.DJ29])) + [.$B$10]*[.$B$5]; -[.$B$22]*(1-EXP(-[.$B$23]*[.DJ$29]))^2*IF([.DJ29]=[.$B$19];1;0))" office:value-type="float" office:value="0.193775128076433" calcext:value-type="float">
            <text:p>0.19</text:p>
          </table:table-cell>
          <table:table-cell table:style-name="ce36" table:formula="of:=IF([.DK29]&lt;=[.$B$19]-[.$B$11];2*[.$B$23]*[.$B$22]*([.$B$8]+[.$B$9]*[.$B$6])*(EXP(-[.$B$23]*[.DK29]) - EXP(-2*[.$B$23]*[.DK29])) + [.$B$10]*[.$B$5]; -[.$B$22]*(1-EXP(-[.$B$23]*[.DK$29]))^2*IF([.DK29]=[.$B$19];1;0))" office:value-type="float" office:value="0.192567405170707" calcext:value-type="float">
            <text:p>0.19</text:p>
          </table:table-cell>
          <table:table-cell table:style-name="ce36" table:formula="of:=IF([.DL29]&lt;=[.$B$19]-[.$B$11];2*[.$B$23]*[.$B$22]*([.$B$8]+[.$B$9]*[.$B$6])*(EXP(-[.$B$23]*[.DL29]) - EXP(-2*[.$B$23]*[.DL29])) + [.$B$10]*[.$B$5]; -[.$B$22]*(1-EXP(-[.$B$23]*[.DL$29]))^2*IF([.DL29]=[.$B$19];1;0))" office:value-type="float" office:value="0.191371997068665" calcext:value-type="float">
            <text:p>0.19</text:p>
          </table:table-cell>
          <table:table-cell table:style-name="ce36" table:formula="of:=IF([.DM29]&lt;=[.$B$19]-[.$B$11];2*[.$B$23]*[.$B$22]*([.$B$8]+[.$B$9]*[.$B$6])*(EXP(-[.$B$23]*[.DM29]) - EXP(-2*[.$B$23]*[.DM29])) + [.$B$10]*[.$B$5]; -[.$B$22]*(1-EXP(-[.$B$23]*[.DM$29]))^2*IF([.DM29]=[.$B$19];1;0))" office:value-type="float" office:value="0.190188968261002" calcext:value-type="float">
            <text:p>0.19</text:p>
          </table:table-cell>
          <table:table-cell table:style-name="ce36" table:formula="of:=IF([.DN29]&lt;=[.$B$19]-[.$B$11];2*[.$B$23]*[.$B$22]*([.$B$8]+[.$B$9]*[.$B$6])*(EXP(-[.$B$23]*[.DN29]) - EXP(-2*[.$B$23]*[.DN29])) + [.$B$10]*[.$B$5]; -[.$B$22]*(1-EXP(-[.$B$23]*[.DN$29]))^2*IF([.DN29]=[.$B$19];1;0))" office:value-type="float" office:value="0.189018372982551" calcext:value-type="float">
            <text:p>0.19</text:p>
          </table:table-cell>
          <table:table-cell table:style-name="ce36" table:formula="of:=IF([.DO29]&lt;=[.$B$19]-[.$B$11];2*[.$B$23]*[.$B$22]*([.$B$8]+[.$B$9]*[.$B$6])*(EXP(-[.$B$23]*[.DO29]) - EXP(-2*[.$B$23]*[.DO29])) + [.$B$10]*[.$B$5]; -[.$B$22]*(1-EXP(-[.$B$23]*[.DO$29]))^2*IF([.DO29]=[.$B$19];1;0))" office:value-type="float" office:value="0.187860255693564" calcext:value-type="float">
            <text:p>0.19</text:p>
          </table:table-cell>
          <table:table-cell table:style-name="ce36" table:formula="of:=IF([.DP29]&lt;=[.$B$19]-[.$B$11];2*[.$B$23]*[.$B$22]*([.$B$8]+[.$B$9]*[.$B$6])*(EXP(-[.$B$23]*[.DP29]) - EXP(-2*[.$B$23]*[.DP29])) + [.$B$10]*[.$B$5]; -[.$B$22]*(1-EXP(-[.$B$23]*[.DP$29]))^2*IF([.DP29]=[.$B$19];1;0))" office:value-type="float" office:value="0.186714651542512" calcext:value-type="float">
            <text:p>0.19</text:p>
          </table:table-cell>
          <table:table-cell table:style-name="ce36" table:formula="of:=IF([.DQ29]&lt;=[.$B$19]-[.$B$11];2*[.$B$23]*[.$B$22]*([.$B$8]+[.$B$9]*[.$B$6])*(EXP(-[.$B$23]*[.DQ29]) - EXP(-2*[.$B$23]*[.DQ29])) + [.$B$10]*[.$B$5]; -[.$B$22]*(1-EXP(-[.$B$23]*[.DQ$29]))^2*IF([.DQ29]=[.$B$19];1;0))" office:value-type="float" office:value="-12.9144270926521" calcext:value-type="float">
            <text:p>-12.91</text:p>
          </table:table-cell>
          <table:table-cell table:number-columns-repeated="16262"/>
        </table:table-row>
        <table:table-row table:style-name="ro1">
          <table:table-cell table:style-name="Default" office:value-type="string" calcext:value-type="string">
            <text:p>Total carbon</text:p>
          </table:table-cell>
          <table:table-cell table:style-name="ce36" table:formula="of:=SUM([.B30:.DQ30])" office:value-type="float" office:value="15.2441136251094" calcext:value-type="float">
            <text:p>15.24</text:p>
          </table:table-cell>
          <table:table-cell table:style-name="Default" table:number-columns-repeated="99"/>
          <table:table-cell table:style-name="ce41"/>
          <table:table-cell table:style-name="Default" table:number-columns-repeated="19"/>
          <table:table-cell table:number-columns-repeated="16262"/>
        </table:table-row>
        <table:table-row table:style-name="ro1">
          <table:table-cell table:style-name="ce42" office:value-type="string" calcext:value-type="string">
            <text:p>Warming yea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ce41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76" calcext:value-type="float">
            <text:p>76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86" calcext:value-type="float">
            <text:p>86</text:p>
          </table:table-cell>
          <table:table-cell table:style-name="Default" office:value-type="float" office:value="87" calcext:value-type="float">
            <text:p>87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office:value-type="float" office:value="98" calcext:value-type="float">
            <text:p>98</text:p>
          </table:table-cell>
          <table:table-cell table:style-name="Default" office:value-type="float" office:value="99" calcext:value-type="float">
            <text:p>99</text:p>
          </table:table-cell>
          <table:table-cell table:style-name="ce41" office:value-type="float" office:value="100" calcext:value-type="float">
            <text:p>100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108" calcext:value-type="float">
            <text:p>108</text:p>
          </table:table-cell>
          <table:table-cell table:style-name="Default" office:value-type="float" office:value="109" calcext:value-type="float">
            <text:p>109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115" calcext:value-type="float">
            <text:p>115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office:value-type="float" office:value="119" calcext:value-type="float">
            <text:p>119</text:p>
          </table:table-cell>
          <table:table-cell table:number-columns-repeated="16262"/>
        </table:table-row>
        <table:table-row table:style-name="ro1">
          <table:table-cell table:style-name="Default" office:value-type="string" calcext:value-type="string">
            <text:p>W[Carbon,u] “kernel”, warming in warming year from year 0 emission, from a solution for SMDAMAGE FitW</text:p>
          </table:table-cell>
          <table:table-cell table:style-name="Default" office:value-type="float" office:value="0" calcext:value-type="float">
            <text:p>0</text:p>
          </table:table-cell>
          <table:table-cell table:style-name="ce39" office:value-type="float" office:value="0.000810628" calcext:value-type="float">
            <text:p>0.0008</text:p>
          </table:table-cell>
          <table:table-cell table:style-name="ce39" office:value-type="float" office:value="0.001371235" calcext:value-type="float">
            <text:p>0.0014</text:p>
          </table:table-cell>
          <table:table-cell table:style-name="ce39" office:value-type="float" office:value="0.001782009" calcext:value-type="float">
            <text:p>0.0018</text:p>
          </table:table-cell>
          <table:table-cell table:style-name="ce39" office:value-type="float" office:value="0.002046314" calcext:value-type="float">
            <text:p>0.0020</text:p>
          </table:table-cell>
          <table:table-cell table:style-name="ce39" office:value-type="float" office:value="0.002224353" calcext:value-type="float">
            <text:p>0.0022</text:p>
          </table:table-cell>
          <table:table-cell table:style-name="ce39" office:value-type="float" office:value="0.002351114" calcext:value-type="float">
            <text:p>0.0024</text:p>
          </table:table-cell>
          <table:table-cell table:style-name="ce39" office:value-type="float" office:value="0.002443458" calcext:value-type="float">
            <text:p>0.0024</text:p>
          </table:table-cell>
          <table:table-cell table:style-name="ce39" office:value-type="float" office:value="0.002509201" calcext:value-type="float">
            <text:p>0.0025</text:p>
          </table:table-cell>
          <table:table-cell table:style-name="ce39" office:value-type="float" office:value="0.002558329" calcext:value-type="float">
            <text:p>0.0026</text:p>
          </table:table-cell>
          <table:table-cell table:style-name="ce39" office:value-type="float" office:value="0.002590824" calcext:value-type="float">
            <text:p>0.0026</text:p>
          </table:table-cell>
          <table:table-cell table:style-name="ce39" office:value-type="float" office:value="0.002611596" calcext:value-type="float">
            <text:p>0.0026</text:p>
          </table:table-cell>
          <table:table-cell table:style-name="ce39" office:value-type="float" office:value="0.002625164" calcext:value-type="float">
            <text:p>0.0026</text:p>
          </table:table-cell>
          <table:table-cell table:style-name="ce39" office:value-type="float" office:value="0.002629826" calcext:value-type="float">
            <text:p>0.0026</text:p>
          </table:table-cell>
          <table:table-cell table:style-name="ce39" office:value-type="float" office:value="0.002629549" calcext:value-type="float">
            <text:p>0.0026</text:p>
          </table:table-cell>
          <table:table-cell table:style-name="ce39" office:value-type="float" office:value="0.002626513" calcext:value-type="float">
            <text:p>0.0026</text:p>
          </table:table-cell>
          <table:table-cell table:style-name="ce39" office:value-type="float" office:value="0.002621047" calcext:value-type="float">
            <text:p>0.0026</text:p>
          </table:table-cell>
          <table:table-cell table:style-name="ce39" office:value-type="float" office:value="0.002608917" calcext:value-type="float">
            <text:p>0.0026</text:p>
          </table:table-cell>
          <table:table-cell table:style-name="ce39" office:value-type="float" office:value="0.002594681" calcext:value-type="float">
            <text:p>0.0026</text:p>
          </table:table-cell>
          <table:table-cell table:style-name="ce39" office:value-type="float" office:value="0.002581921" calcext:value-type="float">
            <text:p>0.0026</text:p>
          </table:table-cell>
          <table:table-cell table:style-name="ce39" office:value-type="float" office:value="0.00256672" calcext:value-type="float">
            <text:p>0.0026</text:p>
          </table:table-cell>
          <table:table-cell table:style-name="ce39" office:value-type="float" office:value="0.002547936" calcext:value-type="float">
            <text:p>0.0025</text:p>
          </table:table-cell>
          <table:table-cell table:style-name="ce39" office:value-type="float" office:value="0.002530647" calcext:value-type="float">
            <text:p>0.0025</text:p>
          </table:table-cell>
          <table:table-cell table:style-name="ce39" office:value-type="float" office:value="0.002513368" calcext:value-type="float">
            <text:p>0.0025</text:p>
          </table:table-cell>
          <table:table-cell table:style-name="ce39" office:value-type="float" office:value="0.00249398" calcext:value-type="float">
            <text:p>0.0025</text:p>
          </table:table-cell>
          <table:table-cell table:style-name="ce39" office:value-type="float" office:value="0.002474633" calcext:value-type="float">
            <text:p>0.0025</text:p>
          </table:table-cell>
          <table:table-cell table:style-name="ce39" office:value-type="float" office:value="0.002454967" calcext:value-type="float">
            <text:p>0.0025</text:p>
          </table:table-cell>
          <table:table-cell table:style-name="ce39" office:value-type="float" office:value="0.002435273" calcext:value-type="float">
            <text:p>0.0024</text:p>
          </table:table-cell>
          <table:table-cell table:style-name="ce39" office:value-type="float" office:value="0.00241557" calcext:value-type="float">
            <text:p>0.0024</text:p>
          </table:table-cell>
          <table:table-cell table:style-name="ce39" office:value-type="float" office:value="0.002397998" calcext:value-type="float">
            <text:p>0.0024</text:p>
          </table:table-cell>
          <table:table-cell table:style-name="ce39" office:value-type="float" office:value="0.002380466" calcext:value-type="float">
            <text:p>0.0024</text:p>
          </table:table-cell>
          <table:table-cell table:style-name="ce39" office:value-type="float" office:value="0.002362705" calcext:value-type="float">
            <text:p>0.0024</text:p>
          </table:table-cell>
          <table:table-cell table:style-name="ce39" office:value-type="float" office:value="0.002345028" calcext:value-type="float">
            <text:p>0.0023</text:p>
          </table:table-cell>
          <table:table-cell table:style-name="ce39" office:value-type="float" office:value="0.002325004" calcext:value-type="float">
            <text:p>0.0023</text:p>
          </table:table-cell>
          <table:table-cell table:style-name="ce39" office:value-type="float" office:value="0.002313421" calcext:value-type="float">
            <text:p>0.0023</text:p>
          </table:table-cell>
          <table:table-cell table:style-name="ce39" office:value-type="float" office:value="0.002298453" calcext:value-type="float">
            <text:p>0.0023</text:p>
          </table:table-cell>
          <table:table-cell table:style-name="ce39" office:value-type="float" office:value="0.002283075" calcext:value-type="float">
            <text:p>0.0023</text:p>
          </table:table-cell>
          <table:table-cell table:style-name="ce39" office:value-type="float" office:value="0.002267619" calcext:value-type="float">
            <text:p>0.0023</text:p>
          </table:table-cell>
          <table:table-cell table:style-name="ce39" office:value-type="float" office:value="0.002249917" calcext:value-type="float">
            <text:p>0.0022</text:p>
          </table:table-cell>
          <table:table-cell table:style-name="ce39" office:value-type="float" office:value="0.002236422" calcext:value-type="float">
            <text:p>0.0022</text:p>
          </table:table-cell>
          <table:table-cell table:style-name="ce39" office:value-type="float" office:value="0.002219432" calcext:value-type="float">
            <text:p>0.0022</text:p>
          </table:table-cell>
          <table:table-cell table:style-name="ce39" office:value-type="float" office:value="0.00220099" calcext:value-type="float">
            <text:p>0.0022</text:p>
          </table:table-cell>
          <table:table-cell table:style-name="ce39" office:value-type="float" office:value="0.002179592" calcext:value-type="float">
            <text:p>0.0022</text:p>
          </table:table-cell>
          <table:table-cell table:style-name="ce39" office:value-type="float" office:value="0.002164619" calcext:value-type="float">
            <text:p>0.0022</text:p>
          </table:table-cell>
          <table:table-cell table:style-name="ce39" office:value-type="float" office:value="0.002147621" calcext:value-type="float">
            <text:p>0.0021</text:p>
          </table:table-cell>
          <table:table-cell table:style-name="ce39" office:value-type="float" office:value="0.002130811" calcext:value-type="float">
            <text:p>0.0021</text:p>
          </table:table-cell>
          <table:table-cell table:style-name="ce39" office:value-type="float" office:value="0.002120102" calcext:value-type="float">
            <text:p>0.0021</text:p>
          </table:table-cell>
          <table:table-cell table:style-name="ce39" office:value-type="float" office:value="0.002102948" calcext:value-type="float">
            <text:p>0.0021</text:p>
          </table:table-cell>
          <table:table-cell table:style-name="ce39" office:value-type="float" office:value="0.002091885" calcext:value-type="float">
            <text:p>0.0021</text:p>
          </table:table-cell>
          <table:table-cell table:style-name="ce39" office:value-type="float" office:value="0.002081073" calcext:value-type="float">
            <text:p>0.0021</text:p>
          </table:table-cell>
          <table:table-cell table:style-name="ce39" office:value-type="float" office:value="0.002066112" calcext:value-type="float">
            <text:p>0.0021</text:p>
          </table:table-cell>
          <table:table-cell table:style-name="ce39" office:value-type="float" office:value="0.00205582" calcext:value-type="float">
            <text:p>0.0021</text:p>
          </table:table-cell>
          <table:table-cell table:style-name="ce39" office:value-type="float" office:value="0.002037398" calcext:value-type="float">
            <text:p>0.0020</text:p>
          </table:table-cell>
          <table:table-cell table:style-name="ce39" office:value-type="float" office:value="0.002026768" calcext:value-type="float">
            <text:p>0.0020</text:p>
          </table:table-cell>
          <table:table-cell table:style-name="ce39" office:value-type="float" office:value="0.002014009" calcext:value-type="float">
            <text:p>0.0020</text:p>
          </table:table-cell>
          <table:table-cell table:style-name="ce39" office:value-type="float" office:value="0.002005162" calcext:value-type="float">
            <text:p>0.0020</text:p>
          </table:table-cell>
          <table:table-cell table:style-name="ce39" office:value-type="float" office:value="0.001998105" calcext:value-type="float">
            <text:p>0.0020</text:p>
          </table:table-cell>
          <table:table-cell table:style-name="ce39" office:value-type="float" office:value="0.001989367" calcext:value-type="float">
            <text:p>0.0020</text:p>
          </table:table-cell>
          <table:table-cell table:style-name="ce39" office:value-type="float" office:value="0.001978528" calcext:value-type="float">
            <text:p>0.0020</text:p>
          </table:table-cell>
          <table:table-cell table:style-name="ce39" office:value-type="float" office:value="0.001968593" calcext:value-type="float">
            <text:p>0.0020</text:p>
          </table:table-cell>
          <table:table-cell table:style-name="ce39" office:value-type="float" office:value="0.001960273" calcext:value-type="float">
            <text:p>0.0020</text:p>
          </table:table-cell>
          <table:table-cell table:style-name="ce39" office:value-type="float" office:value="0.001949699" calcext:value-type="float">
            <text:p>0.0019</text:p>
          </table:table-cell>
          <table:table-cell table:style-name="ce39" office:value-type="float" office:value="0.001941456" calcext:value-type="float">
            <text:p>0.0019</text:p>
          </table:table-cell>
          <table:table-cell table:style-name="ce39" office:value-type="float" office:value="0.001931482" calcext:value-type="float">
            <text:p>0.0019</text:p>
          </table:table-cell>
          <table:table-cell table:style-name="ce39" office:value-type="float" office:value="0.00192284" calcext:value-type="float">
            <text:p>0.0019</text:p>
          </table:table-cell>
          <table:table-cell table:style-name="ce39" office:value-type="float" office:value="0.001914272" calcext:value-type="float">
            <text:p>0.0019</text:p>
          </table:table-cell>
          <table:table-cell table:style-name="ce39" office:value-type="float" office:value="0.001906424" calcext:value-type="float">
            <text:p>0.0019</text:p>
          </table:table-cell>
          <table:table-cell table:style-name="ce39" office:value-type="float" office:value="0.001900075" calcext:value-type="float">
            <text:p>0.0019</text:p>
          </table:table-cell>
          <table:table-cell table:style-name="ce39" office:value-type="float" office:value="0.001892102" calcext:value-type="float">
            <text:p>0.0019</text:p>
          </table:table-cell>
          <table:table-cell table:style-name="ce39" office:value-type="float" office:value="0.001885921" calcext:value-type="float">
            <text:p>0.0019</text:p>
          </table:table-cell>
          <table:table-cell table:style-name="ce39" office:value-type="float" office:value="0.001879774" calcext:value-type="float">
            <text:p>0.0019</text:p>
          </table:table-cell>
          <table:table-cell table:style-name="ce39" office:value-type="float" office:value="0.001869948" calcext:value-type="float">
            <text:p>0.0019</text:p>
          </table:table-cell>
          <table:table-cell table:style-name="ce39" office:value-type="float" office:value="0.001863941" calcext:value-type="float">
            <text:p>0.0019</text:p>
          </table:table-cell>
          <table:table-cell table:style-name="ce39" office:value-type="float" office:value="0.001855957" calcext:value-type="float">
            <text:p>0.0019</text:p>
          </table:table-cell>
          <table:table-cell table:style-name="ce39" office:value-type="float" office:value="0.001851842" calcext:value-type="float">
            <text:p>0.0019</text:p>
          </table:table-cell>
          <table:table-cell table:style-name="ce39" office:value-type="float" office:value="0.001841667" calcext:value-type="float">
            <text:p>0.0018</text:p>
          </table:table-cell>
          <table:table-cell table:style-name="ce39" office:value-type="float" office:value="0.001833609" calcext:value-type="float">
            <text:p>0.0018</text:p>
          </table:table-cell>
          <table:table-cell table:style-name="ce39" office:value-type="float" office:value="0.001829512" calcext:value-type="float">
            <text:p>0.0018</text:p>
          </table:table-cell>
          <table:table-cell table:style-name="ce39" office:value-type="float" office:value="0.001821593" calcext:value-type="float">
            <text:p>0.0018</text:p>
          </table:table-cell>
          <table:table-cell table:style-name="ce39" office:value-type="float" office:value="0.001815792" calcext:value-type="float">
            <text:p>0.0018</text:p>
          </table:table-cell>
          <table:table-cell table:style-name="ce39" office:value-type="float" office:value="0.001809341" calcext:value-type="float">
            <text:p>0.0018</text:p>
          </table:table-cell>
          <table:table-cell table:style-name="ce39" office:value-type="float" office:value="0.001803371" calcext:value-type="float">
            <text:p>0.0018</text:p>
          </table:table-cell>
          <table:table-cell table:style-name="ce39" office:value-type="float" office:value="0.00179802" calcext:value-type="float">
            <text:p>0.0018</text:p>
          </table:table-cell>
          <table:table-cell table:style-name="ce39" office:value-type="float" office:value="0.001789594" calcext:value-type="float">
            <text:p>0.0018</text:p>
          </table:table-cell>
          <table:table-cell table:style-name="ce39" office:value-type="float" office:value="0.001785239" calcext:value-type="float">
            <text:p>0.0018</text:p>
          </table:table-cell>
          <table:table-cell table:style-name="ce39" office:value-type="float" office:value="0.001777986" calcext:value-type="float">
            <text:p>0.0018</text:p>
          </table:table-cell>
          <table:table-cell table:style-name="ce39" office:value-type="float" office:value="0.001771512" calcext:value-type="float">
            <text:p>0.0018</text:p>
          </table:table-cell>
          <table:table-cell table:style-name="ce39" office:value-type="float" office:value="0.001765262" calcext:value-type="float">
            <text:p>0.0018</text:p>
          </table:table-cell>
          <table:table-cell table:style-name="ce39" office:value-type="float" office:value="0.001760534" calcext:value-type="float">
            <text:p>0.0018</text:p>
          </table:table-cell>
          <table:table-cell table:style-name="ce39" office:value-type="float" office:value="0.001754719" calcext:value-type="float">
            <text:p>0.0018</text:p>
          </table:table-cell>
          <table:table-cell table:style-name="ce39" office:value-type="float" office:value="0.001747698" calcext:value-type="float">
            <text:p>0.0017</text:p>
          </table:table-cell>
          <table:table-cell table:style-name="ce39" office:value-type="float" office:value="0.001742777" calcext:value-type="float">
            <text:p>0.0017</text:p>
          </table:table-cell>
          <table:table-cell table:style-name="ce39" office:value-type="float" office:value="0.001737629" calcext:value-type="float">
            <text:p>0.0017</text:p>
          </table:table-cell>
          <table:table-cell table:style-name="ce39" office:value-type="float" office:value="0.001728559" calcext:value-type="float">
            <text:p>0.0017</text:p>
          </table:table-cell>
          <table:table-cell table:style-name="ce39" office:value-type="float" office:value="0.001722733" calcext:value-type="float">
            <text:p>0.0017</text:p>
          </table:table-cell>
          <table:table-cell table:style-name="ce39" office:value-type="float" office:value="0.001712962" calcext:value-type="float">
            <text:p>0.0017</text:p>
          </table:table-cell>
          <table:table-cell table:style-name="ce39" office:value-type="float" office:value="0.001708024" calcext:value-type="float">
            <text:p>0.0017</text:p>
          </table:table-cell>
          <table:table-cell table:style-name="ce39" office:value-type="float" office:value="0.001697598" calcext:value-type="float">
            <text:p>0.0017</text:p>
          </table:table-cell>
          <table:table-cell table:style-name="ce39" office:value-type="float" office:value="0.001691429" calcext:value-type="float">
            <text:p>0.0017</text:p>
          </table:table-cell>
          <table:table-cell table:style-name="ce39" office:value-type="float" office:value="0.001685464" calcext:value-type="float">
            <text:p>0.0017</text:p>
          </table:table-cell>
          <table:table-cell table:style-name="ce44" office:value-type="float" office:value="0.001681741" calcext:value-type="float">
            <text:p>0.0017</text:p>
          </table:table-cell>
          <table:table-cell table:style-name="ce39" office:value-type="float" office:value="0.001676029" calcext:value-type="float">
            <text:p>0.0017</text:p>
          </table:table-cell>
          <table:table-cell table:style-name="ce39" office:value-type="float" office:value="0.001668527" calcext:value-type="float">
            <text:p>0.0017</text:p>
          </table:table-cell>
          <table:table-cell table:style-name="ce39" office:value-type="float" office:value="0.001662831" calcext:value-type="float">
            <text:p>0.0017</text:p>
          </table:table-cell>
          <table:table-cell table:style-name="ce39" office:value-type="float" office:value="0.001657143" calcext:value-type="float">
            <text:p>0.0017</text:p>
          </table:table-cell>
          <table:table-cell table:style-name="ce39" office:value-type="float" office:value="0.00164965" calcext:value-type="float">
            <text:p>0.0016</text:p>
          </table:table-cell>
          <table:table-cell table:style-name="ce39" office:value-type="float" office:value="0.001646093" calcext:value-type="float">
            <text:p>0.0016</text:p>
          </table:table-cell>
          <table:table-cell table:style-name="ce39" office:value-type="float" office:value="0.001638629" calcext:value-type="float">
            <text:p>0.0016</text:p>
          </table:table-cell>
          <table:table-cell table:style-name="ce39" office:value-type="float" office:value="0.001632972" calcext:value-type="float">
            <text:p>0.0016</text:p>
          </table:table-cell>
          <table:table-cell table:style-name="ce39" office:value-type="float" office:value="0.001629437" calcext:value-type="float">
            <text:p>0.0016</text:p>
          </table:table-cell>
          <table:table-cell table:style-name="ce39" office:value-type="float" office:value="0.001621997" calcext:value-type="float">
            <text:p>0.0016</text:p>
          </table:table-cell>
          <table:table-cell table:style-name="ce39" office:value-type="float" office:value="0.001616362" calcext:value-type="float">
            <text:p>0.0016</text:p>
          </table:table-cell>
          <table:table-cell table:style-name="ce39" office:value-type="float" office:value="0.001608937" calcext:value-type="float">
            <text:p>0.0016</text:p>
          </table:table-cell>
          <table:table-cell table:style-name="ce39" office:value-type="float" office:value="0.001603635" calcext:value-type="float">
            <text:p>0.0016</text:p>
          </table:table-cell>
          <table:table-cell table:style-name="ce39" office:value-type="float" office:value="0.001598023" calcext:value-type="float">
            <text:p>0.0016</text:p>
          </table:table-cell>
          <table:table-cell table:style-name="ce39" office:value-type="float" office:value="0.001594534" calcext:value-type="float">
            <text:p>0.0016</text:p>
          </table:table-cell>
          <table:table-cell table:style-name="ce39" office:value-type="float" office:value="0.001589255" calcext:value-type="float">
            <text:p>0.0016</text:p>
          </table:table-cell>
          <table:table-cell table:style-name="ce39" office:value-type="float" office:value="0.001583666" calcext:value-type="float">
            <text:p>0.0016</text:p>
          </table:table-cell>
          <table:table-cell table:style-name="ce39" office:value-type="float" office:value="0.001578084" calcext:value-type="float">
            <text:p>0.0016</text:p>
          </table:table-cell>
          <table:table-cell table:style-name="ce39" office:value-type="float" office:value="0.001572828" calcext:value-type="float">
            <text:p>0.0016</text:p>
          </table:table-cell>
          <table:table-cell table:number-columns-repeated="16262"/>
        </table:table-row>
        <table:table-row table:style-name="ro1">
          <table:table-cell table:style-name="Default" office:value-type="string" calcext:value-type="string">
            <text:p>W[forestry,u], total warming in warming year, by convolution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" calcext:value-type="float">
            <text:p>0.00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00096959623079526" calcext:value-type="float">
            <text:p>0.00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00269810972803853" calcext:value-type="float">
            <text:p>0.00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00506292451804999" calcext:value-type="float">
            <text:p>0.00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00792616878530657" calcext:value-type="float">
            <text:p>0.00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0112040182640165" calcext:value-type="float">
            <text:p>0.00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0148439950359201" calcext:value-type="float">
            <text:p>0.00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0188076250656187" calcext:value-type="float">
            <text:p>0.00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0230617671525568" calcext:value-type="float">
            <text:p>0.00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0275822640810375" calcext:value-type="float">
            <text:p>0.00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0323432174184409" calcext:value-type="float">
            <text:p>0.00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037322970323244" calcext:value-type="float">
            <text:p>0.00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0425042620213788" calcext:value-type="float">
            <text:p>0.00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0478673355519163" calcext:value-type="float">
            <text:p>0.00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0533965615734891" calcext:value-type="float">
            <text:p>0.01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0590787703272021" calcext:value-type="float">
            <text:p>0.01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0649012886217713" calcext:value-type="float">
            <text:p>0.01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0708465184582565" calcext:value-type="float">
            <text:p>0.01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0769019902710337" calcext:value-type="float">
            <text:p>0.01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0830597146688278" calcext:value-type="float">
            <text:p>0.01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0893075992511583" calcext:value-type="float">
            <text:p>0.01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0956323168288048" calcext:value-type="float">
            <text:p>0.01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102026619448105" calcext:value-type="float">
            <text:p>0.01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108482047042145" calcext:value-type="float">
            <text:p>0.01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114987983759946" calcext:value-type="float">
            <text:p>0.01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121536518817857" calcext:value-type="float">
            <text:p>0.01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12811967666139" calcext:value-type="float">
            <text:p>0.01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134730142430029" calcext:value-type="float">
            <text:p>0.01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141360956889497" calcext:value-type="float">
            <text:p>0.01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148008042770228" calcext:value-type="float">
            <text:p>0.01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154665365017071" calcext:value-type="float">
            <text:p>0.02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161326858328887" calcext:value-type="float">
            <text:p>0.02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167987082699265" calcext:value-type="float">
            <text:p>0.02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174637966061758" calcext:value-type="float">
            <text:p>0.02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181284339803195" calcext:value-type="float">
            <text:p>0.02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187918069274071" calcext:value-type="float">
            <text:p>0.02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194534410997219" calcext:value-type="float">
            <text:p>0.02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201129186677261" calcext:value-type="float">
            <text:p>0.02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207695823087759" calcext:value-type="float">
            <text:p>0.02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214235419659607" calcext:value-type="float">
            <text:p>0.02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220740525771365" calcext:value-type="float">
            <text:p>0.02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227205925653477" calcext:value-type="float">
            <text:p>0.02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2336246311567" calcext:value-type="float">
            <text:p>0.02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240000738124091" calcext:value-type="float">
            <text:p>0.02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246329130389708" calcext:value-type="float">
            <text:p>0.02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252607269069346" calcext:value-type="float">
            <text:p>0.03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258839864587413" calcext:value-type="float">
            <text:p>0.03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265017435025928" calcext:value-type="float">
            <text:p>0.03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271144899065772" calcext:value-type="float">
            <text:p>0.03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277220994414871" calcext:value-type="float">
            <text:p>0.03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283239323869639" calcext:value-type="float">
            <text:p>0.03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289203680165575" calcext:value-type="float">
            <text:p>0.03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295103170219427" calcext:value-type="float">
            <text:p>0.03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300945142395538" calcext:value-type="float">
            <text:p>0.03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306726053079491" calcext:value-type="float">
            <text:p>0.03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312449428741766" calcext:value-type="float">
            <text:p>0.03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318116769268236" calcext:value-type="float">
            <text:p>0.03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323725677646014" calcext:value-type="float">
            <text:p>0.03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329273118262002" calcext:value-type="float">
            <text:p>0.03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334759474984722" calcext:value-type="float">
            <text:p>0.03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340186144158502" calcext:value-type="float">
            <text:p>0.03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34555012610762" calcext:value-type="float">
            <text:p>0.03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35085370371792" calcext:value-type="float">
            <text:p>0.04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356094610060194" calcext:value-type="float">
            <text:p>0.04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361274092352777" calcext:value-type="float">
            <text:p>0.04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366392085287079" calcext:value-type="float">
            <text:p>0.04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3714493416727" calcext:value-type="float">
            <text:p>0.04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376447659732643" calcext:value-type="float">
            <text:p>0.04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381385295101197" calcext:value-type="float">
            <text:p>0.04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386264431854195" calcext:value-type="float">
            <text:p>0.04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391085374209315" calcext:value-type="float">
            <text:p>0.04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395844005092043" calcext:value-type="float">
            <text:p>0.04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40054478973402" calcext:value-type="float">
            <text:p>0.04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405185711640736" calcext:value-type="float">
            <text:p>0.04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409771542820869" calcext:value-type="float">
            <text:p>0.04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414295622773669" calcext:value-type="float">
            <text:p>0.04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418760409997132" calcext:value-type="float">
            <text:p>0.04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423170831958958" calcext:value-type="float">
            <text:p>0.04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427522957825349" calcext:value-type="float">
            <text:p>0.04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431819540987951" calcext:value-type="float">
            <text:p>0.04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436060272071432" calcext:value-type="float">
            <text:p>0.04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440246127997223" calcext:value-type="float">
            <text:p>0.04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444378310684291" calcext:value-type="float">
            <text:p>0.04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448453675332621" calcext:value-type="float">
            <text:p>0.04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452477289568897" calcext:value-type="float">
            <text:p>0.05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456446346273401" calcext:value-type="float">
            <text:p>0.05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460362113918478" calcext:value-type="float">
            <text:p>0.05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464225291608666" calcext:value-type="float">
            <text:p>0.05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46803815994572" calcext:value-type="float">
            <text:p>0.05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471800047628781" calcext:value-type="float">
            <text:p>0.05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475510016447857" calcext:value-type="float">
            <text:p>0.05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479170950975061" calcext:value-type="float">
            <text:p>0.05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482783187750935" calcext:value-type="float">
            <text:p>0.05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486342613097686" calcext:value-type="float">
            <text:p>0.05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4898532524124" calcext:value-type="float">
            <text:p>0.05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493310903051632" calcext:value-type="float">
            <text:p>0.05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496721429797789" calcext:value-type="float">
            <text:p>0.05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500078899182042" calcext:value-type="float">
            <text:p>0.05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503388427386734" calcext:value-type="float">
            <text:p>0.05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506650769383967" calcext:value-type="float">
            <text:p>0.05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509869137699" calcext:value-type="float">
            <text:p>0.05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513041924896657" calcext:value-type="float">
            <text:p>0.05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516167528468151" calcext:value-type="float">
            <text:p>0.05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51924844715725" calcext:value-type="float">
            <text:p>0.05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522285231103606" calcext:value-type="float">
            <text:p>0.05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525276257377123" calcext:value-type="float">
            <text:p>0.05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528226567628238" calcext:value-type="float">
            <text:p>0.05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531132256092388" calcext:value-type="float">
            <text:p>0.05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533995807818275" calcext:value-type="float">
            <text:p>0.05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536820286048813" calcext:value-type="float">
            <text:p>0.05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539601770389593" calcext:value-type="float">
            <text:p>0.05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542342726632723" calcext:value-type="float">
            <text:p>0.05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545041521717015" calcext:value-type="float">
            <text:p>0.05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547701001717534" calcext:value-type="float">
            <text:p>0.05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55032133793748" calcext:value-type="float">
            <text:p>0.06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552905569718035" calcext:value-type="float">
            <text:p>0.06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555452281032212" calcext:value-type="float">
            <text:p>0.06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557961612709958" calcext:value-type="float">
            <text:p>0.06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560434043194055" calcext:value-type="float">
            <text:p>0.06</text:p>
          </table:table-cell>
          <table:table-cell table:style-name="ce36" table:formula="of:=SUMPRODUCT([.$B$30]:INDEX([.$B$30:.$DQ$30]; 1; MIN(COLUMN()-COLUMN([.$B$34])+1; 120)); N(OFFSET([.$B$33]; 0; (COLUMN()-COLUMN([.$B$34]))-(COLUMN([.$B$30]:INDEX([.$B$30:.$DQ$30]; 1; MIN(COLUMN()-COLUMN([.$B$34])+1; 120)))-COLUMN([.$B$30])))))" office:value-type="float" office:value="0.0562870427318681" calcext:value-type="float">
            <text:p>0.06</text:p>
          </table:table-cell>
          <table:table-cell table:number-columns-repeated="16262"/>
        </table:table-row>
        <table:table-row table:style-name="ro1">
          <table:table-cell table:style-name="Default" office:value-type="string" calcext:value-type="string">
            <text:p>Bid for contract starting at 1 and Y years long</text:p>
          </table:table-cell>
          <table:table-cell table:style-name="ce46" table:formula="of:=[.$B$12]*([.$B$13]*[.$B$14]+[.$B$15]*(1-[.$B$14])) + [.$B$17]*(1-(1+[.$B$18])^(-[.B$29]))/[.$B$18]-[.$B$22]*(1-EXP(-[.$B$23]*[.B$29]))^2/(1+[.$B$18])^[.B$29]  - IF([.B29]=[.$B$19];1;0)*[.$B$21]*[.$B$22]*(1-EXP(-[.$B$23]*[.$B$19]))^2/(1+[.$B$18])^[.$B$19]" office:value-type="currency" office:currency="USD" office:value="984.883022734475" calcext:value-type="currency">
            <text:p>$985</text:p>
          </table:table-cell>
          <table:table-cell table:style-name="ce46" table:formula="of:=[.$B$12]*([.$B$13]*[.$B$14]+[.$B$15]*(1-[.$B$14])) + [.$B$17]*(1-(1+[.$B$18])^(-[.C$29]))/[.$B$18]-[.$B$22]*(1-EXP(-[.$B$23]*[.C$29]))^2/(1+[.$B$18])^[.C$29]  - IF([.C29]=[.$B$19];1;0)*[.$B$21]*[.$B$22]*(1-EXP(-[.$B$23]*[.$B$19]))^2/(1+[.$B$18])^[.$B$19]" office:value-type="currency" office:currency="USD" office:value="993.678075723798" calcext:value-type="currency">
            <text:p>$994</text:p>
          </table:table-cell>
          <table:table-cell table:style-name="ce46" table:formula="of:=[.$B$12]*([.$B$13]*[.$B$14]+[.$B$15]*(1-[.$B$14])) + [.$B$17]*(1-(1+[.$B$18])^(-[.D$29]))/[.$B$18]-[.$B$22]*(1-EXP(-[.$B$23]*[.D$29]))^2/(1+[.$B$18])^[.D$29]  - IF([.D29]=[.$B$19];1;0)*[.$B$21]*[.$B$22]*(1-EXP(-[.$B$23]*[.$B$19]))^2/(1+[.$B$18])^[.$B$19]" office:value-type="currency" office:currency="USD" office:value="1002.20916692296" calcext:value-type="currency">
            <text:p>$1,002</text:p>
          </table:table-cell>
          <table:table-cell table:style-name="ce46" table:formula="of:=[.$B$12]*([.$B$13]*[.$B$14]+[.$B$15]*(1-[.$B$14])) + [.$B$17]*(1-(1+[.$B$18])^(-[.E$29]))/[.$B$18]-[.$B$22]*(1-EXP(-[.$B$23]*[.E$29]))^2/(1+[.$B$18])^[.E$29]  - IF([.E29]=[.$B$19];1;0)*[.$B$21]*[.$B$22]*(1-EXP(-[.$B$23]*[.$B$19]))^2/(1+[.$B$18])^[.$B$19]" office:value-type="currency" office:currency="USD" office:value="1010.48485874099" calcext:value-type="currency">
            <text:p>$1,010</text:p>
          </table:table-cell>
          <table:table-cell table:style-name="ce46" table:formula="of:=[.$B$12]*([.$B$13]*[.$B$14]+[.$B$15]*(1-[.$B$14])) + [.$B$17]*(1-(1+[.$B$18])^(-[.F$29]))/[.$B$18]-[.$B$22]*(1-EXP(-[.$B$23]*[.F$29]))^2/(1+[.$B$18])^[.F$29]  - IF([.F29]=[.$B$19];1;0)*[.$B$21]*[.$B$22]*(1-EXP(-[.$B$23]*[.$B$19]))^2/(1+[.$B$18])^[.$B$19]" office:value-type="currency" office:currency="USD" office:value="1018.51339233086" calcext:value-type="currency">
            <text:p>$1,019</text:p>
          </table:table-cell>
          <table:table-cell table:style-name="ce46" table:formula="of:=[.$B$12]*([.$B$13]*[.$B$14]+[.$B$15]*(1-[.$B$14])) + [.$B$17]*(1-(1+[.$B$18])^(-[.G$29]))/[.$B$18]-[.$B$22]*(1-EXP(-[.$B$23]*[.G$29]))^2/(1+[.$B$18])^[.G$29]  - IF([.G29]=[.$B$19];1;0)*[.$B$21]*[.$B$22]*(1-EXP(-[.$B$23]*[.$B$19]))^2/(1+[.$B$18])^[.$B$19]" office:value-type="currency" office:currency="USD" office:value="1026.30270219798" calcext:value-type="currency">
            <text:p>$1,026</text:p>
          </table:table-cell>
          <table:table-cell table:style-name="ce46" table:formula="of:=[.$B$12]*([.$B$13]*[.$B$14]+[.$B$15]*(1-[.$B$14])) + [.$B$17]*(1-(1+[.$B$18])^(-[.H$29]))/[.$B$18]-[.$B$22]*(1-EXP(-[.$B$23]*[.H$29]))^2/(1+[.$B$18])^[.H$29]  - IF([.H29]=[.$B$19];1;0)*[.$B$21]*[.$B$22]*(1-EXP(-[.$B$23]*[.$B$19]))^2/(1+[.$B$18])^[.$B$19]" office:value-type="currency" office:currency="USD" office:value="1033.86043002199" calcext:value-type="currency">
            <text:p>$1,034</text:p>
          </table:table-cell>
          <table:table-cell table:style-name="ce46" table:formula="of:=[.$B$12]*([.$B$13]*[.$B$14]+[.$B$15]*(1-[.$B$14])) + [.$B$17]*(1-(1+[.$B$18])^(-[.I$29]))/[.$B$18]-[.$B$22]*(1-EXP(-[.$B$23]*[.I$29]))^2/(1+[.$B$18])^[.I$29]  - IF([.I29]=[.$B$19];1;0)*[.$B$21]*[.$B$22]*(1-EXP(-[.$B$23]*[.$B$19]))^2/(1+[.$B$18])^[.$B$19]" office:value-type="currency" office:currency="USD" office:value="1041.19393773853" calcext:value-type="currency">
            <text:p>$1,041</text:p>
          </table:table-cell>
          <table:table-cell table:style-name="ce46" table:formula="of:=[.$B$12]*([.$B$13]*[.$B$14]+[.$B$15]*(1-[.$B$14])) + [.$B$17]*(1-(1+[.$B$18])^(-[.J$29]))/[.$B$18]-[.$B$22]*(1-EXP(-[.$B$23]*[.J$29]))^2/(1+[.$B$18])^[.J$29]  - IF([.J29]=[.$B$19];1;0)*[.$B$21]*[.$B$22]*(1-EXP(-[.$B$23]*[.$B$19]))^2/(1+[.$B$18])^[.$B$19]" office:value-type="currency" office:currency="USD" office:value="1048.31031992523" calcext:value-type="currency">
            <text:p>$1,048</text:p>
          </table:table-cell>
          <table:table-cell table:style-name="ce46" table:formula="of:=[.$B$12]*([.$B$13]*[.$B$14]+[.$B$15]*(1-[.$B$14])) + [.$B$17]*(1-(1+[.$B$18])^(-[.K$29]))/[.$B$18]-[.$B$22]*(1-EXP(-[.$B$23]*[.K$29]))^2/(1+[.$B$18])^[.K$29]  - IF([.K29]=[.$B$19];1;0)*[.$B$21]*[.$B$22]*(1-EXP(-[.$B$23]*[.$B$19]))^2/(1+[.$B$18])^[.$B$19]" office:value-type="currency" office:currency="USD" office:value="1055.216415533" calcext:value-type="currency">
            <text:p>$1,055</text:p>
          </table:table-cell>
          <table:table-cell table:style-name="ce46" table:formula="of:=[.$B$12]*([.$B$13]*[.$B$14]+[.$B$15]*(1-[.$B$14])) + [.$B$17]*(1-(1+[.$B$18])^(-[.L$29]))/[.$B$18]-[.$B$22]*(1-EXP(-[.$B$23]*[.L$29]))^2/(1+[.$B$18])^[.L$29]  - IF([.L29]=[.$B$19];1;0)*[.$B$21]*[.$B$22]*(1-EXP(-[.$B$23]*[.$B$19]))^2/(1+[.$B$18])^[.$B$19]" office:value-type="currency" office:currency="USD" office:value="1061.91881900133" calcext:value-type="currency">
            <text:p>$1,062</text:p>
          </table:table-cell>
          <table:table-cell table:style-name="ce46" table:formula="of:=[.$B$12]*([.$B$13]*[.$B$14]+[.$B$15]*(1-[.$B$14])) + [.$B$17]*(1-(1+[.$B$18])^(-[.M$29]))/[.$B$18]-[.$B$22]*(1-EXP(-[.$B$23]*[.M$29]))^2/(1+[.$B$18])^[.M$29]  - IF([.M29]=[.$B$19];1;0)*[.$B$21]*[.$B$22]*(1-EXP(-[.$B$23]*[.$B$19]))^2/(1+[.$B$18])^[.$B$19]" office:value-type="currency" office:currency="USD" office:value="1068.4238907939" calcext:value-type="currency">
            <text:p>$1,068</text:p>
          </table:table-cell>
          <table:table-cell table:style-name="ce46" table:formula="of:=[.$B$12]*([.$B$13]*[.$B$14]+[.$B$15]*(1-[.$B$14])) + [.$B$17]*(1-(1+[.$B$18])^(-[.N$29]))/[.$B$18]-[.$B$22]*(1-EXP(-[.$B$23]*[.N$29]))^2/(1+[.$B$18])^[.N$29]  - IF([.N29]=[.$B$19];1;0)*[.$B$21]*[.$B$22]*(1-EXP(-[.$B$23]*[.$B$19]))^2/(1+[.$B$18])^[.$B$19]" office:value-type="currency" office:currency="USD" office:value="1074.73776738854" calcext:value-type="currency">
            <text:p>$1,075</text:p>
          </table:table-cell>
          <table:table-cell table:style-name="ce46" table:formula="of:=[.$B$12]*([.$B$13]*[.$B$14]+[.$B$15]*(1-[.$B$14])) + [.$B$17]*(1-(1+[.$B$18])^(-[.O$29]))/[.$B$18]-[.$B$22]*(1-EXP(-[.$B$23]*[.O$29]))^2/(1+[.$B$18])^[.O$29]  - IF([.O29]=[.$B$19];1;0)*[.$B$21]*[.$B$22]*(1-EXP(-[.$B$23]*[.$B$19]))^2/(1+[.$B$18])^[.$B$19]" office:value-type="currency" office:currency="USD" office:value="1080.86637075339" calcext:value-type="currency">
            <text:p>$1,081</text:p>
          </table:table-cell>
          <table:table-cell table:style-name="ce46" table:formula="of:=[.$B$12]*([.$B$13]*[.$B$14]+[.$B$15]*(1-[.$B$14])) + [.$B$17]*(1-(1+[.$B$18])^(-[.P$29]))/[.$B$18]-[.$B$22]*(1-EXP(-[.$B$23]*[.P$29]))^2/(1+[.$B$18])^[.P$29]  - IF([.P29]=[.$B$19];1;0)*[.$B$21]*[.$B$22]*(1-EXP(-[.$B$23]*[.$B$19]))^2/(1+[.$B$18])^[.$B$19]" office:value-type="currency" office:currency="USD" office:value="1086.81541733927" calcext:value-type="currency">
            <text:p>$1,087</text:p>
          </table:table-cell>
          <table:table-cell table:style-name="ce46" table:formula="of:=[.$B$12]*([.$B$13]*[.$B$14]+[.$B$15]*(1-[.$B$14])) + [.$B$17]*(1-(1+[.$B$18])^(-[.Q$29]))/[.$B$18]-[.$B$22]*(1-EXP(-[.$B$23]*[.Q$29]))^2/(1+[.$B$18])^[.Q$29]  - IF([.Q29]=[.$B$19];1;0)*[.$B$21]*[.$B$22]*(1-EXP(-[.$B$23]*[.$B$19]))^2/(1+[.$B$18])^[.$B$19]" office:value-type="currency" office:currency="USD" office:value="1092.59042661627" calcext:value-type="currency">
            <text:p>$1,093</text:p>
          </table:table-cell>
          <table:table-cell table:style-name="ce46" table:formula="of:=[.$B$12]*([.$B$13]*[.$B$14]+[.$B$15]*(1-[.$B$14])) + [.$B$17]*(1-(1+[.$B$18])^(-[.R$29]))/[.$B$18]-[.$B$22]*(1-EXP(-[.$B$23]*[.R$29]))^2/(1+[.$B$18])^[.R$29]  - IF([.R29]=[.$B$19];1;0)*[.$B$21]*[.$B$22]*(1-EXP(-[.$B$23]*[.$B$19]))^2/(1+[.$B$18])^[.$B$19]" office:value-type="currency" office:currency="USD" office:value="1098.19672918101" calcext:value-type="currency">
            <text:p>$1,098</text:p>
          </table:table-cell>
          <table:table-cell table:style-name="ce46" table:formula="of:=[.$B$12]*([.$B$13]*[.$B$14]+[.$B$15]*(1-[.$B$14])) + [.$B$17]*(1-(1+[.$B$18])^(-[.S$29]))/[.$B$18]-[.$B$22]*(1-EXP(-[.$B$23]*[.S$29]))^2/(1+[.$B$18])^[.S$29]  - IF([.S29]=[.$B$19];1;0)*[.$B$21]*[.$B$22]*(1-EXP(-[.$B$23]*[.$B$19]))^2/(1+[.$B$18])^[.$B$19]" office:value-type="currency" office:currency="USD" office:value="1103.63947445915" calcext:value-type="currency">
            <text:p>$1,104</text:p>
          </table:table-cell>
          <table:table-cell table:style-name="ce46" table:formula="of:=[.$B$12]*([.$B$13]*[.$B$14]+[.$B$15]*(1-[.$B$14])) + [.$B$17]*(1-(1+[.$B$18])^(-[.T$29]))/[.$B$18]-[.$B$22]*(1-EXP(-[.$B$23]*[.T$29]))^2/(1+[.$B$18])^[.T$29]  - IF([.T29]=[.$B$19];1;0)*[.$B$21]*[.$B$22]*(1-EXP(-[.$B$23]*[.$B$19]))^2/(1+[.$B$18])^[.$B$19]" office:value-type="currency" office:currency="USD" office:value="1108.92363802652" calcext:value-type="currency">
            <text:p>$1,109</text:p>
          </table:table-cell>
          <table:table-cell table:style-name="ce46" table:formula="of:=[.$B$12]*([.$B$13]*[.$B$14]+[.$B$15]*(1-[.$B$14])) + [.$B$17]*(1-(1+[.$B$18])^(-[.U$29]))/[.$B$18]-[.$B$22]*(1-EXP(-[.$B$23]*[.U$29]))^2/(1+[.$B$18])^[.U$29]  - IF([.U29]=[.$B$19];1;0)*[.$B$21]*[.$B$22]*(1-EXP(-[.$B$23]*[.$B$19]))^2/(1+[.$B$18])^[.$B$19]" office:value-type="currency" office:currency="USD" office:value="1114.05402857054" calcext:value-type="currency">
            <text:p>$1,114</text:p>
          </table:table-cell>
          <table:table-cell table:style-name="ce46" table:formula="of:=[.$B$12]*([.$B$13]*[.$B$14]+[.$B$15]*(1-[.$B$14])) + [.$B$17]*(1-(1+[.$B$18])^(-[.V$29]))/[.$B$18]-[.$B$22]*(1-EXP(-[.$B$23]*[.V$29]))^2/(1+[.$B$18])^[.V$29]  - IF([.V29]=[.$B$19];1;0)*[.$B$21]*[.$B$22]*(1-EXP(-[.$B$23]*[.$B$19]))^2/(1+[.$B$18])^[.$B$19]" office:value-type="currency" office:currency="USD" office:value="1119.03529451236" calcext:value-type="currency">
            <text:p>$1,119</text:p>
          </table:table-cell>
          <table:table-cell table:style-name="ce46" table:formula="of:=[.$B$12]*([.$B$13]*[.$B$14]+[.$B$15]*(1-[.$B$14])) + [.$B$17]*(1-(1+[.$B$18])^(-[.W$29]))/[.$B$18]-[.$B$22]*(1-EXP(-[.$B$23]*[.W$29]))^2/(1+[.$B$18])^[.W$29]  - IF([.W29]=[.$B$19];1;0)*[.$B$21]*[.$B$22]*(1-EXP(-[.$B$23]*[.$B$19]))^2/(1+[.$B$18])^[.$B$19]" office:value-type="currency" office:currency="USD" office:value="1123.87193030897" calcext:value-type="currency">
            <text:p>$1,124</text:p>
          </table:table-cell>
          <table:table-cell table:style-name="ce46" table:formula="of:=[.$B$12]*([.$B$13]*[.$B$14]+[.$B$15]*(1-[.$B$14])) + [.$B$17]*(1-(1+[.$B$18])^(-[.X$29]))/[.$B$18]-[.$B$22]*(1-EXP(-[.$B$23]*[.X$29]))^2/(1+[.$B$18])^[.X$29]  - IF([.X29]=[.$B$19];1;0)*[.$B$21]*[.$B$22]*(1-EXP(-[.$B$23]*[.$B$19]))^2/(1+[.$B$18])^[.$B$19]" office:value-type="currency" office:currency="USD" office:value="1128.56828245324" calcext:value-type="currency">
            <text:p>$1,129</text:p>
          </table:table-cell>
          <table:table-cell table:style-name="ce46" table:formula="of:=[.$B$12]*([.$B$13]*[.$B$14]+[.$B$15]*(1-[.$B$14])) + [.$B$17]*(1-(1+[.$B$18])^(-[.Y$29]))/[.$B$18]-[.$B$22]*(1-EXP(-[.$B$23]*[.Y$29]))^2/(1+[.$B$18])^[.Y$29]  - IF([.Y29]=[.$B$19];1;0)*[.$B$21]*[.$B$22]*(1-EXP(-[.$B$23]*[.$B$19]))^2/(1+[.$B$18])^[.$B$19]" office:value-type="currency" office:currency="USD" office:value="1133.12855518889" calcext:value-type="currency">
            <text:p>$1,133</text:p>
          </table:table-cell>
          <table:table-cell table:style-name="ce46" table:formula="of:=[.$B$12]*([.$B$13]*[.$B$14]+[.$B$15]*(1-[.$B$14])) + [.$B$17]*(1-(1+[.$B$18])^(-[.Z$29]))/[.$B$18]-[.$B$22]*(1-EXP(-[.$B$23]*[.Z$29]))^2/(1+[.$B$18])^[.Z$29]  - IF([.Z29]=[.$B$19];1;0)*[.$B$21]*[.$B$22]*(1-EXP(-[.$B$23]*[.$B$19]))^2/(1+[.$B$18])^[.$B$19]" office:value-type="currency" office:currency="USD" office:value="1137.55681595611" calcext:value-type="currency">
            <text:p>$1,138</text:p>
          </table:table-cell>
          <table:table-cell table:style-name="ce46" table:formula="of:=[.$B$12]*([.$B$13]*[.$B$14]+[.$B$15]*(1-[.$B$14])) + [.$B$17]*(1-(1+[.$B$18])^(-[.AA$29]))/[.$B$18]-[.$B$22]*(1-EXP(-[.$B$23]*[.AA$29]))^2/(1+[.$B$18])^[.AA$29]  - IF([.AA29]=[.$B$19];1;0)*[.$B$21]*[.$B$22]*(1-EXP(-[.$B$23]*[.$B$19]))^2/(1+[.$B$18])^[.$B$19]" office:value-type="currency" office:currency="USD" office:value="1141.85700058295" calcext:value-type="currency">
            <text:p>$1,142</text:p>
          </table:table-cell>
          <table:table-cell table:style-name="ce46" table:formula="of:=[.$B$12]*([.$B$13]*[.$B$14]+[.$B$15]*(1-[.$B$14])) + [.$B$17]*(1-(1+[.$B$18])^(-[.AB$29]))/[.$B$18]-[.$B$22]*(1-EXP(-[.$B$23]*[.AB$29]))^2/(1+[.$B$18])^[.AB$29]  - IF([.AB29]=[.$B$19];1;0)*[.$B$21]*[.$B$22]*(1-EXP(-[.$B$23]*[.$B$19]))^2/(1+[.$B$18])^[.$B$19]" office:value-type="currency" office:currency="USD" office:value="1146.03291823631" calcext:value-type="currency">
            <text:p>$1,146</text:p>
          </table:table-cell>
          <table:table-cell table:style-name="ce46" table:formula="of:=[.$B$12]*([.$B$13]*[.$B$14]+[.$B$15]*(1-[.$B$14])) + [.$B$17]*(1-(1+[.$B$18])^(-[.AC$29]))/[.$B$18]-[.$B$22]*(1-EXP(-[.$B$23]*[.AC$29]))^2/(1+[.$B$18])^[.AC$29]  - IF([.AC29]=[.$B$19];1;0)*[.$B$21]*[.$B$22]*(1-EXP(-[.$B$23]*[.$B$19]))^2/(1+[.$B$18])^[.$B$19]" office:value-type="currency" office:currency="USD" office:value="1150.08825614584" calcext:value-type="currency">
            <text:p>$1,150</text:p>
          </table:table-cell>
          <table:table-cell table:style-name="ce46" table:formula="of:=[.$B$12]*([.$B$13]*[.$B$14]+[.$B$15]*(1-[.$B$14])) + [.$B$17]*(1-(1+[.$B$18])^(-[.AD$29]))/[.$B$18]-[.$B$22]*(1-EXP(-[.$B$23]*[.AD$29]))^2/(1+[.$B$18])^[.AD$29]  - IF([.AD29]=[.$B$19];1;0)*[.$B$21]*[.$B$22]*(1-EXP(-[.$B$23]*[.$B$19]))^2/(1+[.$B$18])^[.$B$19]" office:value-type="currency" office:currency="USD" office:value="1154.02658411301" calcext:value-type="currency">
            <text:p>$1,154</text:p>
          </table:table-cell>
          <table:table-cell table:style-name="ce46" table:formula="of:=[.$B$12]*([.$B$13]*[.$B$14]+[.$B$15]*(1-[.$B$14])) + [.$B$17]*(1-(1+[.$B$18])^(-[.AE$29]))/[.$B$18]-[.$B$22]*(1-EXP(-[.$B$23]*[.AE$29]))^2/(1+[.$B$18])^[.AE$29]  - IF([.AE29]=[.$B$19];1;0)*[.$B$21]*[.$B$22]*(1-EXP(-[.$B$23]*[.$B$19]))^2/(1+[.$B$18])^[.$B$19]" office:value-type="currency" office:currency="USD" office:value="1157.85135881709" calcext:value-type="currency">
            <text:p>$1,158</text:p>
          </table:table-cell>
          <table:table-cell table:style-name="ce46" table:formula="of:=[.$B$12]*([.$B$13]*[.$B$14]+[.$B$15]*(1-[.$B$14])) + [.$B$17]*(1-(1+[.$B$18])^(-[.AF$29]))/[.$B$18]-[.$B$22]*(1-EXP(-[.$B$23]*[.AF$29]))^2/(1+[.$B$18])^[.AF$29]  - IF([.AF29]=[.$B$19];1;0)*[.$B$21]*[.$B$22]*(1-EXP(-[.$B$23]*[.$B$19]))^2/(1+[.$B$18])^[.$B$19]" office:value-type="currency" office:currency="USD" office:value="1161.56592792887" calcext:value-type="currency">
            <text:p>$1,162</text:p>
          </table:table-cell>
          <table:table-cell table:style-name="ce46" table:formula="of:=[.$B$12]*([.$B$13]*[.$B$14]+[.$B$15]*(1-[.$B$14])) + [.$B$17]*(1-(1+[.$B$18])^(-[.AG$29]))/[.$B$18]-[.$B$22]*(1-EXP(-[.$B$23]*[.AG$29]))^2/(1+[.$B$18])^[.AG$29]  - IF([.AG29]=[.$B$19];1;0)*[.$B$21]*[.$B$22]*(1-EXP(-[.$B$23]*[.$B$19]))^2/(1+[.$B$18])^[.$B$19]" office:value-type="currency" office:currency="USD" office:value="1165.17353404238" calcext:value-type="currency">
            <text:p>$1,165</text:p>
          </table:table-cell>
          <table:table-cell table:style-name="ce46" table:formula="of:=[.$B$12]*([.$B$13]*[.$B$14]+[.$B$15]*(1-[.$B$14])) + [.$B$17]*(1-(1+[.$B$18])^(-[.AH$29]))/[.$B$18]-[.$B$22]*(1-EXP(-[.$B$23]*[.AH$29]))^2/(1+[.$B$18])^[.AH$29]  - IF([.AH29]=[.$B$19];1;0)*[.$B$21]*[.$B$22]*(1-EXP(-[.$B$23]*[.$B$19]))^2/(1+[.$B$18])^[.$B$19]" office:value-type="currency" office:currency="USD" office:value="1168.67731843448" calcext:value-type="currency">
            <text:p>$1,169</text:p>
          </table:table-cell>
          <table:table-cell table:style-name="ce46" table:formula="of:=[.$B$12]*([.$B$13]*[.$B$14]+[.$B$15]*(1-[.$B$14])) + [.$B$17]*(1-(1+[.$B$18])^(-[.AI$29]))/[.$B$18]-[.$B$22]*(1-EXP(-[.$B$23]*[.AI$29]))^2/(1+[.$B$18])^[.AI$29]  - IF([.AI29]=[.$B$19];1;0)*[.$B$21]*[.$B$22]*(1-EXP(-[.$B$23]*[.$B$19]))^2/(1+[.$B$18])^[.$B$19]" office:value-type="currency" office:currency="USD" office:value="1172.08032466104" calcext:value-type="currency">
            <text:p>$1,172</text:p>
          </table:table-cell>
          <table:table-cell table:style-name="ce46" table:formula="of:=[.$B$12]*([.$B$13]*[.$B$14]+[.$B$15]*(1-[.$B$14])) + [.$B$17]*(1-(1+[.$B$18])^(-[.AJ$29]))/[.$B$18]-[.$B$22]*(1-EXP(-[.$B$23]*[.AJ$29]))^2/(1+[.$B$18])^[.AJ$29]  - IF([.AJ29]=[.$B$19];1;0)*[.$B$21]*[.$B$22]*(1-EXP(-[.$B$23]*[.$B$19]))^2/(1+[.$B$18])^[.$B$19]" office:value-type="currency" office:currency="USD" office:value="1175.38550199867" calcext:value-type="currency">
            <text:p>$1,175</text:p>
          </table:table-cell>
          <table:table-cell table:style-name="ce46" table:formula="of:=[.$B$12]*([.$B$13]*[.$B$14]+[.$B$15]*(1-[.$B$14])) + [.$B$17]*(1-(1+[.$B$18])^(-[.AK$29]))/[.$B$18]-[.$B$22]*(1-EXP(-[.$B$23]*[.AK$29]))^2/(1+[.$B$18])^[.AK$29]  - IF([.AK29]=[.$B$19];1;0)*[.$B$21]*[.$B$22]*(1-EXP(-[.$B$23]*[.$B$19]))^2/(1+[.$B$18])^[.$B$19]" office:value-type="currency" office:currency="USD" office:value="1178.59570873972" calcext:value-type="currency">
            <text:p>$1,179</text:p>
          </table:table-cell>
          <table:table-cell table:style-name="ce46" table:formula="of:=[.$B$12]*([.$B$13]*[.$B$14]+[.$B$15]*(1-[.$B$14])) + [.$B$17]*(1-(1+[.$B$18])^(-[.AL$29]))/[.$B$18]-[.$B$22]*(1-EXP(-[.$B$23]*[.AL$29]))^2/(1+[.$B$18])^[.AL$29]  - IF([.AL29]=[.$B$19];1;0)*[.$B$21]*[.$B$22]*(1-EXP(-[.$B$23]*[.$B$19]))^2/(1+[.$B$18])^[.$B$19]" office:value-type="currency" office:currency="USD" office:value="1181.71371534829" calcext:value-type="currency">
            <text:p>$1,182</text:p>
          </table:table-cell>
          <table:table-cell table:style-name="ce46" table:formula="of:=[.$B$12]*([.$B$13]*[.$B$14]+[.$B$15]*(1-[.$B$14])) + [.$B$17]*(1-(1+[.$B$18])^(-[.AM$29]))/[.$B$18]-[.$B$22]*(1-EXP(-[.$B$23]*[.AM$29]))^2/(1+[.$B$18])^[.AM$29]  - IF([.AM29]=[.$B$19];1;0)*[.$B$21]*[.$B$22]*(1-EXP(-[.$B$23]*[.$B$19]))^2/(1+[.$B$18])^[.$B$19]" office:value-type="currency" office:currency="USD" office:value="1184.7422074843" calcext:value-type="currency">
            <text:p>$1,185</text:p>
          </table:table-cell>
          <table:table-cell table:style-name="ce46" table:formula="of:=[.$B$12]*([.$B$13]*[.$B$14]+[.$B$15]*(1-[.$B$14])) + [.$B$17]*(1-(1+[.$B$18])^(-[.AN$29]))/[.$B$18]-[.$B$22]*(1-EXP(-[.$B$23]*[.AN$29]))^2/(1+[.$B$18])^[.AN$29]  - IF([.AN29]=[.$B$19];1;0)*[.$B$21]*[.$B$22]*(1-EXP(-[.$B$23]*[.$B$19]))^2/(1+[.$B$18])^[.$B$19]" office:value-type="currency" office:currency="USD" office:value="1187.68378890242" calcext:value-type="currency">
            <text:p>$1,188</text:p>
          </table:table-cell>
          <table:table-cell table:style-name="ce46" table:formula="of:=[.$B$12]*([.$B$13]*[.$B$14]+[.$B$15]*(1-[.$B$14])) + [.$B$17]*(1-(1+[.$B$18])^(-[.AO$29]))/[.$B$18]-[.$B$22]*(1-EXP(-[.$B$23]*[.AO$29]))^2/(1+[.$B$18])^[.AO$29]  - IF([.AO29]=[.$B$19];1;0)*[.$B$21]*[.$B$22]*(1-EXP(-[.$B$23]*[.$B$19]))^2/(1+[.$B$18])^[.$B$19]" office:value-type="currency" office:currency="USD" office:value="1190.54098423203" calcext:value-type="currency">
            <text:p>$1,191</text:p>
          </table:table-cell>
          <table:table-cell table:style-name="ce46" table:formula="of:=[.$B$12]*([.$B$13]*[.$B$14]+[.$B$15]*(1-[.$B$14])) + [.$B$17]*(1-(1+[.$B$18])^(-[.AP$29]))/[.$B$18]-[.$B$22]*(1-EXP(-[.$B$23]*[.AP$29]))^2/(1+[.$B$18])^[.AP$29]  - IF([.AP29]=[.$B$19];1;0)*[.$B$21]*[.$B$22]*(1-EXP(-[.$B$23]*[.$B$19]))^2/(1+[.$B$18])^[.$B$19]" office:value-type="currency" office:currency="USD" office:value="1193.31624164433" calcext:value-type="currency">
            <text:p>$1,193</text:p>
          </table:table-cell>
          <table:table-cell table:style-name="ce46" table:formula="of:=[.$B$12]*([.$B$13]*[.$B$14]+[.$B$15]*(1-[.$B$14])) + [.$B$17]*(1-(1+[.$B$18])^(-[.AQ$29]))/[.$B$18]-[.$B$22]*(1-EXP(-[.$B$23]*[.AQ$29]))^2/(1+[.$B$18])^[.AQ$29]  - IF([.AQ29]=[.$B$19];1;0)*[.$B$21]*[.$B$22]*(1-EXP(-[.$B$23]*[.$B$19]))^2/(1+[.$B$18])^[.$B$19]" office:value-type="currency" office:currency="USD" office:value="1196.01193541208" calcext:value-type="currency">
            <text:p>$1,196</text:p>
          </table:table-cell>
          <table:table-cell table:style-name="ce46" table:formula="of:=[.$B$12]*([.$B$13]*[.$B$14]+[.$B$15]*(1-[.$B$14])) + [.$B$17]*(1-(1+[.$B$18])^(-[.AR$29]))/[.$B$18]-[.$B$22]*(1-EXP(-[.$B$23]*[.AR$29]))^2/(1+[.$B$18])^[.AR$29]  - IF([.AR29]=[.$B$19];1;0)*[.$B$21]*[.$B$22]*(1-EXP(-[.$B$23]*[.$B$19]))^2/(1+[.$B$18])^[.$B$19]" office:value-type="currency" office:currency="USD" office:value="1198.63036836731" calcext:value-type="currency">
            <text:p>$1,199</text:p>
          </table:table-cell>
          <table:table-cell table:style-name="ce46" table:formula="of:=[.$B$12]*([.$B$13]*[.$B$14]+[.$B$15]*(1-[.$B$14])) + [.$B$17]*(1-(1+[.$B$18])^(-[.AS$29]))/[.$B$18]-[.$B$22]*(1-EXP(-[.$B$23]*[.AS$29]))^2/(1+[.$B$18])^[.AS$29]  - IF([.AS29]=[.$B$19];1;0)*[.$B$21]*[.$B$22]*(1-EXP(-[.$B$23]*[.$B$19]))^2/(1+[.$B$18])^[.$B$19]" office:value-type="currency" office:currency="USD" office:value="1201.17377426203" calcext:value-type="currency">
            <text:p>$1,201</text:p>
          </table:table-cell>
          <table:table-cell table:style-name="ce46" table:formula="of:=[.$B$12]*([.$B$13]*[.$B$14]+[.$B$15]*(1-[.$B$14])) + [.$B$17]*(1-(1+[.$B$18])^(-[.AT$29]))/[.$B$18]-[.$B$22]*(1-EXP(-[.$B$23]*[.AT$29]))^2/(1+[.$B$18])^[.AT$29]  - IF([.AT29]=[.$B$19];1;0)*[.$B$21]*[.$B$22]*(1-EXP(-[.$B$23]*[.$B$19]))^2/(1+[.$B$18])^[.$B$19]" office:value-type="currency" office:currency="USD" office:value="1203.64432003649" calcext:value-type="currency">
            <text:p>$1,204</text:p>
          </table:table-cell>
          <table:table-cell table:style-name="ce46" table:formula="of:=[.$B$12]*([.$B$13]*[.$B$14]+[.$B$15]*(1-[.$B$14])) + [.$B$17]*(1-(1+[.$B$18])^(-[.AU$29]))/[.$B$18]-[.$B$22]*(1-EXP(-[.$B$23]*[.AU$29]))^2/(1+[.$B$18])^[.AU$29]  - IF([.AU29]=[.$B$19];1;0)*[.$B$21]*[.$B$22]*(1-EXP(-[.$B$23]*[.$B$19]))^2/(1+[.$B$18])^[.$B$19]" office:value-type="currency" office:currency="USD" office:value="1206.04410799961" calcext:value-type="currency">
            <text:p>$1,206</text:p>
          </table:table-cell>
          <table:table-cell table:style-name="ce46" table:formula="of:=[.$B$12]*([.$B$13]*[.$B$14]+[.$B$15]*(1-[.$B$14])) + [.$B$17]*(1-(1+[.$B$18])^(-[.AV$29]))/[.$B$18]-[.$B$22]*(1-EXP(-[.$B$23]*[.AV$29]))^2/(1+[.$B$18])^[.AV$29]  - IF([.AV29]=[.$B$19];1;0)*[.$B$21]*[.$B$22]*(1-EXP(-[.$B$23]*[.$B$19]))^2/(1+[.$B$18])^[.$B$19]" office:value-type="currency" office:currency="USD" office:value="1208.37517792567" calcext:value-type="currency">
            <text:p>$1,208</text:p>
          </table:table-cell>
          <table:table-cell table:style-name="ce46" table:formula="of:=[.$B$12]*([.$B$13]*[.$B$14]+[.$B$15]*(1-[.$B$14])) + [.$B$17]*(1-(1+[.$B$18])^(-[.AW$29]))/[.$B$18]-[.$B$22]*(1-EXP(-[.$B$23]*[.AW$29]))^2/(1+[.$B$18])^[.AW$29]  - IF([.AW29]=[.$B$19];1;0)*[.$B$21]*[.$B$22]*(1-EXP(-[.$B$23]*[.$B$19]))^2/(1+[.$B$18])^[.$B$19]" office:value-type="currency" office:currency="USD" office:value="1210.63950907114" calcext:value-type="currency">
            <text:p>$1,211</text:p>
          </table:table-cell>
          <table:table-cell table:style-name="ce46" table:formula="of:=[.$B$12]*([.$B$13]*[.$B$14]+[.$B$15]*(1-[.$B$14])) + [.$B$17]*(1-(1+[.$B$18])^(-[.AX$29]))/[.$B$18]-[.$B$22]*(1-EXP(-[.$B$23]*[.AX$29]))^2/(1+[.$B$18])^[.AX$29]  - IF([.AX29]=[.$B$19];1;0)*[.$B$21]*[.$B$22]*(1-EXP(-[.$B$23]*[.$B$19]))^2/(1+[.$B$18])^[.$B$19]" office:value-type="currency" office:currency="USD" office:value="1212.83902211557" calcext:value-type="currency">
            <text:p>$1,213</text:p>
          </table:table-cell>
          <table:table-cell table:style-name="ce46" table:formula="of:=[.$B$12]*([.$B$13]*[.$B$14]+[.$B$15]*(1-[.$B$14])) + [.$B$17]*(1-(1+[.$B$18])^(-[.AY$29]))/[.$B$18]-[.$B$22]*(1-EXP(-[.$B$23]*[.AY$29]))^2/(1+[.$B$18])^[.AY$29]  - IF([.AY29]=[.$B$19];1;0)*[.$B$21]*[.$B$22]*(1-EXP(-[.$B$23]*[.$B$19]))^2/(1+[.$B$18])^[.$B$19]" office:value-type="currency" office:currency="USD" office:value="1214.97558102982" calcext:value-type="currency">
            <text:p>$1,215</text:p>
          </table:table-cell>
          <table:table-cell table:style-name="ce46" table:formula="of:=[.$B$12]*([.$B$13]*[.$B$14]+[.$B$15]*(1-[.$B$14])) + [.$B$17]*(1-(1+[.$B$18])^(-[.AZ$29]))/[.$B$18]-[.$B$22]*(1-EXP(-[.$B$23]*[.AZ$29]))^2/(1+[.$B$18])^[.AZ$29]  - IF([.AZ29]=[.$B$19];1;0)*[.$B$21]*[.$B$22]*(1-EXP(-[.$B$23]*[.$B$19]))^2/(1+[.$B$18])^[.$B$19]" office:value-type="currency" office:currency="USD" office:value="1217.05099487525" calcext:value-type="currency">
            <text:p>$1,217</text:p>
          </table:table-cell>
          <table:table-cell table:style-name="ce46" table:formula="of:=[.$B$12]*([.$B$13]*[.$B$14]+[.$B$15]*(1-[.$B$14])) + [.$B$17]*(1-(1+[.$B$18])^(-[.BA$29]))/[.$B$18]-[.$B$22]*(1-EXP(-[.$B$23]*[.BA$29]))^2/(1+[.$B$18])^[.BA$29]  - IF([.BA29]=[.$B$19];1;0)*[.$B$21]*[.$B$22]*(1-EXP(-[.$B$23]*[.$B$19]))^2/(1+[.$B$18])^[.$B$19]" office:value-type="currency" office:currency="USD" office:value="1219.06701953666" calcext:value-type="currency">
            <text:p>$1,219</text:p>
          </table:table-cell>
          <table:table-cell table:style-name="ce46" table:formula="of:=[.$B$12]*([.$B$13]*[.$B$14]+[.$B$15]*(1-[.$B$14])) + [.$B$17]*(1-(1+[.$B$18])^(-[.BB$29]))/[.$B$18]-[.$B$22]*(1-EXP(-[.$B$23]*[.BB$29]))^2/(1+[.$B$18])^[.BB$29]  - IF([.BB29]=[.$B$19];1;0)*[.$B$21]*[.$B$22]*(1-EXP(-[.$B$23]*[.$B$19]))^2/(1+[.$B$18])^[.$B$19]" office:value-type="currency" office:currency="USD" office:value="1221.0253593923" calcext:value-type="currency">
            <text:p>$1,221</text:p>
          </table:table-cell>
          <table:table-cell table:style-name="ce46" table:formula="of:=[.$B$12]*([.$B$13]*[.$B$14]+[.$B$15]*(1-[.$B$14])) + [.$B$17]*(1-(1+[.$B$18])^(-[.BC$29]))/[.$B$18]-[.$B$22]*(1-EXP(-[.$B$23]*[.BC$29]))^2/(1+[.$B$18])^[.BC$29]  - IF([.BC29]=[.$B$19];1;0)*[.$B$21]*[.$B$22]*(1-EXP(-[.$B$23]*[.$B$19]))^2/(1+[.$B$18])^[.$B$19]" office:value-type="currency" office:currency="USD" office:value="1222.92766892355" calcext:value-type="currency">
            <text:p>$1,223</text:p>
          </table:table-cell>
          <table:table-cell table:style-name="ce46" table:formula="of:=[.$B$12]*([.$B$13]*[.$B$14]+[.$B$15]*(1-[.$B$14])) + [.$B$17]*(1-(1+[.$B$18])^(-[.BD$29]))/[.$B$18]-[.$B$22]*(1-EXP(-[.$B$23]*[.BD$29]))^2/(1+[.$B$18])^[.BD$29]  - IF([.BD29]=[.$B$19];1;0)*[.$B$21]*[.$B$22]*(1-EXP(-[.$B$23]*[.$B$19]))^2/(1+[.$B$18])^[.$B$19]" office:value-type="currency" office:currency="USD" office:value="1224.77555426699" calcext:value-type="currency">
            <text:p>$1,225</text:p>
          </table:table-cell>
          <table:table-cell table:style-name="ce46" table:formula="of:=[.$B$12]*([.$B$13]*[.$B$14]+[.$B$15]*(1-[.$B$14])) + [.$B$17]*(1-(1+[.$B$18])^(-[.BE$29]))/[.$B$18]-[.$B$22]*(1-EXP(-[.$B$23]*[.BE$29]))^2/(1+[.$B$18])^[.BE$29]  - IF([.BE29]=[.$B$19];1;0)*[.$B$21]*[.$B$22]*(1-EXP(-[.$B$23]*[.$B$19]))^2/(1+[.$B$18])^[.$B$19]" office:value-type="currency" office:currency="USD" office:value="1226.57057471142" calcext:value-type="currency">
            <text:p>$1,227</text:p>
          </table:table-cell>
          <table:table-cell table:style-name="ce46" table:formula="of:=[.$B$12]*([.$B$13]*[.$B$14]+[.$B$15]*(1-[.$B$14])) + [.$B$17]*(1-(1+[.$B$18])^(-[.BF$29]))/[.$B$18]-[.$B$22]*(1-EXP(-[.$B$23]*[.BF$29]))^2/(1+[.$B$18])^[.BF$29]  - IF([.BF29]=[.$B$19];1;0)*[.$B$21]*[.$B$22]*(1-EXP(-[.$B$23]*[.$B$19]))^2/(1+[.$B$18])^[.$B$19]" office:value-type="currency" office:currency="USD" office:value="1228.31424414209" calcext:value-type="currency">
            <text:p>$1,228</text:p>
          </table:table-cell>
          <table:table-cell table:style-name="ce46" table:formula="of:=[.$B$12]*([.$B$13]*[.$B$14]+[.$B$15]*(1-[.$B$14])) + [.$B$17]*(1-(1+[.$B$18])^(-[.BG$29]))/[.$B$18]-[.$B$22]*(1-EXP(-[.$B$23]*[.BG$29]))^2/(1+[.$B$18])^[.BG$29]  - IF([.BG29]=[.$B$19];1;0)*[.$B$21]*[.$B$22]*(1-EXP(-[.$B$23]*[.$B$19]))^2/(1+[.$B$18])^[.$B$19]" office:value-type="currency" office:currency="USD" office:value="1230.00803243464" calcext:value-type="currency">
            <text:p>$1,230</text:p>
          </table:table-cell>
          <table:table-cell table:style-name="ce46" table:formula="of:=[.$B$12]*([.$B$13]*[.$B$14]+[.$B$15]*(1-[.$B$14])) + [.$B$17]*(1-(1+[.$B$18])^(-[.BH$29]))/[.$B$18]-[.$B$22]*(1-EXP(-[.$B$23]*[.BH$29]))^2/(1+[.$B$18])^[.BH$29]  - IF([.BH29]=[.$B$19];1;0)*[.$B$21]*[.$B$22]*(1-EXP(-[.$B$23]*[.$B$19]))^2/(1+[.$B$18])^[.$B$19]" office:value-type="currency" office:currency="USD" office:value="1231.65336680059" calcext:value-type="currency">
            <text:p>$1,232</text:p>
          </table:table-cell>
          <table:table-cell table:style-name="ce46" table:formula="of:=[.$B$12]*([.$B$13]*[.$B$14]+[.$B$15]*(1-[.$B$14])) + [.$B$17]*(1-(1+[.$B$18])^(-[.BI$29]))/[.$B$18]-[.$B$22]*(1-EXP(-[.$B$23]*[.BI$29]))^2/(1+[.$B$18])^[.BI$29]  - IF([.BI29]=[.$B$19];1;0)*[.$B$21]*[.$B$22]*(1-EXP(-[.$B$23]*[.$B$19]))^2/(1+[.$B$18])^[.$B$19]" office:value-type="currency" office:currency="USD" office:value="1233.25163308668" calcext:value-type="currency">
            <text:p>$1,233</text:p>
          </table:table-cell>
          <table:table-cell table:style-name="ce46" table:formula="of:=[.$B$12]*([.$B$13]*[.$B$14]+[.$B$15]*(1-[.$B$14])) + [.$B$17]*(1-(1+[.$B$18])^(-[.BJ$29]))/[.$B$18]-[.$B$22]*(1-EXP(-[.$B$23]*[.BJ$29]))^2/(1+[.$B$18])^[.BJ$29]  - IF([.BJ29]=[.$B$19];1;0)*[.$B$21]*[.$B$22]*(1-EXP(-[.$B$23]*[.$B$19]))^2/(1+[.$B$18])^[.$B$19]" office:value-type="currency" office:currency="USD" office:value="1234.8041770298" calcext:value-type="currency">
            <text:p>$1,235</text:p>
          </table:table-cell>
          <table:table-cell table:style-name="ce46" table:formula="of:=[.$B$12]*([.$B$13]*[.$B$14]+[.$B$15]*(1-[.$B$14])) + [.$B$17]*(1-(1+[.$B$18])^(-[.BK$29]))/[.$B$18]-[.$B$22]*(1-EXP(-[.$B$23]*[.BK$29]))^2/(1+[.$B$18])^[.BK$29]  - IF([.BK29]=[.$B$19];1;0)*[.$B$21]*[.$B$22]*(1-EXP(-[.$B$23]*[.$B$19]))^2/(1+[.$B$18])^[.$B$19]" office:value-type="currency" office:currency="USD" office:value="1236.31230546945" calcext:value-type="currency">
            <text:p>$1,236</text:p>
          </table:table-cell>
          <table:table-cell table:style-name="ce46" table:formula="of:=[.$B$12]*([.$B$13]*[.$B$14]+[.$B$15]*(1-[.$B$14])) + [.$B$17]*(1-(1+[.$B$18])^(-[.BL$29]))/[.$B$18]-[.$B$22]*(1-EXP(-[.$B$23]*[.BL$29]))^2/(1+[.$B$18])^[.BL$29]  - IF([.BL29]=[.$B$19];1;0)*[.$B$21]*[.$B$22]*(1-EXP(-[.$B$23]*[.$B$19]))^2/(1+[.$B$18])^[.$B$19]" office:value-type="currency" office:currency="USD" office:value="1237.77728751943" calcext:value-type="currency">
            <text:p>$1,238</text:p>
          </table:table-cell>
          <table:table-cell table:style-name="ce46" table:formula="of:=[.$B$12]*([.$B$13]*[.$B$14]+[.$B$15]*(1-[.$B$14])) + [.$B$17]*(1-(1+[.$B$18])^(-[.BM$29]))/[.$B$18]-[.$B$22]*(1-EXP(-[.$B$23]*[.BM$29]))^2/(1+[.$B$18])^[.BM$29]  - IF([.BM29]=[.$B$19];1;0)*[.$B$21]*[.$B$22]*(1-EXP(-[.$B$23]*[.$B$19]))^2/(1+[.$B$18])^[.$B$19]" office:value-type="currency" office:currency="USD" office:value="1239.20035570038" calcext:value-type="currency">
            <text:p>$1,239</text:p>
          </table:table-cell>
          <table:table-cell table:style-name="ce46" table:formula="of:=[.$B$12]*([.$B$13]*[.$B$14]+[.$B$15]*(1-[.$B$14])) + [.$B$17]*(1-(1+[.$B$18])^(-[.BN$29]))/[.$B$18]-[.$B$22]*(1-EXP(-[.$B$23]*[.BN$29]))^2/(1+[.$B$18])^[.BN$29]  - IF([.BN29]=[.$B$19];1;0)*[.$B$21]*[.$B$22]*(1-EXP(-[.$B$23]*[.$B$19]))^2/(1+[.$B$18])^[.$B$19]" office:value-type="currency" office:currency="USD" office:value="1240.58270703477" calcext:value-type="currency">
            <text:p>$1,241</text:p>
          </table:table-cell>
          <table:table-cell table:style-name="ce46" table:formula="of:=[.$B$12]*([.$B$13]*[.$B$14]+[.$B$15]*(1-[.$B$14])) + [.$B$17]*(1-(1+[.$B$18])^(-[.BO$29]))/[.$B$18]-[.$B$22]*(1-EXP(-[.$B$23]*[.BO$29]))^2/(1+[.$B$18])^[.BO$29]  - IF([.BO29]=[.$B$19];1;0)*[.$B$21]*[.$B$22]*(1-EXP(-[.$B$23]*[.$B$19]))^2/(1+[.$B$18])^[.$B$19]" office:value-type="currency" office:currency="USD" office:value="1241.92550410585" calcext:value-type="currency">
            <text:p>$1,242</text:p>
          </table:table-cell>
          <table:table-cell table:style-name="ce46" table:formula="of:=[.$B$12]*([.$B$13]*[.$B$14]+[.$B$15]*(1-[.$B$14])) + [.$B$17]*(1-(1+[.$B$18])^(-[.BP$29]))/[.$B$18]-[.$B$22]*(1-EXP(-[.$B$23]*[.BP$29]))^2/(1+[.$B$18])^[.BP$29]  - IF([.BP29]=[.$B$19];1;0)*[.$B$21]*[.$B$22]*(1-EXP(-[.$B$23]*[.$B$19]))^2/(1+[.$B$18])^[.$B$19]" office:value-type="currency" office:currency="USD" office:value="1243.22987608192" calcext:value-type="currency">
            <text:p>$1,243</text:p>
          </table:table-cell>
          <table:table-cell table:style-name="ce46" table:formula="of:=[.$B$12]*([.$B$13]*[.$B$14]+[.$B$15]*(1-[.$B$14])) + [.$B$17]*(1-(1+[.$B$18])^(-[.BQ$29]))/[.$B$18]-[.$B$22]*(1-EXP(-[.$B$23]*[.BQ$29]))^2/(1+[.$B$18])^[.BQ$29]  - IF([.BQ29]=[.$B$19];1;0)*[.$B$21]*[.$B$22]*(1-EXP(-[.$B$23]*[.$B$19]))^2/(1+[.$B$18])^[.$B$19]" office:value-type="currency" office:currency="USD" office:value="1244.4969197073" calcext:value-type="currency">
            <text:p>$1,244</text:p>
          </table:table-cell>
          <table:table-cell table:style-name="ce46" table:formula="of:=[.$B$12]*([.$B$13]*[.$B$14]+[.$B$15]*(1-[.$B$14])) + [.$B$17]*(1-(1+[.$B$18])^(-[.BR$29]))/[.$B$18]-[.$B$22]*(1-EXP(-[.$B$23]*[.BR$29]))^2/(1+[.$B$18])^[.BR$29]  - IF([.BR29]=[.$B$19];1;0)*[.$B$21]*[.$B$22]*(1-EXP(-[.$B$23]*[.$B$19]))^2/(1+[.$B$18])^[.$B$19]" office:value-type="currency" office:currency="USD" office:value="1245.72770026129" calcext:value-type="currency">
            <text:p>$1,246</text:p>
          </table:table-cell>
          <table:table-cell table:style-name="ce46" table:formula="of:=[.$B$12]*([.$B$13]*[.$B$14]+[.$B$15]*(1-[.$B$14])) + [.$B$17]*(1-(1+[.$B$18])^(-[.BS$29]))/[.$B$18]-[.$B$22]*(1-EXP(-[.$B$23]*[.BS$29]))^2/(1+[.$B$18])^[.BS$29]  - IF([.BS29]=[.$B$19];1;0)*[.$B$21]*[.$B$22]*(1-EXP(-[.$B$23]*[.$B$19]))^2/(1+[.$B$18])^[.$B$19]" office:value-type="currency" office:currency="USD" office:value="1246.92325248634" calcext:value-type="currency">
            <text:p>$1,247</text:p>
          </table:table-cell>
          <table:table-cell table:style-name="ce46" table:formula="of:=[.$B$12]*([.$B$13]*[.$B$14]+[.$B$15]*(1-[.$B$14])) + [.$B$17]*(1-(1+[.$B$18])^(-[.BT$29]))/[.$B$18]-[.$B$22]*(1-EXP(-[.$B$23]*[.BT$29]))^2/(1+[.$B$18])^[.BT$29]  - IF([.BT29]=[.$B$19];1;0)*[.$B$21]*[.$B$22]*(1-EXP(-[.$B$23]*[.$B$19]))^2/(1+[.$B$18])^[.$B$19]" office:value-type="currency" office:currency="USD" office:value="1248.08458148652" calcext:value-type="currency">
            <text:p>$1,248</text:p>
          </table:table-cell>
          <table:table-cell table:style-name="ce46" table:formula="of:=[.$B$12]*([.$B$13]*[.$B$14]+[.$B$15]*(1-[.$B$14])) + [.$B$17]*(1-(1+[.$B$18])^(-[.BU$29]))/[.$B$18]-[.$B$22]*(1-EXP(-[.$B$23]*[.BU$29]))^2/(1+[.$B$18])^[.BU$29]  - IF([.BU29]=[.$B$19];1;0)*[.$B$21]*[.$B$22]*(1-EXP(-[.$B$23]*[.$B$19]))^2/(1+[.$B$18])^[.$B$19]" office:value-type="currency" office:currency="USD" office:value="1249.21266359756" calcext:value-type="currency">
            <text:p>$1,249</text:p>
          </table:table-cell>
          <table:table-cell table:style-name="ce46" table:formula="of:=[.$B$12]*([.$B$13]*[.$B$14]+[.$B$15]*(1-[.$B$14])) + [.$B$17]*(1-(1+[.$B$18])^(-[.BV$29]))/[.$B$18]-[.$B$22]*(1-EXP(-[.$B$23]*[.BV$29]))^2/(1+[.$B$18])^[.BV$29]  - IF([.BV29]=[.$B$19];1;0)*[.$B$21]*[.$B$22]*(1-EXP(-[.$B$23]*[.$B$19]))^2/(1+[.$B$18])^[.$B$19]" office:value-type="currency" office:currency="USD" office:value="1250.30844722937" calcext:value-type="currency">
            <text:p>$1,250</text:p>
          </table:table-cell>
          <table:table-cell table:style-name="ce46" table:formula="of:=[.$B$12]*([.$B$13]*[.$B$14]+[.$B$15]*(1-[.$B$14])) + [.$B$17]*(1-(1+[.$B$18])^(-[.BW$29]))/[.$B$18]-[.$B$22]*(1-EXP(-[.$B$23]*[.BW$29]))^2/(1+[.$B$18])^[.BW$29]  - IF([.BW29]=[.$B$19];1;0)*[.$B$21]*[.$B$22]*(1-EXP(-[.$B$23]*[.$B$19]))^2/(1+[.$B$18])^[.$B$19]" office:value-type="currency" office:currency="USD" office:value="1251.37285368209" calcext:value-type="currency">
            <text:p>$1,251</text:p>
          </table:table-cell>
          <table:table-cell table:style-name="ce46" table:formula="of:=[.$B$12]*([.$B$13]*[.$B$14]+[.$B$15]*(1-[.$B$14])) + [.$B$17]*(1-(1+[.$B$18])^(-[.BX$29]))/[.$B$18]-[.$B$22]*(1-EXP(-[.$B$23]*[.BX$29]))^2/(1+[.$B$18])^[.BX$29]  - IF([.BX29]=[.$B$19];1;0)*[.$B$21]*[.$B$22]*(1-EXP(-[.$B$23]*[.$B$19]))^2/(1+[.$B$18])^[.$B$19]" office:value-type="currency" office:currency="USD" office:value="1252.40677793667" calcext:value-type="currency">
            <text:p>$1,252</text:p>
          </table:table-cell>
          <table:table-cell table:style-name="ce46" table:formula="of:=[.$B$12]*([.$B$13]*[.$B$14]+[.$B$15]*(1-[.$B$14])) + [.$B$17]*(1-(1+[.$B$18])^(-[.BY$29]))/[.$B$18]-[.$B$22]*(1-EXP(-[.$B$23]*[.BY$29]))^2/(1+[.$B$18])^[.BY$29]  - IF([.BY29]=[.$B$19];1;0)*[.$B$21]*[.$B$22]*(1-EXP(-[.$B$23]*[.$B$19]))^2/(1+[.$B$18])^[.$B$19]" office:value-type="currency" office:currency="USD" office:value="1253.41108942084" calcext:value-type="currency">
            <text:p>$1,253</text:p>
          </table:table-cell>
          <table:table-cell table:style-name="ce46" table:formula="of:=[.$B$12]*([.$B$13]*[.$B$14]+[.$B$15]*(1-[.$B$14])) + [.$B$17]*(1-(1+[.$B$18])^(-[.BZ$29]))/[.$B$18]-[.$B$22]*(1-EXP(-[.$B$23]*[.BZ$29]))^2/(1+[.$B$18])^[.BZ$29]  - IF([.BZ29]=[.$B$19];1;0)*[.$B$21]*[.$B$22]*(1-EXP(-[.$B$23]*[.$B$19]))^2/(1+[.$B$18])^[.$B$19]" office:value-type="currency" office:currency="USD" office:value="1254.38663275146" calcext:value-type="currency">
            <text:p>$1,254</text:p>
          </table:table-cell>
          <table:table-cell table:style-name="ce46" table:formula="of:=[.$B$12]*([.$B$13]*[.$B$14]+[.$B$15]*(1-[.$B$14])) + [.$B$17]*(1-(1+[.$B$18])^(-[.CA$29]))/[.$B$18]-[.$B$22]*(1-EXP(-[.$B$23]*[.CA$29]))^2/(1+[.$B$18])^[.CA$29]  - IF([.CA29]=[.$B$19];1;0)*[.$B$21]*[.$B$22]*(1-EXP(-[.$B$23]*[.$B$19]))^2/(1+[.$B$18])^[.$B$19]" office:value-type="currency" office:currency="USD" office:value="1255.33422845393" calcext:value-type="currency">
            <text:p>$1,255</text:p>
          </table:table-cell>
          <table:table-cell table:style-name="ce46" table:formula="of:=[.$B$12]*([.$B$13]*[.$B$14]+[.$B$15]*(1-[.$B$14])) + [.$B$17]*(1-(1+[.$B$18])^(-[.CB$29]))/[.$B$18]-[.$B$22]*(1-EXP(-[.$B$23]*[.CB$29]))^2/(1+[.$B$18])^[.CB$29]  - IF([.CB29]=[.$B$19];1;0)*[.$B$21]*[.$B$22]*(1-EXP(-[.$B$23]*[.$B$19]))^2/(1+[.$B$18])^[.$B$19]" office:value-type="currency" office:currency="USD" office:value="1256.2546736596" calcext:value-type="currency">
            <text:p>$1,256</text:p>
          </table:table-cell>
          <table:table-cell table:style-name="ce46" table:formula="of:=[.$B$12]*([.$B$13]*[.$B$14]+[.$B$15]*(1-[.$B$14])) + [.$B$17]*(1-(1+[.$B$18])^(-[.CC$29]))/[.$B$18]-[.$B$22]*(1-EXP(-[.$B$23]*[.CC$29]))^2/(1+[.$B$18])^[.CC$29]  - IF([.CC29]=[.$B$19];1;0)*[.$B$21]*[.$B$22]*(1-EXP(-[.$B$23]*[.$B$19]))^2/(1+[.$B$18])^[.$B$19]" office:value-type="currency" office:currency="USD" office:value="1257.14874278186" calcext:value-type="currency">
            <text:p>$1,257</text:p>
          </table:table-cell>
          <table:table-cell table:style-name="ce46" table:formula="of:=[.$B$12]*([.$B$13]*[.$B$14]+[.$B$15]*(1-[.$B$14])) + [.$B$17]*(1-(1+[.$B$18])^(-[.CD$29]))/[.$B$18]-[.$B$22]*(1-EXP(-[.$B$23]*[.CD$29]))^2/(1+[.$B$18])^[.CD$29]  - IF([.CD29]=[.$B$19];1;0)*[.$B$21]*[.$B$22]*(1-EXP(-[.$B$23]*[.$B$19]))^2/(1+[.$B$18])^[.$B$19]" office:value-type="currency" office:currency="USD" office:value="1258.01718817171" calcext:value-type="currency">
            <text:p>$1,258</text:p>
          </table:table-cell>
          <table:table-cell table:style-name="ce46" table:formula="of:=[.$B$12]*([.$B$13]*[.$B$14]+[.$B$15]*(1-[.$B$14])) + [.$B$17]*(1-(1+[.$B$18])^(-[.CE$29]))/[.$B$18]-[.$B$22]*(1-EXP(-[.$B$23]*[.CE$29]))^2/(1+[.$B$18])^[.CE$29]  - IF([.CE29]=[.$B$19];1;0)*[.$B$21]*[.$B$22]*(1-EXP(-[.$B$23]*[.$B$19]))^2/(1+[.$B$18])^[.$B$19]" office:value-type="currency" office:currency="USD" office:value="1258.86074075351" calcext:value-type="currency">
            <text:p>$1,259</text:p>
          </table:table-cell>
          <table:table-cell table:style-name="ce46" table:formula="of:=[.$B$12]*([.$B$13]*[.$B$14]+[.$B$15]*(1-[.$B$14])) + [.$B$17]*(1-(1+[.$B$18])^(-[.CF$29]))/[.$B$18]-[.$B$22]*(1-EXP(-[.$B$23]*[.CF$29]))^2/(1+[.$B$18])^[.CF$29]  - IF([.CF29]=[.$B$19];1;0)*[.$B$21]*[.$B$22]*(1-EXP(-[.$B$23]*[.$B$19]))^2/(1+[.$B$18])^[.$B$19]" office:value-type="currency" office:currency="USD" office:value="1259.6801106415" calcext:value-type="currency">
            <text:p>$1,260</text:p>
          </table:table-cell>
          <table:table-cell table:style-name="ce46" table:formula="of:=[.$B$12]*([.$B$13]*[.$B$14]+[.$B$15]*(1-[.$B$14])) + [.$B$17]*(1-(1+[.$B$18])^(-[.CG$29]))/[.$B$18]-[.$B$22]*(1-EXP(-[.$B$23]*[.CG$29]))^2/(1+[.$B$18])^[.CG$29]  - IF([.CG29]=[.$B$19];1;0)*[.$B$21]*[.$B$22]*(1-EXP(-[.$B$23]*[.$B$19]))^2/(1+[.$B$18])^[.$B$19]" office:value-type="currency" office:currency="USD" office:value="1260.47598773786" calcext:value-type="currency">
            <text:p>$1,260</text:p>
          </table:table-cell>
          <table:table-cell table:style-name="ce46" table:formula="of:=[.$B$12]*([.$B$13]*[.$B$14]+[.$B$15]*(1-[.$B$14])) + [.$B$17]*(1-(1+[.$B$18])^(-[.CH$29]))/[.$B$18]-[.$B$22]*(1-EXP(-[.$B$23]*[.CH$29]))^2/(1+[.$B$18])^[.CH$29]  - IF([.CH29]=[.$B$19];1;0)*[.$B$21]*[.$B$22]*(1-EXP(-[.$B$23]*[.$B$19]))^2/(1+[.$B$18])^[.$B$19]" office:value-type="currency" office:currency="USD" office:value="1261.24904231283" calcext:value-type="currency">
            <text:p>$1,261</text:p>
          </table:table-cell>
          <table:table-cell table:style-name="ce46" table:formula="of:=[.$B$12]*([.$B$13]*[.$B$14]+[.$B$15]*(1-[.$B$14])) + [.$B$17]*(1-(1+[.$B$18])^(-[.CI$29]))/[.$B$18]-[.$B$22]*(1-EXP(-[.$B$23]*[.CI$29]))^2/(1+[.$B$18])^[.CI$29]  - IF([.CI29]=[.$B$19];1;0)*[.$B$21]*[.$B$22]*(1-EXP(-[.$B$23]*[.$B$19]))^2/(1+[.$B$18])^[.$B$19]" office:value-type="currency" office:currency="USD" office:value="1261.99992556757" calcext:value-type="currency">
            <text:p>$1,262</text:p>
          </table:table-cell>
          <table:table-cell table:style-name="ce46" table:formula="of:=[.$B$12]*([.$B$13]*[.$B$14]+[.$B$15]*(1-[.$B$14])) + [.$B$17]*(1-(1+[.$B$18])^(-[.CJ$29]))/[.$B$18]-[.$B$22]*(1-EXP(-[.$B$23]*[.CJ$29]))^2/(1+[.$B$18])^[.CJ$29]  - IF([.CJ29]=[.$B$19];1;0)*[.$B$21]*[.$B$22]*(1-EXP(-[.$B$23]*[.$B$19]))^2/(1+[.$B$18])^[.$B$19]" office:value-type="currency" office:currency="USD" office:value="1262.72927018025" calcext:value-type="currency">
            <text:p>$1,263</text:p>
          </table:table-cell>
          <table:table-cell table:style-name="ce46" table:formula="of:=[.$B$12]*([.$B$13]*[.$B$14]+[.$B$15]*(1-[.$B$14])) + [.$B$17]*(1-(1+[.$B$18])^(-[.CK$29]))/[.$B$18]-[.$B$22]*(1-EXP(-[.$B$23]*[.CK$29]))^2/(1+[.$B$18])^[.CK$29]  - IF([.CK29]=[.$B$19];1;0)*[.$B$21]*[.$B$22]*(1-EXP(-[.$B$23]*[.$B$19]))^2/(1+[.$B$18])^[.$B$19]" office:value-type="currency" office:currency="USD" office:value="1263.43769083596" calcext:value-type="currency">
            <text:p>$1,263</text:p>
          </table:table-cell>
          <table:table-cell table:style-name="ce46" table:formula="of:=[.$B$12]*([.$B$13]*[.$B$14]+[.$B$15]*(1-[.$B$14])) + [.$B$17]*(1-(1+[.$B$18])^(-[.CL$29]))/[.$B$18]-[.$B$22]*(1-EXP(-[.$B$23]*[.CL$29]))^2/(1+[.$B$18])^[.CL$29]  - IF([.CL29]=[.$B$19];1;0)*[.$B$21]*[.$B$22]*(1-EXP(-[.$B$23]*[.$B$19]))^2/(1+[.$B$18])^[.$B$19]" office:value-type="currency" office:currency="USD" office:value="1264.12578474101" calcext:value-type="currency">
            <text:p>$1,264</text:p>
          </table:table-cell>
          <table:table-cell table:style-name="ce46" table:formula="of:=[.$B$12]*([.$B$13]*[.$B$14]+[.$B$15]*(1-[.$B$14])) + [.$B$17]*(1-(1+[.$B$18])^(-[.CM$29]))/[.$B$18]-[.$B$22]*(1-EXP(-[.$B$23]*[.CM$29]))^2/(1+[.$B$18])^[.CM$29]  - IF([.CM29]=[.$B$19];1;0)*[.$B$21]*[.$B$22]*(1-EXP(-[.$B$23]*[.$B$19]))^2/(1+[.$B$18])^[.$B$19]" office:value-type="currency" office:currency="USD" office:value="1264.794132122" calcext:value-type="currency">
            <text:p>$1,265</text:p>
          </table:table-cell>
          <table:table-cell table:style-name="ce46" table:formula="of:=[.$B$12]*([.$B$13]*[.$B$14]+[.$B$15]*(1-[.$B$14])) + [.$B$17]*(1-(1+[.$B$18])^(-[.CN$29]))/[.$B$18]-[.$B$22]*(1-EXP(-[.$B$23]*[.CN$29]))^2/(1+[.$B$18])^[.CN$29]  - IF([.CN29]=[.$B$19];1;0)*[.$B$21]*[.$B$22]*(1-EXP(-[.$B$23]*[.$B$19]))^2/(1+[.$B$18])^[.$B$19]" office:value-type="currency" office:currency="USD" office:value="1265.44329671033" calcext:value-type="currency">
            <text:p>$1,265</text:p>
          </table:table-cell>
          <table:table-cell table:style-name="ce46" table:formula="of:=[.$B$12]*([.$B$13]*[.$B$14]+[.$B$15]*(1-[.$B$14])) + [.$B$17]*(1-(1+[.$B$18])^(-[.CO$29]))/[.$B$18]-[.$B$22]*(1-EXP(-[.$B$23]*[.CO$29]))^2/(1+[.$B$18])^[.CO$29]  - IF([.CO29]=[.$B$19];1;0)*[.$B$21]*[.$B$22]*(1-EXP(-[.$B$23]*[.$B$19]))^2/(1+[.$B$18])^[.$B$19]" office:value-type="currency" office:currency="USD" office:value="1266.07382621244" calcext:value-type="currency">
            <text:p>$1,266</text:p>
          </table:table-cell>
          <table:table-cell table:style-name="ce46" table:formula="of:=[.$B$12]*([.$B$13]*[.$B$14]+[.$B$15]*(1-[.$B$14])) + [.$B$17]*(1-(1+[.$B$18])^(-[.CP$29]))/[.$B$18]-[.$B$22]*(1-EXP(-[.$B$23]*[.CP$29]))^2/(1+[.$B$18])^[.CP$29]  - IF([.CP29]=[.$B$19];1;0)*[.$B$21]*[.$B$22]*(1-EXP(-[.$B$23]*[.$B$19]))^2/(1+[.$B$18])^[.$B$19]" office:value-type="currency" office:currency="USD" office:value="1266.68625276631" calcext:value-type="currency">
            <text:p>$1,267</text:p>
          </table:table-cell>
          <table:table-cell table:style-name="ce46" table:formula="of:=[.$B$12]*([.$B$13]*[.$B$14]+[.$B$15]*(1-[.$B$14])) + [.$B$17]*(1-(1+[.$B$18])^(-[.CQ$29]))/[.$B$18]-[.$B$22]*(1-EXP(-[.$B$23]*[.CQ$29]))^2/(1+[.$B$18])^[.CQ$29]  - IF([.CQ29]=[.$B$19];1;0)*[.$B$21]*[.$B$22]*(1-EXP(-[.$B$23]*[.$B$19]))^2/(1+[.$B$18])^[.$B$19]" office:value-type="currency" office:currency="USD" office:value="1267.28109338471" calcext:value-type="currency">
            <text:p>$1,267</text:p>
          </table:table-cell>
          <table:table-cell table:style-name="ce46" table:formula="of:=[.$B$12]*([.$B$13]*[.$B$14]+[.$B$15]*(1-[.$B$14])) + [.$B$17]*(1-(1+[.$B$18])^(-[.CR$29]))/[.$B$18]-[.$B$22]*(1-EXP(-[.$B$23]*[.CR$29]))^2/(1+[.$B$18])^[.CR$29]  - IF([.CR29]=[.$B$19];1;0)*[.$B$21]*[.$B$22]*(1-EXP(-[.$B$23]*[.$B$19]))^2/(1+[.$B$18])^[.$B$19]" office:value-type="currency" office:currency="USD" office:value="1267.85885038549" calcext:value-type="currency">
            <text:p>$1,268</text:p>
          </table:table-cell>
          <table:table-cell table:style-name="ce46" table:formula="of:=[.$B$12]*([.$B$13]*[.$B$14]+[.$B$15]*(1-[.$B$14])) + [.$B$17]*(1-(1+[.$B$18])^(-[.CS$29]))/[.$B$18]-[.$B$22]*(1-EXP(-[.$B$23]*[.CS$29]))^2/(1+[.$B$18])^[.CS$29]  - IF([.CS29]=[.$B$19];1;0)*[.$B$21]*[.$B$22]*(1-EXP(-[.$B$23]*[.$B$19]))^2/(1+[.$B$18])^[.$B$19]" office:value-type="currency" office:currency="USD" office:value="1268.42001180942" calcext:value-type="currency">
            <text:p>$1,268</text:p>
          </table:table-cell>
          <table:table-cell table:style-name="ce46" table:formula="of:=[.$B$12]*([.$B$13]*[.$B$14]+[.$B$15]*(1-[.$B$14])) + [.$B$17]*(1-(1+[.$B$18])^(-[.CT$29]))/[.$B$18]-[.$B$22]*(1-EXP(-[.$B$23]*[.CT$29]))^2/(1+[.$B$18])^[.CT$29]  - IF([.CT29]=[.$B$19];1;0)*[.$B$21]*[.$B$22]*(1-EXP(-[.$B$23]*[.$B$19]))^2/(1+[.$B$18])^[.$B$19]" office:value-type="currency" office:currency="USD" office:value="1268.96505182594" calcext:value-type="currency">
            <text:p>$1,269</text:p>
          </table:table-cell>
          <table:table-cell table:style-name="ce46" table:formula="of:=[.$B$12]*([.$B$13]*[.$B$14]+[.$B$15]*(1-[.$B$14])) + [.$B$17]*(1-(1+[.$B$18])^(-[.CU$29]))/[.$B$18]-[.$B$22]*(1-EXP(-[.$B$23]*[.CU$29]))^2/(1+[.$B$18])^[.CU$29]  - IF([.CU29]=[.$B$19];1;0)*[.$B$21]*[.$B$22]*(1-EXP(-[.$B$23]*[.$B$19]))^2/(1+[.$B$18])^[.$B$19]" office:value-type="currency" office:currency="USD" office:value="1269.49443112714" calcext:value-type="currency">
            <text:p>$1,269</text:p>
          </table:table-cell>
          <table:table-cell table:style-name="ce46" table:formula="of:=[.$B$12]*([.$B$13]*[.$B$14]+[.$B$15]*(1-[.$B$14])) + [.$B$17]*(1-(1+[.$B$18])^(-[.CV$29]))/[.$B$18]-[.$B$22]*(1-EXP(-[.$B$23]*[.CV$29]))^2/(1+[.$B$18])^[.CV$29]  - IF([.CV29]=[.$B$19];1;0)*[.$B$21]*[.$B$22]*(1-EXP(-[.$B$23]*[.$B$19]))^2/(1+[.$B$18])^[.$B$19]" office:value-type="currency" office:currency="USD" office:value="1270.00859731041" calcext:value-type="currency">
            <text:p>$1,270</text:p>
          </table:table-cell>
          <table:table-cell table:style-name="ce46" table:formula="of:=[.$B$12]*([.$B$13]*[.$B$14]+[.$B$15]*(1-[.$B$14])) + [.$B$17]*(1-(1+[.$B$18])^(-[.CW$29]))/[.$B$18]-[.$B$22]*(1-EXP(-[.$B$23]*[.CW$29]))^2/(1+[.$B$18])^[.CW$29]  - IF([.CW29]=[.$B$19];1;0)*[.$B$21]*[.$B$22]*(1-EXP(-[.$B$23]*[.$B$19]))^2/(1+[.$B$18])^[.$B$19]" office:value-type="currency" office:currency="USD" office:value="1270.50798525005" calcext:value-type="currency">
            <text:p>$1,271</text:p>
          </table:table-cell>
          <table:table-cell table:style-name="ce46" table:formula="of:=[.$B$12]*([.$B$13]*[.$B$14]+[.$B$15]*(1-[.$B$14])) + [.$B$17]*(1-(1+[.$B$18])^(-[.CX$29]))/[.$B$18]-[.$B$22]*(1-EXP(-[.$B$23]*[.CX$29]))^2/(1+[.$B$18])^[.CX$29]  - IF([.CX29]=[.$B$19];1;0)*[.$B$21]*[.$B$22]*(1-EXP(-[.$B$23]*[.$B$19]))^2/(1+[.$B$18])^[.$B$19]" office:value-type="currency" office:currency="USD" office:value="1270.99301745821" calcext:value-type="currency">
            <text:p>$1,271</text:p>
          </table:table-cell>
          <table:table-cell table:style-name="ce46" table:formula="of:=[.$B$12]*([.$B$13]*[.$B$14]+[.$B$15]*(1-[.$B$14])) + [.$B$17]*(1-(1+[.$B$18])^(-[.CY$29]))/[.$B$18]-[.$B$22]*(1-EXP(-[.$B$23]*[.CY$29]))^2/(1+[.$B$18])^[.CY$29]  - IF([.CY29]=[.$B$19];1;0)*[.$B$21]*[.$B$22]*(1-EXP(-[.$B$23]*[.$B$19]))^2/(1+[.$B$18])^[.$B$19]" office:value-type="currency" office:currency="USD" office:value="1271.46410443543" calcext:value-type="currency">
            <text:p>$1,271</text:p>
          </table:table-cell>
          <table:table-cell table:style-name="ce46" table:formula="of:=[.$B$12]*([.$B$13]*[.$B$14]+[.$B$15]*(1-[.$B$14])) + [.$B$17]*(1-(1+[.$B$18])^(-[.CZ$29]))/[.$B$18]-[.$B$22]*(1-EXP(-[.$B$23]*[.CZ$29]))^2/(1+[.$B$18])^[.CZ$29]  - IF([.CZ29]=[.$B$19];1;0)*[.$B$21]*[.$B$22]*(1-EXP(-[.$B$23]*[.$B$19]))^2/(1+[.$B$18])^[.$B$19]" office:value-type="currency" office:currency="USD" office:value="1271.92164501125" calcext:value-type="currency">
            <text:p>$1,272</text:p>
          </table:table-cell>
          <table:table-cell table:style-name="ce46" table:formula="of:=[.$B$12]*([.$B$13]*[.$B$14]+[.$B$15]*(1-[.$B$14])) + [.$B$17]*(1-(1+[.$B$18])^(-[.DA$29]))/[.$B$18]-[.$B$22]*(1-EXP(-[.$B$23]*[.DA$29]))^2/(1+[.$B$18])^[.DA$29]  - IF([.DA29]=[.$B$19];1;0)*[.$B$21]*[.$B$22]*(1-EXP(-[.$B$23]*[.$B$19]))^2/(1+[.$B$18])^[.$B$19]" office:value-type="currency" office:currency="USD" office:value="1272.36602667487" calcext:value-type="currency">
            <text:p>$1,272</text:p>
          </table:table-cell>
          <table:table-cell table:style-name="ce46" table:formula="of:=[.$B$12]*([.$B$13]*[.$B$14]+[.$B$15]*(1-[.$B$14])) + [.$B$17]*(1-(1+[.$B$18])^(-[.DB$29]))/[.$B$18]-[.$B$22]*(1-EXP(-[.$B$23]*[.DB$29]))^2/(1+[.$B$18])^[.DB$29]  - IF([.DB29]=[.$B$19];1;0)*[.$B$21]*[.$B$22]*(1-EXP(-[.$B$23]*[.$B$19]))^2/(1+[.$B$18])^[.$B$19]" office:value-type="currency" office:currency="USD" office:value="1272.79762589658" calcext:value-type="currency">
            <text:p>$1,273</text:p>
          </table:table-cell>
          <table:table-cell table:style-name="ce46" table:formula="of:=[.$B$12]*([.$B$13]*[.$B$14]+[.$B$15]*(1-[.$B$14])) + [.$B$17]*(1-(1+[.$B$18])^(-[.DC$29]))/[.$B$18]-[.$B$22]*(1-EXP(-[.$B$23]*[.DC$29]))^2/(1+[.$B$18])^[.DC$29]  - IF([.DC29]=[.$B$19];1;0)*[.$B$21]*[.$B$22]*(1-EXP(-[.$B$23]*[.$B$19]))^2/(1+[.$B$18])^[.$B$19]" office:value-type="currency" office:currency="USD" office:value="1273.21680843984" calcext:value-type="currency">
            <text:p>$1,273</text:p>
          </table:table-cell>
          <table:table-cell table:style-name="ce46" table:formula="of:=[.$B$12]*([.$B$13]*[.$B$14]+[.$B$15]*(1-[.$B$14])) + [.$B$17]*(1-(1+[.$B$18])^(-[.DD$29]))/[.$B$18]-[.$B$22]*(1-EXP(-[.$B$23]*[.DD$29]))^2/(1+[.$B$18])^[.DD$29]  - IF([.DD29]=[.$B$19];1;0)*[.$B$21]*[.$B$22]*(1-EXP(-[.$B$23]*[.$B$19]))^2/(1+[.$B$18])^[.$B$19]" office:value-type="currency" office:currency="USD" office:value="1273.62392966458" calcext:value-type="currency">
            <text:p>$1,274</text:p>
          </table:table-cell>
          <table:table-cell table:style-name="ce46" table:formula="of:=[.$B$12]*([.$B$13]*[.$B$14]+[.$B$15]*(1-[.$B$14])) + [.$B$17]*(1-(1+[.$B$18])^(-[.DE$29]))/[.$B$18]-[.$B$22]*(1-EXP(-[.$B$23]*[.DE$29]))^2/(1+[.$B$18])^[.DE$29]  - IF([.DE29]=[.$B$19];1;0)*[.$B$21]*[.$B$22]*(1-EXP(-[.$B$23]*[.$B$19]))^2/(1+[.$B$18])^[.$B$19]" office:value-type="currency" office:currency="USD" office:value="1274.01933482178" calcext:value-type="currency">
            <text:p>$1,274</text:p>
          </table:table-cell>
          <table:table-cell table:style-name="ce46" table:formula="of:=[.$B$12]*([.$B$13]*[.$B$14]+[.$B$15]*(1-[.$B$14])) + [.$B$17]*(1-(1+[.$B$18])^(-[.DF$29]))/[.$B$18]-[.$B$22]*(1-EXP(-[.$B$23]*[.DF$29]))^2/(1+[.$B$18])^[.DF$29]  - IF([.DF29]=[.$B$19];1;0)*[.$B$21]*[.$B$22]*(1-EXP(-[.$B$23]*[.$B$19]))^2/(1+[.$B$18])^[.$B$19]" office:value-type="currency" office:currency="USD" office:value="1274.40335933972" calcext:value-type="currency">
            <text:p>$1,274</text:p>
          </table:table-cell>
          <table:table-cell table:style-name="ce46" table:formula="of:=[.$B$12]*([.$B$13]*[.$B$14]+[.$B$15]*(1-[.$B$14])) + [.$B$17]*(1-(1+[.$B$18])^(-[.DG$29]))/[.$B$18]-[.$B$22]*(1-EXP(-[.$B$23]*[.DG$29]))^2/(1+[.$B$18])^[.DG$29]  - IF([.DG29]=[.$B$19];1;0)*[.$B$21]*[.$B$22]*(1-EXP(-[.$B$23]*[.$B$19]))^2/(1+[.$B$18])^[.$B$19]" office:value-type="currency" office:currency="USD" office:value="1274.77632910208" calcext:value-type="currency">
            <text:p>$1,275</text:p>
          </table:table-cell>
          <table:table-cell table:style-name="ce46" table:formula="of:=[.$B$12]*([.$B$13]*[.$B$14]+[.$B$15]*(1-[.$B$14])) + [.$B$17]*(1-(1+[.$B$18])^(-[.DH$29]))/[.$B$18]-[.$B$22]*(1-EXP(-[.$B$23]*[.DH$29]))^2/(1+[.$B$18])^[.DH$29]  - IF([.DH29]=[.$B$19];1;0)*[.$B$21]*[.$B$22]*(1-EXP(-[.$B$23]*[.$B$19]))^2/(1+[.$B$18])^[.$B$19]" office:value-type="currency" office:currency="USD" office:value="1275.13856071813" calcext:value-type="currency">
            <text:p>$1,275</text:p>
          </table:table-cell>
          <table:table-cell table:style-name="ce46" table:formula="of:=[.$B$12]*([.$B$13]*[.$B$14]+[.$B$15]*(1-[.$B$14])) + [.$B$17]*(1-(1+[.$B$18])^(-[.DI$29]))/[.$B$18]-[.$B$22]*(1-EXP(-[.$B$23]*[.DI$29]))^2/(1+[.$B$18])^[.DI$29]  - IF([.DI29]=[.$B$19];1;0)*[.$B$21]*[.$B$22]*(1-EXP(-[.$B$23]*[.$B$19]))^2/(1+[.$B$18])^[.$B$19]" office:value-type="currency" office:currency="USD" office:value="1275.49036178526" calcext:value-type="currency">
            <text:p>$1,275</text:p>
          </table:table-cell>
          <table:table-cell table:style-name="ce46" table:formula="of:=[.$B$12]*([.$B$13]*[.$B$14]+[.$B$15]*(1-[.$B$14])) + [.$B$17]*(1-(1+[.$B$18])^(-[.DJ$29]))/[.$B$18]-[.$B$22]*(1-EXP(-[.$B$23]*[.DJ$29]))^2/(1+[.$B$18])^[.DJ$29]  - IF([.DJ29]=[.$B$19];1;0)*[.$B$21]*[.$B$22]*(1-EXP(-[.$B$23]*[.$B$19]))^2/(1+[.$B$18])^[.$B$19]" office:value-type="currency" office:currency="USD" office:value="1275.8320311441" calcext:value-type="currency">
            <text:p>$1,276</text:p>
          </table:table-cell>
          <table:table-cell table:style-name="ce46" table:formula="of:=[.$B$12]*([.$B$13]*[.$B$14]+[.$B$15]*(1-[.$B$14])) + [.$B$17]*(1-(1+[.$B$18])^(-[.DK$29]))/[.$B$18]-[.$B$22]*(1-EXP(-[.$B$23]*[.DK$29]))^2/(1+[.$B$18])^[.DK$29]  - IF([.DK29]=[.$B$19];1;0)*[.$B$21]*[.$B$22]*(1-EXP(-[.$B$23]*[.$B$19]))^2/(1+[.$B$18])^[.$B$19]" office:value-type="currency" office:currency="USD" office:value="1276.16385912635" calcext:value-type="currency">
            <text:p>$1,276</text:p>
          </table:table-cell>
          <table:table-cell table:style-name="ce46" table:formula="of:=[.$B$12]*([.$B$13]*[.$B$14]+[.$B$15]*(1-[.$B$14])) + [.$B$17]*(1-(1+[.$B$18])^(-[.DL$29]))/[.$B$18]-[.$B$22]*(1-EXP(-[.$B$23]*[.DL$29]))^2/(1+[.$B$18])^[.DL$29]  - IF([.DL29]=[.$B$19];1;0)*[.$B$21]*[.$B$22]*(1-EXP(-[.$B$23]*[.$B$19]))^2/(1+[.$B$18])^[.$B$19]" office:value-type="currency" office:currency="USD" office:value="1276.48612779562" calcext:value-type="currency">
            <text:p>$1,276</text:p>
          </table:table-cell>
          <table:table-cell table:style-name="ce46" table:formula="of:=[.$B$12]*([.$B$13]*[.$B$14]+[.$B$15]*(1-[.$B$14])) + [.$B$17]*(1-(1+[.$B$18])^(-[.DM$29]))/[.$B$18]-[.$B$22]*(1-EXP(-[.$B$23]*[.DM$29]))^2/(1+[.$B$18])^[.DM$29]  - IF([.DM29]=[.$B$19];1;0)*[.$B$21]*[.$B$22]*(1-EXP(-[.$B$23]*[.$B$19]))^2/(1+[.$B$18])^[.$B$19]" office:value-type="currency" office:currency="USD" office:value="1276.7991111815" calcext:value-type="currency">
            <text:p>$1,277</text:p>
          </table:table-cell>
          <table:table-cell table:style-name="ce46" table:formula="of:=[.$B$12]*([.$B$13]*[.$B$14]+[.$B$15]*(1-[.$B$14])) + [.$B$17]*(1-(1+[.$B$18])^(-[.DN$29]))/[.$B$18]-[.$B$22]*(1-EXP(-[.$B$23]*[.DN$29]))^2/(1+[.$B$18])^[.DN$29]  - IF([.DN29]=[.$B$19];1;0)*[.$B$21]*[.$B$22]*(1-EXP(-[.$B$23]*[.$B$19]))^2/(1+[.$B$18])^[.$B$19]" office:value-type="currency" office:currency="USD" office:value="1277.10307550696" calcext:value-type="currency">
            <text:p>$1,277</text:p>
          </table:table-cell>
          <table:table-cell table:style-name="ce46" table:formula="of:=[.$B$12]*([.$B$13]*[.$B$14]+[.$B$15]*(1-[.$B$14])) + [.$B$17]*(1-(1+[.$B$18])^(-[.DO$29]))/[.$B$18]-[.$B$22]*(1-EXP(-[.$B$23]*[.DO$29]))^2/(1+[.$B$18])^[.DO$29]  - IF([.DO29]=[.$B$19];1;0)*[.$B$21]*[.$B$22]*(1-EXP(-[.$B$23]*[.$B$19]))^2/(1+[.$B$18])^[.$B$19]" office:value-type="currency" office:currency="USD" office:value="1277.39827940932" calcext:value-type="currency">
            <text:p>$1,277</text:p>
          </table:table-cell>
          <table:table-cell table:style-name="ce46" table:formula="of:=[.$B$12]*([.$B$13]*[.$B$14]+[.$B$15]*(1-[.$B$14])) + [.$B$17]*(1-(1+[.$B$18])^(-[.DP$29]))/[.$B$18]-[.$B$22]*(1-EXP(-[.$B$23]*[.DP$29]))^2/(1+[.$B$18])^[.DP$29]  - IF([.DP29]=[.$B$19];1;0)*[.$B$21]*[.$B$22]*(1-EXP(-[.$B$23]*[.$B$19]))^2/(1+[.$B$18])^[.$B$19]" office:value-type="currency" office:currency="USD" office:value="1277.68497415502" calcext:value-type="currency">
            <text:p>$1,278</text:p>
          </table:table-cell>
          <table:table-cell table:style-name="ce46" table:formula="of:=[.$B$12]*([.$B$13]*[.$B$14]+[.$B$15]*(1-[.$B$14])) + [.$B$17]*(1-(1+[.$B$18])^(-[.DQ$29]))/[.$B$18]-[.$B$22]*(1-EXP(-[.$B$23]*[.DQ$29]))^2/(1+[.$B$18])^[.DQ$29]  - IF([.DQ29]=[.$B$19];1;0)*[.$B$21]*[.$B$22]*(1-EXP(-[.$B$23]*[.$B$19]))^2/(1+[.$B$18])^[.$B$19]" office:value-type="currency" office:currency="USD" office:value="1268.9773655365" calcext:value-type="currency">
            <text:p>$1,269</text:p>
          </table:table-cell>
          <table:table-cell table:number-columns-repeated="16262"/>
        </table:table-row>
        <table:table-row table:style-name="ro1">
          <table:table-cell table:style-name="Default" office:value-type="string" calcext:value-type="string">
            <text:p>Bid score: bid[0,t]/W[forestry,t]</text:p>
          </table:table-cell>
          <table:table-cell table:number-columns-repeated="10"/>
          <table:table-cell table:style-name="ce52" table:formula="of:=[.L35]/[.L34]" office:value-type="float" office:value="328328.132993926" calcext:value-type="float">
            <text:p>328,328</text:p>
          </table:table-cell>
          <table:table-cell table:style-name="ce52" table:formula="of:=[.M35]/[.M34]" office:value-type="float" office:value="286264.432209059" calcext:value-type="float">
            <text:p>286,264</text:p>
          </table:table-cell>
          <table:table-cell table:style-name="ce52" table:formula="of:=[.N35]/[.N34]" office:value-type="float" office:value="252854.117746585" calcext:value-type="float">
            <text:p>252,854</text:p>
          </table:table-cell>
          <table:table-cell table:style-name="ce52" table:formula="of:=[.O35]/[.O34]" office:value-type="float" office:value="225804.582246091" calcext:value-type="float">
            <text:p>225,805</text:p>
          </table:table-cell>
          <table:table-cell table:style-name="ce52" table:formula="of:=[.P35]/[.P34]" office:value-type="float" office:value="203536.592116236" calcext:value-type="float">
            <text:p>203,537</text:p>
          </table:table-cell>
          <table:table-cell table:style-name="ce52" table:formula="of:=[.Q35]/[.Q34]" office:value-type="float" office:value="184937.909263356" calcext:value-type="float">
            <text:p>184,938</text:p>
          </table:table-cell>
          <table:table-cell table:style-name="ce52" table:formula="of:=[.R35]/[.R34]" office:value-type="float" office:value="169210.311921698" calcext:value-type="float">
            <text:p>169,210</text:p>
          </table:table-cell>
          <table:table-cell table:style-name="ce52" table:formula="of:=[.S35]/[.S34]" office:value-type="float" office:value="155778.928658212" calcext:value-type="float">
            <text:p>155,779</text:p>
          </table:table-cell>
          <table:table-cell table:style-name="ce52" table:formula="of:=[.T35]/[.T34]" office:value-type="float" office:value="144199.601872231" calcext:value-type="float">
            <text:p>144,200</text:p>
          </table:table-cell>
          <table:table-cell table:style-name="ce52" table:formula="of:=[.U35]/[.U34]" office:value-type="float" office:value="134126.878838009" calcext:value-type="float">
            <text:p>134,127</text:p>
          </table:table-cell>
          <table:table-cell table:style-name="ce52" table:formula="of:=[.V35]/[.V34]" office:value-type="float" office:value="125301.240196293" calcext:value-type="float">
            <text:p>125,301</text:p>
          </table:table-cell>
          <table:table-cell table:style-name="ce52" table:formula="of:=[.W35]/[.W34]" office:value-type="float" office:value="117520.098600231" calcext:value-type="float">
            <text:p>117,520</text:p>
          </table:table-cell>
          <table:table-cell table:style-name="ce52" table:formula="of:=[.X35]/[.X34]" office:value-type="float" office:value="110615.081491285" calcext:value-type="float">
            <text:p>110,615</text:p>
          </table:table-cell>
          <table:table-cell table:style-name="ce52" table:formula="of:=[.Y35]/[.Y34]" office:value-type="float" office:value="104453.094874645" calcext:value-type="float">
            <text:p>104,453</text:p>
          </table:table-cell>
          <table:table-cell table:style-name="ce52" table:formula="of:=[.Z35]/[.Z34]" office:value-type="float" office:value="98928.3209218561" calcext:value-type="float">
            <text:p>98,928</text:p>
          </table:table-cell>
          <table:table-cell table:style-name="ce52" table:formula="of:=[.AA35]/[.AA34]" office:value-type="float" office:value="93951.7613051121" calcext:value-type="float">
            <text:p>93,952</text:p>
          </table:table-cell>
          <table:table-cell table:style-name="ce52" table:formula="of:=[.AB35]/[.AB34]" office:value-type="float" office:value="89450.1881444163" calcext:value-type="float">
            <text:p>89,450</text:p>
          </table:table-cell>
          <table:table-cell table:style-name="ce52" table:formula="of:=[.AC35]/[.AC34]" office:value-type="float" office:value="85362.3573316658" calcext:value-type="float">
            <text:p>85,362</text:p>
          </table:table-cell>
          <table:table-cell table:style-name="ce52" table:formula="of:=[.AD35]/[.AD34]" office:value-type="float" office:value="81636.8684470011" calcext:value-type="float">
            <text:p>81,637</text:p>
          </table:table-cell>
          <table:table-cell table:style-name="ce52" table:formula="of:=[.AE35]/[.AE34]" office:value-type="float" office:value="78228.9487210217" calcext:value-type="float">
            <text:p>78,229</text:p>
          </table:table-cell>
          <table:table-cell table:style-name="ce52" table:formula="of:=[.AF35]/[.AF34]" office:value-type="float" office:value="75101.8773854549" calcext:value-type="float">
            <text:p>75,102</text:p>
          </table:table-cell>
          <table:table-cell table:style-name="ce52" table:formula="of:=[.AG35]/[.AG34]" office:value-type="float" office:value="72224.3987214467" calcext:value-type="float">
            <text:p>72,224</text:p>
          </table:table-cell>
          <table:table-cell table:style-name="ce52" table:formula="of:=[.AH35]/[.AH34]" office:value-type="float" office:value="69569.47520344" calcext:value-type="float">
            <text:p>69,569</text:p>
          </table:table-cell>
          <table:table-cell table:style-name="ce52" table:formula="of:=[.AI35]/[.AI34]" office:value-type="float" office:value="67114.8634568127" calcext:value-type="float">
            <text:p>67,115</text:p>
          </table:table-cell>
          <table:table-cell table:style-name="ce52" table:formula="of:=[.AJ35]/[.AJ34]" office:value-type="float" office:value="64836.5712821463" calcext:value-type="float">
            <text:p>64,837</text:p>
          </table:table-cell>
          <table:table-cell table:style-name="ce52" table:formula="of:=[.AK35]/[.AK34]" office:value-type="float" office:value="62718.593975164" calcext:value-type="float">
            <text:p>62,719</text:p>
          </table:table-cell>
          <table:table-cell table:style-name="ce52" table:formula="of:=[.AL35]/[.AL34]" office:value-type="float" office:value="60745.7420664347" calcext:value-type="float">
            <text:p>60,746</text:p>
          </table:table-cell>
          <table:table-cell table:style-name="ce52" table:formula="of:=[.AM35]/[.AM34]" office:value-type="float" office:value="58904.5392693493" calcext:value-type="float">
            <text:p>58,905</text:p>
          </table:table-cell>
          <table:table-cell table:style-name="ce52" table:formula="of:=[.AN35]/[.AN34]" office:value-type="float" office:value="57183.8071293606" calcext:value-type="float">
            <text:p>57,184</text:p>
          </table:table-cell>
          <table:table-cell table:style-name="ce52" table:formula="of:=[.AO35]/[.AO34]" office:value-type="float" office:value="55571.6223826878" calcext:value-type="float">
            <text:p>55,572</text:p>
          </table:table-cell>
          <table:table-cell table:style-name="ce52" table:formula="of:=[.AP35]/[.AP34]" office:value-type="float" office:value="54059.6810429057" calcext:value-type="float">
            <text:p>54,060</text:p>
          </table:table-cell>
          <table:table-cell table:style-name="ce52" table:formula="of:=[.AQ35]/[.AQ34]" office:value-type="float" office:value="52639.9974812353" calcext:value-type="float">
            <text:p>52,640</text:p>
          </table:table-cell>
          <table:table-cell table:style-name="ce52" table:formula="of:=[.AR35]/[.AR34]" office:value-type="float" office:value="51305.8217548711" calcext:value-type="float">
            <text:p>51,306</text:p>
          </table:table-cell>
          <table:table-cell table:style-name="ce52" table:formula="of:=[.AS35]/[.AS34]" office:value-type="float" office:value="50048.7533351239" calcext:value-type="float">
            <text:p>50,049</text:p>
          </table:table-cell>
          <table:table-cell table:style-name="ce52" table:formula="of:=[.AT35]/[.AT34]" office:value-type="float" office:value="48863.2553580752" calcext:value-type="float">
            <text:p>48,863</text:p>
          </table:table-cell>
          <table:table-cell table:style-name="ce52" table:formula="of:=[.AU35]/[.AU34]" office:value-type="float" office:value="47743.840169086" calcext:value-type="float">
            <text:p>47,744</text:p>
          </table:table-cell>
          <table:table-cell table:style-name="ce52" table:formula="of:=[.AV35]/[.AV34]" office:value-type="float" office:value="46684.2763904162" calcext:value-type="float">
            <text:p>46,684</text:p>
          </table:table-cell>
          <table:table-cell table:style-name="ce52" table:formula="of:=[.AW35]/[.AW34]" office:value-type="float" office:value="45681.5042735849" calcext:value-type="float">
            <text:p>45,682</text:p>
          </table:table-cell>
          <table:table-cell table:style-name="ce52" table:formula="of:=[.AX35]/[.AX34]" office:value-type="float" office:value="44730.2909364842" calcext:value-type="float">
            <text:p>44,730</text:p>
          </table:table-cell>
          <table:table-cell table:style-name="ce52" table:formula="of:=[.AY35]/[.AY34]" office:value-type="float" office:value="43826.968574089" calcext:value-type="float">
            <text:p>43,827</text:p>
          </table:table-cell>
          <table:table-cell table:style-name="ce52" table:formula="of:=[.AZ35]/[.AZ34]" office:value-type="float" office:value="42968.9980278092" calcext:value-type="float">
            <text:p>42,969</text:p>
          </table:table-cell>
          <table:table-cell table:style-name="ce52" table:formula="of:=[.BA35]/[.BA34]" office:value-type="float" office:value="42152.5417255658" calcext:value-type="float">
            <text:p>42,153</text:p>
          </table:table-cell>
          <table:table-cell table:style-name="ce52" table:formula="of:=[.BB35]/[.BB34]" office:value-type="float" office:value="41376.219661903" calcext:value-type="float">
            <text:p>41,376</text:p>
          </table:table-cell>
          <table:table-cell table:style-name="ce52" table:formula="of:=[.BC35]/[.BC34]" office:value-type="float" office:value="40636.2322112589" calcext:value-type="float">
            <text:p>40,636</text:p>
          </table:table-cell>
          <table:table-cell table:style-name="ce52" table:formula="of:=[.BD35]/[.BD34]" office:value-type="float" office:value="39930.6006767407" calcext:value-type="float">
            <text:p>39,931</text:p>
          </table:table-cell>
          <table:table-cell table:style-name="ce52" table:formula="of:=[.BE35]/[.BE34]" office:value-type="float" office:value="39256.6112106786" calcext:value-type="float">
            <text:p>39,257</text:p>
          </table:table-cell>
          <table:table-cell table:style-name="ce52" table:formula="of:=[.BF35]/[.BF34]" office:value-type="float" office:value="38612.0557859173" calcext:value-type="float">
            <text:p>38,612</text:p>
          </table:table-cell>
          <table:table-cell table:style-name="ce52" table:formula="of:=[.BG35]/[.BG34]" office:value-type="float" office:value="37995.3805758844" calcext:value-type="float">
            <text:p>37,995</text:p>
          </table:table-cell>
          <table:table-cell table:style-name="ce52" table:formula="of:=[.BH35]/[.BH34]" office:value-type="float" office:value="37405.2207268426" calcext:value-type="float">
            <text:p>37,405</text:p>
          </table:table-cell>
          <table:table-cell table:style-name="ce52" table:formula="of:=[.BI35]/[.BI34]" office:value-type="float" office:value="36839.9321077608" calcext:value-type="float">
            <text:p>36,840</text:p>
          </table:table-cell>
          <table:table-cell table:style-name="ce52" table:formula="of:=[.BJ35]/[.BJ34]" office:value-type="float" office:value="36297.8974374238" calcext:value-type="float">
            <text:p>36,298</text:p>
          </table:table-cell>
          <table:table-cell table:style-name="ce52" table:formula="of:=[.BK35]/[.BK34]" office:value-type="float" office:value="35778.088678353" calcext:value-type="float">
            <text:p>35,778</text:p>
          </table:table-cell>
          <table:table-cell table:style-name="ce52" table:formula="of:=[.BL35]/[.BL34]" office:value-type="float" office:value="35279.0144268958" calcext:value-type="float">
            <text:p>35,279</text:p>
          </table:table-cell>
          <table:table-cell table:style-name="ce52" table:formula="of:=[.BM35]/[.BM34]" office:value-type="float" office:value="34799.7504228133" calcext:value-type="float">
            <text:p>34,800</text:p>
          </table:table-cell>
          <table:table-cell table:style-name="ce52" table:formula="of:=[.BN35]/[.BN34]" office:value-type="float" office:value="34339.0996834438" calcext:value-type="float">
            <text:p>34,339</text:p>
          </table:table-cell>
          <table:table-cell table:style-name="ce52" table:formula="of:=[.BO35]/[.BO34]" office:value-type="float" office:value="33896.078926835" calcext:value-type="float">
            <text:p>33,896</text:p>
          </table:table-cell>
          <table:table-cell table:style-name="ce52" table:formula="of:=[.BP35]/[.BP34]" office:value-type="float" office:value="33469.7019648343" calcext:value-type="float">
            <text:p>33,470</text:p>
          </table:table-cell>
          <table:table-cell table:style-name="ce52" table:formula="of:=[.BQ35]/[.BQ34]" office:value-type="float" office:value="33058.9628473492" calcext:value-type="float">
            <text:p>33,059</text:p>
          </table:table-cell>
          <table:table-cell table:style-name="ce52" table:formula="of:=[.BR35]/[.BR34]" office:value-type="float" office:value="32663.2336448828" calcext:value-type="float">
            <text:p>32,663</text:p>
          </table:table-cell>
          <table:table-cell table:style-name="ce52" table:formula="of:=[.BS35]/[.BS34]" office:value-type="float" office:value="32281.5964830285" calcext:value-type="float">
            <text:p>32,282</text:p>
          </table:table-cell>
          <table:table-cell table:style-name="ce52" table:formula="of:=[.BT35]/[.BT34]" office:value-type="float" office:value="31913.353548694" calcext:value-type="float">
            <text:p>31,913</text:p>
          </table:table-cell>
          <table:table-cell table:style-name="ce52" table:formula="of:=[.BU35]/[.BU34]" office:value-type="float" office:value="31558.2059479994" calcext:value-type="float">
            <text:p>31,558</text:p>
          </table:table-cell>
          <table:table-cell table:style-name="ce52" table:formula="of:=[.BV35]/[.BV34]" office:value-type="float" office:value="31215.1968837152" calcext:value-type="float">
            <text:p>31,215</text:p>
          </table:table-cell>
          <table:table-cell table:style-name="ce52" table:formula="of:=[.BW35]/[.BW34]" office:value-type="float" office:value="30883.9334095681" calcext:value-type="float">
            <text:p>30,884</text:p>
          </table:table-cell>
          <table:table-cell table:style-name="ce52" table:formula="of:=[.BX35]/[.BX34]" office:value-type="float" office:value="30563.5371679324" calcext:value-type="float">
            <text:p>30,564</text:p>
          </table:table-cell>
          <table:table-cell table:style-name="ce52" table:formula="of:=[.BY35]/[.BY34]" office:value-type="float" office:value="30254.0268475291" calcext:value-type="float">
            <text:p>30,254</text:p>
          </table:table-cell>
          <table:table-cell table:style-name="ce52" table:formula="of:=[.BZ35]/[.BZ34]" office:value-type="float" office:value="29954.7570115344" calcext:value-type="float">
            <text:p>29,955</text:p>
          </table:table-cell>
          <table:table-cell table:style-name="ce52" table:formula="of:=[.CA35]/[.CA34]" office:value-type="float" office:value="29664.9516849423" calcext:value-type="float">
            <text:p>29,665</text:p>
          </table:table-cell>
          <table:table-cell table:style-name="ce52" table:formula="of:=[.CB35]/[.CB34]" office:value-type="float" office:value="29384.4962162899" calcext:value-type="float">
            <text:p>29,384</text:p>
          </table:table-cell>
          <table:table-cell table:style-name="ce52" table:formula="of:=[.CC35]/[.CC34]" office:value-type="float" office:value="29112.8266197878" calcext:value-type="float">
            <text:p>29,113</text:p>
          </table:table-cell>
          <table:table-cell table:style-name="ce52" table:formula="of:=[.CD35]/[.CD34]" office:value-type="float" office:value="28849.6170998497" calcext:value-type="float">
            <text:p>28,850</text:p>
          </table:table-cell>
          <table:table-cell table:style-name="ce52" table:formula="of:=[.CE35]/[.CE34]" office:value-type="float" office:value="28594.4761508827" calcext:value-type="float">
            <text:p>28,594</text:p>
          </table:table-cell>
          <table:table-cell table:style-name="ce52" table:formula="of:=[.CF35]/[.CF34]" office:value-type="float" office:value="28347.0205533149" calcext:value-type="float">
            <text:p>28,347</text:p>
          </table:table-cell>
          <table:table-cell table:style-name="ce52" table:formula="of:=[.CG35]/[.CG34]" office:value-type="float" office:value="28107.1614989654" calcext:value-type="float">
            <text:p>28,107</text:p>
          </table:table-cell>
          <table:table-cell table:style-name="ce52" table:formula="of:=[.CH35]/[.CH34]" office:value-type="float" office:value="27874.3059903515" calcext:value-type="float">
            <text:p>27,874</text:p>
          </table:table-cell>
          <table:table-cell table:style-name="ce52" table:formula="of:=[.CI35]/[.CI34]" office:value-type="float" office:value="27648.3739188847" calcext:value-type="float">
            <text:p>27,648</text:p>
          </table:table-cell>
          <table:table-cell table:style-name="ce52" table:formula="of:=[.CJ35]/[.CJ34]" office:value-type="float" office:value="27429.0440503942" calcext:value-type="float">
            <text:p>27,429</text:p>
          </table:table-cell>
          <table:table-cell table:style-name="ce52" table:formula="of:=[.CK35]/[.CK34]" office:value-type="float" office:value="27216.0460378583" calcext:value-type="float">
            <text:p>27,216</text:p>
          </table:table-cell>
          <table:table-cell table:style-name="ce52" table:formula="of:=[.CL35]/[.CL34]" office:value-type="float" office:value="27009.0324448676" calcext:value-type="float">
            <text:p>27,009</text:p>
          </table:table-cell>
          <table:table-cell table:style-name="ce52" table:formula="of:=[.CM35]/[.CM34]" office:value-type="float" office:value="26807.8424001592" calcext:value-type="float">
            <text:p>26,808</text:p>
          </table:table-cell>
          <table:table-cell table:style-name="ce52" table:formula="of:=[.CN35]/[.CN34]" office:value-type="float" office:value="26612.337341775" calcext:value-type="float">
            <text:p>26,612</text:p>
          </table:table-cell>
          <table:table-cell table:style-name="ce52" table:formula="of:=[.CO35]/[.CO34]" office:value-type="float" office:value="26422.1740411458" calcext:value-type="float">
            <text:p>26,422</text:p>
          </table:table-cell>
          <table:table-cell table:style-name="ce52" table:formula="of:=[.CP35]/[.CP34]" office:value-type="float" office:value="26237.1657693223" calcext:value-type="float">
            <text:p>26,237</text:p>
          </table:table-cell>
          <table:table-cell table:style-name="ce52" table:formula="of:=[.CQ35]/[.CQ34]" office:value-type="float" office:value="26057.3731204213" calcext:value-type="float">
            <text:p>26,057</text:p>
          </table:table-cell>
          <table:table-cell table:style-name="ce52" table:formula="of:=[.CR35]/[.CR34]" office:value-type="float" office:value="25882.42180983" calcext:value-type="float">
            <text:p>25,882</text:p>
          </table:table-cell>
          <table:table-cell table:style-name="ce52" table:formula="of:=[.CS35]/[.CS34]" office:value-type="float" office:value="25712.3855151578" calcext:value-type="float">
            <text:p>25,712</text:p>
          </table:table-cell>
          <table:table-cell table:style-name="ce52" table:formula="of:=[.CT35]/[.CT34]" office:value-type="float" office:value="25546.8150899494" calcext:value-type="float">
            <text:p>25,547</text:p>
          </table:table-cell>
          <table:table-cell table:style-name="ce52" table:formula="of:=[.CU35]/[.CU34]" office:value-type="float" office:value="25385.8827717706" calcext:value-type="float">
            <text:p>25,386</text:p>
          </table:table-cell>
          <table:table-cell table:style-name="ce52" table:formula="of:=[.CV35]/[.CV34]" office:value-type="float" office:value="25229.1973397854" calcext:value-type="float">
            <text:p>25,229</text:p>
          </table:table-cell>
          <table:table-cell table:style-name="ce52" table:formula="of:=[.CW35]/[.CW34]" office:value-type="float" office:value="25076.6023072432" calcext:value-type="float">
            <text:p>25,077</text:p>
          </table:table-cell>
          <table:table-cell table:style-name="ce52" table:formula="of:=[.CX35]/[.CX34]" office:value-type="float" office:value="24927.8280147353" calcext:value-type="float">
            <text:p>24,928</text:p>
          </table:table-cell>
          <table:table-cell table:style-name="ce52" table:formula="of:=[.CY35]/[.CY34]" office:value-type="float" office:value="24782.8499530823" calcext:value-type="float">
            <text:p>24,783</text:p>
          </table:table-cell>
          <table:table-cell table:style-name="ce52" table:formula="of:=[.CZ35]/[.CZ34]" office:value-type="float" office:value="24641.6439404078" calcext:value-type="float">
            <text:p>24,642</text:p>
          </table:table-cell>
          <table:table-cell table:style-name="ce52" table:formula="of:=[.DA35]/[.DA34]" office:value-type="float" office:value="24503.9929082262" calcext:value-type="float">
            <text:p>24,504</text:p>
          </table:table-cell>
          <table:table-cell table:style-name="ce52" table:formula="of:=[.DB35]/[.DB34]" office:value-type="float" office:value="24369.7801526402" calcext:value-type="float">
            <text:p>24,370</text:p>
          </table:table-cell>
          <table:table-cell table:style-name="ce52" table:formula="of:=[.DC35]/[.DC34]" office:value-type="float" office:value="24238.9940637604" calcext:value-type="float">
            <text:p>24,239</text:p>
          </table:table-cell>
          <table:table-cell table:style-name="ce52" table:formula="of:=[.DD35]/[.DD34]" office:value-type="float" office:value="24111.3190384044" calcext:value-type="float">
            <text:p>24,111</text:p>
          </table:table-cell>
          <table:table-cell table:style-name="ce52" table:formula="of:=[.DE35]/[.DE34]" office:value-type="float" office:value="23986.8567613443" calcext:value-type="float">
            <text:p>23,987</text:p>
          </table:table-cell>
          <table:table-cell table:style-name="ce52" table:formula="of:=[.DF35]/[.DF34]" office:value-type="float" office:value="23865.4188044377" calcext:value-type="float">
            <text:p>23,865</text:p>
          </table:table-cell>
          <table:table-cell table:style-name="ce52" table:formula="of:=[.DG35]/[.DG34]" office:value-type="float" office:value="23746.7987375232" calcext:value-type="float">
            <text:p>23,747</text:p>
          </table:table-cell>
          <table:table-cell table:style-name="ce52" table:formula="of:=[.DH35]/[.DH34]" office:value-type="float" office:value="23631.1040973323" calcext:value-type="float">
            <text:p>23,631</text:p>
          </table:table-cell>
          <table:table-cell table:style-name="ce52" table:formula="of:=[.DI35]/[.DI34]" office:value-type="float" office:value="23518.1611027492" calcext:value-type="float">
            <text:p>23,518</text:p>
          </table:table-cell>
          <table:table-cell table:style-name="ce52" table:formula="of:=[.DJ35]/[.DJ34]" office:value-type="float" office:value="23407.9786641744" calcext:value-type="float">
            <text:p>23,408</text:p>
          </table:table-cell>
          <table:table-cell table:style-name="ce52" table:formula="of:=[.DK35]/[.DK34]" office:value-type="float" office:value="23300.3747505377" calcext:value-type="float">
            <text:p>23,300</text:p>
          </table:table-cell>
          <table:table-cell table:style-name="ce52" table:formula="of:=[.DL35]/[.DL34]" office:value-type="float" office:value="23195.2868224171" calcext:value-type="float">
            <text:p>23,195</text:p>
          </table:table-cell>
          <table:table-cell table:style-name="ce52" table:formula="of:=[.DM35]/[.DM34]" office:value-type="float" office:value="23092.5348035946" calcext:value-type="float">
            <text:p>23,093</text:p>
          </table:table-cell>
          <table:table-cell table:style-name="ce52" table:formula="of:=[.DN35]/[.DN34]" office:value-type="float" office:value="22992.1294613047" calcext:value-type="float">
            <text:p>22,992</text:p>
          </table:table-cell>
          <table:table-cell table:style-name="ce52" table:formula="of:=[.DO35]/[.DO34]" office:value-type="float" office:value="22894.0172641115" calcext:value-type="float">
            <text:p>22,894</text:p>
          </table:table-cell>
          <table:table-cell table:style-name="ce52" table:formula="of:=[.DP35]/[.DP34]" office:value-type="float" office:value="22798.1327985212" calcext:value-type="float">
            <text:p>22,798</text:p>
          </table:table-cell>
          <table:table-cell table:style-name="ce52" table:formula="of:=[.DQ35]/[.DQ34]" office:value-type="float" office:value="22544.7510465503" calcext:value-type="float">
            <text:p>22,545</text:p>
          </table:table-cell>
          <table:table-cell table:number-columns-repeated="16262"/>
        </table:table-row>
        <table:table-row table:style-name="ro1">
          <table:table-cell table:style-name="Default" office:value-type="string" calcext:value-type="string">
            <text:p>Year with best bid score</text:p>
          </table:table-cell>
          <table:table-cell table:style-name="ce52" table:formula="of:=MATCH(MIN([.B36:.DQ36]);[.B36:.DQ36];0)" office:value-type="float" office:value="120" calcext:value-type="float">
            <text:p>12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est bid</text:p>
          </table:table-cell>
          <table:table-cell table:style-name="ce46" table:formula="of:=INDEX([.$B35:.$DQ35];1;[.B37])" office:value-type="currency" office:currency="USD" office:value="1268.9773655365" calcext:value-type="currency">
            <text:p>$1,26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rude total carbon</text:p>
          </table:table-cell>
          <table:table-cell table:style-name="ce53" table:formula="of:=SUMIF([.$B29:.$DQ29];&quot;&lt;=&quot;&amp;[.B37];[.B30:.DQ30])" office:value-type="float" office:value="15.2441136251094" calcext:value-type="float">
            <text:p>15.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rude $/tC</text:p>
          </table:table-cell>
          <table:table-cell table:style-name="ce46" table:formula="of:=[.B38]/[.B39]" office:value-type="currency" office:currency="USD" office:value="83.2437619361679" calcext:value-type="currency">
            <text:p>$83</text:p>
          </table:table-cell>
          <table:table-cell table:number-columns-repeated="16381"/>
        </table:table-row>
        <table:table-row table:style-name="ro1" table:number-rows-repeated="1048530">
          <table:table-cell table:number-columns-repeated="16383"/>
        </table:table-row>
        <table:table-row table:style-name="ro2" table:number-rows-repeated="5">
          <table:table-cell table:number-columns-repeated="16383"/>
        </table:table-row>
        <table:table-row table:style-name="ro2"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number number:decimal-places="6" number:min-decimal-places="6" number:min-integer-digits="1"/>
    </number:number-style>
    <number:percentage-style style:name="N134">
      <number:number number:decimal-places="1" number:min-decimal-places="1" number:min-integer-digits="1"/>
      <number:text>%</number:text>
    </number:percentage-style>
    <number:number-style style:name="N135">
      <number:number number:decimal-places="1" number:min-decimal-places="1" number:min-integer-digits="1" number:grouping="true"/>
    </number:number-style>
    <number:number-style style:name="N136">
      <number:number number:decimal-places="14" number:min-decimal-places="14" number:min-integer-digits="1"/>
    </number:number-style>
    <number:currency-style style:name="N138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8P0"/>
    </number:currency-style>
    <number:currency-style style:name="N13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9P0"/>
    </number:currency-style>
    <number:currency-style style:name="N14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4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1P0"/>
    </number:currency-style>
    <number:currency-style style:name="N14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4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date-style style:name="N143">
      <number:month/>
      <number:text>/</number:text>
      <number:day/>
      <number:text>/</number:text>
      <number:year number:style="long"/>
    </number:date-style>
    <number:date-style style:name="N144">
      <number:day/>
      <number:text>-</number:text>
      <number:month number:textual="true"/>
      <number:text>-</number:text>
      <number:year/>
    </number:date-style>
    <number:date-style style:name="N145">
      <number:day/>
      <number:text>-</number:text>
      <number:month number:textual="true"/>
    </number:date-style>
    <number:date-style style:name="N146">
      <number:month number:textual="true"/>
      <number:text>-</number:text>
      <number:year/>
    </number:date-style>
    <number:time-style style:name="N147">
      <number:hours/>
      <number:text>:</number:text>
      <number:minutes number:style="long"/>
      <number:text> </number:text>
      <number:am-pm/>
    </number:time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9">
      <number:hours/>
      <number:text>:</number:text>
      <number:minutes number:style="long"/>
    </number:time-style>
    <number:time-style style:name="N150">
      <number:hours/>
      <number:text>:</number:text>
      <number:minutes number:style="long"/>
      <number:text>:</number:text>
      <number:seconds number:style="long"/>
    </number:time-style>
    <number:date-style style:name="N15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5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5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5P0"/>
    </number:number-style>
    <number:number-style style:name="N15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 loext:blank-width-char=")1">-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67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7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67">
      <number:text loext:blank-width-char="("> </number:text>
      <number:text-content/>
      <number:text loext:blank-width-char=")"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71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71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1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71">
      <number:text loext:blank-width-char="("> </number:text>
      <number:text-content/>
      <number:text loext:blank-width-char=")"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">
      <number:number number:decimal-places="4" number:min-decimal-places="4" number:min-integer-digits="1"/>
    </number:number-style>
    <number:number-style style:name="N173">
      <number:number number:decimal-places="1" number:min-decimal-places="1" number:min-integer-digits="1"/>
    </number:number-style>
    <number:number-style style:name="N174">
      <number:number number:decimal-places="3" number:min-decimal-places="3" number:min-integer-digits="1" number:grouping="true"/>
    </number:number-style>
    <number:number-style style:name="N175">
      <number:number number:decimal-places="4" number:min-decimal-places="4" number:min-integer-digits="1" number:grouping="true"/>
    </number:number-style>
    <number:number-style style:name="N176">
      <number:number number:decimal-places="5" number:min-decimal-places="5" number:min-integer-digits="1" number:grouping="true"/>
    </number:number-style>
    <number:number-style style:name="N177">
      <number:number number:decimal-places="6" number:min-decimal-places="6" number:min-integer-digits="1" number:grouping="true"/>
    </number:number-style>
    <number:number-style style:name="N178">
      <number:number number:decimal-places="7" number:min-decimal-places="7" number:min-integer-digits="1" number:grouping="true"/>
    </number:number-style>
    <number:number-style style:name="N179">
      <number:number number:decimal-places="8" number:min-decimal-places="8" number:min-integer-digits="1" number:grouping="true"/>
    </number:number-style>
    <number:number-style style:name="N180">
      <number:number number:decimal-places="9" number:min-decimal-places="9" number:min-integer-digits="1" number:grouping="true"/>
    </number:number-style>
    <number:number-style style:name="N181">
      <number:number number:decimal-places="10" number:min-decimal-places="10" number:min-integer-digits="1" number:grouping="true"/>
    </number:number-style>
    <number:currency-style style:name="N183P0" style:volatile="true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83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83P0"/>
    </number:currency-style>
    <number:number-style style:name="N184">
      <number:number number:decimal-places="16" number:min-decimal-places="16" number:min-integer-digits="1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 loext:blank-width-char=")"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 loext:blank-width-char=")"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currency-style style:name="N10149P0" style:volatile="true" number:language="en" number:country="US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0149" number:language="en" number:country="US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0149P0"/>
    </number:currency-style>
    <number:number-style style:name="N10150" number:language="en" number:country="US">
      <number:number number:decimal-places="1" number:min-decimal-places="1" number:min-integer-digits="1" number:grouping="true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1">00/00/0000</text:date>, <text:time style:data-style-name="N2" text:time-value="18:56:41.699879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tation_20_example" style:display-name="PageStyle_Plantation exampl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John F. Raffensperger</meta:initial-creator>
    <meta:creation-date>2026-07-02T19:58:07</meta:creation-date>
    <dc:date>2026-07-11T21:18:59.285803300</dc:date>
    <meta:editing-cycles>26</meta:editing-cycles>
    <meta:editing-duration>P1DT5H22M46S</meta:editing-duration>
    <meta:generator>LibreOffice/26.2.4.2$Windows_X86_64 LibreOffice_project/0229ac93fcf0d7cbc6376066c6f35021cef002dc</meta:generator>
    <meta:document-statistic meta:table-count="1" meta:cell-count="936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737cm" svg:height="13.352cm" xlink:href=".." xlink:type="simple" chart:class="chart:scatter" chart:style-name="ch1">
        <chart:title svg:x="9.771cm" svg:y="0.403cm" chart:style-name="ch2">
          <text:p>Bid[1,t]/W[forestry,t]</text:p>
        </chart:title>
        <chart:plot-area chart:style-name="ch3" svg:x="0.474cm" svg:y="1.475cm" svg:width="22.789cm" svg:height="11.61cm">
          <chart:coordinate-region svg:x="2.294cm" svg:y="1.671cm" svg:width="20.673cm" svg:height="10.77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Plantation example'.L36:'Plantation example'.DQ36" chart:class="chart:scatter">
            <chart:domain table:cell-range-address="'Plantation example'.L32:'Plantation example'.DQ32"/>
            <chart:data-point chart:repeated="1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</table:table-row>
          </table:table-header-rows>
          <table:table-rows>
            <table:table-row>
              <table:table-cell office:value-type="string">
                <text:p>Row 32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'Plantation example'.L32:'Plantation example'.DQ32</svg:desc>
                </draw:g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102">
                <text:p>102</text:p>
              </table:table-cell>
              <table:table-cell office:value-type="float" office:value="103">
                <text:p>103</text:p>
              </table:table-cell>
              <table:table-cell office:value-type="float" office:value="104">
                <text:p>104</text:p>
              </table:table-cell>
              <table:table-cell office:value-type="float" office:value="105">
                <text:p>105</text:p>
              </table:table-cell>
              <table:table-cell office:value-type="float" office:value="106">
                <text:p>106</text:p>
              </table:table-cell>
              <table:table-cell office:value-type="float" office:value="107">
                <text:p>107</text:p>
              </table:table-cell>
              <table:table-cell office:value-type="float" office:value="108">
                <text:p>108</text:p>
              </table:table-cell>
              <table:table-cell office:value-type="float" office:value="109">
                <text:p>109</text:p>
              </table:table-cell>
              <table:table-cell office:value-type="float" office:value="110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113">
                <text:p>113</text:p>
              </table:table-cell>
              <table:table-cell office:value-type="float" office:value="114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117">
                <text:p>117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Row 36</text:p>
                <draw:g>
                  <svg:desc/>
                </draw:g>
              </table:table-cell>
              <table:table-cell office:value-type="float" office:value="328328.132993926">
                <text:p>328328.132993926</text:p>
                <draw:g>
                  <svg:desc>'Plantation example'.L36:'Plantation example'.DQ36</svg:desc>
                </draw:g>
              </table:table-cell>
              <table:table-cell office:value-type="float" office:value="286264.432209059">
                <text:p>286264.432209059</text:p>
              </table:table-cell>
              <table:table-cell office:value-type="float" office:value="252854.117746585">
                <text:p>252854.117746585</text:p>
              </table:table-cell>
              <table:table-cell office:value-type="float" office:value="225804.582246091">
                <text:p>225804.582246091</text:p>
              </table:table-cell>
              <table:table-cell office:value-type="float" office:value="203536.592116236">
                <text:p>203536.592116236</text:p>
              </table:table-cell>
              <table:table-cell office:value-type="float" office:value="184937.909263356">
                <text:p>184937.909263356</text:p>
              </table:table-cell>
              <table:table-cell office:value-type="float" office:value="169210.311921698">
                <text:p>169210.311921698</text:p>
              </table:table-cell>
              <table:table-cell office:value-type="float" office:value="155778.928658212">
                <text:p>155778.928658212</text:p>
              </table:table-cell>
              <table:table-cell office:value-type="float" office:value="144199.601872231">
                <text:p>144199.601872231</text:p>
              </table:table-cell>
              <table:table-cell office:value-type="float" office:value="134126.878838009">
                <text:p>134126.878838009</text:p>
              </table:table-cell>
              <table:table-cell office:value-type="float" office:value="125301.240196293">
                <text:p>125301.240196293</text:p>
              </table:table-cell>
              <table:table-cell office:value-type="float" office:value="117520.098600231">
                <text:p>117520.098600231</text:p>
              </table:table-cell>
              <table:table-cell office:value-type="float" office:value="110615.081491285">
                <text:p>110615.081491285</text:p>
              </table:table-cell>
              <table:table-cell office:value-type="float" office:value="104453.094874645">
                <text:p>104453.094874645</text:p>
              </table:table-cell>
              <table:table-cell office:value-type="float" office:value="98928.3209218561">
                <text:p>98928.3209218561</text:p>
              </table:table-cell>
              <table:table-cell office:value-type="float" office:value="93951.7613051121">
                <text:p>93951.7613051121</text:p>
              </table:table-cell>
              <table:table-cell office:value-type="float" office:value="89450.1881444163">
                <text:p>89450.1881444163</text:p>
              </table:table-cell>
              <table:table-cell office:value-type="float" office:value="85362.3573316658">
                <text:p>85362.3573316658</text:p>
              </table:table-cell>
              <table:table-cell office:value-type="float" office:value="81636.8684470011">
                <text:p>81636.8684470011</text:p>
              </table:table-cell>
              <table:table-cell office:value-type="float" office:value="78228.9487210217">
                <text:p>78228.9487210217</text:p>
              </table:table-cell>
              <table:table-cell office:value-type="float" office:value="75101.8773854549">
                <text:p>75101.8773854549</text:p>
              </table:table-cell>
              <table:table-cell office:value-type="float" office:value="72224.3987214467">
                <text:p>72224.3987214467</text:p>
              </table:table-cell>
              <table:table-cell office:value-type="float" office:value="69569.47520344">
                <text:p>69569.47520344</text:p>
              </table:table-cell>
              <table:table-cell office:value-type="float" office:value="67114.8634568127">
                <text:p>67114.8634568127</text:p>
              </table:table-cell>
              <table:table-cell office:value-type="float" office:value="64836.5712821463">
                <text:p>64836.5712821463</text:p>
              </table:table-cell>
              <table:table-cell office:value-type="float" office:value="62718.593975164">
                <text:p>62718.593975164</text:p>
              </table:table-cell>
              <table:table-cell office:value-type="float" office:value="60745.7420664347">
                <text:p>60745.7420664347</text:p>
              </table:table-cell>
              <table:table-cell office:value-type="float" office:value="58904.5392693493">
                <text:p>58904.5392693493</text:p>
              </table:table-cell>
              <table:table-cell office:value-type="float" office:value="57183.8071293606">
                <text:p>57183.8071293606</text:p>
              </table:table-cell>
              <table:table-cell office:value-type="float" office:value="55571.6223826878">
                <text:p>55571.6223826878</text:p>
              </table:table-cell>
              <table:table-cell office:value-type="float" office:value="54059.6810429057">
                <text:p>54059.6810429057</text:p>
              </table:table-cell>
              <table:table-cell office:value-type="float" office:value="52639.9974812353">
                <text:p>52639.9974812353</text:p>
              </table:table-cell>
              <table:table-cell office:value-type="float" office:value="51305.8217548711">
                <text:p>51305.8217548711</text:p>
              </table:table-cell>
              <table:table-cell office:value-type="float" office:value="50048.7533351239">
                <text:p>50048.7533351239</text:p>
              </table:table-cell>
              <table:table-cell office:value-type="float" office:value="48863.2553580752">
                <text:p>48863.2553580752</text:p>
              </table:table-cell>
              <table:table-cell office:value-type="float" office:value="47743.840169086">
                <text:p>47743.840169086</text:p>
              </table:table-cell>
              <table:table-cell office:value-type="float" office:value="46684.2763904162">
                <text:p>46684.2763904162</text:p>
              </table:table-cell>
              <table:table-cell office:value-type="float" office:value="45681.5042735849">
                <text:p>45681.5042735849</text:p>
              </table:table-cell>
              <table:table-cell office:value-type="float" office:value="44730.2909364842">
                <text:p>44730.2909364842</text:p>
              </table:table-cell>
              <table:table-cell office:value-type="float" office:value="43826.968574089">
                <text:p>43826.968574089</text:p>
              </table:table-cell>
              <table:table-cell office:value-type="float" office:value="42968.9980278092">
                <text:p>42968.9980278092</text:p>
              </table:table-cell>
              <table:table-cell office:value-type="float" office:value="42152.5417255658">
                <text:p>42152.5417255658</text:p>
              </table:table-cell>
              <table:table-cell office:value-type="float" office:value="41376.219661903">
                <text:p>41376.219661903</text:p>
              </table:table-cell>
              <table:table-cell office:value-type="float" office:value="40636.2322112589">
                <text:p>40636.2322112589</text:p>
              </table:table-cell>
              <table:table-cell office:value-type="float" office:value="39930.6006767407">
                <text:p>39930.6006767407</text:p>
              </table:table-cell>
              <table:table-cell office:value-type="float" office:value="39256.6112106786">
                <text:p>39256.6112106786</text:p>
              </table:table-cell>
              <table:table-cell office:value-type="float" office:value="38612.0557859173">
                <text:p>38612.0557859173</text:p>
              </table:table-cell>
              <table:table-cell office:value-type="float" office:value="37995.3805758844">
                <text:p>37995.3805758844</text:p>
              </table:table-cell>
              <table:table-cell office:value-type="float" office:value="37405.2207268426">
                <text:p>37405.2207268426</text:p>
              </table:table-cell>
              <table:table-cell office:value-type="float" office:value="36839.9321077608">
                <text:p>36839.9321077608</text:p>
              </table:table-cell>
              <table:table-cell office:value-type="float" office:value="36297.8974374238">
                <text:p>36297.8974374238</text:p>
              </table:table-cell>
              <table:table-cell office:value-type="float" office:value="35778.088678353">
                <text:p>35778.088678353</text:p>
              </table:table-cell>
              <table:table-cell office:value-type="float" office:value="35279.0144268958">
                <text:p>35279.0144268958</text:p>
              </table:table-cell>
              <table:table-cell office:value-type="float" office:value="34799.7504228133">
                <text:p>34799.7504228133</text:p>
              </table:table-cell>
              <table:table-cell office:value-type="float" office:value="34339.0996834438">
                <text:p>34339.0996834438</text:p>
              </table:table-cell>
              <table:table-cell office:value-type="float" office:value="33896.078926835">
                <text:p>33896.078926835</text:p>
              </table:table-cell>
              <table:table-cell office:value-type="float" office:value="33469.7019648343">
                <text:p>33469.7019648343</text:p>
              </table:table-cell>
              <table:table-cell office:value-type="float" office:value="33058.9628473492">
                <text:p>33058.9628473492</text:p>
              </table:table-cell>
              <table:table-cell office:value-type="float" office:value="32663.2336448828">
                <text:p>32663.2336448828</text:p>
              </table:table-cell>
              <table:table-cell office:value-type="float" office:value="32281.5964830285">
                <text:p>32281.5964830285</text:p>
              </table:table-cell>
              <table:table-cell office:value-type="float" office:value="31913.353548694">
                <text:p>31913.353548694</text:p>
              </table:table-cell>
              <table:table-cell office:value-type="float" office:value="31558.2059479994">
                <text:p>31558.2059479994</text:p>
              </table:table-cell>
              <table:table-cell office:value-type="float" office:value="31215.1968837152">
                <text:p>31215.1968837152</text:p>
              </table:table-cell>
              <table:table-cell office:value-type="float" office:value="30883.9334095681">
                <text:p>30883.9334095681</text:p>
              </table:table-cell>
              <table:table-cell office:value-type="float" office:value="30563.5371679324">
                <text:p>30563.5371679324</text:p>
              </table:table-cell>
              <table:table-cell office:value-type="float" office:value="30254.0268475291">
                <text:p>30254.0268475291</text:p>
              </table:table-cell>
              <table:table-cell office:value-type="float" office:value="29954.7570115344">
                <text:p>29954.7570115344</text:p>
              </table:table-cell>
              <table:table-cell office:value-type="float" office:value="29664.9516849423">
                <text:p>29664.9516849423</text:p>
              </table:table-cell>
              <table:table-cell office:value-type="float" office:value="29384.4962162899">
                <text:p>29384.4962162899</text:p>
              </table:table-cell>
              <table:table-cell office:value-type="float" office:value="29112.8266197878">
                <text:p>29112.8266197878</text:p>
              </table:table-cell>
              <table:table-cell office:value-type="float" office:value="28849.6170998497">
                <text:p>28849.6170998497</text:p>
              </table:table-cell>
              <table:table-cell office:value-type="float" office:value="28594.4761508827">
                <text:p>28594.4761508827</text:p>
              </table:table-cell>
              <table:table-cell office:value-type="float" office:value="28347.0205533149">
                <text:p>28347.0205533149</text:p>
              </table:table-cell>
              <table:table-cell office:value-type="float" office:value="28107.1614989654">
                <text:p>28107.1614989654</text:p>
              </table:table-cell>
              <table:table-cell office:value-type="float" office:value="27874.3059903515">
                <text:p>27874.3059903515</text:p>
              </table:table-cell>
              <table:table-cell office:value-type="float" office:value="27648.3739188847">
                <text:p>27648.3739188847</text:p>
              </table:table-cell>
              <table:table-cell office:value-type="float" office:value="27429.0440503942">
                <text:p>27429.0440503942</text:p>
              </table:table-cell>
              <table:table-cell office:value-type="float" office:value="27216.0460378583">
                <text:p>27216.0460378583</text:p>
              </table:table-cell>
              <table:table-cell office:value-type="float" office:value="27009.0324448676">
                <text:p>27009.0324448676</text:p>
              </table:table-cell>
              <table:table-cell office:value-type="float" office:value="26807.8424001592">
                <text:p>26807.8424001592</text:p>
              </table:table-cell>
              <table:table-cell office:value-type="float" office:value="26612.337341775">
                <text:p>26612.337341775</text:p>
              </table:table-cell>
              <table:table-cell office:value-type="float" office:value="26422.1740411458">
                <text:p>26422.1740411458</text:p>
              </table:table-cell>
              <table:table-cell office:value-type="float" office:value="26237.1657693223">
                <text:p>26237.1657693223</text:p>
              </table:table-cell>
              <table:table-cell office:value-type="float" office:value="26057.3731204213">
                <text:p>26057.3731204213</text:p>
              </table:table-cell>
              <table:table-cell office:value-type="float" office:value="25882.42180983">
                <text:p>25882.42180983</text:p>
              </table:table-cell>
              <table:table-cell office:value-type="float" office:value="25712.3855151578">
                <text:p>25712.3855151578</text:p>
              </table:table-cell>
              <table:table-cell office:value-type="float" office:value="25546.8150899494">
                <text:p>25546.8150899494</text:p>
              </table:table-cell>
              <table:table-cell office:value-type="float" office:value="25385.8827717706">
                <text:p>25385.8827717706</text:p>
              </table:table-cell>
              <table:table-cell office:value-type="float" office:value="25229.1973397854">
                <text:p>25229.1973397854</text:p>
              </table:table-cell>
              <table:table-cell office:value-type="float" office:value="25076.6023072432">
                <text:p>25076.6023072432</text:p>
              </table:table-cell>
              <table:table-cell office:value-type="float" office:value="24927.8280147353">
                <text:p>24927.8280147353</text:p>
              </table:table-cell>
              <table:table-cell office:value-type="float" office:value="24782.8499530823">
                <text:p>24782.8499530823</text:p>
              </table:table-cell>
              <table:table-cell office:value-type="float" office:value="24641.6439404078">
                <text:p>24641.6439404078</text:p>
              </table:table-cell>
              <table:table-cell office:value-type="float" office:value="24503.9929082262">
                <text:p>24503.9929082262</text:p>
              </table:table-cell>
              <table:table-cell office:value-type="float" office:value="24369.7801526402">
                <text:p>24369.7801526402</text:p>
              </table:table-cell>
              <table:table-cell office:value-type="float" office:value="24238.9940637604">
                <text:p>24238.9940637604</text:p>
              </table:table-cell>
              <table:table-cell office:value-type="float" office:value="24111.3190384044">
                <text:p>24111.3190384044</text:p>
              </table:table-cell>
              <table:table-cell office:value-type="float" office:value="23986.8567613443">
                <text:p>23986.8567613443</text:p>
              </table:table-cell>
              <table:table-cell office:value-type="float" office:value="23865.4188044377">
                <text:p>23865.4188044377</text:p>
              </table:table-cell>
              <table:table-cell office:value-type="float" office:value="23746.7987375232">
                <text:p>23746.7987375232</text:p>
              </table:table-cell>
              <table:table-cell office:value-type="float" office:value="23631.1040973323">
                <text:p>23631.1040973323</text:p>
              </table:table-cell>
              <table:table-cell office:value-type="float" office:value="23518.1611027492">
                <text:p>23518.1611027492</text:p>
              </table:table-cell>
              <table:table-cell office:value-type="float" office:value="23407.9786641744">
                <text:p>23407.9786641744</text:p>
              </table:table-cell>
              <table:table-cell office:value-type="float" office:value="23300.3747505377">
                <text:p>23300.3747505377</text:p>
              </table:table-cell>
              <table:table-cell office:value-type="float" office:value="23195.2868224171">
                <text:p>23195.2868224171</text:p>
              </table:table-cell>
              <table:table-cell office:value-type="float" office:value="23092.5348035946">
                <text:p>23092.5348035946</text:p>
              </table:table-cell>
              <table:table-cell office:value-type="float" office:value="22992.1294613047">
                <text:p>22992.1294613047</text:p>
              </table:table-cell>
              <table:table-cell office:value-type="float" office:value="22894.0172641115">
                <text:p>22894.0172641115</text:p>
              </table:table-cell>
              <table:table-cell office:value-type="float" office:value="22798.1327985212">
                <text:p>22798.1327985212</text:p>
              </table:table-cell>
              <table:table-cell office:value-type="float" office:value="22544.7510465503">
                <text:p>22544.75104655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6.2.4.2$Windows_X86_64 LibreOffice_project/0229ac93fcf0d7cbc6376066c6f35021cef002dc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