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53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lantation_20_exampl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en" number:country="US">
      <number:number number:decimal-places="2" number:min-decimal-places="2" number:min-integer-digits="1" number:grouping="true"/>
    </number:number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 fo:padding="0.028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#e6e6e6" fo:border="0.54pt solid #a0a0a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padding="0.028in"/>
      <style:text-properties fo:color="#bf0041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5" style:family="table-cell" style:parent-style-name="Default" style:data-style-name="N11">
      <style:table-cell-properties fo:padding="0.028in"/>
    </style:style>
    <style:style style:name="ce28" style:family="table-cell" style:parent-style-name="Default" style:data-style-name="N10103">
      <style:table-cell-properties fo:padding="0.028in"/>
      <style:text-properties fo:color="#bf0041"/>
    </style:style>
    <style:style style:name="ce7" style:family="table-cell" style:parent-style-name="Default" style:data-style-name="N10">
      <style:table-cell-properties fo:padding="0.028in"/>
    </style:style>
    <style:style style:name="ce8" style:family="table-cell" style:parent-style-name="Default" style:data-style-name="N10103">
      <style:table-cell-properties fo:background-color="#eeeeee" style:diagonal-bl-tr="none" style:diagonal-tl-br="none" fo:border="0.74pt solid #999999" fo:padding="0.028in" style:rotation-align="none"/>
    </style:style>
    <style:style style:name="ce25" style:family="table-cell" style:parent-style-name="Default">
      <style:table-cell-properties fo:padding="0.028in"/>
      <style:text-properties style:text-underline-style="none" fo:font-weight="bold" style:font-weight-asian="bold" style:font-weight-complex="bold"/>
    </style:style>
    <style:style style:name="ce49" style:family="table-cell" style:parent-style-name="Default" style:data-style-name="N10004">
      <style:table-cell-properties fo:padding="0.028in"/>
      <style:text-properties fo:color="#bf0041"/>
    </style:style>
    <style:style style:name="ce50" style:family="table-cell" style:parent-style-name="Default" style:data-style-name="N104">
      <style:table-cell-properties fo:background-color="#eeeeee" style:diagonal-bl-tr="none" style:diagonal-tl-br="none" fo:border="0.74pt solid #999999" fo:padding="0.028in" style:rotation-align="none"/>
    </style:style>
    <style:style style:name="ce46" style:family="table-cell" style:parent-style-name="Default" style:data-style-name="N103">
      <style:table-cell-properties fo:background-color="#e6e6e6" fo:border="0.54pt solid #a0a0a0"/>
      <style:text-properties fo:font-weight="normal" style:font-weight-asian="normal" style:font-weight-complex="normal"/>
    </style:style>
    <style:style style:name="ce52" style:family="table-cell" style:parent-style-name="Default" style:data-style-name="N3">
      <style:table-cell-properties fo:background-color="#e6e6e6" fo:border="0.54pt solid #a0a0a0"/>
    </style:style>
    <style:style style:name="ce53" style:family="table-cell" style:parent-style-name="Default" style:data-style-name="N135">
      <style:table-cell-properties fo:background-color="#e6e6e6" fo:border="0.54pt solid #a0a0a0"/>
    </style:style>
    <style:style style:name="ce39" style:family="table-cell" style:parent-style-name="Default" style:data-style-name="N175"/>
    <style:style style:name="ce6" style:family="table-cell" style:parent-style-name="Default" style:data-style-name="N10103">
      <style:table-cell-properties fo:padding="0.028in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175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lantation example" table:style-name="ta1">
        <office:forms form:automatic-focus="false" form:apply-design-mode="false"/>
        <table:shapes>
          <draw:frame draw:z-index="0" draw:style-name="gr1" draw:text-style-name="P1" svg:width="9.3449in" svg:height="5.2563in" svg:x="8.9606in" svg:y="0.7787in">
            <draw:object draw:notify-on-update-of-ranges="'Plantation example'.L34:'Plantation example'.DQ34 'Plantation example'.L38:'Plantation example'.DQ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51" table:default-cell-style-name="ce2"/>
        <table:table-column table:style-name="co2" table:number-columns-repeated="16131" table:default-cell-style-name="Default"/>
        <table:table-row table:style-name="ro1">
          <table:table-cell table:style-name="ce1" office:value-type="string" calcext:value-type="string">
            <text:p>Busch 2024 plantation example (same baseline pixel assumptions as NR sheet). I think this is the best I can do: calculate the score for a bid[1,Y] without harvest, where Y is the deadline.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<text:span text:style-name="T1">'</text:span><text:span text:style-name="T2">I use Busch et al data to show how I calculate the carbon schedule, warming effects, and bid for a given pixel for a plantation.</text:span>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2"/>
          <table:table-cell table:number-columns-repeated="16381"/>
        </table:table-row>
        <table:table-row table:style-name="ro1">
          <table:table-cell table:style-name="Default"/>
          <table:table-cell table:style-name="ce23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so</text:p>
          </table:table-cell>
          <table:table-cell table:style-name="ce21" office:value-type="string" calcext:value-type="string">
            <text:p>BRA</text:p>
          </table:table-cell>
          <table:table-cell/>
          <table:table-cell table:style-name="Default" table:number-columns-repeated="2"/>
          <table:table-cell table:style-name="ce21" office:value-type="string" calcext:value-type="string">
            <text:p>B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tation_genus</text:p>
          </table:table-cell>
          <table:table-cell table:style-name="ce21" office:value-type="string" calcext:value-type="string">
            <text:p>pinu</text:p>
          </table:table-cell>
          <table:table-cell/>
          <table:table-cell table:style-name="Default" table:number-columns-repeated="2"/>
          <table:table-cell table:style-name="ce21" office:value-type="string" calcext:value-type="string">
            <text:p>pinu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4" office:value-type="string" calcext:value-type="string">
            <text:p>PLANTATION_SOIL_C</text:p>
          </table:table-cell>
          <table:table-cell table:style-name="ce23" table:formula="of:=RAND()*2*[.F7]" office:value-type="float" office:value="0.0256513734128208" calcext:value-type="float">
            <text:p>0.0256513734128208</text:p>
          </table:table-cell>
          <table:table-cell table:number-columns-repeated="2"/>
          <table:table-cell table:style-name="Default" office:value-type="float" office:value="0.146299856398338" calcext:value-type="float">
            <text:p>0.146299856398338</text:p>
          </table:table-cell>
          <table:table-cell office:value-type="float" office:value="0.092749069" calcext:value-type="float">
            <text:p>0.092749069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0" office:value-type="string" calcext:value-type="string">
            <text:p>pl_rootshoot</text:p>
          </table:table-cell>
          <table:table-cell table:style-name="ce23" table:formula="of:=RAND()*2*[.F8]" office:value-type="float" office:value="0.0931059063385789" calcext:value-type="float">
            <text:p>0.0931059063385789</text:p>
          </table:table-cell>
          <table:table-cell table:style-name="Default" table:number-columns-repeated="2"/>
          <table:table-cell table:style-name="Default" office:value-type="float" office:value="0.137419203069018" calcext:value-type="float">
            <text:p>0.137419203069018</text:p>
          </table:table-cell>
          <table:table-cell office:value-type="float" office:value="0.26" calcext:value-type="float">
            <text:p>0.26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0" office:value-type="string" calcext:value-type="string">
            <text:p>w (wood storage share)</text:p>
          </table:table-cell>
          <table:table-cell table:style-name="ce23" table:formula="of:=RAND()*2*[.F9]" office:value-type="float" office:value="0.21331391796418" calcext:value-type="float">
            <text:p>0.21331391796418</text:p>
          </table:table-cell>
          <table:table-cell table:style-name="Default" table:number-columns-repeated="2"/>
          <table:table-cell table:style-name="Default" office:value-type="float" office:value="0.178351926446948" calcext:value-type="float">
            <text:p>0.178351926446948</text:p>
          </table:table-cell>
          <table:table-cell office:value-type="float" office:value="0.268" calcext:value-type="float">
            <text:p>0.268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A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BGB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table:style-name="ce11" office:value-type="string" calcext:value-type="string">
            <text:p>SOIL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HARVEST_C_POO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inary switch, include pool or n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cost_inflator_2011_to_2020</text:p>
          </table:table-cell>
          <table:table-cell table:style-name="ce5" office:value-type="percentage" office:value="1.1577" calcext:value-type="percentage">
            <text:p>115.77%</text:p>
          </table:table-cell>
          <table:table-cell table:style-name="Default"/>
          <table:table-cell/>
          <table:table-cell office:value-type="float" office:value="1.1577" calcext:value-type="float">
            <text:p>1.1577</text:p>
          </table:table-cell>
          <table:table-cell table:style-name="ce5" office:value-type="percentage" office:value="1.1577" calcext:value-type="percentage">
            <text:p>115.7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_cost_2011_USD_per_ha, Exotic plantation establishment cost per hectare in 2020 USD.</text:p>
          </table:table-cell>
          <table:table-cell table:style-name="ce28" table:formula="of:=RAND()*2*[.F15]" office:value-type="currency" office:currency="USD" office:value="781.700503494902" calcext:value-type="currency">
            <text:p>$782</text:p>
          </table:table-cell>
          <table:table-cell table:style-name="Default"/>
          <table:table-cell/>
          <table:table-cell office:value-type="float" office:value="146.767749996302" calcext:value-type="float">
            <text:p>146.767749996302</text:p>
          </table:table-cell>
          <table:table-cell table:style-name="ce6" office:value-type="currency" office:currency="USD" office:value="500" calcext:value-type="currency">
            <text:p>$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otic_share, Country-level share of plantations that are exotic species.</text:p>
          </table:table-cell>
          <table:table-cell table:style-name="ce7" office:value-type="percentage" office:value="0.97" calcext:value-type="percentage">
            <text:p>97%</text:p>
          </table:table-cell>
          <table:table-cell table:style-name="Default"/>
          <table:table-cell/>
          <table:table-cell office:value-type="float" office:value="0.97" calcext:value-type="float">
            <text:p>0.97</text:p>
          </table:table-cell>
          <table:table-cell table:style-name="ce7" office:value-type="percentage" office:value="0.97" calcext:value-type="percentage">
            <text:p>9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p_cost_2011_USD_per_ha, Native plantation establishment cost per hectare in 2020 USD.</text:p>
          </table:table-cell>
          <table:table-cell table:style-name="ce28" table:formula="of:=RAND()*2*[.F17]" office:value-type="currency" office:currency="USD" office:value="806.3690262596" calcext:value-type="currency">
            <text:p>$806</text:p>
          </table:table-cell>
          <table:table-cell table:style-name="Default"/>
          <table:table-cell/>
          <table:table-cell office:value-type="float" office:value="799.548755423708" calcext:value-type="float">
            <text:p>799.548755423708</text:p>
          </table:table-cell>
          <table:table-cell table:style-name="ce6" office:value-type="currency" office:currency="USD" office:value="500" calcext:value-type="currency">
            <text:p>$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up cost</text:p>
          </table:table-cell>
          <table:table-cell table:style-name="ce8" table:formula="of:=[.B14]*([.B15]*[.B16]+[.B17]*(1-[.B16]))" office:value-type="currency" office:currency="USD" office:value="905.831435360188" calcext:value-type="currency">
            <text:p>$906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Opportunity cost of land $/ha/year, crop_va_USD_per_ha_per_year</text:p>
          </table:table-cell>
          <table:table-cell table:style-name="ce28" table:formula="of:=RAND()*2*[.F19]" office:value-type="currency" office:currency="USD" office:value="42.1206921285148" calcext:value-type="currency">
            <text:p>$42</text:p>
          </table:table-cell>
          <table:table-cell table:number-columns-repeated="2"/>
          <table:table-cell office:value-type="float" office:value="63.7462629530422" calcext:value-type="float">
            <text:p>63.7462629530422</text:p>
          </table:table-cell>
          <table:table-cell table:style-name="ce6" office:value-type="currency" office:currency="USD" office:value="50" calcext:value-type="currency">
            <text:p>$50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Discount_rate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elected_plantation_rotation_year (mapped)</text:p>
          </table:table-cell>
          <table:table-cell table:style-name="ce25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25" office:value-type="float" office:value="120" calcext:value-type="float">
            <text:p>120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Present value of land opportunity costs, Plantation net present value establishment cost per hectare, pl_npv_estcost_USD_per_ha = init_cost</text:p>
          </table:table-cell>
          <table:table-cell table:style-name="ce8" table:formula="of:=[.B19]*(1-(1+[.B20])^(-[.$B$21]))/[.B20]" office:value-type="currency" office:currency="USD" office:value="1363.57411841954" calcext:value-type="currency">
            <text:p>$1,364</text:p>
          </table:table-cell>
          <table:table-cell office:value-type="string" calcext:value-type="string">
            <text:p>Payments at end of year.</text:p>
          </table:table-cell>
          <table:table-cell table:number-columns-repeated="9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Wood-product revenue with harvest, p_USD_per_tC_harvested</text:p>
          </table:table-cell>
          <table:table-cell table:style-name="ce28" table:formula="of:=RAND()*2*[.F23]" office:value-type="currency" office:currency="USD" office:value="47.1828349251052" calcext:value-type="currency">
            <text:p>$47</text:p>
          </table:table-cell>
          <table:table-cell office:value-type="string" calcext:value-type="string">
            <text:p>Present value of harvest revenue is small, while the warming impact is large. Should probably never harvest!</text:p>
          </table:table-cell>
          <table:table-cell table:number-columns-repeated="2"/>
          <table:table-cell table:style-name="ce6" office:value-type="currency" office:currency="USD" office:value="61.04" calcext:value-type="currency">
            <text:p>$61</text:p>
          </table:table-cell>
          <table:table-cell table:number-columns-repeated="6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Chapman growth factor, pl_A</text:p>
          </table:table-cell>
          <table:table-cell table:style-name="ce49" table:formula="of:=RAND()*2*[.F24]" office:value-type="float" office:value="14.5541751372667" calcext:value-type="float">
            <text:p>14.55</text:p>
          </table:table-cell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Chapman growth factor, pl_k</text:p>
          </table:table-cell>
          <table:table-cell table:style-name="ce49" table:formula="of:=RAND()*2*[.F25]" office:value-type="float" office:value="0.0153836266213119" calcext:value-type="float">
            <text:p>0.02</text:p>
          </table:table-cell>
          <table:table-cell table:style-name="Default"/>
          <table:table-cell/>
          <table:table-cell table:style-name="Default"/>
          <table:table-cell office:value-type="float" office:value="0.03" calcext:value-type="float">
            <text:p>0.03</text:p>
          </table:table-cell>
          <table:table-cell table:style-name="Default" table:number-columns-repeated="118"/>
          <table:table-cell table:number-columns-repeated="16259"/>
        </table:table-row>
        <table:table-row table:style-name="ro1">
          <table:table-cell office:value-type="string" calcext:value-type="string">
            <text:p>Present value of wood harvest revenue, from plantation harvested C/ha over the time horizon, pl_harvested_tC_per_ha, from g_harvested_cum_tC_per_ha</text:p>
          </table:table-cell>
          <table:table-cell table:style-name="ce8" table:formula="of:=-[.B23]*[.B24]*(1-EXP(-[.B25]*[.B21]))^2/(1+[.B20])^[.B21]" office:value-type="currency" office:currency="USD" office:value="-14.0304428705035" calcext:value-type="currency">
            <text:p>-$14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MDAMAGE bid $/ha discounted to year 0 of contract </text:p>
          </table:table-cell>
          <table:table-cell table:style-name="ce50" table:formula="of:=[.B18]+[.B22]+[.B26]" office:value-type="currency" office:currency="USD" office:value="2255.37511090923" calcext:value-type="currency">
            <text:p>$2,255.38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style-name="ce3" office:value-type="string" calcext:value-type="string">
            <text:p>SMDAMAGE bid $/ha discounted to year 0 of contract, collected terms</text:p>
          </table:table-cell>
          <table:table-cell table:style-name="ce50" table:formula="of:=[.B14]*([.B15]*[.B16]+[.B17]*(1-[.B16])) + [.B19]*(1-(1+[.B20])^(-[.B21]))/[.B20] - [.B23]*[.B24]*(1-EXP(-[.B25]*[.B21]))^2/(1+[.B20])^[.B21]" office:value-type="currency" office:currency="USD" office:value="2255.37511090923" calcext:value-type="currency">
            <text:p>$2,255.38</text:p>
          </table:table-cell>
          <table:table-cell table:number-columns-repeated="10"/>
          <table:table-cell table:style-name="Default"/>
          <table:table-cell table:number-columns-repeated="16370"/>
        </table:table-row>
        <table:table-row table:style-name="ro1">
          <table:table-cell table:style-name="Default" table:number-columns-repeated="252"/>
          <table:table-cell table:number-columns-repeated="16131"/>
        </table:table-row>
        <table:table-row table:style-name="ro1">
          <table:table-cell table:style-name="ce1" office:value-type="string" calcext:value-type="string">
            <text:p>Planting 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262"/>
        </table:table-row>
        <table:table-row table:style-name="ro1">
          <table:table-cell table:style-name="ce36" table:formula="of:=&quot;Carbon schedule tC/ha/year = annual_pl(t) - harvest[&quot;&amp;[.B21]&amp;&quot;], calculus&quot;" office:value-type="string" office:string-value="Carbon schedule tC/ha/year = annual_pl(t) - harvest[120], calculus" calcext:value-type="string">
            <text:p>Carbon schedule tC/ha/year = annual_pl(t) - harvest[120], calculus</text:p>
          </table:table-cell>
          <table:table-cell table:style-name="ce36" table:formula="of:=IF([.B31]&lt;=[.$B$21]-[.$B$13];2*[.$B$25]*[.$B$24]*([.$B$10]+[.$B$11]*[.$B$8])*(EXP(-[.$B$25]*[.B31]) - EXP(-2*[.$B$25]*[.B31])) + [.$B$12]*[.$B$7]; -[.$B$24]*(1-EXP(-[.$B$25]*[.B$31]))^2*IF([.B31]=[.$B$21];1;0))" office:value-type="float" office:value="0.0330097166236016" calcext:value-type="float">
            <text:p>0.03</text:p>
          </table:table-cell>
          <table:table-cell table:style-name="ce36" table:formula="of:=IF([.C31]&lt;=[.$B$21]-[.$B$13];2*[.$B$25]*[.$B$24]*([.$B$10]+[.$B$11]*[.$B$8])*(EXP(-[.$B$25]*[.C31]) - EXP(-2*[.$B$25]*[.C31])) + [.$B$12]*[.$B$7]; -[.$B$24]*(1-EXP(-[.$B$25]*[.C$31]))^2*IF([.C31]=[.$B$21];1;0))" office:value-type="float" office:value="0.0400327794171557" calcext:value-type="float">
            <text:p>0.04</text:p>
          </table:table-cell>
          <table:table-cell table:style-name="ce36" table:formula="of:=IF([.D31]&lt;=[.$B$21]-[.$B$13];2*[.$B$25]*[.$B$24]*([.$B$10]+[.$B$11]*[.$B$8])*(EXP(-[.$B$25]*[.D31]) - EXP(-2*[.$B$25]*[.D31])) + [.$B$12]*[.$B$7]; -[.$B$24]*(1-EXP(-[.$B$25]*[.D$31]))^2*IF([.D31]=[.$B$21];1;0))" office:value-type="float" office:value="0.0467324352195044" calcext:value-type="float">
            <text:p>0.05</text:p>
          </table:table-cell>
          <table:table-cell table:style-name="ce36" table:formula="of:=IF([.E31]&lt;=[.$B$21]-[.$B$13];2*[.$B$25]*[.$B$24]*([.$B$10]+[.$B$11]*[.$B$8])*(EXP(-[.$B$25]*[.E31]) - EXP(-2*[.$B$25]*[.E31])) + [.$B$12]*[.$B$7]; -[.$B$24]*(1-EXP(-[.$B$25]*[.E$31]))^2*IF([.E31]=[.$B$21];1;0))" office:value-type="float" office:value="0.0531201715279346" calcext:value-type="float">
            <text:p>0.05</text:p>
          </table:table-cell>
          <table:table-cell table:style-name="ce36" table:formula="of:=IF([.F31]&lt;=[.$B$21]-[.$B$13];2*[.$B$25]*[.$B$24]*([.$B$10]+[.$B$11]*[.$B$8])*(EXP(-[.$B$25]*[.F31]) - EXP(-2*[.$B$25]*[.F31])) + [.$B$12]*[.$B$7]; -[.$B$24]*(1-EXP(-[.$B$25]*[.F$31]))^2*IF([.F31]=[.$B$21];1;0))" office:value-type="float" office:value="0.059207102003802" calcext:value-type="float">
            <text:p>0.06</text:p>
          </table:table-cell>
          <table:table-cell table:style-name="ce36" table:formula="of:=IF([.G31]&lt;=[.$B$21]-[.$B$13];2*[.$B$25]*[.$B$24]*([.$B$10]+[.$B$11]*[.$B$8])*(EXP(-[.$B$25]*[.G31]) - EXP(-2*[.$B$25]*[.G31])) + [.$B$12]*[.$B$7]; -[.$B$24]*(1-EXP(-[.$B$25]*[.G$31]))^2*IF([.G31]=[.$B$21];1;0))" office:value-type="float" office:value="0.0650039781928357" calcext:value-type="float">
            <text:p>0.07</text:p>
          </table:table-cell>
          <table:table-cell table:style-name="ce36" table:formula="of:=IF([.H31]&lt;=[.$B$21]-[.$B$13];2*[.$B$25]*[.$B$24]*([.$B$10]+[.$B$11]*[.$B$8])*(EXP(-[.$B$25]*[.H31]) - EXP(-2*[.$B$25]*[.H31])) + [.$B$12]*[.$B$7]; -[.$B$24]*(1-EXP(-[.$B$25]*[.H$31]))^2*IF([.H31]=[.$B$21];1;0))" office:value-type="float" office:value="0.0705212008843243" calcext:value-type="float">
            <text:p>0.07</text:p>
          </table:table-cell>
          <table:table-cell table:style-name="ce36" table:formula="of:=IF([.I31]&lt;=[.$B$21]-[.$B$13];2*[.$B$25]*[.$B$24]*([.$B$10]+[.$B$11]*[.$B$8])*(EXP(-[.$B$25]*[.I31]) - EXP(-2*[.$B$25]*[.I31])) + [.$B$12]*[.$B$7]; -[.$B$24]*(1-EXP(-[.$B$25]*[.I$31]))^2*IF([.I31]=[.$B$21];1;0))" office:value-type="float" office:value="0.0757688311202166" calcext:value-type="float">
            <text:p>0.08</text:p>
          </table:table-cell>
          <table:table-cell table:style-name="ce36" table:formula="of:=IF([.J31]&lt;=[.$B$21]-[.$B$13];2*[.$B$25]*[.$B$24]*([.$B$10]+[.$B$11]*[.$B$8])*(EXP(-[.$B$25]*[.J31]) - EXP(-2*[.$B$25]*[.J31])) + [.$B$12]*[.$B$7]; -[.$B$24]*(1-EXP(-[.$B$25]*[.J$31]))^2*IF([.J31]=[.$B$21];1;0))" office:value-type="float" office:value="0.0807566008648356" calcext:value-type="float">
            <text:p>0.08</text:p>
          </table:table-cell>
          <table:table-cell table:style-name="ce36" table:formula="of:=IF([.K31]&lt;=[.$B$21]-[.$B$13];2*[.$B$25]*[.$B$24]*([.$B$10]+[.$B$11]*[.$B$8])*(EXP(-[.$B$25]*[.K31]) - EXP(-2*[.$B$25]*[.K31])) + [.$B$12]*[.$B$7]; -[.$B$24]*(1-EXP(-[.$B$25]*[.K$31]))^2*IF([.K31]=[.$B$21];1;0))" office:value-type="float" office:value="0.0854939233455747" calcext:value-type="float">
            <text:p>0.09</text:p>
          </table:table-cell>
          <table:table-cell table:style-name="ce36" table:formula="of:=IF([.L31]&lt;=[.$B$21]-[.$B$13];2*[.$B$25]*[.$B$24]*([.$B$10]+[.$B$11]*[.$B$8])*(EXP(-[.$B$25]*[.L31]) - EXP(-2*[.$B$25]*[.L31])) + [.$B$12]*[.$B$7]; -[.$B$24]*(1-EXP(-[.$B$25]*[.L$31]))^2*IF([.L31]=[.$B$21];1;0))" office:value-type="float" office:value="0.0899899030746369" calcext:value-type="float">
            <text:p>0.09</text:p>
          </table:table-cell>
          <table:table-cell table:style-name="ce36" table:formula="of:=IF([.M31]&lt;=[.$B$21]-[.$B$13];2*[.$B$25]*[.$B$24]*([.$B$10]+[.$B$11]*[.$B$8])*(EXP(-[.$B$25]*[.M31]) - EXP(-2*[.$B$25]*[.M31])) + [.$B$12]*[.$B$7]; -[.$B$24]*(1-EXP(-[.$B$25]*[.M$31]))^2*IF([.M31]=[.$B$21];1;0))" office:value-type="float" office:value="0.0942533455615621" calcext:value-type="float">
            <text:p>0.09</text:p>
          </table:table-cell>
          <table:table-cell table:style-name="ce36" table:formula="of:=IF([.N31]&lt;=[.$B$21]-[.$B$13];2*[.$B$25]*[.$B$24]*([.$B$10]+[.$B$11]*[.$B$8])*(EXP(-[.$B$25]*[.N31]) - EXP(-2*[.$B$25]*[.N31])) + [.$B$12]*[.$B$7]; -[.$B$24]*(1-EXP(-[.$B$25]*[.N$31]))^2*IF([.N31]=[.$B$21];1;0))" office:value-type="float" office:value="0.098292766726001" calcext:value-type="float">
            <text:p>0.10</text:p>
          </table:table-cell>
          <table:table-cell table:style-name="ce36" table:formula="of:=IF([.O31]&lt;=[.$B$21]-[.$B$13];2*[.$B$25]*[.$B$24]*([.$B$10]+[.$B$11]*[.$B$8])*(EXP(-[.$B$25]*[.O31]) - EXP(-2*[.$B$25]*[.O31])) + [.$B$12]*[.$B$7]; -[.$B$24]*(1-EXP(-[.$B$25]*[.O$31]))^2*IF([.O31]=[.$B$21];1;0))" office:value-type="float" office:value="0.102116402019898" calcext:value-type="float">
            <text:p>0.10</text:p>
          </table:table-cell>
          <table:table-cell table:style-name="ce36" table:formula="of:=IF([.P31]&lt;=[.$B$21]-[.$B$13];2*[.$B$25]*[.$B$24]*([.$B$10]+[.$B$11]*[.$B$8])*(EXP(-[.$B$25]*[.P31]) - EXP(-2*[.$B$25]*[.P31])) + [.$B$12]*[.$B$7]; -[.$B$24]*(1-EXP(-[.$B$25]*[.P$31]))^2*IF([.P31]=[.$B$21];1;0))" office:value-type="float" office:value="0.105732215267973" calcext:value-type="float">
            <text:p>0.11</text:p>
          </table:table-cell>
          <table:table-cell table:style-name="ce36" table:formula="of:=IF([.Q31]&lt;=[.$B$21]-[.$B$13];2*[.$B$25]*[.$B$24]*([.$B$10]+[.$B$11]*[.$B$8])*(EXP(-[.$B$25]*[.Q31]) - EXP(-2*[.$B$25]*[.Q31])) + [.$B$12]*[.$B$7]; -[.$B$24]*(1-EXP(-[.$B$25]*[.Q$31]))^2*IF([.Q31]=[.$B$21];1;0))" office:value-type="float" office:value="0.109147907235111" calcext:value-type="float">
            <text:p>0.11</text:p>
          </table:table-cell>
          <table:table-cell table:style-name="ce36" table:formula="of:=IF([.R31]&lt;=[.$B$21]-[.$B$13];2*[.$B$25]*[.$B$24]*([.$B$10]+[.$B$11]*[.$B$8])*(EXP(-[.$B$25]*[.R31]) - EXP(-2*[.$B$25]*[.R31])) + [.$B$12]*[.$B$7]; -[.$B$24]*(1-EXP(-[.$B$25]*[.R$31]))^2*IF([.R31]=[.$B$21];1;0))" office:value-type="float" office:value="0.112370923929031" calcext:value-type="float">
            <text:p>0.11</text:p>
          </table:table-cell>
          <table:table-cell table:style-name="ce36" table:formula="of:=IF([.S31]&lt;=[.$B$21]-[.$B$13];2*[.$B$25]*[.$B$24]*([.$B$10]+[.$B$11]*[.$B$8])*(EXP(-[.$B$25]*[.S31]) - EXP(-2*[.$B$25]*[.S31])) + [.$B$12]*[.$B$7]; -[.$B$24]*(1-EXP(-[.$B$25]*[.S$31]))^2*IF([.S31]=[.$B$21];1;0))" office:value-type="float" office:value="0.115408464646305" calcext:value-type="float">
            <text:p>0.12</text:p>
          </table:table-cell>
          <table:table-cell table:style-name="ce36" table:formula="of:=IF([.T31]&lt;=[.$B$21]-[.$B$13];2*[.$B$25]*[.$B$24]*([.$B$10]+[.$B$11]*[.$B$8])*(EXP(-[.$B$25]*[.T31]) - EXP(-2*[.$B$25]*[.T31])) + [.$B$12]*[.$B$7]; -[.$B$24]*(1-EXP(-[.$B$25]*[.T$31]))^2*IF([.T31]=[.$B$21];1;0))" office:value-type="float" office:value="0.118267489769616" calcext:value-type="float">
            <text:p>0.12</text:p>
          </table:table-cell>
          <table:table-cell table:style-name="ce36" table:formula="of:=IF([.U31]&lt;=[.$B$21]-[.$B$13];2*[.$B$25]*[.$B$24]*([.$B$10]+[.$B$11]*[.$B$8])*(EXP(-[.$B$25]*[.U31]) - EXP(-2*[.$B$25]*[.U31])) + [.$B$12]*[.$B$7]; -[.$B$24]*(1-EXP(-[.$B$25]*[.U$31]))^2*IF([.U31]=[.$B$21];1;0))" office:value-type="float" office:value="0.120954728323834" calcext:value-type="float">
            <text:p>0.12</text:p>
          </table:table-cell>
          <table:table-cell table:style-name="ce36" table:formula="of:=IF([.V31]&lt;=[.$B$21]-[.$B$13];2*[.$B$25]*[.$B$24]*([.$B$10]+[.$B$11]*[.$B$8])*(EXP(-[.$B$25]*[.V31]) - EXP(-2*[.$B$25]*[.V31])) + [.$B$12]*[.$B$7]; -[.$B$24]*(1-EXP(-[.$B$25]*[.V$31]))^2*IF([.V31]=[.$B$21];1;0))" office:value-type="float" office:value="0.123476685298321" calcext:value-type="float">
            <text:p>0.12</text:p>
          </table:table-cell>
          <table:table-cell table:style-name="ce36" table:formula="of:=IF([.W31]&lt;=[.$B$21]-[.$B$13];2*[.$B$25]*[.$B$24]*([.$B$10]+[.$B$11]*[.$B$8])*(EXP(-[.$B$25]*[.W31]) - EXP(-2*[.$B$25]*[.W31])) + [.$B$12]*[.$B$7]; -[.$B$24]*(1-EXP(-[.$B$25]*[.W$31]))^2*IF([.W31]=[.$B$21];1;0))" office:value-type="float" office:value="0.125839648742599" calcext:value-type="float">
            <text:p>0.13</text:p>
          </table:table-cell>
          <table:table-cell table:style-name="ce36" table:formula="of:=IF([.X31]&lt;=[.$B$21]-[.$B$13];2*[.$B$25]*[.$B$24]*([.$B$10]+[.$B$11]*[.$B$8])*(EXP(-[.$B$25]*[.X31]) - EXP(-2*[.$B$25]*[.X31])) + [.$B$12]*[.$B$7]; -[.$B$24]*(1-EXP(-[.$B$25]*[.X$31]))^2*IF([.X31]=[.$B$21];1;0))" office:value-type="float" office:value="0.128049696642341" calcext:value-type="float">
            <text:p>0.13</text:p>
          </table:table-cell>
          <table:table-cell table:style-name="ce36" table:formula="of:=IF([.Y31]&lt;=[.$B$21]-[.$B$13];2*[.$B$25]*[.$B$24]*([.$B$10]+[.$B$11]*[.$B$8])*(EXP(-[.$B$25]*[.Y31]) - EXP(-2*[.$B$25]*[.Y31])) + [.$B$12]*[.$B$7]; -[.$B$24]*(1-EXP(-[.$B$25]*[.Y$31]))^2*IF([.Y31]=[.$B$21];1;0))" office:value-type="float" office:value="0.130112703582393" calcext:value-type="float">
            <text:p>0.13</text:p>
          </table:table-cell>
          <table:table-cell table:style-name="ce36" table:formula="of:=IF([.Z31]&lt;=[.$B$21]-[.$B$13];2*[.$B$25]*[.$B$24]*([.$B$10]+[.$B$11]*[.$B$8])*(EXP(-[.$B$25]*[.Z31]) - EXP(-2*[.$B$25]*[.Z31])) + [.$B$12]*[.$B$7]; -[.$B$24]*(1-EXP(-[.$B$25]*[.Z$31]))^2*IF([.Z31]=[.$B$21];1;0))" office:value-type="float" office:value="0.132034347203369" calcext:value-type="float">
            <text:p>0.13</text:p>
          </table:table-cell>
          <table:table-cell table:style-name="ce36" table:formula="of:=IF([.AA31]&lt;=[.$B$21]-[.$B$13];2*[.$B$25]*[.$B$24]*([.$B$10]+[.$B$11]*[.$B$8])*(EXP(-[.$B$25]*[.AA31]) - EXP(-2*[.$B$25]*[.AA31])) + [.$B$12]*[.$B$7]; -[.$B$24]*(1-EXP(-[.$B$25]*[.AA$31]))^2*IF([.AA31]=[.$B$21];1;0))" office:value-type="float" office:value="0.133820114458128" calcext:value-type="float">
            <text:p>0.13</text:p>
          </table:table-cell>
          <table:table-cell table:style-name="ce36" table:formula="of:=IF([.AB31]&lt;=[.$B$21]-[.$B$13];2*[.$B$25]*[.$B$24]*([.$B$10]+[.$B$11]*[.$B$8])*(EXP(-[.$B$25]*[.AB31]) - EXP(-2*[.$B$25]*[.AB31])) + [.$B$12]*[.$B$7]; -[.$B$24]*(1-EXP(-[.$B$25]*[.AB$31]))^2*IF([.AB31]=[.$B$21];1;0))" office:value-type="float" office:value="0.135475307674274" calcext:value-type="float">
            <text:p>0.14</text:p>
          </table:table-cell>
          <table:table-cell table:style-name="ce36" table:formula="of:=IF([.AC31]&lt;=[.$B$21]-[.$B$13];2*[.$B$25]*[.$B$24]*([.$B$10]+[.$B$11]*[.$B$8])*(EXP(-[.$B$25]*[.AC31]) - EXP(-2*[.$B$25]*[.AC31])) + [.$B$12]*[.$B$7]; -[.$B$24]*(1-EXP(-[.$B$25]*[.AC$31]))^2*IF([.AC31]=[.$B$21];1;0))" office:value-type="float" office:value="0.13700505042862" calcext:value-type="float">
            <text:p>0.14</text:p>
          </table:table-cell>
          <table:table-cell table:style-name="ce36" table:formula="of:=IF([.AD31]&lt;=[.$B$21]-[.$B$13];2*[.$B$25]*[.$B$24]*([.$B$10]+[.$B$11]*[.$B$8])*(EXP(-[.$B$25]*[.AD31]) - EXP(-2*[.$B$25]*[.AD31])) + [.$B$12]*[.$B$7]; -[.$B$24]*(1-EXP(-[.$B$25]*[.AD$31]))^2*IF([.AD31]=[.$B$21];1;0))" office:value-type="float" office:value="0.138414293239376" calcext:value-type="float">
            <text:p>0.14</text:p>
          </table:table-cell>
          <table:table-cell table:style-name="ce36" table:formula="of:=IF([.AE31]&lt;=[.$B$21]-[.$B$13];2*[.$B$25]*[.$B$24]*([.$B$10]+[.$B$11]*[.$B$8])*(EXP(-[.$B$25]*[.AE31]) - EXP(-2*[.$B$25]*[.AE31])) + [.$B$12]*[.$B$7]; -[.$B$24]*(1-EXP(-[.$B$25]*[.AE$31]))^2*IF([.AE31]=[.$B$21];1;0))" office:value-type="float" office:value="0.139707819081663" calcext:value-type="float">
            <text:p>0.14</text:p>
          </table:table-cell>
          <table:table-cell table:style-name="ce36" table:formula="of:=IF([.AF31]&lt;=[.$B$21]-[.$B$13];2*[.$B$25]*[.$B$24]*([.$B$10]+[.$B$11]*[.$B$8])*(EXP(-[.$B$25]*[.AF31]) - EXP(-2*[.$B$25]*[.AF31])) + [.$B$12]*[.$B$7]; -[.$B$24]*(1-EXP(-[.$B$25]*[.AF$31]))^2*IF([.AF31]=[.$B$21];1;0))" office:value-type="float" office:value="0.140890248731751" calcext:value-type="float">
            <text:p>0.14</text:p>
          </table:table-cell>
          <table:table-cell table:style-name="ce36" table:formula="of:=IF([.AG31]&lt;=[.$B$21]-[.$B$13];2*[.$B$25]*[.$B$24]*([.$B$10]+[.$B$11]*[.$B$8])*(EXP(-[.$B$25]*[.AG31]) - EXP(-2*[.$B$25]*[.AG31])) + [.$B$12]*[.$B$7]; -[.$B$24]*(1-EXP(-[.$B$25]*[.AG$31]))^2*IF([.AG31]=[.$B$21];1;0))" office:value-type="float" office:value="0.141966045945286" calcext:value-type="float">
            <text:p>0.14</text:p>
          </table:table-cell>
          <table:table-cell table:style-name="ce36" table:formula="of:=IF([.AH31]&lt;=[.$B$21]-[.$B$13];2*[.$B$25]*[.$B$24]*([.$B$10]+[.$B$11]*[.$B$8])*(EXP(-[.$B$25]*[.AH31]) - EXP(-2*[.$B$25]*[.AH31])) + [.$B$12]*[.$B$7]; -[.$B$24]*(1-EXP(-[.$B$25]*[.AH$31]))^2*IF([.AH31]=[.$B$21];1;0))" office:value-type="float" office:value="0.142939522474604" calcext:value-type="float">
            <text:p>0.14</text:p>
          </table:table-cell>
          <table:table-cell table:style-name="ce36" table:formula="of:=IF([.AI31]&lt;=[.$B$21]-[.$B$13];2*[.$B$25]*[.$B$24]*([.$B$10]+[.$B$11]*[.$B$8])*(EXP(-[.$B$25]*[.AI31]) - EXP(-2*[.$B$25]*[.AI31])) + [.$B$12]*[.$B$7]; -[.$B$24]*(1-EXP(-[.$B$25]*[.AI$31]))^2*IF([.AI31]=[.$B$21];1;0))" office:value-type="float" office:value="0.143814842930045" calcext:value-type="float">
            <text:p>0.14</text:p>
          </table:table-cell>
          <table:table-cell table:style-name="ce36" table:formula="of:=IF([.AJ31]&lt;=[.$B$21]-[.$B$13];2*[.$B$25]*[.$B$24]*([.$B$10]+[.$B$11]*[.$B$8])*(EXP(-[.$B$25]*[.AJ31]) - EXP(-2*[.$B$25]*[.AJ31])) + [.$B$12]*[.$B$7]; -[.$B$24]*(1-EXP(-[.$B$25]*[.AJ$31]))^2*IF([.AJ31]=[.$B$21];1;0))" office:value-type="float" office:value="0.144596029490087" calcext:value-type="float">
            <text:p>0.14</text:p>
          </table:table-cell>
          <table:table-cell table:style-name="ce36" table:formula="of:=IF([.AK31]&lt;=[.$B$21]-[.$B$13];2*[.$B$25]*[.$B$24]*([.$B$10]+[.$B$11]*[.$B$8])*(EXP(-[.$B$25]*[.AK31]) - EXP(-2*[.$B$25]*[.AK31])) + [.$B$12]*[.$B$7]; -[.$B$24]*(1-EXP(-[.$B$25]*[.AK$31]))^2*IF([.AK31]=[.$B$21];1;0))" office:value-type="float" office:value="0.145286966464913" calcext:value-type="float">
            <text:p>0.15</text:p>
          </table:table-cell>
          <table:table-cell table:style-name="ce36" table:formula="of:=IF([.AL31]&lt;=[.$B$21]-[.$B$13];2*[.$B$25]*[.$B$24]*([.$B$10]+[.$B$11]*[.$B$8])*(EXP(-[.$B$25]*[.AL31]) - EXP(-2*[.$B$25]*[.AL31])) + [.$B$12]*[.$B$7]; -[.$B$24]*(1-EXP(-[.$B$25]*[.AL$31]))^2*IF([.AL31]=[.$B$21];1;0))" office:value-type="float" office:value="0.14589140471792" calcext:value-type="float">
            <text:p>0.15</text:p>
          </table:table-cell>
          <table:table-cell table:style-name="ce36" table:formula="of:=IF([.AM31]&lt;=[.$B$21]-[.$B$13];2*[.$B$25]*[.$B$24]*([.$B$10]+[.$B$11]*[.$B$8])*(EXP(-[.$B$25]*[.AM31]) - EXP(-2*[.$B$25]*[.AM31])) + [.$B$12]*[.$B$7]; -[.$B$24]*(1-EXP(-[.$B$25]*[.AM$31]))^2*IF([.AM31]=[.$B$21];1;0))" office:value-type="float" office:value="0.14641296594954" calcext:value-type="float">
            <text:p>0.15</text:p>
          </table:table-cell>
          <table:table-cell table:style-name="ce36" table:formula="of:=IF([.AN31]&lt;=[.$B$21]-[.$B$13];2*[.$B$25]*[.$B$24]*([.$B$10]+[.$B$11]*[.$B$8])*(EXP(-[.$B$25]*[.AN31]) - EXP(-2*[.$B$25]*[.AN31])) + [.$B$12]*[.$B$7]; -[.$B$24]*(1-EXP(-[.$B$25]*[.AN$31]))^2*IF([.AN31]=[.$B$21];1;0))" office:value-type="float" office:value="0.14685514684759" calcext:value-type="float">
            <text:p>0.15</text:p>
          </table:table-cell>
          <table:table-cell table:style-name="ce36" table:formula="of:=IF([.AO31]&lt;=[.$B$21]-[.$B$13];2*[.$B$25]*[.$B$24]*([.$B$10]+[.$B$11]*[.$B$8])*(EXP(-[.$B$25]*[.AO31]) - EXP(-2*[.$B$25]*[.AO31])) + [.$B$12]*[.$B$7]; -[.$B$24]*(1-EXP(-[.$B$25]*[.AO$31]))^2*IF([.AO31]=[.$B$21];1;0))" office:value-type="float" office:value="0.147221323108253" calcext:value-type="float">
            <text:p>0.15</text:p>
          </table:table-cell>
          <table:table-cell table:style-name="ce36" table:formula="of:=IF([.AP31]&lt;=[.$B$21]-[.$B$13];2*[.$B$25]*[.$B$24]*([.$B$10]+[.$B$11]*[.$B$8])*(EXP(-[.$B$25]*[.AP31]) - EXP(-2*[.$B$25]*[.AP31])) + [.$B$12]*[.$B$7]; -[.$B$24]*(1-EXP(-[.$B$25]*[.AP$31]))^2*IF([.AP31]=[.$B$21];1;0))" office:value-type="float" office:value="0.147514753331672" calcext:value-type="float">
            <text:p>0.15</text:p>
          </table:table-cell>
          <table:table-cell table:style-name="ce36" table:formula="of:=IF([.AQ31]&lt;=[.$B$21]-[.$B$13];2*[.$B$25]*[.$B$24]*([.$B$10]+[.$B$11]*[.$B$8])*(EXP(-[.$B$25]*[.AQ31]) - EXP(-2*[.$B$25]*[.AQ31])) + [.$B$12]*[.$B$7]; -[.$B$24]*(1-EXP(-[.$B$25]*[.AQ$31]))^2*IF([.AQ31]=[.$B$21];1;0))" office:value-type="float" office:value="0.147738582796005" calcext:value-type="float">
            <text:p>0.15</text:p>
          </table:table-cell>
          <table:table-cell table:style-name="ce36" table:formula="of:=IF([.AR31]&lt;=[.$B$21]-[.$B$13];2*[.$B$25]*[.$B$24]*([.$B$10]+[.$B$11]*[.$B$8])*(EXP(-[.$B$25]*[.AR31]) - EXP(-2*[.$B$25]*[.AR31])) + [.$B$12]*[.$B$7]; -[.$B$24]*(1-EXP(-[.$B$25]*[.AR$31]))^2*IF([.AR31]=[.$B$21];1;0))" office:value-type="float" office:value="0.147895847113673" calcext:value-type="float">
            <text:p>0.15</text:p>
          </table:table-cell>
          <table:table-cell table:style-name="ce36" table:formula="of:=IF([.AS31]&lt;=[.$B$21]-[.$B$13];2*[.$B$25]*[.$B$24]*([.$B$10]+[.$B$11]*[.$B$8])*(EXP(-[.$B$25]*[.AS31]) - EXP(-2*[.$B$25]*[.AS31])) + [.$B$12]*[.$B$7]; -[.$B$24]*(1-EXP(-[.$B$25]*[.AS$31]))^2*IF([.AS31]=[.$B$21];1;0))" office:value-type="float" office:value="0.147989475773436" calcext:value-type="float">
            <text:p>0.15</text:p>
          </table:table-cell>
          <table:table-cell table:style-name="ce36" table:formula="of:=IF([.AT31]&lt;=[.$B$21]-[.$B$13];2*[.$B$25]*[.$B$24]*([.$B$10]+[.$B$11]*[.$B$8])*(EXP(-[.$B$25]*[.AT31]) - EXP(-2*[.$B$25]*[.AT31])) + [.$B$12]*[.$B$7]; -[.$B$24]*(1-EXP(-[.$B$25]*[.AT$31]))^2*IF([.AT31]=[.$B$21];1;0))" office:value-type="float" office:value="0.148022295571795" calcext:value-type="float">
            <text:p>0.15</text:p>
          </table:table-cell>
          <table:table-cell table:style-name="ce36" table:formula="of:=IF([.AU31]&lt;=[.$B$21]-[.$B$13];2*[.$B$25]*[.$B$24]*([.$B$10]+[.$B$11]*[.$B$8])*(EXP(-[.$B$25]*[.AU31]) - EXP(-2*[.$B$25]*[.AU31])) + [.$B$12]*[.$B$7]; -[.$B$24]*(1-EXP(-[.$B$25]*[.AU$31]))^2*IF([.AU31]=[.$B$21];1;0))" office:value-type="float" office:value="0.147997033937128" calcext:value-type="float">
            <text:p>0.15</text:p>
          </table:table-cell>
          <table:table-cell table:style-name="ce36" table:formula="of:=IF([.AV31]&lt;=[.$B$21]-[.$B$13];2*[.$B$25]*[.$B$24]*([.$B$10]+[.$B$11]*[.$B$8])*(EXP(-[.$B$25]*[.AV31]) - EXP(-2*[.$B$25]*[.AV31])) + [.$B$12]*[.$B$7]; -[.$B$24]*(1-EXP(-[.$B$25]*[.AV$31]))^2*IF([.AV31]=[.$B$21];1;0))" office:value-type="float" office:value="0.147916322149866" calcext:value-type="float">
            <text:p>0.15</text:p>
          </table:table-cell>
          <table:table-cell table:style-name="ce36" table:formula="of:=IF([.AW31]&lt;=[.$B$21]-[.$B$13];2*[.$B$25]*[.$B$24]*([.$B$10]+[.$B$11]*[.$B$8])*(EXP(-[.$B$25]*[.AW31]) - EXP(-2*[.$B$25]*[.AW31])) + [.$B$12]*[.$B$7]; -[.$B$24]*(1-EXP(-[.$B$25]*[.AW$31]))^2*IF([.AW31]=[.$B$21];1;0))" office:value-type="float" office:value="0.147782698461903" calcext:value-type="float">
            <text:p>0.15</text:p>
          </table:table-cell>
          <table:table-cell table:style-name="ce36" table:formula="of:=IF([.AX31]&lt;=[.$B$21]-[.$B$13];2*[.$B$25]*[.$B$24]*([.$B$10]+[.$B$11]*[.$B$8])*(EXP(-[.$B$25]*[.AX31]) - EXP(-2*[.$B$25]*[.AX31])) + [.$B$12]*[.$B$7]; -[.$B$24]*(1-EXP(-[.$B$25]*[.AX$31]))^2*IF([.AX31]=[.$B$21];1;0))" office:value-type="float" office:value="0.147598611118342" calcext:value-type="float">
            <text:p>0.15</text:p>
          </table:table-cell>
          <table:table-cell table:style-name="ce36" table:formula="of:=IF([.AY31]&lt;=[.$B$21]-[.$B$13];2*[.$B$25]*[.$B$24]*([.$B$10]+[.$B$11]*[.$B$8])*(EXP(-[.$B$25]*[.AY31]) - EXP(-2*[.$B$25]*[.AY31])) + [.$B$12]*[.$B$7]; -[.$B$24]*(1-EXP(-[.$B$25]*[.AY$31]))^2*IF([.AY31]=[.$B$21];1;0))" office:value-type="float" office:value="0.147366421284589" calcext:value-type="float">
            <text:p>0.15</text:p>
          </table:table-cell>
          <table:table-cell table:style-name="ce36" table:formula="of:=IF([.AZ31]&lt;=[.$B$21]-[.$B$13];2*[.$B$25]*[.$B$24]*([.$B$10]+[.$B$11]*[.$B$8])*(EXP(-[.$B$25]*[.AZ31]) - EXP(-2*[.$B$25]*[.AZ31])) + [.$B$12]*[.$B$7]; -[.$B$24]*(1-EXP(-[.$B$25]*[.AZ$31]))^2*IF([.AZ31]=[.$B$21];1;0))" office:value-type="float" office:value="0.147088405881697" calcext:value-type="float">
            <text:p>0.15</text:p>
          </table:table-cell>
          <table:table-cell table:style-name="ce36" table:formula="of:=IF([.BA31]&lt;=[.$B$21]-[.$B$13];2*[.$B$25]*[.$B$24]*([.$B$10]+[.$B$11]*[.$B$8])*(EXP(-[.$B$25]*[.BA31]) - EXP(-2*[.$B$25]*[.BA31])) + [.$B$12]*[.$B$7]; -[.$B$24]*(1-EXP(-[.$B$25]*[.BA$31]))^2*IF([.BA31]=[.$B$21];1;0))" office:value-type="float" office:value="0.146766760332811" calcext:value-type="float">
            <text:p>0.15</text:p>
          </table:table-cell>
          <table:table-cell table:style-name="ce36" table:formula="of:=IF([.BB31]&lt;=[.$B$21]-[.$B$13];2*[.$B$25]*[.$B$24]*([.$B$10]+[.$B$11]*[.$B$8])*(EXP(-[.$B$25]*[.BB31]) - EXP(-2*[.$B$25]*[.BB31])) + [.$B$12]*[.$B$7]; -[.$B$24]*(1-EXP(-[.$B$25]*[.BB$31]))^2*IF([.BB31]=[.$B$21];1;0))" office:value-type="float" office:value="0.146403601223425" calcext:value-type="float">
            <text:p>0.15</text:p>
          </table:table-cell>
          <table:table-cell table:style-name="ce36" table:formula="of:=IF([.BC31]&lt;=[.$B$21]-[.$B$13];2*[.$B$25]*[.$B$24]*([.$B$10]+[.$B$11]*[.$B$8])*(EXP(-[.$B$25]*[.BC31]) - EXP(-2*[.$B$25]*[.BC31])) + [.$B$12]*[.$B$7]; -[.$B$24]*(1-EXP(-[.$B$25]*[.BC$31]))^2*IF([.BC31]=[.$B$21];1;0))" office:value-type="float" office:value="0.146000968878128" calcext:value-type="float">
            <text:p>0.15</text:p>
          </table:table-cell>
          <table:table-cell table:style-name="ce36" table:formula="of:=IF([.BD31]&lt;=[.$B$21]-[.$B$13];2*[.$B$25]*[.$B$24]*([.$B$10]+[.$B$11]*[.$B$8])*(EXP(-[.$B$25]*[.BD31]) - EXP(-2*[.$B$25]*[.BD31])) + [.$B$12]*[.$B$7]; -[.$B$24]*(1-EXP(-[.$B$25]*[.BD$31]))^2*IF([.BD31]=[.$B$21];1;0))" office:value-type="float" office:value="0.145560829856405" calcext:value-type="float">
            <text:p>0.15</text:p>
          </table:table-cell>
          <table:table-cell table:style-name="ce36" table:formula="of:=IF([.BE31]&lt;=[.$B$21]-[.$B$13];2*[.$B$25]*[.$B$24]*([.$B$10]+[.$B$11]*[.$B$8])*(EXP(-[.$B$25]*[.BE31]) - EXP(-2*[.$B$25]*[.BE31])) + [.$B$12]*[.$B$7]; -[.$B$24]*(1-EXP(-[.$B$25]*[.BE$31]))^2*IF([.BE31]=[.$B$21];1;0))" office:value-type="float" office:value="0.145085079369994" calcext:value-type="float">
            <text:p>0.15</text:p>
          </table:table-cell>
          <table:table-cell table:style-name="ce36" table:formula="of:=IF([.BF31]&lt;=[.$B$21]-[.$B$13];2*[.$B$25]*[.$B$24]*([.$B$10]+[.$B$11]*[.$B$8])*(EXP(-[.$B$25]*[.BF31]) - EXP(-2*[.$B$25]*[.BF31])) + [.$B$12]*[.$B$7]; -[.$B$24]*(1-EXP(-[.$B$25]*[.BF$31]))^2*IF([.BF31]=[.$B$21];1;0))" office:value-type="float" office:value="0.144575543624209" calcext:value-type="float">
            <text:p>0.14</text:p>
          </table:table-cell>
          <table:table-cell table:style-name="ce36" table:formula="of:=IF([.BG31]&lt;=[.$B$21]-[.$B$13];2*[.$B$25]*[.$B$24]*([.$B$10]+[.$B$11]*[.$B$8])*(EXP(-[.$B$25]*[.BG31]) - EXP(-2*[.$B$25]*[.BG31])) + [.$B$12]*[.$B$7]; -[.$B$24]*(1-EXP(-[.$B$25]*[.BG$31]))^2*IF([.BG31]=[.$B$21];1;0))" office:value-type="float" office:value="0.144033982085591" calcext:value-type="float">
            <text:p>0.14</text:p>
          </table:table-cell>
          <table:table-cell table:style-name="ce36" table:formula="of:=IF([.BH31]&lt;=[.$B$21]-[.$B$13];2*[.$B$25]*[.$B$24]*([.$B$10]+[.$B$11]*[.$B$8])*(EXP(-[.$B$25]*[.BH31]) - EXP(-2*[.$B$25]*[.BH31])) + [.$B$12]*[.$B$7]; -[.$B$24]*(1-EXP(-[.$B$25]*[.BH$31]))^2*IF([.BH31]=[.$B$21];1;0))" office:value-type="float" office:value="0.143462089678145" calcext:value-type="float">
            <text:p>0.14</text:p>
          </table:table-cell>
          <table:table-cell table:style-name="ce36" table:formula="of:=IF([.BI31]&lt;=[.$B$21]-[.$B$13];2*[.$B$25]*[.$B$24]*([.$B$10]+[.$B$11]*[.$B$8])*(EXP(-[.$B$25]*[.BI31]) - EXP(-2*[.$B$25]*[.BI31])) + [.$B$12]*[.$B$7]; -[.$B$24]*(1-EXP(-[.$B$25]*[.BI$31]))^2*IF([.BI31]=[.$B$21];1;0))" office:value-type="float" office:value="0.142861498910383" calcext:value-type="float">
            <text:p>0.14</text:p>
          </table:table-cell>
          <table:table-cell table:style-name="ce36" table:formula="of:=IF([.BJ31]&lt;=[.$B$21]-[.$B$13];2*[.$B$25]*[.$B$24]*([.$B$10]+[.$B$11]*[.$B$8])*(EXP(-[.$B$25]*[.BJ31]) - EXP(-2*[.$B$25]*[.BJ31])) + [.$B$12]*[.$B$7]; -[.$B$24]*(1-EXP(-[.$B$25]*[.BJ$31]))^2*IF([.BJ31]=[.$B$21];1;0))" office:value-type="float" office:value="0.142233781935296" calcext:value-type="float">
            <text:p>0.14</text:p>
          </table:table-cell>
          <table:table-cell table:style-name="ce36" table:formula="of:=IF([.BK31]&lt;=[.$B$21]-[.$B$13];2*[.$B$25]*[.$B$24]*([.$B$10]+[.$B$11]*[.$B$8])*(EXP(-[.$B$25]*[.BK31]) - EXP(-2*[.$B$25]*[.BK31])) + [.$B$12]*[.$B$7]; -[.$B$24]*(1-EXP(-[.$B$25]*[.BK$31]))^2*IF([.BK31]=[.$B$21];1;0))" office:value-type="float" office:value="0.141580452545333" calcext:value-type="float">
            <text:p>0.14</text:p>
          </table:table-cell>
          <table:table-cell table:style-name="ce36" table:formula="of:=IF([.BL31]&lt;=[.$B$21]-[.$B$13];2*[.$B$25]*[.$B$24]*([.$B$10]+[.$B$11]*[.$B$8])*(EXP(-[.$B$25]*[.BL31]) - EXP(-2*[.$B$25]*[.BL31])) + [.$B$12]*[.$B$7]; -[.$B$24]*(1-EXP(-[.$B$25]*[.BL$31]))^2*IF([.BL31]=[.$B$21];1;0))" office:value-type="float" office:value="0.140902968104405" calcext:value-type="float">
            <text:p>0.14</text:p>
          </table:table-cell>
          <table:table-cell table:style-name="ce36" table:formula="of:=IF([.BM31]&lt;=[.$B$21]-[.$B$13];2*[.$B$25]*[.$B$24]*([.$B$10]+[.$B$11]*[.$B$8])*(EXP(-[.$B$25]*[.BM31]) - EXP(-2*[.$B$25]*[.BM31])) + [.$B$12]*[.$B$7]; -[.$B$24]*(1-EXP(-[.$B$25]*[.BM$31]))^2*IF([.BM31]=[.$B$21];1;0))" office:value-type="float" office:value="0.140202731418841" calcext:value-type="float">
            <text:p>0.14</text:p>
          </table:table-cell>
          <table:table-cell table:style-name="ce36" table:formula="of:=IF([.BN31]&lt;=[.$B$21]-[.$B$13];2*[.$B$25]*[.$B$24]*([.$B$10]+[.$B$11]*[.$B$8])*(EXP(-[.$B$25]*[.BN31]) - EXP(-2*[.$B$25]*[.BN31])) + [.$B$12]*[.$B$7]; -[.$B$24]*(1-EXP(-[.$B$25]*[.BN$31]))^2*IF([.BN31]=[.$B$21];1;0))" office:value-type="float" office:value="0.139481092549201" calcext:value-type="float">
            <text:p>0.14</text:p>
          </table:table-cell>
          <table:table-cell table:style-name="ce36" table:formula="of:=IF([.BO31]&lt;=[.$B$21]-[.$B$13];2*[.$B$25]*[.$B$24]*([.$B$10]+[.$B$11]*[.$B$8])*(EXP(-[.$B$25]*[.BO31]) - EXP(-2*[.$B$25]*[.BO31])) + [.$B$12]*[.$B$7]; -[.$B$24]*(1-EXP(-[.$B$25]*[.BO$31]))^2*IF([.BO31]=[.$B$21];1;0))" office:value-type="float" office:value="0.13873935056477" calcext:value-type="float">
            <text:p>0.14</text:p>
          </table:table-cell>
          <table:table-cell table:style-name="ce36" table:formula="of:=IF([.BP31]&lt;=[.$B$21]-[.$B$13];2*[.$B$25]*[.$B$24]*([.$B$10]+[.$B$11]*[.$B$8])*(EXP(-[.$B$25]*[.BP31]) - EXP(-2*[.$B$25]*[.BP31])) + [.$B$12]*[.$B$7]; -[.$B$24]*(1-EXP(-[.$B$25]*[.BP$31]))^2*IF([.BP31]=[.$B$21];1;0))" office:value-type="float" office:value="0.1379787552425" calcext:value-type="float">
            <text:p>0.14</text:p>
          </table:table-cell>
          <table:table-cell table:style-name="ce36" table:formula="of:=IF([.BQ31]&lt;=[.$B$21]-[.$B$13];2*[.$B$25]*[.$B$24]*([.$B$10]+[.$B$11]*[.$B$8])*(EXP(-[.$B$25]*[.BQ31]) - EXP(-2*[.$B$25]*[.BQ31])) + [.$B$12]*[.$B$7]; -[.$B$24]*(1-EXP(-[.$B$25]*[.BQ$31]))^2*IF([.BQ31]=[.$B$21];1;0))" office:value-type="float" office:value="0.137200508712134" calcext:value-type="float">
            <text:p>0.14</text:p>
          </table:table-cell>
          <table:table-cell table:style-name="ce36" table:formula="of:=IF([.BR31]&lt;=[.$B$21]-[.$B$13];2*[.$B$25]*[.$B$24]*([.$B$10]+[.$B$11]*[.$B$8])*(EXP(-[.$B$25]*[.BR31]) - EXP(-2*[.$B$25]*[.BR31])) + [.$B$12]*[.$B$7]; -[.$B$24]*(1-EXP(-[.$B$25]*[.BR$31]))^2*IF([.BR31]=[.$B$21];1;0))" office:value-type="float" office:value="0.136405767049162" calcext:value-type="float">
            <text:p>0.14</text:p>
          </table:table-cell>
          <table:table-cell table:style-name="ce36" table:formula="of:=IF([.BS31]&lt;=[.$B$21]-[.$B$13];2*[.$B$25]*[.$B$24]*([.$B$10]+[.$B$11]*[.$B$8])*(EXP(-[.$B$25]*[.BS31]) - EXP(-2*[.$B$25]*[.BS31])) + [.$B$12]*[.$B$7]; -[.$B$24]*(1-EXP(-[.$B$25]*[.BS$31]))^2*IF([.BS31]=[.$B$21];1;0))" office:value-type="float" office:value="0.13559564181724" calcext:value-type="float">
            <text:p>0.14</text:p>
          </table:table-cell>
          <table:table-cell table:style-name="ce36" table:formula="of:=IF([.BT31]&lt;=[.$B$21]-[.$B$13];2*[.$B$25]*[.$B$24]*([.$B$10]+[.$B$11]*[.$B$8])*(EXP(-[.$B$25]*[.BT31]) - EXP(-2*[.$B$25]*[.BT31])) + [.$B$12]*[.$B$7]; -[.$B$24]*(1-EXP(-[.$B$25]*[.BT$31]))^2*IF([.BT31]=[.$B$21];1;0))" office:value-type="float" office:value="0.134771201561626" calcext:value-type="float">
            <text:p>0.13</text:p>
          </table:table-cell>
          <table:table-cell table:style-name="ce36" table:formula="of:=IF([.BU31]&lt;=[.$B$21]-[.$B$13];2*[.$B$25]*[.$B$24]*([.$B$10]+[.$B$11]*[.$B$8])*(EXP(-[.$B$25]*[.BU31]) - EXP(-2*[.$B$25]*[.BU31])) + [.$B$12]*[.$B$7]; -[.$B$24]*(1-EXP(-[.$B$25]*[.BU$31]))^2*IF([.BU31]=[.$B$21];1;0))" office:value-type="float" office:value="0.133933473255158" calcext:value-type="float">
            <text:p>0.13</text:p>
          </table:table-cell>
          <table:table-cell table:style-name="ce36" table:formula="of:=IF([.BV31]&lt;=[.$B$21]-[.$B$13];2*[.$B$25]*[.$B$24]*([.$B$10]+[.$B$11]*[.$B$8])*(EXP(-[.$B$25]*[.BV31]) - EXP(-2*[.$B$25]*[.BV31])) + [.$B$12]*[.$B$7]; -[.$B$24]*(1-EXP(-[.$B$25]*[.BV$31]))^2*IF([.BV31]=[.$B$21];1;0))" office:value-type="float" office:value="0.133083443698247" calcext:value-type="float">
            <text:p>0.13</text:p>
          </table:table-cell>
          <table:table-cell table:style-name="ce36" table:formula="of:=IF([.BW31]&lt;=[.$B$21]-[.$B$13];2*[.$B$25]*[.$B$24]*([.$B$10]+[.$B$11]*[.$B$8])*(EXP(-[.$B$25]*[.BW31]) - EXP(-2*[.$B$25]*[.BW31])) + [.$B$12]*[.$B$7]; -[.$B$24]*(1-EXP(-[.$B$25]*[.BW$31]))^2*IF([.BW31]=[.$B$21];1;0))" office:value-type="float" office:value="0.132222060874303" calcext:value-type="float">
            <text:p>0.13</text:p>
          </table:table-cell>
          <table:table-cell table:style-name="ce36" table:formula="of:=IF([.BX31]&lt;=[.$B$21]-[.$B$13];2*[.$B$25]*[.$B$24]*([.$B$10]+[.$B$11]*[.$B$8])*(EXP(-[.$B$25]*[.BX31]) - EXP(-2*[.$B$25]*[.BX31])) + [.$B$12]*[.$B$7]; -[.$B$24]*(1-EXP(-[.$B$25]*[.BX$31]))^2*IF([.BX31]=[.$B$21];1;0))" office:value-type="float" office:value="0.131350235261989" calcext:value-type="float">
            <text:p>0.13</text:p>
          </table:table-cell>
          <table:table-cell table:style-name="ce36" table:formula="of:=IF([.BY31]&lt;=[.$B$21]-[.$B$13];2*[.$B$25]*[.$B$24]*([.$B$10]+[.$B$11]*[.$B$8])*(EXP(-[.$B$25]*[.BY31]) - EXP(-2*[.$B$25]*[.BY31])) + [.$B$12]*[.$B$7]; -[.$B$24]*(1-EXP(-[.$B$25]*[.BY$31]))^2*IF([.BY31]=[.$B$21];1;0))" office:value-type="float" office:value="0.130468841105632" calcext:value-type="float">
            <text:p>0.13</text:p>
          </table:table-cell>
          <table:table-cell table:style-name="ce36" table:formula="of:=IF([.BZ31]&lt;=[.$B$21]-[.$B$13];2*[.$B$25]*[.$B$24]*([.$B$10]+[.$B$11]*[.$B$8])*(EXP(-[.$B$25]*[.BZ31]) - EXP(-2*[.$B$25]*[.BZ31])) + [.$B$12]*[.$B$7]; -[.$B$24]*(1-EXP(-[.$B$25]*[.BZ$31]))^2*IF([.BZ31]=[.$B$21];1;0))" office:value-type="float" office:value="0.129578717645096" calcext:value-type="float">
            <text:p>0.13</text:p>
          </table:table-cell>
          <table:table-cell table:style-name="ce36" table:formula="of:=IF([.CA31]&lt;=[.$B$21]-[.$B$13];2*[.$B$25]*[.$B$24]*([.$B$10]+[.$B$11]*[.$B$8])*(EXP(-[.$B$25]*[.CA31]) - EXP(-2*[.$B$25]*[.CA31])) + [.$B$12]*[.$B$7]; -[.$B$24]*(1-EXP(-[.$B$25]*[.CA$31]))^2*IF([.CA31]=[.$B$21];1;0))" office:value-type="float" office:value="0.128680670306382" calcext:value-type="float">
            <text:p>0.13</text:p>
          </table:table-cell>
          <table:table-cell table:style-name="ce36" table:formula="of:=IF([.CB31]&lt;=[.$B$21]-[.$B$13];2*[.$B$25]*[.$B$24]*([.$B$10]+[.$B$11]*[.$B$8])*(EXP(-[.$B$25]*[.CB31]) - EXP(-2*[.$B$25]*[.CB31])) + [.$B$12]*[.$B$7]; -[.$B$24]*(1-EXP(-[.$B$25]*[.CB$31]))^2*IF([.CB31]=[.$B$21];1;0))" office:value-type="float" office:value="0.127775471854159" calcext:value-type="float">
            <text:p>0.13</text:p>
          </table:table-cell>
          <table:table-cell table:style-name="ce36" table:formula="of:=IF([.CC31]&lt;=[.$B$21]-[.$B$13];2*[.$B$25]*[.$B$24]*([.$B$10]+[.$B$11]*[.$B$8])*(EXP(-[.$B$25]*[.CC31]) - EXP(-2*[.$B$25]*[.CC31])) + [.$B$12]*[.$B$7]; -[.$B$24]*(1-EXP(-[.$B$25]*[.CC$31]))^2*IF([.CC31]=[.$B$21];1;0))" office:value-type="float" office:value="0.126863863507432" calcext:value-type="float">
            <text:p>0.13</text:p>
          </table:table-cell>
          <table:table-cell table:style-name="ce36" table:formula="of:=IF([.CD31]&lt;=[.$B$21]-[.$B$13];2*[.$B$25]*[.$B$24]*([.$B$10]+[.$B$11]*[.$B$8])*(EXP(-[.$B$25]*[.CD31]) - EXP(-2*[.$B$25]*[.CD31])) + [.$B$12]*[.$B$7]; -[.$B$24]*(1-EXP(-[.$B$25]*[.CD$31]))^2*IF([.CD31]=[.$B$21];1;0))" office:value-type="float" office:value="0.125946556019473" calcext:value-type="float">
            <text:p>0.13</text:p>
          </table:table-cell>
          <table:table-cell table:style-name="ce36" table:formula="of:=IF([.CE31]&lt;=[.$B$21]-[.$B$13];2*[.$B$25]*[.$B$24]*([.$B$10]+[.$B$11]*[.$B$8])*(EXP(-[.$B$25]*[.CE31]) - EXP(-2*[.$B$25]*[.CE31])) + [.$B$12]*[.$B$7]; -[.$B$24]*(1-EXP(-[.$B$25]*[.CE$31]))^2*IF([.CE31]=[.$B$21];1;0))" office:value-type="float" office:value="0.125024230723141" calcext:value-type="float">
            <text:p>0.13</text:p>
          </table:table-cell>
          <table:table-cell table:style-name="ce36" table:formula="of:=IF([.CF31]&lt;=[.$B$21]-[.$B$13];2*[.$B$25]*[.$B$24]*([.$B$10]+[.$B$11]*[.$B$8])*(EXP(-[.$B$25]*[.CF31]) - EXP(-2*[.$B$25]*[.CF31])) + [.$B$12]*[.$B$7]; -[.$B$24]*(1-EXP(-[.$B$25]*[.CF$31]))^2*IF([.CF31]=[.$B$21];1;0))" office:value-type="float" office:value="0.124097540542663" calcext:value-type="float">
            <text:p>0.12</text:p>
          </table:table-cell>
          <table:table-cell table:style-name="ce36" table:formula="of:=IF([.CG31]&lt;=[.$B$21]-[.$B$13];2*[.$B$25]*[.$B$24]*([.$B$10]+[.$B$11]*[.$B$8])*(EXP(-[.$B$25]*[.CG31]) - EXP(-2*[.$B$25]*[.CG31])) + [.$B$12]*[.$B$7]; -[.$B$24]*(1-EXP(-[.$B$25]*[.CG$31]))^2*IF([.CG31]=[.$B$21];1;0))" office:value-type="float" office:value="0.123167110972921" calcext:value-type="float">
            <text:p>0.12</text:p>
          </table:table-cell>
          <table:table-cell table:style-name="ce36" table:formula="of:=IF([.CH31]&lt;=[.$B$21]-[.$B$13];2*[.$B$25]*[.$B$24]*([.$B$10]+[.$B$11]*[.$B$8])*(EXP(-[.$B$25]*[.CH31]) - EXP(-2*[.$B$25]*[.CH31])) + [.$B$12]*[.$B$7]; -[.$B$24]*(1-EXP(-[.$B$25]*[.CH$31]))^2*IF([.CH31]=[.$B$21];1;0))" office:value-type="float" office:value="0.122233541027259" calcext:value-type="float">
            <text:p>0.12</text:p>
          </table:table-cell>
          <table:table-cell table:style-name="ce36" table:formula="of:=IF([.CI31]&lt;=[.$B$21]-[.$B$13];2*[.$B$25]*[.$B$24]*([.$B$10]+[.$B$11]*[.$B$8])*(EXP(-[.$B$25]*[.CI31]) - EXP(-2*[.$B$25]*[.CI31])) + [.$B$12]*[.$B$7]; -[.$B$24]*(1-EXP(-[.$B$25]*[.CI$31]))^2*IF([.CI31]=[.$B$21];1;0))" office:value-type="float" office:value="0.12129740415479" calcext:value-type="float">
            <text:p>0.12</text:p>
          </table:table-cell>
          <table:table-cell table:style-name="ce36" table:formula="of:=IF([.CJ31]&lt;=[.$B$21]-[.$B$13];2*[.$B$25]*[.$B$24]*([.$B$10]+[.$B$11]*[.$B$8])*(EXP(-[.$B$25]*[.CJ31]) - EXP(-2*[.$B$25]*[.CJ31])) + [.$B$12]*[.$B$7]; -[.$B$24]*(1-EXP(-[.$B$25]*[.CJ$31]))^2*IF([.CJ31]=[.$B$21];1;0))" office:value-type="float" office:value="0.120359249128155" calcext:value-type="float">
            <text:p>0.12</text:p>
          </table:table-cell>
          <table:table-cell table:style-name="ce36" table:formula="of:=IF([.CK31]&lt;=[.$B$21]-[.$B$13];2*[.$B$25]*[.$B$24]*([.$B$10]+[.$B$11]*[.$B$8])*(EXP(-[.$B$25]*[.CK31]) - EXP(-2*[.$B$25]*[.CK31])) + [.$B$12]*[.$B$7]; -[.$B$24]*(1-EXP(-[.$B$25]*[.CK$31]))^2*IF([.CK31]=[.$B$21];1;0))" office:value-type="float" office:value="0.119419600902657" calcext:value-type="float">
            <text:p>0.12</text:p>
          </table:table-cell>
          <table:table-cell table:style-name="ce36" table:formula="of:=IF([.CL31]&lt;=[.$B$21]-[.$B$13];2*[.$B$25]*[.$B$24]*([.$B$10]+[.$B$11]*[.$B$8])*(EXP(-[.$B$25]*[.CL31]) - EXP(-2*[.$B$25]*[.CL31])) + [.$B$12]*[.$B$7]; -[.$B$24]*(1-EXP(-[.$B$25]*[.CL$31]))^2*IF([.CL31]=[.$B$21];1;0))" office:value-type="float" office:value="0.118478961447661" calcext:value-type="float">
            <text:p>0.12</text:p>
          </table:table-cell>
          <table:table-cell table:style-name="ce36" table:formula="of:=IF([.CM31]&lt;=[.$B$21]-[.$B$13];2*[.$B$25]*[.$B$24]*([.$B$10]+[.$B$11]*[.$B$8])*(EXP(-[.$B$25]*[.CM31]) - EXP(-2*[.$B$25]*[.CM31])) + [.$B$12]*[.$B$7]; -[.$B$24]*(1-EXP(-[.$B$25]*[.CM$31]))^2*IF([.CM31]=[.$B$21];1;0))" office:value-type="float" office:value="0.117537810551128" calcext:value-type="float">
            <text:p>0.12</text:p>
          </table:table-cell>
          <table:table-cell table:style-name="ce36" table:formula="of:=IF([.CN31]&lt;=[.$B$21]-[.$B$13];2*[.$B$25]*[.$B$24]*([.$B$10]+[.$B$11]*[.$B$8])*(EXP(-[.$B$25]*[.CN31]) - EXP(-2*[.$B$25]*[.CN31])) + [.$B$12]*[.$B$7]; -[.$B$24]*(1-EXP(-[.$B$25]*[.CN$31]))^2*IF([.CN31]=[.$B$21];1;0))" office:value-type="float" office:value="0.116596606598125" calcext:value-type="float">
            <text:p>0.12</text:p>
          </table:table-cell>
          <table:table-cell table:style-name="ce36" table:formula="of:=IF([.CO31]&lt;=[.$B$21]-[.$B$13];2*[.$B$25]*[.$B$24]*([.$B$10]+[.$B$11]*[.$B$8])*(EXP(-[.$B$25]*[.CO31]) - EXP(-2*[.$B$25]*[.CO31])) + [.$B$12]*[.$B$7]; -[.$B$24]*(1-EXP(-[.$B$25]*[.CO$31]))^2*IF([.CO31]=[.$B$21];1;0))" office:value-type="float" office:value="0.115655787324119" calcext:value-type="float">
            <text:p>0.12</text:p>
          </table:table-cell>
          <table:table-cell table:style-name="ce36" table:formula="of:=IF([.CP31]&lt;=[.$B$21]-[.$B$13];2*[.$B$25]*[.$B$24]*([.$B$10]+[.$B$11]*[.$B$8])*(EXP(-[.$B$25]*[.CP31]) - EXP(-2*[.$B$25]*[.CP31])) + [.$B$12]*[.$B$7]; -[.$B$24]*(1-EXP(-[.$B$25]*[.CP$31]))^2*IF([.CP31]=[.$B$21];1;0))" office:value-type="float" office:value="0.114715770543852" calcext:value-type="float">
            <text:p>0.11</text:p>
          </table:table-cell>
          <table:table-cell table:style-name="ce36" table:formula="of:=IF([.CQ31]&lt;=[.$B$21]-[.$B$13];2*[.$B$25]*[.$B$24]*([.$B$10]+[.$B$11]*[.$B$8])*(EXP(-[.$B$25]*[.CQ31]) - EXP(-2*[.$B$25]*[.CQ31])) + [.$B$12]*[.$B$7]; -[.$B$24]*(1-EXP(-[.$B$25]*[.CQ$31]))^2*IF([.CQ31]=[.$B$21];1;0))" office:value-type="float" office:value="0.113776954856546" calcext:value-type="float">
            <text:p>0.11</text:p>
          </table:table-cell>
          <table:table-cell table:style-name="ce36" table:formula="of:=IF([.CR31]&lt;=[.$B$21]-[.$B$13];2*[.$B$25]*[.$B$24]*([.$B$10]+[.$B$11]*[.$B$8])*(EXP(-[.$B$25]*[.CR31]) - EXP(-2*[.$B$25]*[.CR31])) + [.$B$12]*[.$B$7]; -[.$B$24]*(1-EXP(-[.$B$25]*[.CR$31]))^2*IF([.CR31]=[.$B$21];1;0))" office:value-type="float" office:value="0.112839720328203" calcext:value-type="float">
            <text:p>0.11</text:p>
          </table:table-cell>
          <table:table-cell table:style-name="ce36" table:formula="of:=IF([.CS31]&lt;=[.$B$21]-[.$B$13];2*[.$B$25]*[.$B$24]*([.$B$10]+[.$B$11]*[.$B$8])*(EXP(-[.$B$25]*[.CS31]) - EXP(-2*[.$B$25]*[.CS31])) + [.$B$12]*[.$B$7]; -[.$B$24]*(1-EXP(-[.$B$25]*[.CS$31]))^2*IF([.CS31]=[.$B$21];1;0))" office:value-type="float" office:value="0.111904429151695" calcext:value-type="float">
            <text:p>0.11</text:p>
          </table:table-cell>
          <table:table-cell table:style-name="ce36" table:formula="of:=IF([.CT31]&lt;=[.$B$21]-[.$B$13];2*[.$B$25]*[.$B$24]*([.$B$10]+[.$B$11]*[.$B$8])*(EXP(-[.$B$25]*[.CT31]) - EXP(-2*[.$B$25]*[.CT31])) + [.$B$12]*[.$B$7]; -[.$B$24]*(1-EXP(-[.$B$25]*[.CT$31]))^2*IF([.CT31]=[.$B$21];1;0))" office:value-type="float" office:value="0.110971426285352" calcext:value-type="float">
            <text:p>0.11</text:p>
          </table:table-cell>
          <table:table-cell table:style-name="ce36" table:formula="of:=IF([.CU31]&lt;=[.$B$21]-[.$B$13];2*[.$B$25]*[.$B$24]*([.$B$10]+[.$B$11]*[.$B$8])*(EXP(-[.$B$25]*[.CU31]) - EXP(-2*[.$B$25]*[.CU31])) + [.$B$12]*[.$B$7]; -[.$B$24]*(1-EXP(-[.$B$25]*[.CU$31]))^2*IF([.CU31]=[.$B$21];1;0))" office:value-type="float" office:value="0.110041040070722" calcext:value-type="float">
            <text:p>0.11</text:p>
          </table:table-cell>
          <table:table-cell table:style-name="ce36" table:formula="of:=IF([.CV31]&lt;=[.$B$21]-[.$B$13];2*[.$B$25]*[.$B$24]*([.$B$10]+[.$B$11]*[.$B$8])*(EXP(-[.$B$25]*[.CV31]) - EXP(-2*[.$B$25]*[.CV31])) + [.$B$12]*[.$B$7]; -[.$B$24]*(1-EXP(-[.$B$25]*[.CV$31]))^2*IF([.CV31]=[.$B$21];1;0))" office:value-type="float" office:value="0.109113582830149" calcext:value-type="float">
            <text:p>0.11</text:p>
          </table:table-cell>
          <table:table-cell table:style-name="ce36" table:formula="of:=IF([.CW31]&lt;=[.$B$21]-[.$B$13];2*[.$B$25]*[.$B$24]*([.$B$10]+[.$B$11]*[.$B$8])*(EXP(-[.$B$25]*[.CW31]) - EXP(-2*[.$B$25]*[.CW31])) + [.$B$12]*[.$B$7]; -[.$B$24]*(1-EXP(-[.$B$25]*[.CW$31]))^2*IF([.CW31]=[.$B$21];1;0))" office:value-type="float" office:value="0.108189351444816" calcext:value-type="float">
            <text:p>0.11</text:p>
          </table:table-cell>
          <table:table-cell table:style-name="ce36" table:formula="of:=IF([.CX31]&lt;=[.$B$21]-[.$B$13];2*[.$B$25]*[.$B$24]*([.$B$10]+[.$B$11]*[.$B$8])*(EXP(-[.$B$25]*[.CX31]) - EXP(-2*[.$B$25]*[.CX31])) + [.$B$12]*[.$B$7]; -[.$B$24]*(1-EXP(-[.$B$25]*[.CX$31]))^2*IF([.CX31]=[.$B$21];1;0))" office:value-type="float" office:value="0.107268627913854" calcext:value-type="float">
            <text:p>0.11</text:p>
          </table:table-cell>
          <table:table-cell table:style-name="ce36" table:formula="of:=IF([.CY31]&lt;=[.$B$21]-[.$B$13];2*[.$B$25]*[.$B$24]*([.$B$10]+[.$B$11]*[.$B$8])*(EXP(-[.$B$25]*[.CY31]) - EXP(-2*[.$B$25]*[.CY31])) + [.$B$12]*[.$B$7]; -[.$B$24]*(1-EXP(-[.$B$25]*[.CY$31]))^2*IF([.CY31]=[.$B$21];1;0))" office:value-type="float" office:value="0.106351679895118" calcext:value-type="float">
            <text:p>0.11</text:p>
          </table:table-cell>
          <table:table-cell table:style-name="ce36" table:formula="of:=IF([.CZ31]&lt;=[.$B$21]-[.$B$13];2*[.$B$25]*[.$B$24]*([.$B$10]+[.$B$11]*[.$B$8])*(EXP(-[.$B$25]*[.CZ31]) - EXP(-2*[.$B$25]*[.CZ31])) + [.$B$12]*[.$B$7]; -[.$B$24]*(1-EXP(-[.$B$25]*[.CZ$31]))^2*IF([.CZ31]=[.$B$21];1;0))" office:value-type="float" office:value="0.105438761228208" calcext:value-type="float">
            <text:p>0.11</text:p>
          </table:table-cell>
          <table:table-cell table:style-name="ce36" table:formula="of:=IF([.DA31]&lt;=[.$B$21]-[.$B$13];2*[.$B$25]*[.$B$24]*([.$B$10]+[.$B$11]*[.$B$8])*(EXP(-[.$B$25]*[.DA31]) - EXP(-2*[.$B$25]*[.DA31])) + [.$B$12]*[.$B$7]; -[.$B$24]*(1-EXP(-[.$B$25]*[.DA$31]))^2*IF([.DA31]=[.$B$21];1;0))" office:value-type="float" office:value="0.104530112440292" calcext:value-type="float">
            <text:p>0.10</text:p>
          </table:table-cell>
          <table:table-cell table:style-name="ce36" table:formula="of:=IF([.DB31]&lt;=[.$B$21]-[.$B$13];2*[.$B$25]*[.$B$24]*([.$B$10]+[.$B$11]*[.$B$8])*(EXP(-[.$B$25]*[.DB31]) - EXP(-2*[.$B$25]*[.DB31])) + [.$B$12]*[.$B$7]; -[.$B$24]*(1-EXP(-[.$B$25]*[.DB$31]))^2*IF([.DB31]=[.$B$21];1;0))" office:value-type="float" office:value="0.103625961235269" calcext:value-type="float">
            <text:p>0.10</text:p>
          </table:table-cell>
          <table:table-cell table:style-name="ce36" table:formula="of:=IF([.DC31]&lt;=[.$B$21]-[.$B$13];2*[.$B$25]*[.$B$24]*([.$B$10]+[.$B$11]*[.$B$8])*(EXP(-[.$B$25]*[.DC31]) - EXP(-2*[.$B$25]*[.DC31])) + [.$B$12]*[.$B$7]; -[.$B$24]*(1-EXP(-[.$B$25]*[.DC$31]))^2*IF([.DC31]=[.$B$21];1;0))" office:value-type="float" office:value="0.102726522966809" calcext:value-type="float">
            <text:p>0.10</text:p>
          </table:table-cell>
          <table:table-cell table:style-name="ce36" table:formula="of:=IF([.DD31]&lt;=[.$B$21]-[.$B$13];2*[.$B$25]*[.$B$24]*([.$B$10]+[.$B$11]*[.$B$8])*(EXP(-[.$B$25]*[.DD31]) - EXP(-2*[.$B$25]*[.DD31])) + [.$B$12]*[.$B$7]; -[.$B$24]*(1-EXP(-[.$B$25]*[.DD$31]))^2*IF([.DD31]=[.$B$21];1;0))" office:value-type="float" office:value="0.101832001095759" calcext:value-type="float">
            <text:p>0.10</text:p>
          </table:table-cell>
          <table:table-cell table:style-name="ce36" table:formula="of:=IF([.DE31]&lt;=[.$B$21]-[.$B$13];2*[.$B$25]*[.$B$24]*([.$B$10]+[.$B$11]*[.$B$8])*(EXP(-[.$B$25]*[.DE31]) - EXP(-2*[.$B$25]*[.DE31])) + [.$B$12]*[.$B$7]; -[.$B$24]*(1-EXP(-[.$B$25]*[.DE$31]))^2*IF([.DE31]=[.$B$21];1;0))" office:value-type="float" office:value="0.100942587632432" calcext:value-type="float">
            <text:p>0.10</text:p>
          </table:table-cell>
          <table:table-cell table:style-name="ce36" table:formula="of:=IF([.DF31]&lt;=[.$B$21]-[.$B$13];2*[.$B$25]*[.$B$24]*([.$B$10]+[.$B$11]*[.$B$8])*(EXP(-[.$B$25]*[.DF31]) - EXP(-2*[.$B$25]*[.DF31])) + [.$B$12]*[.$B$7]; -[.$B$24]*(1-EXP(-[.$B$25]*[.DF$31]))^2*IF([.DF31]=[.$B$21];1;0))" office:value-type="float" office:value="0.100058463564234" calcext:value-type="float">
            <text:p>0.10</text:p>
          </table:table-cell>
          <table:table-cell table:style-name="ce36" table:formula="of:=IF([.DG31]&lt;=[.$B$21]-[.$B$13];2*[.$B$25]*[.$B$24]*([.$B$10]+[.$B$11]*[.$B$8])*(EXP(-[.$B$25]*[.DG31]) - EXP(-2*[.$B$25]*[.DG31])) + [.$B$12]*[.$B$7]; -[.$B$24]*(1-EXP(-[.$B$25]*[.DG$31]))^2*IF([.DG31]=[.$B$21];1;0))" office:value-type="float" office:value="0.099179799269112" calcext:value-type="float">
            <text:p>0.10</text:p>
          </table:table-cell>
          <table:table-cell table:style-name="ce36" table:formula="of:=IF([.DH31]&lt;=[.$B$21]-[.$B$13];2*[.$B$25]*[.$B$24]*([.$B$10]+[.$B$11]*[.$B$8])*(EXP(-[.$B$25]*[.DH31]) - EXP(-2*[.$B$25]*[.DH31])) + [.$B$12]*[.$B$7]; -[.$B$24]*(1-EXP(-[.$B$25]*[.DH$31]))^2*IF([.DH31]=[.$B$21];1;0))" office:value-type="float" office:value="0.0983067549152504" calcext:value-type="float">
            <text:p>0.10</text:p>
          </table:table-cell>
          <table:table-cell table:style-name="ce36" table:formula="of:=IF([.DI31]&lt;=[.$B$21]-[.$B$13];2*[.$B$25]*[.$B$24]*([.$B$10]+[.$B$11]*[.$B$8])*(EXP(-[.$B$25]*[.DI31]) - EXP(-2*[.$B$25]*[.DI31])) + [.$B$12]*[.$B$7]; -[.$B$24]*(1-EXP(-[.$B$25]*[.DI$31]))^2*IF([.DI31]=[.$B$21];1;0))" office:value-type="float" office:value="0.0974394808474741" calcext:value-type="float">
            <text:p>0.10</text:p>
          </table:table-cell>
          <table:table-cell table:style-name="ce36" table:formula="of:=IF([.DJ31]&lt;=[.$B$21]-[.$B$13];2*[.$B$25]*[.$B$24]*([.$B$10]+[.$B$11]*[.$B$8])*(EXP(-[.$B$25]*[.DJ31]) - EXP(-2*[.$B$25]*[.DJ31])) + [.$B$12]*[.$B$7]; -[.$B$24]*(1-EXP(-[.$B$25]*[.DJ$31]))^2*IF([.DJ31]=[.$B$21];1;0))" office:value-type="float" office:value="0.0965781179607609" calcext:value-type="float">
            <text:p>0.10</text:p>
          </table:table-cell>
          <table:table-cell table:style-name="ce36" table:formula="of:=IF([.DK31]&lt;=[.$B$21]-[.$B$13];2*[.$B$25]*[.$B$24]*([.$B$10]+[.$B$11]*[.$B$8])*(EXP(-[.$B$25]*[.DK31]) - EXP(-2*[.$B$25]*[.DK31])) + [.$B$12]*[.$B$7]; -[.$B$24]*(1-EXP(-[.$B$25]*[.DK$31]))^2*IF([.DK31]=[.$B$21];1;0))" office:value-type="float" office:value="0.0957227980612805" calcext:value-type="float">
            <text:p>0.10</text:p>
          </table:table-cell>
          <table:table-cell table:style-name="ce36" table:formula="of:=IF([.DL31]&lt;=[.$B$21]-[.$B$13];2*[.$B$25]*[.$B$24]*([.$B$10]+[.$B$11]*[.$B$8])*(EXP(-[.$B$25]*[.DL31]) - EXP(-2*[.$B$25]*[.DL31])) + [.$B$12]*[.$B$7]; -[.$B$24]*(1-EXP(-[.$B$25]*[.DL$31]))^2*IF([.DL31]=[.$B$21];1;0))" office:value-type="float" office:value="0.0948736442153539" calcext:value-type="float">
            <text:p>0.09</text:p>
          </table:table-cell>
          <table:table-cell table:style-name="ce36" table:formula="of:=IF([.DM31]&lt;=[.$B$21]-[.$B$13];2*[.$B$25]*[.$B$24]*([.$B$10]+[.$B$11]*[.$B$8])*(EXP(-[.$B$25]*[.DM31]) - EXP(-2*[.$B$25]*[.DM31])) + [.$B$12]*[.$B$7]; -[.$B$24]*(1-EXP(-[.$B$25]*[.DM$31]))^2*IF([.DM31]=[.$B$21];1;0))" office:value-type="float" office:value="0.0940307710867158" calcext:value-type="float">
            <text:p>0.09</text:p>
          </table:table-cell>
          <table:table-cell table:style-name="ce36" table:formula="of:=IF([.DN31]&lt;=[.$B$21]-[.$B$13];2*[.$B$25]*[.$B$24]*([.$B$10]+[.$B$11]*[.$B$8])*(EXP(-[.$B$25]*[.DN31]) - EXP(-2*[.$B$25]*[.DN31])) + [.$B$12]*[.$B$7]; -[.$B$24]*(1-EXP(-[.$B$25]*[.DN$31]))^2*IF([.DN31]=[.$B$21];1;0))" office:value-type="float" office:value="0.0931942852624535" calcext:value-type="float">
            <text:p>0.09</text:p>
          </table:table-cell>
          <table:table-cell table:style-name="ce36" table:formula="of:=IF([.DO31]&lt;=[.$B$21]-[.$B$13];2*[.$B$25]*[.$B$24]*([.$B$10]+[.$B$11]*[.$B$8])*(EXP(-[.$B$25]*[.DO31]) - EXP(-2*[.$B$25]*[.DO31])) + [.$B$12]*[.$B$7]; -[.$B$24]*(1-EXP(-[.$B$25]*[.DO$31]))^2*IF([.DO31]=[.$B$21];1;0))" office:value-type="float" office:value="0.0923642855679799" calcext:value-type="float">
            <text:p>0.09</text:p>
          </table:table-cell>
          <table:table-cell table:style-name="ce36" table:formula="of:=IF([.DP31]&lt;=[.$B$21]-[.$B$13];2*[.$B$25]*[.$B$24]*([.$B$10]+[.$B$11]*[.$B$8])*(EXP(-[.$B$25]*[.DP31]) - EXP(-2*[.$B$25]*[.DP31])) + [.$B$12]*[.$B$7]; -[.$B$24]*(1-EXP(-[.$B$25]*[.DP$31]))^2*IF([.DP31]=[.$B$21];1;0))" office:value-type="float" office:value="0.0915408633713908" calcext:value-type="float">
            <text:p>0.09</text:p>
          </table:table-cell>
          <table:table-cell table:style-name="ce36" table:formula="of:=IF([.DQ31]&lt;=[.$B$21]-[.$B$13];2*[.$B$25]*[.$B$24]*([.$B$10]+[.$B$11]*[.$B$8])*(EXP(-[.$B$25]*[.DQ31]) - EXP(-2*[.$B$25]*[.DQ31])) + [.$B$12]*[.$B$7]; -[.$B$24]*(1-EXP(-[.$B$25]*[.DQ$31]))^2*IF([.DQ31]=[.$B$21];1;0))" office:value-type="float" office:value="-10.3217732202375" calcext:value-type="float">
            <text:p>-10.32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Total carbon</text:p>
          </table:table-cell>
          <table:table-cell table:style-name="ce36" table:formula="of:=SUM([.B32:.DQ32])" office:value-type="float" office:value="3.98029985234857" calcext:value-type="float">
            <text:p>3.98</text:p>
          </table:table-cell>
          <table:table-cell table:style-name="Default" table:number-columns-repeated="99"/>
          <table:table-cell table:style-name="ce41"/>
          <table:table-cell table:style-name="Default" table:number-columns-repeated="19"/>
          <table:table-cell table:number-columns-repeated="16262"/>
        </table:table-row>
        <table:table-row table:style-name="ro1">
          <table:table-cell table:style-name="ce42" office:value-type="string" calcext:value-type="string">
            <text:p>Warming yea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W[Carbon,u] “kernel”, warming in warming year from year 0 emission, from a solution for SMDAMAGE FitW</text:p>
          </table:table-cell>
          <table:table-cell table:style-name="Default" office:value-type="float" office:value="0" calcext:value-type="float">
            <text:p>0</text:p>
          </table:table-cell>
          <table:table-cell table:style-name="ce39" office:value-type="float" office:value="0.000810628" calcext:value-type="float">
            <text:p>0.0008</text:p>
          </table:table-cell>
          <table:table-cell table:style-name="ce39" office:value-type="float" office:value="0.001371235" calcext:value-type="float">
            <text:p>0.0014</text:p>
          </table:table-cell>
          <table:table-cell table:style-name="ce39" office:value-type="float" office:value="0.001782009" calcext:value-type="float">
            <text:p>0.0018</text:p>
          </table:table-cell>
          <table:table-cell table:style-name="ce39" office:value-type="float" office:value="0.002046314" calcext:value-type="float">
            <text:p>0.0020</text:p>
          </table:table-cell>
          <table:table-cell table:style-name="ce39" office:value-type="float" office:value="0.002224353" calcext:value-type="float">
            <text:p>0.0022</text:p>
          </table:table-cell>
          <table:table-cell table:style-name="ce39" office:value-type="float" office:value="0.002351114" calcext:value-type="float">
            <text:p>0.0024</text:p>
          </table:table-cell>
          <table:table-cell table:style-name="ce39" office:value-type="float" office:value="0.002443458" calcext:value-type="float">
            <text:p>0.0024</text:p>
          </table:table-cell>
          <table:table-cell table:style-name="ce39" office:value-type="float" office:value="0.002509201" calcext:value-type="float">
            <text:p>0.0025</text:p>
          </table:table-cell>
          <table:table-cell table:style-name="ce39" office:value-type="float" office:value="0.002558329" calcext:value-type="float">
            <text:p>0.0026</text:p>
          </table:table-cell>
          <table:table-cell table:style-name="ce39" office:value-type="float" office:value="0.002590824" calcext:value-type="float">
            <text:p>0.0026</text:p>
          </table:table-cell>
          <table:table-cell table:style-name="ce39" office:value-type="float" office:value="0.002611596" calcext:value-type="float">
            <text:p>0.0026</text:p>
          </table:table-cell>
          <table:table-cell table:style-name="ce39" office:value-type="float" office:value="0.002625164" calcext:value-type="float">
            <text:p>0.0026</text:p>
          </table:table-cell>
          <table:table-cell table:style-name="ce39" office:value-type="float" office:value="0.002629826" calcext:value-type="float">
            <text:p>0.0026</text:p>
          </table:table-cell>
          <table:table-cell table:style-name="ce39" office:value-type="float" office:value="0.002629549" calcext:value-type="float">
            <text:p>0.0026</text:p>
          </table:table-cell>
          <table:table-cell table:style-name="ce39" office:value-type="float" office:value="0.002626513" calcext:value-type="float">
            <text:p>0.0026</text:p>
          </table:table-cell>
          <table:table-cell table:style-name="ce39" office:value-type="float" office:value="0.002621047" calcext:value-type="float">
            <text:p>0.0026</text:p>
          </table:table-cell>
          <table:table-cell table:style-name="ce39" office:value-type="float" office:value="0.002608917" calcext:value-type="float">
            <text:p>0.0026</text:p>
          </table:table-cell>
          <table:table-cell table:style-name="ce39" office:value-type="float" office:value="0.002594681" calcext:value-type="float">
            <text:p>0.0026</text:p>
          </table:table-cell>
          <table:table-cell table:style-name="ce39" office:value-type="float" office:value="0.002581921" calcext:value-type="float">
            <text:p>0.0026</text:p>
          </table:table-cell>
          <table:table-cell table:style-name="ce39" office:value-type="float" office:value="0.00256672" calcext:value-type="float">
            <text:p>0.0026</text:p>
          </table:table-cell>
          <table:table-cell table:style-name="ce39" office:value-type="float" office:value="0.002547936" calcext:value-type="float">
            <text:p>0.0025</text:p>
          </table:table-cell>
          <table:table-cell table:style-name="ce39" office:value-type="float" office:value="0.002530647" calcext:value-type="float">
            <text:p>0.0025</text:p>
          </table:table-cell>
          <table:table-cell table:style-name="ce39" office:value-type="float" office:value="0.002513368" calcext:value-type="float">
            <text:p>0.0025</text:p>
          </table:table-cell>
          <table:table-cell table:style-name="ce39" office:value-type="float" office:value="0.00249398" calcext:value-type="float">
            <text:p>0.0025</text:p>
          </table:table-cell>
          <table:table-cell table:style-name="ce39" office:value-type="float" office:value="0.002474633" calcext:value-type="float">
            <text:p>0.0025</text:p>
          </table:table-cell>
          <table:table-cell table:style-name="ce39" office:value-type="float" office:value="0.002454967" calcext:value-type="float">
            <text:p>0.0025</text:p>
          </table:table-cell>
          <table:table-cell table:style-name="ce39" office:value-type="float" office:value="0.002435273" calcext:value-type="float">
            <text:p>0.0024</text:p>
          </table:table-cell>
          <table:table-cell table:style-name="ce39" office:value-type="float" office:value="0.00241557" calcext:value-type="float">
            <text:p>0.0024</text:p>
          </table:table-cell>
          <table:table-cell table:style-name="ce39" office:value-type="float" office:value="0.002397998" calcext:value-type="float">
            <text:p>0.0024</text:p>
          </table:table-cell>
          <table:table-cell table:style-name="ce39" office:value-type="float" office:value="0.002380466" calcext:value-type="float">
            <text:p>0.0024</text:p>
          </table:table-cell>
          <table:table-cell table:style-name="ce39" office:value-type="float" office:value="0.002362705" calcext:value-type="float">
            <text:p>0.0024</text:p>
          </table:table-cell>
          <table:table-cell table:style-name="ce39" office:value-type="float" office:value="0.002345028" calcext:value-type="float">
            <text:p>0.0023</text:p>
          </table:table-cell>
          <table:table-cell table:style-name="ce39" office:value-type="float" office:value="0.002325004" calcext:value-type="float">
            <text:p>0.0023</text:p>
          </table:table-cell>
          <table:table-cell table:style-name="ce39" office:value-type="float" office:value="0.002313421" calcext:value-type="float">
            <text:p>0.0023</text:p>
          </table:table-cell>
          <table:table-cell table:style-name="ce39" office:value-type="float" office:value="0.002298453" calcext:value-type="float">
            <text:p>0.0023</text:p>
          </table:table-cell>
          <table:table-cell table:style-name="ce39" office:value-type="float" office:value="0.002283075" calcext:value-type="float">
            <text:p>0.0023</text:p>
          </table:table-cell>
          <table:table-cell table:style-name="ce39" office:value-type="float" office:value="0.002267619" calcext:value-type="float">
            <text:p>0.0023</text:p>
          </table:table-cell>
          <table:table-cell table:style-name="ce39" office:value-type="float" office:value="0.002249917" calcext:value-type="float">
            <text:p>0.0022</text:p>
          </table:table-cell>
          <table:table-cell table:style-name="ce39" office:value-type="float" office:value="0.002236422" calcext:value-type="float">
            <text:p>0.0022</text:p>
          </table:table-cell>
          <table:table-cell table:style-name="ce39" office:value-type="float" office:value="0.002219432" calcext:value-type="float">
            <text:p>0.0022</text:p>
          </table:table-cell>
          <table:table-cell table:style-name="ce39" office:value-type="float" office:value="0.00220099" calcext:value-type="float">
            <text:p>0.0022</text:p>
          </table:table-cell>
          <table:table-cell table:style-name="ce39" office:value-type="float" office:value="0.002179592" calcext:value-type="float">
            <text:p>0.0022</text:p>
          </table:table-cell>
          <table:table-cell table:style-name="ce39" office:value-type="float" office:value="0.002164619" calcext:value-type="float">
            <text:p>0.0022</text:p>
          </table:table-cell>
          <table:table-cell table:style-name="ce39" office:value-type="float" office:value="0.002147621" calcext:value-type="float">
            <text:p>0.0021</text:p>
          </table:table-cell>
          <table:table-cell table:style-name="ce39" office:value-type="float" office:value="0.002130811" calcext:value-type="float">
            <text:p>0.0021</text:p>
          </table:table-cell>
          <table:table-cell table:style-name="ce39" office:value-type="float" office:value="0.002120102" calcext:value-type="float">
            <text:p>0.0021</text:p>
          </table:table-cell>
          <table:table-cell table:style-name="ce39" office:value-type="float" office:value="0.002102948" calcext:value-type="float">
            <text:p>0.0021</text:p>
          </table:table-cell>
          <table:table-cell table:style-name="ce39" office:value-type="float" office:value="0.002091885" calcext:value-type="float">
            <text:p>0.0021</text:p>
          </table:table-cell>
          <table:table-cell table:style-name="ce39" office:value-type="float" office:value="0.002081073" calcext:value-type="float">
            <text:p>0.0021</text:p>
          </table:table-cell>
          <table:table-cell table:style-name="ce39" office:value-type="float" office:value="0.002066112" calcext:value-type="float">
            <text:p>0.0021</text:p>
          </table:table-cell>
          <table:table-cell table:style-name="ce39" office:value-type="float" office:value="0.00205582" calcext:value-type="float">
            <text:p>0.0021</text:p>
          </table:table-cell>
          <table:table-cell table:style-name="ce39" office:value-type="float" office:value="0.002037398" calcext:value-type="float">
            <text:p>0.0020</text:p>
          </table:table-cell>
          <table:table-cell table:style-name="ce39" office:value-type="float" office:value="0.002026768" calcext:value-type="float">
            <text:p>0.0020</text:p>
          </table:table-cell>
          <table:table-cell table:style-name="ce39" office:value-type="float" office:value="0.002014009" calcext:value-type="float">
            <text:p>0.0020</text:p>
          </table:table-cell>
          <table:table-cell table:style-name="ce39" office:value-type="float" office:value="0.002005162" calcext:value-type="float">
            <text:p>0.0020</text:p>
          </table:table-cell>
          <table:table-cell table:style-name="ce39" office:value-type="float" office:value="0.001998105" calcext:value-type="float">
            <text:p>0.0020</text:p>
          </table:table-cell>
          <table:table-cell table:style-name="ce39" office:value-type="float" office:value="0.001989367" calcext:value-type="float">
            <text:p>0.0020</text:p>
          </table:table-cell>
          <table:table-cell table:style-name="ce39" office:value-type="float" office:value="0.001978528" calcext:value-type="float">
            <text:p>0.0020</text:p>
          </table:table-cell>
          <table:table-cell table:style-name="ce39" office:value-type="float" office:value="0.001968593" calcext:value-type="float">
            <text:p>0.0020</text:p>
          </table:table-cell>
          <table:table-cell table:style-name="ce39" office:value-type="float" office:value="0.001960273" calcext:value-type="float">
            <text:p>0.0020</text:p>
          </table:table-cell>
          <table:table-cell table:style-name="ce39" office:value-type="float" office:value="0.001949699" calcext:value-type="float">
            <text:p>0.0019</text:p>
          </table:table-cell>
          <table:table-cell table:style-name="ce39" office:value-type="float" office:value="0.001941456" calcext:value-type="float">
            <text:p>0.0019</text:p>
          </table:table-cell>
          <table:table-cell table:style-name="ce39" office:value-type="float" office:value="0.001931482" calcext:value-type="float">
            <text:p>0.0019</text:p>
          </table:table-cell>
          <table:table-cell table:style-name="ce39" office:value-type="float" office:value="0.00192284" calcext:value-type="float">
            <text:p>0.0019</text:p>
          </table:table-cell>
          <table:table-cell table:style-name="ce39" office:value-type="float" office:value="0.001914272" calcext:value-type="float">
            <text:p>0.0019</text:p>
          </table:table-cell>
          <table:table-cell table:style-name="ce39" office:value-type="float" office:value="0.001906424" calcext:value-type="float">
            <text:p>0.0019</text:p>
          </table:table-cell>
          <table:table-cell table:style-name="ce39" office:value-type="float" office:value="0.001900075" calcext:value-type="float">
            <text:p>0.0019</text:p>
          </table:table-cell>
          <table:table-cell table:style-name="ce39" office:value-type="float" office:value="0.001892102" calcext:value-type="float">
            <text:p>0.0019</text:p>
          </table:table-cell>
          <table:table-cell table:style-name="ce39" office:value-type="float" office:value="0.001885921" calcext:value-type="float">
            <text:p>0.0019</text:p>
          </table:table-cell>
          <table:table-cell table:style-name="ce39" office:value-type="float" office:value="0.001879774" calcext:value-type="float">
            <text:p>0.0019</text:p>
          </table:table-cell>
          <table:table-cell table:style-name="ce39" office:value-type="float" office:value="0.001869948" calcext:value-type="float">
            <text:p>0.0019</text:p>
          </table:table-cell>
          <table:table-cell table:style-name="ce39" office:value-type="float" office:value="0.001863941" calcext:value-type="float">
            <text:p>0.0019</text:p>
          </table:table-cell>
          <table:table-cell table:style-name="ce39" office:value-type="float" office:value="0.001855957" calcext:value-type="float">
            <text:p>0.0019</text:p>
          </table:table-cell>
          <table:table-cell table:style-name="ce39" office:value-type="float" office:value="0.001851842" calcext:value-type="float">
            <text:p>0.0019</text:p>
          </table:table-cell>
          <table:table-cell table:style-name="ce39" office:value-type="float" office:value="0.001841667" calcext:value-type="float">
            <text:p>0.0018</text:p>
          </table:table-cell>
          <table:table-cell table:style-name="ce39" office:value-type="float" office:value="0.001833609" calcext:value-type="float">
            <text:p>0.0018</text:p>
          </table:table-cell>
          <table:table-cell table:style-name="ce39" office:value-type="float" office:value="0.001829512" calcext:value-type="float">
            <text:p>0.0018</text:p>
          </table:table-cell>
          <table:table-cell table:style-name="ce39" office:value-type="float" office:value="0.001821593" calcext:value-type="float">
            <text:p>0.0018</text:p>
          </table:table-cell>
          <table:table-cell table:style-name="ce39" office:value-type="float" office:value="0.001815792" calcext:value-type="float">
            <text:p>0.0018</text:p>
          </table:table-cell>
          <table:table-cell table:style-name="ce39" office:value-type="float" office:value="0.001809341" calcext:value-type="float">
            <text:p>0.0018</text:p>
          </table:table-cell>
          <table:table-cell table:style-name="ce39" office:value-type="float" office:value="0.001803371" calcext:value-type="float">
            <text:p>0.0018</text:p>
          </table:table-cell>
          <table:table-cell table:style-name="ce39" office:value-type="float" office:value="0.00179802" calcext:value-type="float">
            <text:p>0.0018</text:p>
          </table:table-cell>
          <table:table-cell table:style-name="ce39" office:value-type="float" office:value="0.001789594" calcext:value-type="float">
            <text:p>0.0018</text:p>
          </table:table-cell>
          <table:table-cell table:style-name="ce39" office:value-type="float" office:value="0.001785239" calcext:value-type="float">
            <text:p>0.0018</text:p>
          </table:table-cell>
          <table:table-cell table:style-name="ce39" office:value-type="float" office:value="0.001777986" calcext:value-type="float">
            <text:p>0.0018</text:p>
          </table:table-cell>
          <table:table-cell table:style-name="ce39" office:value-type="float" office:value="0.001771512" calcext:value-type="float">
            <text:p>0.0018</text:p>
          </table:table-cell>
          <table:table-cell table:style-name="ce39" office:value-type="float" office:value="0.001765262" calcext:value-type="float">
            <text:p>0.0018</text:p>
          </table:table-cell>
          <table:table-cell table:style-name="ce39" office:value-type="float" office:value="0.001760534" calcext:value-type="float">
            <text:p>0.0018</text:p>
          </table:table-cell>
          <table:table-cell table:style-name="ce39" office:value-type="float" office:value="0.001754719" calcext:value-type="float">
            <text:p>0.0018</text:p>
          </table:table-cell>
          <table:table-cell table:style-name="ce39" office:value-type="float" office:value="0.001747698" calcext:value-type="float">
            <text:p>0.0017</text:p>
          </table:table-cell>
          <table:table-cell table:style-name="ce39" office:value-type="float" office:value="0.001742777" calcext:value-type="float">
            <text:p>0.0017</text:p>
          </table:table-cell>
          <table:table-cell table:style-name="ce39" office:value-type="float" office:value="0.001737629" calcext:value-type="float">
            <text:p>0.0017</text:p>
          </table:table-cell>
          <table:table-cell table:style-name="ce39" office:value-type="float" office:value="0.001728559" calcext:value-type="float">
            <text:p>0.0017</text:p>
          </table:table-cell>
          <table:table-cell table:style-name="ce39" office:value-type="float" office:value="0.001722733" calcext:value-type="float">
            <text:p>0.0017</text:p>
          </table:table-cell>
          <table:table-cell table:style-name="ce39" office:value-type="float" office:value="0.001712962" calcext:value-type="float">
            <text:p>0.0017</text:p>
          </table:table-cell>
          <table:table-cell table:style-name="ce39" office:value-type="float" office:value="0.001708024" calcext:value-type="float">
            <text:p>0.0017</text:p>
          </table:table-cell>
          <table:table-cell table:style-name="ce39" office:value-type="float" office:value="0.001697598" calcext:value-type="float">
            <text:p>0.0017</text:p>
          </table:table-cell>
          <table:table-cell table:style-name="ce39" office:value-type="float" office:value="0.001691429" calcext:value-type="float">
            <text:p>0.0017</text:p>
          </table:table-cell>
          <table:table-cell table:style-name="ce39" office:value-type="float" office:value="0.001685464" calcext:value-type="float">
            <text:p>0.0017</text:p>
          </table:table-cell>
          <table:table-cell table:style-name="ce44" office:value-type="float" office:value="0.001681741" calcext:value-type="float">
            <text:p>0.0017</text:p>
          </table:table-cell>
          <table:table-cell table:style-name="ce39" office:value-type="float" office:value="0.001676029" calcext:value-type="float">
            <text:p>0.0017</text:p>
          </table:table-cell>
          <table:table-cell table:style-name="ce39" office:value-type="float" office:value="0.001668527" calcext:value-type="float">
            <text:p>0.0017</text:p>
          </table:table-cell>
          <table:table-cell table:style-name="ce39" office:value-type="float" office:value="0.001662831" calcext:value-type="float">
            <text:p>0.0017</text:p>
          </table:table-cell>
          <table:table-cell table:style-name="ce39" office:value-type="float" office:value="0.001657143" calcext:value-type="float">
            <text:p>0.0017</text:p>
          </table:table-cell>
          <table:table-cell table:style-name="ce39" office:value-type="float" office:value="0.00164965" calcext:value-type="float">
            <text:p>0.0016</text:p>
          </table:table-cell>
          <table:table-cell table:style-name="ce39" office:value-type="float" office:value="0.001646093" calcext:value-type="float">
            <text:p>0.0016</text:p>
          </table:table-cell>
          <table:table-cell table:style-name="ce39" office:value-type="float" office:value="0.001638629" calcext:value-type="float">
            <text:p>0.0016</text:p>
          </table:table-cell>
          <table:table-cell table:style-name="ce39" office:value-type="float" office:value="0.001632972" calcext:value-type="float">
            <text:p>0.0016</text:p>
          </table:table-cell>
          <table:table-cell table:style-name="ce39" office:value-type="float" office:value="0.001629437" calcext:value-type="float">
            <text:p>0.0016</text:p>
          </table:table-cell>
          <table:table-cell table:style-name="ce39" office:value-type="float" office:value="0.001621997" calcext:value-type="float">
            <text:p>0.0016</text:p>
          </table:table-cell>
          <table:table-cell table:style-name="ce39" office:value-type="float" office:value="0.001616362" calcext:value-type="float">
            <text:p>0.0016</text:p>
          </table:table-cell>
          <table:table-cell table:style-name="ce39" office:value-type="float" office:value="0.001608937" calcext:value-type="float">
            <text:p>0.0016</text:p>
          </table:table-cell>
          <table:table-cell table:style-name="ce39" office:value-type="float" office:value="0.001603635" calcext:value-type="float">
            <text:p>0.0016</text:p>
          </table:table-cell>
          <table:table-cell table:style-name="ce39" office:value-type="float" office:value="0.001598023" calcext:value-type="float">
            <text:p>0.0016</text:p>
          </table:table-cell>
          <table:table-cell table:style-name="ce39" office:value-type="float" office:value="0.001594534" calcext:value-type="float">
            <text:p>0.0016</text:p>
          </table:table-cell>
          <table:table-cell table:style-name="ce39" office:value-type="float" office:value="0.001589255" calcext:value-type="float">
            <text:p>0.0016</text:p>
          </table:table-cell>
          <table:table-cell table:style-name="ce39" office:value-type="float" office:value="0.001583666" calcext:value-type="float">
            <text:p>0.0016</text:p>
          </table:table-cell>
          <table:table-cell table:style-name="ce39" office:value-type="float" office:value="0.001578084" calcext:value-type="float">
            <text:p>0.0016</text:p>
          </table:table-cell>
          <table:table-cell table:style-name="ce39" office:value-type="float" office:value="0.001572828" calcext:value-type="float">
            <text:p>0.0016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W[forestry,u], total warming in warming year, by convolution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0267586005671569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0777157706877344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151600580891908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246028867692859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359457692422415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490827395423445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639239246168488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803793195521269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0983726222373379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117816111351017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138627434092411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160732278551976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184047349582724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208498065832353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234015674542398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260532763424864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287968446320618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316254417181419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345335071289463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375145256055803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40561655365227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436697015274776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468333103936862" calcext:value-type="float">
            <text:p>0.00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500466433540525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53304629954629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56602290136522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59934916662763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632979999804371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666879231434722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70100709065757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735324619911658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769795348106239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804376404106823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839060387916724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873808322396318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908589878989241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943376810020672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097813489809619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01285085007599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04749013413948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0820235590247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11641707606154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15066666087135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1847460972462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21863599062435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25233756763878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28581585517483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31907343329291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352098763627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38486661226925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41737855973952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44959794807109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48153552126441" calcext:value-type="float">
            <text:p>0.01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51317554264279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544521236045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5755721320653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6063179770085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63674629255034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66685342753425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696639149021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7260919771297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75521430678812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7839971443596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81244068391582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8405422390722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86830158806189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8957218526483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92279713060886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9495318292715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197592603021094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00196773396652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02766725157985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0530186997411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07803422602353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10269609982506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12700937352582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1509869129883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1746188356642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19791220842764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22086659557698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24348491010748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26577094711398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2877168111728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3093360806029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33062232930421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35157923638294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37220929096213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3925194890697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41250933732366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43217718744323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45153149216492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47057456902345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48929637848754" calcext:value-type="float">
            <text:p>0.02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077077867393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2579833820277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435838023394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6104941873383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7820872305443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59506502095806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116285031759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2789697455014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4386743181099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5954748214438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749401199136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69004235277098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048688626343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19411254639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3367716994087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476766047480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6140113546694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7485836008565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78804532087415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0097070216798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1363668784923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2605324391461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3821888919496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5013568032125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6180647207382" calcext:value-type="float">
            <text:p>0.03</text:p>
          </table:table-cell>
          <table:table-cell table:style-name="ce36" table:formula="of:=SUMPRODUCT([.$B$32]:INDEX([.$B$32:.$DQ$32]; 1; MIN(COLUMN()-COLUMN([.$B$36])+1; 120)); N(OFFSET([.$B$35]; 0; (COLUMN()-COLUMN([.$B$36]))-(COLUMN([.$B$32]:INDEX([.$B$32:.$DQ$32]; 1; MIN(COLUMN()-COLUMN([.$B$36])+1; 120)))-COLUMN([.$B$32])))))" office:value-type="float" office:value="0.0287323515660812" calcext:value-type="float">
            <text:p>0.03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Bid for contract starting at 1 and Y years long</text:p>
          </table:table-cell>
          <table:table-cell table:style-name="ce46" table:formula="of:=[.$B$14]*([.$B$15]*[.$B$16]+[.$B$17]*(1-[.$B$16])) + [.$B$19]*(1-(1+[.$B$20])^(-[.B$31]))/[.$B$20]-[.$B$24]*(1-EXP(-[.$B$25]*[.B$31]))^2/(1+[.$B$20])^[.B$31]  - IF([.B31]=[.$B$21];1;0)*[.$B$23]*[.$B$24]*(1-EXP(-[.$B$25]*[.$B$21]))^2/(1+[.$B$20])^[.$B$21]" office:value-type="currency" office:currency="USD" office:value="946.722018185492" calcext:value-type="currency">
            <text:p>$947</text:p>
          </table:table-cell>
          <table:table-cell table:style-name="ce46" table:formula="of:=[.$B$14]*([.$B$15]*[.$B$16]+[.$B$17]*(1-[.$B$16])) + [.$B$19]*(1-(1+[.$B$20])^(-[.C$31]))/[.$B$20]-[.$B$24]*(1-EXP(-[.$B$25]*[.C$31]))^2/(1+[.$B$20])^[.C$31]  - IF([.C31]=[.$B$21];1;0)*[.$B$23]*[.$B$24]*(1-EXP(-[.$B$25]*[.$B$21]))^2/(1+[.$B$20])^[.$B$21]" office:value-type="currency" office:currency="USD" office:value="986.415509328809" calcext:value-type="currency">
            <text:p>$986</text:p>
          </table:table-cell>
          <table:table-cell table:style-name="ce46" table:formula="of:=[.$B$14]*([.$B$15]*[.$B$16]+[.$B$17]*(1-[.$B$16])) + [.$B$19]*(1-(1+[.$B$20])^(-[.D$31]))/[.$B$20]-[.$B$24]*(1-EXP(-[.$B$25]*[.D$31]))^2/(1+[.$B$20])^[.D$31]  - IF([.D31]=[.$B$21];1;0)*[.$B$23]*[.$B$24]*(1-EXP(-[.$B$25]*[.$B$21]))^2/(1+[.$B$20])^[.$B$21]" office:value-type="currency" office:currency="USD" office:value="1024.94740959203" calcext:value-type="currency">
            <text:p>$1,025</text:p>
          </table:table-cell>
          <table:table-cell table:style-name="ce46" table:formula="of:=[.$B$14]*([.$B$15]*[.$B$16]+[.$B$17]*(1-[.$B$16])) + [.$B$19]*(1-(1+[.$B$20])^(-[.E$31]))/[.$B$20]-[.$B$24]*(1-EXP(-[.$B$25]*[.E$31]))^2/(1+[.$B$20])^[.E$31]  - IF([.E31]=[.$B$21];1;0)*[.$B$23]*[.$B$24]*(1-EXP(-[.$B$25]*[.$B$21]))^2/(1+[.$B$20])^[.$B$21]" office:value-type="currency" office:currency="USD" office:value="1062.35213649285" calcext:value-type="currency">
            <text:p>$1,062</text:p>
          </table:table-cell>
          <table:table-cell table:style-name="ce46" table:formula="of:=[.$B$14]*([.$B$15]*[.$B$16]+[.$B$17]*(1-[.$B$16])) + [.$B$19]*(1-(1+[.$B$20])^(-[.F$31]))/[.$B$20]-[.$B$24]*(1-EXP(-[.$B$25]*[.F$31]))^2/(1+[.$B$20])^[.F$31]  - IF([.F31]=[.$B$21];1;0)*[.$B$23]*[.$B$24]*(1-EXP(-[.$B$25]*[.$B$21]))^2/(1+[.$B$20])^[.$B$21]" office:value-type="currency" office:currency="USD" office:value="1098.66305923618" calcext:value-type="currency">
            <text:p>$1,099</text:p>
          </table:table-cell>
          <table:table-cell table:style-name="ce46" table:formula="of:=[.$B$14]*([.$B$15]*[.$B$16]+[.$B$17]*(1-[.$B$16])) + [.$B$19]*(1-(1+[.$B$20])^(-[.G$31]))/[.$B$20]-[.$B$24]*(1-EXP(-[.$B$25]*[.G$31]))^2/(1+[.$B$20])^[.G$31]  - IF([.G31]=[.$B$21];1;0)*[.$B$23]*[.$B$24]*(1-EXP(-[.$B$25]*[.$B$21]))^2/(1+[.$B$20])^[.$B$21]" office:value-type="currency" office:currency="USD" office:value="1133.91253244333" calcext:value-type="currency">
            <text:p>$1,134</text:p>
          </table:table-cell>
          <table:table-cell table:style-name="ce46" table:formula="of:=[.$B$14]*([.$B$15]*[.$B$16]+[.$B$17]*(1-[.$B$16])) + [.$B$19]*(1-(1+[.$B$20])^(-[.H$31]))/[.$B$20]-[.$B$24]*(1-EXP(-[.$B$25]*[.H$31]))^2/(1+[.$B$20])^[.H$31]  - IF([.H31]=[.$B$21];1;0)*[.$B$23]*[.$B$24]*(1-EXP(-[.$B$25]*[.$B$21]))^2/(1+[.$B$20])^[.$B$21]" office:value-type="currency" office:currency="USD" office:value="1168.13192868916" calcext:value-type="currency">
            <text:p>$1,168</text:p>
          </table:table-cell>
          <table:table-cell table:style-name="ce46" table:formula="of:=[.$B$14]*([.$B$15]*[.$B$16]+[.$B$17]*(1-[.$B$16])) + [.$B$19]*(1-(1+[.$B$20])^(-[.I$31]))/[.$B$20]-[.$B$24]*(1-EXP(-[.$B$25]*[.I$31]))^2/(1+[.$B$20])^[.I$31]  - IF([.I31]=[.$B$21];1;0)*[.$B$23]*[.$B$24]*(1-EXP(-[.$B$25]*[.$B$21]))^2/(1+[.$B$20])^[.$B$21]" office:value-type="currency" office:currency="USD" office:value="1201.35166989534" calcext:value-type="currency">
            <text:p>$1,201</text:p>
          </table:table-cell>
          <table:table-cell table:style-name="ce46" table:formula="of:=[.$B$14]*([.$B$15]*[.$B$16]+[.$B$17]*(1-[.$B$16])) + [.$B$19]*(1-(1+[.$B$20])^(-[.J$31]))/[.$B$20]-[.$B$24]*(1-EXP(-[.$B$25]*[.J$31]))^2/(1+[.$B$20])^[.J$31]  - IF([.J31]=[.$B$21];1;0)*[.$B$23]*[.$B$24]*(1-EXP(-[.$B$25]*[.$B$21]))^2/(1+[.$B$20])^[.$B$21]" office:value-type="currency" office:currency="USD" office:value="1233.60125762536" calcext:value-type="currency">
            <text:p>$1,234</text:p>
          </table:table-cell>
          <table:table-cell table:style-name="ce46" table:formula="of:=[.$B$14]*([.$B$15]*[.$B$16]+[.$B$17]*(1-[.$B$16])) + [.$B$19]*(1-(1+[.$B$20])^(-[.K$31]))/[.$B$20]-[.$B$24]*(1-EXP(-[.$B$25]*[.K$31]))^2/(1+[.$B$20])^[.K$31]  - IF([.K31]=[.$B$21];1;0)*[.$B$23]*[.$B$24]*(1-EXP(-[.$B$25]*[.$B$21]))^2/(1+[.$B$20])^[.$B$21]" office:value-type="currency" office:currency="USD" office:value="1264.90930232498" calcext:value-type="currency">
            <text:p>$1,265</text:p>
          </table:table-cell>
          <table:table-cell table:style-name="ce46" table:formula="of:=[.$B$14]*([.$B$15]*[.$B$16]+[.$B$17]*(1-[.$B$16])) + [.$B$19]*(1-(1+[.$B$20])^(-[.L$31]))/[.$B$20]-[.$B$24]*(1-EXP(-[.$B$25]*[.L$31]))^2/(1+[.$B$20])^[.L$31]  - IF([.L31]=[.$B$21];1;0)*[.$B$23]*[.$B$24]*(1-EXP(-[.$B$25]*[.$B$21]))^2/(1+[.$B$20])^[.$B$21]" office:value-type="currency" office:currency="USD" office:value="1295.30355154972" calcext:value-type="currency">
            <text:p>$1,295</text:p>
          </table:table-cell>
          <table:table-cell table:style-name="ce46" table:formula="of:=[.$B$14]*([.$B$15]*[.$B$16]+[.$B$17]*(1-[.$B$16])) + [.$B$19]*(1-(1+[.$B$20])^(-[.M$31]))/[.$B$20]-[.$B$24]*(1-EXP(-[.$B$25]*[.M$31]))^2/(1+[.$B$20])^[.M$31]  - IF([.M31]=[.$B$21];1;0)*[.$B$23]*[.$B$24]*(1-EXP(-[.$B$25]*[.$B$21]))^2/(1+[.$B$20])^[.$B$21]" office:value-type="currency" office:currency="USD" office:value="1324.81091721931" calcext:value-type="currency">
            <text:p>$1,325</text:p>
          </table:table-cell>
          <table:table-cell table:style-name="ce46" table:formula="of:=[.$B$14]*([.$B$15]*[.$B$16]+[.$B$17]*(1-[.$B$16])) + [.$B$19]*(1-(1+[.$B$20])^(-[.N$31]))/[.$B$20]-[.$B$24]*(1-EXP(-[.$B$25]*[.N$31]))^2/(1+[.$B$20])^[.N$31]  - IF([.N31]=[.$B$21];1;0)*[.$B$23]*[.$B$24]*(1-EXP(-[.$B$25]*[.$B$21]))^2/(1+[.$B$20])^[.$B$21]" office:value-type="currency" office:currency="USD" office:value="1353.45750193683" calcext:value-type="currency">
            <text:p>$1,353</text:p>
          </table:table-cell>
          <table:table-cell table:style-name="ce46" table:formula="of:=[.$B$14]*([.$B$15]*[.$B$16]+[.$B$17]*(1-[.$B$16])) + [.$B$19]*(1-(1+[.$B$20])^(-[.O$31]))/[.$B$20]-[.$B$24]*(1-EXP(-[.$B$25]*[.O$31]))^2/(1+[.$B$20])^[.O$31]  - IF([.O31]=[.$B$21];1;0)*[.$B$23]*[.$B$24]*(1-EXP(-[.$B$25]*[.$B$21]))^2/(1+[.$B$20])^[.$B$21]" office:value-type="currency" office:currency="USD" office:value="1381.2686244091" calcext:value-type="currency">
            <text:p>$1,381</text:p>
          </table:table-cell>
          <table:table-cell table:style-name="ce46" table:formula="of:=[.$B$14]*([.$B$15]*[.$B$16]+[.$B$17]*(1-[.$B$16])) + [.$B$19]*(1-(1+[.$B$20])^(-[.P$31]))/[.$B$20]-[.$B$24]*(1-EXP(-[.$B$25]*[.P$31]))^2/(1+[.$B$20])^[.P$31]  - IF([.P31]=[.$B$21];1;0)*[.$B$23]*[.$B$24]*(1-EXP(-[.$B$25]*[.$B$21]))^2/(1+[.$B$20])^[.$B$21]" office:value-type="currency" office:currency="USD" office:value="1408.26884400265" calcext:value-type="currency">
            <text:p>$1,408</text:p>
          </table:table-cell>
          <table:table-cell table:style-name="ce46" table:formula="of:=[.$B$14]*([.$B$15]*[.$B$16]+[.$B$17]*(1-[.$B$16])) + [.$B$19]*(1-(1+[.$B$20])^(-[.Q$31]))/[.$B$20]-[.$B$24]*(1-EXP(-[.$B$25]*[.Q$31]))^2/(1+[.$B$20])^[.Q$31]  - IF([.Q31]=[.$B$21];1;0)*[.$B$23]*[.$B$24]*(1-EXP(-[.$B$25]*[.$B$21]))^2/(1+[.$B$20])^[.$B$21]" office:value-type="currency" office:currency="USD" office:value="1434.4819844687" calcext:value-type="currency">
            <text:p>$1,434</text:p>
          </table:table-cell>
          <table:table-cell table:style-name="ce46" table:formula="of:=[.$B$14]*([.$B$15]*[.$B$16]+[.$B$17]*(1-[.$B$16])) + [.$B$19]*(1-(1+[.$B$20])^(-[.R$31]))/[.$B$20]-[.$B$24]*(1-EXP(-[.$B$25]*[.R$31]))^2/(1+[.$B$20])^[.R$31]  - IF([.R31]=[.$B$21];1;0)*[.$B$23]*[.$B$24]*(1-EXP(-[.$B$25]*[.$B$21]))^2/(1+[.$B$20])^[.$B$21]" office:value-type="currency" office:currency="USD" office:value="1459.93115686852" calcext:value-type="currency">
            <text:p>$1,460</text:p>
          </table:table-cell>
          <table:table-cell table:style-name="ce46" table:formula="of:=[.$B$14]*([.$B$15]*[.$B$16]+[.$B$17]*(1-[.$B$16])) + [.$B$19]*(1-(1+[.$B$20])^(-[.S$31]))/[.$B$20]-[.$B$24]*(1-EXP(-[.$B$25]*[.S$31]))^2/(1+[.$B$20])^[.S$31]  - IF([.S31]=[.$B$21];1;0)*[.$B$23]*[.$B$24]*(1-EXP(-[.$B$25]*[.$B$21]))^2/(1+[.$B$20])^[.$B$21]" office:value-type="currency" office:currency="USD" office:value="1484.63878172965" calcext:value-type="currency">
            <text:p>$1,485</text:p>
          </table:table-cell>
          <table:table-cell table:style-name="ce46" table:formula="of:=[.$B$14]*([.$B$15]*[.$B$16]+[.$B$17]*(1-[.$B$16])) + [.$B$19]*(1-(1+[.$B$20])^(-[.T$31]))/[.$B$20]-[.$B$24]*(1-EXP(-[.$B$25]*[.T$31]))^2/(1+[.$B$20])^[.T$31]  - IF([.T31]=[.$B$21];1;0)*[.$B$23]*[.$B$24]*(1-EXP(-[.$B$25]*[.$B$21]))^2/(1+[.$B$20])^[.$B$21]" office:value-type="currency" office:currency="USD" office:value="1508.62661046184" calcext:value-type="currency">
            <text:p>$1,509</text:p>
          </table:table-cell>
          <table:table-cell table:style-name="ce46" table:formula="of:=[.$B$14]*([.$B$15]*[.$B$16]+[.$B$17]*(1-[.$B$16])) + [.$B$19]*(1-(1+[.$B$20])^(-[.U$31]))/[.$B$20]-[.$B$24]*(1-EXP(-[.$B$25]*[.U$31]))^2/(1+[.$B$20])^[.U$31]  - IF([.U31]=[.$B$21];1;0)*[.$B$23]*[.$B$24]*(1-EXP(-[.$B$25]*[.$B$21]))^2/(1+[.$B$20])^[.$B$21]" office:value-type="currency" office:currency="USD" office:value="1531.9157460603" calcext:value-type="currency">
            <text:p>$1,532</text:p>
          </table:table-cell>
          <table:table-cell table:style-name="ce46" table:formula="of:=[.$B$14]*([.$B$15]*[.$B$16]+[.$B$17]*(1-[.$B$16])) + [.$B$19]*(1-(1+[.$B$20])^(-[.V$31]))/[.$B$20]-[.$B$24]*(1-EXP(-[.$B$25]*[.V$31]))^2/(1+[.$B$20])^[.V$31]  - IF([.V31]=[.$B$21];1;0)*[.$B$23]*[.$B$24]*(1-EXP(-[.$B$25]*[.$B$21]))^2/(1+[.$B$20])^[.$B$21]" office:value-type="currency" office:currency="USD" office:value="1554.52666312306" calcext:value-type="currency">
            <text:p>$1,555</text:p>
          </table:table-cell>
          <table:table-cell table:style-name="ce46" table:formula="of:=[.$B$14]*([.$B$15]*[.$B$16]+[.$B$17]*(1-[.$B$16])) + [.$B$19]*(1-(1+[.$B$20])^(-[.W$31]))/[.$B$20]-[.$B$24]*(1-EXP(-[.$B$25]*[.W$31]))^2/(1+[.$B$20])^[.W$31]  - IF([.W31]=[.$B$21];1;0)*[.$B$23]*[.$B$24]*(1-EXP(-[.$B$25]*[.$B$21]))^2/(1+[.$B$20])^[.$B$21]" office:value-type="currency" office:currency="USD" office:value="1576.47922720742" calcext:value-type="currency">
            <text:p>$1,576</text:p>
          </table:table-cell>
          <table:table-cell table:style-name="ce46" table:formula="of:=[.$B$14]*([.$B$15]*[.$B$16]+[.$B$17]*(1-[.$B$16])) + [.$B$19]*(1-(1+[.$B$20])^(-[.X$31]))/[.$B$20]-[.$B$24]*(1-EXP(-[.$B$25]*[.X$31]))^2/(1+[.$B$20])^[.X$31]  - IF([.X31]=[.$B$21];1;0)*[.$B$23]*[.$B$24]*(1-EXP(-[.$B$25]*[.$B$21]))^2/(1+[.$B$20])^[.$B$21]" office:value-type="currency" office:currency="USD" office:value="1597.79271355018" calcext:value-type="currency">
            <text:p>$1,598</text:p>
          </table:table-cell>
          <table:table-cell table:style-name="ce46" table:formula="of:=[.$B$14]*([.$B$15]*[.$B$16]+[.$B$17]*(1-[.$B$16])) + [.$B$19]*(1-(1+[.$B$20])^(-[.Y$31]))/[.$B$20]-[.$B$24]*(1-EXP(-[.$B$25]*[.Y$31]))^2/(1+[.$B$20])^[.Y$31]  - IF([.Y31]=[.$B$21];1;0)*[.$B$23]*[.$B$24]*(1-EXP(-[.$B$25]*[.$B$21]))^2/(1+[.$B$20])^[.$B$21]" office:value-type="currency" office:currency="USD" office:value="1618.48582517458" calcext:value-type="currency">
            <text:p>$1,618</text:p>
          </table:table-cell>
          <table:table-cell table:style-name="ce46" table:formula="of:=[.$B$14]*([.$B$15]*[.$B$16]+[.$B$17]*(1-[.$B$16])) + [.$B$19]*(1-(1+[.$B$20])^(-[.Z$31]))/[.$B$20]-[.$B$24]*(1-EXP(-[.$B$25]*[.Z$31]))^2/(1+[.$B$20])^[.Z$31]  - IF([.Z31]=[.$B$21];1;0)*[.$B$23]*[.$B$24]*(1-EXP(-[.$B$25]*[.$B$21]))^2/(1+[.$B$20])^[.$B$21]" office:value-type="currency" office:currency="USD" office:value="1638.57671040647" calcext:value-type="currency">
            <text:p>$1,639</text:p>
          </table:table-cell>
          <table:table-cell table:style-name="ce46" table:formula="of:=[.$B$14]*([.$B$15]*[.$B$16]+[.$B$17]*(1-[.$B$16])) + [.$B$19]*(1-(1+[.$B$20])^(-[.AA$31]))/[.$B$20]-[.$B$24]*(1-EXP(-[.$B$25]*[.AA$31]))^2/(1+[.$B$20])^[.AA$31]  - IF([.AA31]=[.$B$21];1;0)*[.$B$23]*[.$B$24]*(1-EXP(-[.$B$25]*[.$B$21]))^2/(1+[.$B$20])^[.$B$21]" office:value-type="currency" office:currency="USD" office:value="1658.08297982098" calcext:value-type="currency">
            <text:p>$1,658</text:p>
          </table:table-cell>
          <table:table-cell table:style-name="ce46" table:formula="of:=[.$B$14]*([.$B$15]*[.$B$16]+[.$B$17]*(1-[.$B$16])) + [.$B$19]*(1-(1+[.$B$20])^(-[.AB$31]))/[.$B$20]-[.$B$24]*(1-EXP(-[.$B$25]*[.AB$31]))^2/(1+[.$B$20])^[.AB$31]  - IF([.AB31]=[.$B$21];1;0)*[.$B$23]*[.$B$24]*(1-EXP(-[.$B$25]*[.$B$21]))^2/(1+[.$B$20])^[.$B$21]" office:value-type="currency" office:currency="USD" office:value="1677.02172264015" calcext:value-type="currency">
            <text:p>$1,677</text:p>
          </table:table-cell>
          <table:table-cell table:style-name="ce46" table:formula="of:=[.$B$14]*([.$B$15]*[.$B$16]+[.$B$17]*(1-[.$B$16])) + [.$B$19]*(1-(1+[.$B$20])^(-[.AC$31]))/[.$B$20]-[.$B$24]*(1-EXP(-[.$B$25]*[.AC$31]))^2/(1+[.$B$20])^[.AC$31]  - IF([.AC31]=[.$B$21];1;0)*[.$B$23]*[.$B$24]*(1-EXP(-[.$B$25]*[.$B$21]))^2/(1+[.$B$20])^[.$B$21]" office:value-type="currency" office:currency="USD" office:value="1695.40952260126" calcext:value-type="currency">
            <text:p>$1,695</text:p>
          </table:table-cell>
          <table:table-cell table:style-name="ce46" table:formula="of:=[.$B$14]*([.$B$15]*[.$B$16]+[.$B$17]*(1-[.$B$16])) + [.$B$19]*(1-(1+[.$B$20])^(-[.AD$31]))/[.$B$20]-[.$B$24]*(1-EXP(-[.$B$25]*[.AD$31]))^2/(1+[.$B$20])^[.AD$31]  - IF([.AD31]=[.$B$21];1;0)*[.$B$23]*[.$B$24]*(1-EXP(-[.$B$25]*[.$B$21]))^2/(1+[.$B$20])^[.$B$21]" office:value-type="currency" office:currency="USD" office:value="1713.26247331455" calcext:value-type="currency">
            <text:p>$1,713</text:p>
          </table:table-cell>
          <table:table-cell table:style-name="ce46" table:formula="of:=[.$B$14]*([.$B$15]*[.$B$16]+[.$B$17]*(1-[.$B$16])) + [.$B$19]*(1-(1+[.$B$20])^(-[.AE$31]))/[.$B$20]-[.$B$24]*(1-EXP(-[.$B$25]*[.AE$31]))^2/(1+[.$B$20])^[.AE$31]  - IF([.AE31]=[.$B$21];1;0)*[.$B$23]*[.$B$24]*(1-EXP(-[.$B$25]*[.$B$21]))^2/(1+[.$B$20])^[.$B$21]" office:value-type="currency" office:currency="USD" office:value="1730.59619312851" calcext:value-type="currency">
            <text:p>$1,731</text:p>
          </table:table-cell>
          <table:table-cell table:style-name="ce46" table:formula="of:=[.$B$14]*([.$B$15]*[.$B$16]+[.$B$17]*(1-[.$B$16])) + [.$B$19]*(1-(1+[.$B$20])^(-[.AF$31]))/[.$B$20]-[.$B$24]*(1-EXP(-[.$B$25]*[.AF$31]))^2/(1+[.$B$20])^[.AF$31]  - IF([.AF31]=[.$B$21];1;0)*[.$B$23]*[.$B$24]*(1-EXP(-[.$B$25]*[.$B$21]))^2/(1+[.$B$20])^[.$B$21]" office:value-type="currency" office:currency="USD" office:value="1747.42583952004" calcext:value-type="currency">
            <text:p>$1,747</text:p>
          </table:table-cell>
          <table:table-cell table:style-name="ce46" table:formula="of:=[.$B$14]*([.$B$15]*[.$B$16]+[.$B$17]*(1-[.$B$16])) + [.$B$19]*(1-(1+[.$B$20])^(-[.AG$31]))/[.$B$20]-[.$B$24]*(1-EXP(-[.$B$25]*[.AG$31]))^2/(1+[.$B$20])^[.AG$31]  - IF([.AG31]=[.$B$21];1;0)*[.$B$23]*[.$B$24]*(1-EXP(-[.$B$25]*[.$B$21]))^2/(1+[.$B$20])^[.$B$21]" office:value-type="currency" office:currency="USD" office:value="1763.76612302611" calcext:value-type="currency">
            <text:p>$1,764</text:p>
          </table:table-cell>
          <table:table-cell table:style-name="ce46" table:formula="of:=[.$B$14]*([.$B$15]*[.$B$16]+[.$B$17]*(1-[.$B$16])) + [.$B$19]*(1-(1+[.$B$20])^(-[.AH$31]))/[.$B$20]-[.$B$24]*(1-EXP(-[.$B$25]*[.AH$31]))^2/(1+[.$B$20])^[.AH$31]  - IF([.AH31]=[.$B$21];1;0)*[.$B$23]*[.$B$24]*(1-EXP(-[.$B$25]*[.$B$21]))^2/(1+[.$B$20])^[.$B$21]" office:value-type="currency" office:currency="USD" office:value="1779.63132073291" calcext:value-type="currency">
            <text:p>$1,780</text:p>
          </table:table-cell>
          <table:table-cell table:style-name="ce46" table:formula="of:=[.$B$14]*([.$B$15]*[.$B$16]+[.$B$17]*(1-[.$B$16])) + [.$B$19]*(1-(1+[.$B$20])^(-[.AI$31]))/[.$B$20]-[.$B$24]*(1-EXP(-[.$B$25]*[.AI$31]))^2/(1+[.$B$20])^[.AI$31]  - IF([.AI31]=[.$B$21];1;0)*[.$B$23]*[.$B$24]*(1-EXP(-[.$B$25]*[.$B$21]))^2/(1+[.$B$20])^[.$B$21]" office:value-type="currency" office:currency="USD" office:value="1795.03528933785" calcext:value-type="currency">
            <text:p>$1,795</text:p>
          </table:table-cell>
          <table:table-cell table:style-name="ce46" table:formula="of:=[.$B$14]*([.$B$15]*[.$B$16]+[.$B$17]*(1-[.$B$16])) + [.$B$19]*(1-(1+[.$B$20])^(-[.AJ$31]))/[.$B$20]-[.$B$24]*(1-EXP(-[.$B$25]*[.AJ$31]))^2/(1+[.$B$20])^[.AJ$31]  - IF([.AJ31]=[.$B$21];1;0)*[.$B$23]*[.$B$24]*(1-EXP(-[.$B$25]*[.$B$21]))^2/(1+[.$B$20])^[.$B$21]" office:value-type="currency" office:currency="USD" office:value="1809.99147779911" calcext:value-type="currency">
            <text:p>$1,810</text:p>
          </table:table-cell>
          <table:table-cell table:style-name="ce46" table:formula="of:=[.$B$14]*([.$B$15]*[.$B$16]+[.$B$17]*(1-[.$B$16])) + [.$B$19]*(1-(1+[.$B$20])^(-[.AK$31]))/[.$B$20]-[.$B$24]*(1-EXP(-[.$B$25]*[.AK$31]))^2/(1+[.$B$20])^[.AK$31]  - IF([.AK31]=[.$B$21];1;0)*[.$B$23]*[.$B$24]*(1-EXP(-[.$B$25]*[.$B$21]))^2/(1+[.$B$20])^[.$B$21]" office:value-type="currency" office:currency="USD" office:value="1824.512939587" calcext:value-type="currency">
            <text:p>$1,825</text:p>
          </table:table-cell>
          <table:table-cell table:style-name="ce46" table:formula="of:=[.$B$14]*([.$B$15]*[.$B$16]+[.$B$17]*(1-[.$B$16])) + [.$B$19]*(1-(1+[.$B$20])^(-[.AL$31]))/[.$B$20]-[.$B$24]*(1-EXP(-[.$B$25]*[.AL$31]))^2/(1+[.$B$20])^[.AL$31]  - IF([.AL31]=[.$B$21];1;0)*[.$B$23]*[.$B$24]*(1-EXP(-[.$B$25]*[.$B$21]))^2/(1+[.$B$20])^[.$B$21]" office:value-type="currency" office:currency="USD" office:value="1838.61234455058" calcext:value-type="currency">
            <text:p>$1,839</text:p>
          </table:table-cell>
          <table:table-cell table:style-name="ce46" table:formula="of:=[.$B$14]*([.$B$15]*[.$B$16]+[.$B$17]*(1-[.$B$16])) + [.$B$19]*(1-(1+[.$B$20])^(-[.AM$31]))/[.$B$20]-[.$B$24]*(1-EXP(-[.$B$25]*[.AM$31]))^2/(1+[.$B$20])^[.AM$31]  - IF([.AM31]=[.$B$21];1;0)*[.$B$23]*[.$B$24]*(1-EXP(-[.$B$25]*[.$B$21]))^2/(1+[.$B$20])^[.$B$21]" office:value-type="currency" office:currency="USD" office:value="1852.30199041279" calcext:value-type="currency">
            <text:p>$1,852</text:p>
          </table:table-cell>
          <table:table-cell table:style-name="ce46" table:formula="of:=[.$B$14]*([.$B$15]*[.$B$16]+[.$B$17]*(1-[.$B$16])) + [.$B$19]*(1-(1+[.$B$20])^(-[.AN$31]))/[.$B$20]-[.$B$24]*(1-EXP(-[.$B$25]*[.AN$31]))^2/(1+[.$B$20])^[.AN$31]  - IF([.AN31]=[.$B$21];1;0)*[.$B$23]*[.$B$24]*(1-EXP(-[.$B$25]*[.$B$21]))^2/(1+[.$B$20])^[.$B$21]" office:value-type="currency" office:currency="USD" office:value="1865.5938139066" calcext:value-type="currency">
            <text:p>$1,866</text:p>
          </table:table-cell>
          <table:table-cell table:style-name="ce46" table:formula="of:=[.$B$14]*([.$B$15]*[.$B$16]+[.$B$17]*(1-[.$B$16])) + [.$B$19]*(1-(1+[.$B$20])^(-[.AO$31]))/[.$B$20]-[.$B$24]*(1-EXP(-[.$B$25]*[.AO$31]))^2/(1+[.$B$20])^[.AO$31]  - IF([.AO31]=[.$B$21];1;0)*[.$B$23]*[.$B$24]*(1-EXP(-[.$B$25]*[.$B$21]))^2/(1+[.$B$20])^[.$B$21]" office:value-type="currency" office:currency="USD" office:value="1878.49940156428" calcext:value-type="currency">
            <text:p>$1,878</text:p>
          </table:table-cell>
          <table:table-cell table:style-name="ce46" table:formula="of:=[.$B$14]*([.$B$15]*[.$B$16]+[.$B$17]*(1-[.$B$16])) + [.$B$19]*(1-(1+[.$B$20])^(-[.AP$31]))/[.$B$20]-[.$B$24]*(1-EXP(-[.$B$25]*[.AP$31]))^2/(1+[.$B$20])^[.AP$31]  - IF([.AP31]=[.$B$21];1;0)*[.$B$23]*[.$B$24]*(1-EXP(-[.$B$25]*[.$B$21]))^2/(1+[.$B$20])^[.$B$21]" office:value-type="currency" office:currency="USD" office:value="1891.03000017146" calcext:value-type="currency">
            <text:p>$1,891</text:p>
          </table:table-cell>
          <table:table-cell table:style-name="ce46" table:formula="of:=[.$B$14]*([.$B$15]*[.$B$16]+[.$B$17]*(1-[.$B$16])) + [.$B$19]*(1-(1+[.$B$20])^(-[.AQ$31]))/[.$B$20]-[.$B$24]*(1-EXP(-[.$B$25]*[.AQ$31]))^2/(1+[.$B$20])^[.AQ$31]  - IF([.AQ31]=[.$B$21];1;0)*[.$B$23]*[.$B$24]*(1-EXP(-[.$B$25]*[.$B$21]))^2/(1+[.$B$20])^[.$B$21]" office:value-type="currency" office:currency="USD" office:value="1903.19652689716" calcext:value-type="currency">
            <text:p>$1,903</text:p>
          </table:table-cell>
          <table:table-cell table:style-name="ce46" table:formula="of:=[.$B$14]*([.$B$15]*[.$B$16]+[.$B$17]*(1-[.$B$16])) + [.$B$19]*(1-(1+[.$B$20])^(-[.AR$31]))/[.$B$20]-[.$B$24]*(1-EXP(-[.$B$25]*[.AR$31]))^2/(1+[.$B$20])^[.AR$31]  - IF([.AR31]=[.$B$21];1;0)*[.$B$23]*[.$B$24]*(1-EXP(-[.$B$25]*[.$B$21]))^2/(1+[.$B$20])^[.$B$21]" office:value-type="currency" office:currency="USD" office:value="1915.00957911058" calcext:value-type="currency">
            <text:p>$1,915</text:p>
          </table:table-cell>
          <table:table-cell table:style-name="ce46" table:formula="of:=[.$B$14]*([.$B$15]*[.$B$16]+[.$B$17]*(1-[.$B$16])) + [.$B$19]*(1-(1+[.$B$20])^(-[.AS$31]))/[.$B$20]-[.$B$24]*(1-EXP(-[.$B$25]*[.AS$31]))^2/(1+[.$B$20])^[.AS$31]  - IF([.AS31]=[.$B$21];1;0)*[.$B$23]*[.$B$24]*(1-EXP(-[.$B$25]*[.$B$21]))^2/(1+[.$B$20])^[.$B$21]" office:value-type="currency" office:currency="USD" office:value="1926.4794438951" calcext:value-type="currency">
            <text:p>$1,926</text:p>
          </table:table-cell>
          <table:table-cell table:style-name="ce46" table:formula="of:=[.$B$14]*([.$B$15]*[.$B$16]+[.$B$17]*(1-[.$B$16])) + [.$B$19]*(1-(1+[.$B$20])^(-[.AT$31]))/[.$B$20]-[.$B$24]*(1-EXP(-[.$B$25]*[.AT$31]))^2/(1+[.$B$20])^[.AT$31]  - IF([.AT31]=[.$B$21];1;0)*[.$B$23]*[.$B$24]*(1-EXP(-[.$B$25]*[.$B$21]))^2/(1+[.$B$20])^[.$B$21]" office:value-type="currency" office:currency="USD" office:value="1937.61610726934" calcext:value-type="currency">
            <text:p>$1,938</text:p>
          </table:table-cell>
          <table:table-cell table:style-name="ce46" table:formula="of:=[.$B$14]*([.$B$15]*[.$B$16]+[.$B$17]*(1-[.$B$16])) + [.$B$19]*(1-(1+[.$B$20])^(-[.AU$31]))/[.$B$20]-[.$B$24]*(1-EXP(-[.$B$25]*[.AU$31]))^2/(1+[.$B$20])^[.AU$31]  - IF([.AU31]=[.$B$21];1;0)*[.$B$23]*[.$B$24]*(1-EXP(-[.$B$25]*[.$B$21]))^2/(1+[.$B$20])^[.$B$21]" office:value-type="currency" office:currency="USD" office:value="1948.42926312508" calcext:value-type="currency">
            <text:p>$1,948</text:p>
          </table:table-cell>
          <table:table-cell table:style-name="ce46" table:formula="of:=[.$B$14]*([.$B$15]*[.$B$16]+[.$B$17]*(1-[.$B$16])) + [.$B$19]*(1-(1+[.$B$20])^(-[.AV$31]))/[.$B$20]-[.$B$24]*(1-EXP(-[.$B$25]*[.AV$31]))^2/(1+[.$B$20])^[.AV$31]  - IF([.AV31]=[.$B$21];1;0)*[.$B$23]*[.$B$24]*(1-EXP(-[.$B$25]*[.$B$21]))^2/(1+[.$B$20])^[.$B$21]" office:value-type="currency" office:currency="USD" office:value="1958.92832189121" calcext:value-type="currency">
            <text:p>$1,959</text:p>
          </table:table-cell>
          <table:table-cell table:style-name="ce46" table:formula="of:=[.$B$14]*([.$B$15]*[.$B$16]+[.$B$17]*(1-[.$B$16])) + [.$B$19]*(1-(1+[.$B$20])^(-[.AW$31]))/[.$B$20]-[.$B$24]*(1-EXP(-[.$B$25]*[.AW$31]))^2/(1+[.$B$20])^[.AW$31]  - IF([.AW31]=[.$B$21];1;0)*[.$B$23]*[.$B$24]*(1-EXP(-[.$B$25]*[.$B$21]))^2/(1+[.$B$20])^[.$B$21]" office:value-type="currency" office:currency="USD" office:value="1969.12241893264" calcext:value-type="currency">
            <text:p>$1,969</text:p>
          </table:table-cell>
          <table:table-cell table:style-name="ce46" table:formula="of:=[.$B$14]*([.$B$15]*[.$B$16]+[.$B$17]*(1-[.$B$16])) + [.$B$19]*(1-(1+[.$B$20])^(-[.AX$31]))/[.$B$20]-[.$B$24]*(1-EXP(-[.$B$25]*[.AX$31]))^2/(1+[.$B$20])^[.AX$31]  - IF([.AX31]=[.$B$21];1;0)*[.$B$23]*[.$B$24]*(1-EXP(-[.$B$25]*[.$B$21]))^2/(1+[.$B$20])^[.$B$21]" office:value-type="currency" office:currency="USD" office:value="1979.0204226929" calcext:value-type="currency">
            <text:p>$1,979</text:p>
          </table:table-cell>
          <table:table-cell table:style-name="ce46" table:formula="of:=[.$B$14]*([.$B$15]*[.$B$16]+[.$B$17]*(1-[.$B$16])) + [.$B$19]*(1-(1+[.$B$20])^(-[.AY$31]))/[.$B$20]-[.$B$24]*(1-EXP(-[.$B$25]*[.AY$31]))^2/(1+[.$B$20])^[.AY$31]  - IF([.AY31]=[.$B$21];1;0)*[.$B$23]*[.$B$24]*(1-EXP(-[.$B$25]*[.$B$21]))^2/(1+[.$B$20])^[.$B$21]" office:value-type="currency" office:currency="USD" office:value="1988.63094258861" calcext:value-type="currency">
            <text:p>$1,989</text:p>
          </table:table-cell>
          <table:table-cell table:style-name="ce46" table:formula="of:=[.$B$14]*([.$B$15]*[.$B$16]+[.$B$17]*(1-[.$B$16])) + [.$B$19]*(1-(1+[.$B$20])^(-[.AZ$31]))/[.$B$20]-[.$B$24]*(1-EXP(-[.$B$25]*[.AZ$31]))^2/(1+[.$B$20])^[.AZ$31]  - IF([.AZ31]=[.$B$21];1;0)*[.$B$23]*[.$B$24]*(1-EXP(-[.$B$25]*[.$B$21]))^2/(1+[.$B$20])^[.$B$21]" office:value-type="currency" office:currency="USD" office:value="1997.96233666384" calcext:value-type="currency">
            <text:p>$1,998</text:p>
          </table:table-cell>
          <table:table-cell table:style-name="ce46" table:formula="of:=[.$B$14]*([.$B$15]*[.$B$16]+[.$B$17]*(1-[.$B$16])) + [.$B$19]*(1-(1+[.$B$20])^(-[.BA$31]))/[.$B$20]-[.$B$24]*(1-EXP(-[.$B$25]*[.BA$31]))^2/(1+[.$B$20])^[.BA$31]  - IF([.BA31]=[.$B$21];1;0)*[.$B$23]*[.$B$24]*(1-EXP(-[.$B$25]*[.$B$21]))^2/(1+[.$B$20])^[.$B$21]" office:value-type="currency" office:currency="USD" office:value="2007.02271901222" calcext:value-type="currency">
            <text:p>$2,007</text:p>
          </table:table-cell>
          <table:table-cell table:style-name="ce46" table:formula="of:=[.$B$14]*([.$B$15]*[.$B$16]+[.$B$17]*(1-[.$B$16])) + [.$B$19]*(1-(1+[.$B$20])^(-[.BB$31]))/[.$B$20]-[.$B$24]*(1-EXP(-[.$B$25]*[.BB$31]))^2/(1+[.$B$20])^[.BB$31]  - IF([.BB31]=[.$B$21];1;0)*[.$B$23]*[.$B$24]*(1-EXP(-[.$B$25]*[.$B$21]))^2/(1+[.$B$20])^[.$B$21]" office:value-type="currency" office:currency="USD" office:value="2015.81996697407" calcext:value-type="currency">
            <text:p>$2,016</text:p>
          </table:table-cell>
          <table:table-cell table:style-name="ce46" table:formula="of:=[.$B$14]*([.$B$15]*[.$B$16]+[.$B$17]*(1-[.$B$16])) + [.$B$19]*(1-(1+[.$B$20])^(-[.BC$31]))/[.$B$20]-[.$B$24]*(1-EXP(-[.$B$25]*[.BC$31]))^2/(1+[.$B$20])^[.BC$31]  - IF([.BC31]=[.$B$21];1;0)*[.$B$23]*[.$B$24]*(1-EXP(-[.$B$25]*[.$B$21]))^2/(1+[.$B$20])^[.$B$21]" office:value-type="currency" office:currency="USD" office:value="2024.36172811581" calcext:value-type="currency">
            <text:p>$2,024</text:p>
          </table:table-cell>
          <table:table-cell table:style-name="ce46" table:formula="of:=[.$B$14]*([.$B$15]*[.$B$16]+[.$B$17]*(1-[.$B$16])) + [.$B$19]*(1-(1+[.$B$20])^(-[.BD$31]))/[.$B$20]-[.$B$24]*(1-EXP(-[.$B$25]*[.BD$31]))^2/(1+[.$B$20])^[.BD$31]  - IF([.BD31]=[.$B$21];1;0)*[.$B$23]*[.$B$24]*(1-EXP(-[.$B$25]*[.$B$21]))^2/(1+[.$B$20])^[.$B$21]" office:value-type="currency" office:currency="USD" office:value="2032.65542699866" calcext:value-type="currency">
            <text:p>$2,033</text:p>
          </table:table-cell>
          <table:table-cell table:style-name="ce46" table:formula="of:=[.$B$14]*([.$B$15]*[.$B$16]+[.$B$17]*(1-[.$B$16])) + [.$B$19]*(1-(1+[.$B$20])^(-[.BE$31]))/[.$B$20]-[.$B$24]*(1-EXP(-[.$B$25]*[.BE$31]))^2/(1+[.$B$20])^[.BE$31]  - IF([.BE31]=[.$B$21];1;0)*[.$B$23]*[.$B$24]*(1-EXP(-[.$B$25]*[.$B$21]))^2/(1+[.$B$20])^[.$B$21]" office:value-type="currency" office:currency="USD" office:value="2040.70827174314" calcext:value-type="currency">
            <text:p>$2,041</text:p>
          </table:table-cell>
          <table:table-cell table:style-name="ce46" table:formula="of:=[.$B$14]*([.$B$15]*[.$B$16]+[.$B$17]*(1-[.$B$16])) + [.$B$19]*(1-(1+[.$B$20])^(-[.BF$31]))/[.$B$20]-[.$B$24]*(1-EXP(-[.$B$25]*[.BF$31]))^2/(1+[.$B$20])^[.BF$31]  - IF([.BF31]=[.$B$21];1;0)*[.$B$23]*[.$B$24]*(1-EXP(-[.$B$25]*[.$B$21]))^2/(1+[.$B$20])^[.$B$21]" office:value-type="currency" office:currency="USD" office:value="2048.52726039608" calcext:value-type="currency">
            <text:p>$2,049</text:p>
          </table:table-cell>
          <table:table-cell table:style-name="ce46" table:formula="of:=[.$B$14]*([.$B$15]*[.$B$16]+[.$B$17]*(1-[.$B$16])) + [.$B$19]*(1-(1+[.$B$20])^(-[.BG$31]))/[.$B$20]-[.$B$24]*(1-EXP(-[.$B$25]*[.BG$31]))^2/(1+[.$B$20])^[.BG$31]  - IF([.BG31]=[.$B$21];1;0)*[.$B$23]*[.$B$24]*(1-EXP(-[.$B$25]*[.$B$21]))^2/(1+[.$B$20])^[.$B$21]" office:value-type="currency" office:currency="USD" office:value="2056.11918710608" calcext:value-type="currency">
            <text:p>$2,056</text:p>
          </table:table-cell>
          <table:table-cell table:style-name="ce46" table:formula="of:=[.$B$14]*([.$B$15]*[.$B$16]+[.$B$17]*(1-[.$B$16])) + [.$B$19]*(1-(1+[.$B$20])^(-[.BH$31]))/[.$B$20]-[.$B$24]*(1-EXP(-[.$B$25]*[.BH$31]))^2/(1+[.$B$20])^[.BH$31]  - IF([.BH31]=[.$B$21];1;0)*[.$B$23]*[.$B$24]*(1-EXP(-[.$B$25]*[.$B$21]))^2/(1+[.$B$20])^[.$B$21]" office:value-type="currency" office:currency="USD" office:value="2063.49064811375" calcext:value-type="currency">
            <text:p>$2,063</text:p>
          </table:table-cell>
          <table:table-cell table:style-name="ce46" table:formula="of:=[.$B$14]*([.$B$15]*[.$B$16]+[.$B$17]*(1-[.$B$16])) + [.$B$19]*(1-(1+[.$B$20])^(-[.BI$31]))/[.$B$20]-[.$B$24]*(1-EXP(-[.$B$25]*[.BI$31]))^2/(1+[.$B$20])^[.BI$31]  - IF([.BI31]=[.$B$21];1;0)*[.$B$23]*[.$B$24]*(1-EXP(-[.$B$25]*[.$B$21]))^2/(1+[.$B$20])^[.$B$21]" office:value-type="currency" office:currency="USD" office:value="2070.6480475623" calcext:value-type="currency">
            <text:p>$2,071</text:p>
          </table:table-cell>
          <table:table-cell table:style-name="ce46" table:formula="of:=[.$B$14]*([.$B$15]*[.$B$16]+[.$B$17]*(1-[.$B$16])) + [.$B$19]*(1-(1+[.$B$20])^(-[.BJ$31]))/[.$B$20]-[.$B$24]*(1-EXP(-[.$B$25]*[.BJ$31]))^2/(1+[.$B$20])^[.BJ$31]  - IF([.BJ31]=[.$B$21];1;0)*[.$B$23]*[.$B$24]*(1-EXP(-[.$B$25]*[.$B$21]))^2/(1+[.$B$20])^[.$B$21]" office:value-type="currency" office:currency="USD" office:value="2077.59760313419" calcext:value-type="currency">
            <text:p>$2,078</text:p>
          </table:table-cell>
          <table:table-cell table:style-name="ce46" table:formula="of:=[.$B$14]*([.$B$15]*[.$B$16]+[.$B$17]*(1-[.$B$16])) + [.$B$19]*(1-(1+[.$B$20])^(-[.BK$31]))/[.$B$20]-[.$B$24]*(1-EXP(-[.$B$25]*[.BK$31]))^2/(1+[.$B$20])^[.BK$31]  - IF([.BK31]=[.$B$21];1;0)*[.$B$23]*[.$B$24]*(1-EXP(-[.$B$25]*[.$B$21]))^2/(1+[.$B$20])^[.$B$21]" office:value-type="currency" office:currency="USD" office:value="2084.34535151936" calcext:value-type="currency">
            <text:p>$2,084</text:p>
          </table:table-cell>
          <table:table-cell table:style-name="ce46" table:formula="of:=[.$B$14]*([.$B$15]*[.$B$16]+[.$B$17]*(1-[.$B$16])) + [.$B$19]*(1-(1+[.$B$20])^(-[.BL$31]))/[.$B$20]-[.$B$24]*(1-EXP(-[.$B$25]*[.BL$31]))^2/(1+[.$B$20])^[.BL$31]  - IF([.BL31]=[.$B$21];1;0)*[.$B$23]*[.$B$24]*(1-EXP(-[.$B$25]*[.$B$21]))^2/(1+[.$B$20])^[.$B$21]" office:value-type="currency" office:currency="USD" office:value="2090.89715372013" calcext:value-type="currency">
            <text:p>$2,091</text:p>
          </table:table-cell>
          <table:table-cell table:style-name="ce46" table:formula="of:=[.$B$14]*([.$B$15]*[.$B$16]+[.$B$17]*(1-[.$B$16])) + [.$B$19]*(1-(1+[.$B$20])^(-[.BM$31]))/[.$B$20]-[.$B$24]*(1-EXP(-[.$B$25]*[.BM$31]))^2/(1+[.$B$20])^[.BM$31]  - IF([.BM31]=[.$B$21];1;0)*[.$B$23]*[.$B$24]*(1-EXP(-[.$B$25]*[.$B$21]))^2/(1+[.$B$20])^[.$B$21]" office:value-type="currency" office:currency="USD" office:value="2097.25870019787" calcext:value-type="currency">
            <text:p>$2,097</text:p>
          </table:table-cell>
          <table:table-cell table:style-name="ce46" table:formula="of:=[.$B$14]*([.$B$15]*[.$B$16]+[.$B$17]*(1-[.$B$16])) + [.$B$19]*(1-(1+[.$B$20])^(-[.BN$31]))/[.$B$20]-[.$B$24]*(1-EXP(-[.$B$25]*[.BN$31]))^2/(1+[.$B$20])^[.BN$31]  - IF([.BN31]=[.$B$21];1;0)*[.$B$23]*[.$B$24]*(1-EXP(-[.$B$25]*[.$B$21]))^2/(1+[.$B$20])^[.$B$21]" office:value-type="currency" office:currency="USD" office:value="2103.43551586649" calcext:value-type="currency">
            <text:p>$2,103</text:p>
          </table:table-cell>
          <table:table-cell table:style-name="ce46" table:formula="of:=[.$B$14]*([.$B$15]*[.$B$16]+[.$B$17]*(1-[.$B$16])) + [.$B$19]*(1-(1+[.$B$20])^(-[.BO$31]))/[.$B$20]-[.$B$24]*(1-EXP(-[.$B$25]*[.BO$31]))^2/(1+[.$B$20])^[.BO$31]  - IF([.BO31]=[.$B$21];1;0)*[.$B$23]*[.$B$24]*(1-EXP(-[.$B$25]*[.$B$21]))^2/(1+[.$B$20])^[.$B$21]" office:value-type="currency" office:currency="USD" office:value="2109.43296493727" calcext:value-type="currency">
            <text:p>$2,109</text:p>
          </table:table-cell>
          <table:table-cell table:style-name="ce46" table:formula="of:=[.$B$14]*([.$B$15]*[.$B$16]+[.$B$17]*(1-[.$B$16])) + [.$B$19]*(1-(1+[.$B$20])^(-[.BP$31]))/[.$B$20]-[.$B$24]*(1-EXP(-[.$B$25]*[.BP$31]))^2/(1+[.$B$20])^[.BP$31]  - IF([.BP31]=[.$B$21];1;0)*[.$B$23]*[.$B$24]*(1-EXP(-[.$B$25]*[.$B$21]))^2/(1+[.$B$20])^[.$B$21]" office:value-type="currency" office:currency="USD" office:value="2115.25625561975" calcext:value-type="currency">
            <text:p>$2,115</text:p>
          </table:table-cell>
          <table:table-cell table:style-name="ce46" table:formula="of:=[.$B$14]*([.$B$15]*[.$B$16]+[.$B$17]*(1-[.$B$16])) + [.$B$19]*(1-(1+[.$B$20])^(-[.BQ$31]))/[.$B$20]-[.$B$24]*(1-EXP(-[.$B$25]*[.BQ$31]))^2/(1+[.$B$20])^[.BQ$31]  - IF([.BQ31]=[.$B$21];1;0)*[.$B$23]*[.$B$24]*(1-EXP(-[.$B$25]*[.$B$21]))^2/(1+[.$B$20])^[.$B$21]" office:value-type="currency" office:currency="USD" office:value="2120.91044468308" calcext:value-type="currency">
            <text:p>$2,121</text:p>
          </table:table-cell>
          <table:table-cell table:style-name="ce46" table:formula="of:=[.$B$14]*([.$B$15]*[.$B$16]+[.$B$17]*(1-[.$B$16])) + [.$B$19]*(1-(1+[.$B$20])^(-[.BR$31]))/[.$B$20]-[.$B$24]*(1-EXP(-[.$B$25]*[.BR$31]))^2/(1+[.$B$20])^[.BR$31]  - IF([.BR31]=[.$B$21];1;0)*[.$B$23]*[.$B$24]*(1-EXP(-[.$B$25]*[.$B$21]))^2/(1+[.$B$20])^[.$B$21]" office:value-type="currency" office:currency="USD" office:value="2126.40044188208" calcext:value-type="currency">
            <text:p>$2,126</text:p>
          </table:table-cell>
          <table:table-cell table:style-name="ce46" table:formula="of:=[.$B$14]*([.$B$15]*[.$B$16]+[.$B$17]*(1-[.$B$16])) + [.$B$19]*(1-(1+[.$B$20])^(-[.BS$31]))/[.$B$20]-[.$B$24]*(1-EXP(-[.$B$25]*[.BS$31]))^2/(1+[.$B$20])^[.BS$31]  - IF([.BS31]=[.$B$21];1;0)*[.$B$23]*[.$B$24]*(1-EXP(-[.$B$25]*[.$B$21]))^2/(1+[.$B$20])^[.$B$21]" office:value-type="currency" office:currency="USD" office:value="2131.73101425218" calcext:value-type="currency">
            <text:p>$2,132</text:p>
          </table:table-cell>
          <table:table-cell table:style-name="ce46" table:formula="of:=[.$B$14]*([.$B$15]*[.$B$16]+[.$B$17]*(1-[.$B$16])) + [.$B$19]*(1-(1+[.$B$20])^(-[.BT$31]))/[.$B$20]-[.$B$24]*(1-EXP(-[.$B$25]*[.BT$31]))^2/(1+[.$B$20])^[.BT$31]  - IF([.BT31]=[.$B$21];1;0)*[.$B$23]*[.$B$24]*(1-EXP(-[.$B$25]*[.$B$21]))^2/(1+[.$B$20])^[.$B$21]" office:value-type="currency" office:currency="USD" office:value="2136.90679027723" calcext:value-type="currency">
            <text:p>$2,137</text:p>
          </table:table-cell>
          <table:table-cell table:style-name="ce46" table:formula="of:=[.$B$14]*([.$B$15]*[.$B$16]+[.$B$17]*(1-[.$B$16])) + [.$B$19]*(1-(1+[.$B$20])^(-[.BU$31]))/[.$B$20]-[.$B$24]*(1-EXP(-[.$B$25]*[.BU$31]))^2/(1+[.$B$20])^[.BU$31]  - IF([.BU31]=[.$B$21];1;0)*[.$B$23]*[.$B$24]*(1-EXP(-[.$B$25]*[.$B$21]))^2/(1+[.$B$20])^[.$B$21]" office:value-type="currency" office:currency="USD" office:value="2141.9322639341" calcext:value-type="currency">
            <text:p>$2,142</text:p>
          </table:table-cell>
          <table:table-cell table:style-name="ce46" table:formula="of:=[.$B$14]*([.$B$15]*[.$B$16]+[.$B$17]*(1-[.$B$16])) + [.$B$19]*(1-(1+[.$B$20])^(-[.BV$31]))/[.$B$20]-[.$B$24]*(1-EXP(-[.$B$25]*[.BV$31]))^2/(1+[.$B$20])^[.BV$31]  - IF([.BV31]=[.$B$21];1;0)*[.$B$23]*[.$B$24]*(1-EXP(-[.$B$25]*[.$B$21]))^2/(1+[.$B$20])^[.$B$21]" office:value-type="currency" office:currency="USD" office:value="2146.81179861776" calcext:value-type="currency">
            <text:p>$2,147</text:p>
          </table:table-cell>
          <table:table-cell table:style-name="ce46" table:formula="of:=[.$B$14]*([.$B$15]*[.$B$16]+[.$B$17]*(1-[.$B$16])) + [.$B$19]*(1-(1+[.$B$20])^(-[.BW$31]))/[.$B$20]-[.$B$24]*(1-EXP(-[.$B$25]*[.BW$31]))^2/(1+[.$B$20])^[.BW$31]  - IF([.BW31]=[.$B$21];1;0)*[.$B$23]*[.$B$24]*(1-EXP(-[.$B$25]*[.$B$21]))^2/(1+[.$B$20])^[.$B$21]" office:value-type="currency" office:currency="USD" office:value="2151.54963095049" calcext:value-type="currency">
            <text:p>$2,152</text:p>
          </table:table-cell>
          <table:table-cell table:style-name="ce46" table:formula="of:=[.$B$14]*([.$B$15]*[.$B$16]+[.$B$17]*(1-[.$B$16])) + [.$B$19]*(1-(1+[.$B$20])^(-[.BX$31]))/[.$B$20]-[.$B$24]*(1-EXP(-[.$B$25]*[.BX$31]))^2/(1+[.$B$20])^[.BX$31]  - IF([.BX31]=[.$B$21];1;0)*[.$B$23]*[.$B$24]*(1-EXP(-[.$B$25]*[.$B$21]))^2/(1+[.$B$20])^[.$B$21]" office:value-type="currency" office:currency="USD" office:value="2156.14987447876" calcext:value-type="currency">
            <text:p>$2,156</text:p>
          </table:table-cell>
          <table:table-cell table:style-name="ce46" table:formula="of:=[.$B$14]*([.$B$15]*[.$B$16]+[.$B$17]*(1-[.$B$16])) + [.$B$19]*(1-(1+[.$B$20])^(-[.BY$31]))/[.$B$20]-[.$B$24]*(1-EXP(-[.$B$25]*[.BY$31]))^2/(1+[.$B$20])^[.BY$31]  - IF([.BY31]=[.$B$21];1;0)*[.$B$23]*[.$B$24]*(1-EXP(-[.$B$25]*[.$B$21]))^2/(1+[.$B$20])^[.$B$21]" office:value-type="currency" office:currency="USD" office:value="2160.61652326117" calcext:value-type="currency">
            <text:p>$2,161</text:p>
          </table:table-cell>
          <table:table-cell table:style-name="ce46" table:formula="of:=[.$B$14]*([.$B$15]*[.$B$16]+[.$B$17]*(1-[.$B$16])) + [.$B$19]*(1-(1+[.$B$20])^(-[.BZ$31]))/[.$B$20]-[.$B$24]*(1-EXP(-[.$B$25]*[.BZ$31]))^2/(1+[.$B$20])^[.BZ$31]  - IF([.BZ31]=[.$B$21];1;0)*[.$B$23]*[.$B$24]*(1-EXP(-[.$B$25]*[.$B$21]))^2/(1+[.$B$20])^[.$B$21]" office:value-type="currency" office:currency="USD" office:value="2164.95345535072" calcext:value-type="currency">
            <text:p>$2,165</text:p>
          </table:table-cell>
          <table:table-cell table:style-name="ce46" table:formula="of:=[.$B$14]*([.$B$15]*[.$B$16]+[.$B$17]*(1-[.$B$16])) + [.$B$19]*(1-(1+[.$B$20])^(-[.CA$31]))/[.$B$20]-[.$B$24]*(1-EXP(-[.$B$25]*[.CA$31]))^2/(1+[.$B$20])^[.CA$31]  - IF([.CA31]=[.$B$21];1;0)*[.$B$23]*[.$B$24]*(1-EXP(-[.$B$25]*[.$B$21]))^2/(1+[.$B$20])^[.$B$21]" office:value-type="currency" office:currency="USD" office:value="2169.16443617457" calcext:value-type="currency">
            <text:p>$2,169</text:p>
          </table:table-cell>
          <table:table-cell table:style-name="ce46" table:formula="of:=[.$B$14]*([.$B$15]*[.$B$16]+[.$B$17]*(1-[.$B$16])) + [.$B$19]*(1-(1+[.$B$20])^(-[.CB$31]))/[.$B$20]-[.$B$24]*(1-EXP(-[.$B$25]*[.CB$31]))^2/(1+[.$B$20])^[.CB$31]  - IF([.CB31]=[.$B$21];1;0)*[.$B$23]*[.$B$24]*(1-EXP(-[.$B$25]*[.$B$21]))^2/(1+[.$B$20])^[.$B$21]" office:value-type="currency" office:currency="USD" office:value="2173.25312181453" calcext:value-type="currency">
            <text:p>$2,173</text:p>
          </table:table-cell>
          <table:table-cell table:style-name="ce46" table:formula="of:=[.$B$14]*([.$B$15]*[.$B$16]+[.$B$17]*(1-[.$B$16])) + [.$B$19]*(1-(1+[.$B$20])^(-[.CC$31]))/[.$B$20]-[.$B$24]*(1-EXP(-[.$B$25]*[.CC$31]))^2/(1+[.$B$20])^[.CC$31]  - IF([.CC31]=[.$B$21];1;0)*[.$B$23]*[.$B$24]*(1-EXP(-[.$B$25]*[.$B$21]))^2/(1+[.$B$20])^[.$B$21]" office:value-type="currency" office:currency="USD" office:value="2177.22306219103" calcext:value-type="currency">
            <text:p>$2,177</text:p>
          </table:table-cell>
          <table:table-cell table:style-name="ce46" table:formula="of:=[.$B$14]*([.$B$15]*[.$B$16]+[.$B$17]*(1-[.$B$16])) + [.$B$19]*(1-(1+[.$B$20])^(-[.CD$31]))/[.$B$20]-[.$B$24]*(1-EXP(-[.$B$25]*[.CD$31]))^2/(1+[.$B$20])^[.CD$31]  - IF([.CD31]=[.$B$21];1;0)*[.$B$23]*[.$B$24]*(1-EXP(-[.$B$25]*[.$B$21]))^2/(1+[.$B$20])^[.$B$21]" office:value-type="currency" office:currency="USD" office:value="2181.07770415366" calcext:value-type="currency">
            <text:p>$2,181</text:p>
          </table:table-cell>
          <table:table-cell table:style-name="ce46" table:formula="of:=[.$B$14]*([.$B$15]*[.$B$16]+[.$B$17]*(1-[.$B$16])) + [.$B$19]*(1-(1+[.$B$20])^(-[.CE$31]))/[.$B$20]-[.$B$24]*(1-EXP(-[.$B$25]*[.CE$31]))^2/(1+[.$B$20])^[.CE$31]  - IF([.CE31]=[.$B$21];1;0)*[.$B$23]*[.$B$24]*(1-EXP(-[.$B$25]*[.$B$21]))^2/(1+[.$B$20])^[.$B$21]" office:value-type="currency" office:currency="USD" office:value="2184.82039448104" calcext:value-type="currency">
            <text:p>$2,185</text:p>
          </table:table-cell>
          <table:table-cell table:style-name="ce46" table:formula="of:=[.$B$14]*([.$B$15]*[.$B$16]+[.$B$17]*(1-[.$B$16])) + [.$B$19]*(1-(1+[.$B$20])^(-[.CF$31]))/[.$B$20]-[.$B$24]*(1-EXP(-[.$B$25]*[.CF$31]))^2/(1+[.$B$20])^[.CF$31]  - IF([.CF31]=[.$B$21];1;0)*[.$B$23]*[.$B$24]*(1-EXP(-[.$B$25]*[.$B$21]))^2/(1+[.$B$20])^[.$B$21]" office:value-type="currency" office:currency="USD" office:value="2188.4543827926" calcext:value-type="currency">
            <text:p>$2,188</text:p>
          </table:table-cell>
          <table:table-cell table:style-name="ce46" table:formula="of:=[.$B$14]*([.$B$15]*[.$B$16]+[.$B$17]*(1-[.$B$16])) + [.$B$19]*(1-(1+[.$B$20])^(-[.CG$31]))/[.$B$20]-[.$B$24]*(1-EXP(-[.$B$25]*[.CG$31]))^2/(1+[.$B$20])^[.CG$31]  - IF([.CG31]=[.$B$21];1;0)*[.$B$23]*[.$B$24]*(1-EXP(-[.$B$25]*[.$B$21]))^2/(1+[.$B$20])^[.$B$21]" office:value-type="currency" office:currency="USD" office:value="2191.98282437513" calcext:value-type="currency">
            <text:p>$2,192</text:p>
          </table:table-cell>
          <table:table-cell table:style-name="ce46" table:formula="of:=[.$B$14]*([.$B$15]*[.$B$16]+[.$B$17]*(1-[.$B$16])) + [.$B$19]*(1-(1+[.$B$20])^(-[.CH$31]))/[.$B$20]-[.$B$24]*(1-EXP(-[.$B$25]*[.CH$31]))^2/(1+[.$B$20])^[.CH$31]  - IF([.CH31]=[.$B$21];1;0)*[.$B$23]*[.$B$24]*(1-EXP(-[.$B$25]*[.$B$21]))^2/(1+[.$B$20])^[.$B$21]" office:value-type="currency" office:currency="USD" office:value="2195.40878292647" calcext:value-type="currency">
            <text:p>$2,195</text:p>
          </table:table-cell>
          <table:table-cell table:style-name="ce46" table:formula="of:=[.$B$14]*([.$B$15]*[.$B$16]+[.$B$17]*(1-[.$B$16])) + [.$B$19]*(1-(1+[.$B$20])^(-[.CI$31]))/[.$B$20]-[.$B$24]*(1-EXP(-[.$B$25]*[.CI$31]))^2/(1+[.$B$20])^[.CI$31]  - IF([.CI31]=[.$B$21];1;0)*[.$B$23]*[.$B$24]*(1-EXP(-[.$B$25]*[.$B$21]))^2/(1+[.$B$20])^[.$B$21]" office:value-type="currency" office:currency="USD" office:value="2198.73523321886" calcext:value-type="currency">
            <text:p>$2,199</text:p>
          </table:table-cell>
          <table:table-cell table:style-name="ce46" table:formula="of:=[.$B$14]*([.$B$15]*[.$B$16]+[.$B$17]*(1-[.$B$16])) + [.$B$19]*(1-(1+[.$B$20])^(-[.CJ$31]))/[.$B$20]-[.$B$24]*(1-EXP(-[.$B$25]*[.CJ$31]))^2/(1+[.$B$20])^[.CJ$31]  - IF([.CJ31]=[.$B$21];1;0)*[.$B$23]*[.$B$24]*(1-EXP(-[.$B$25]*[.$B$21]))^2/(1+[.$B$20])^[.$B$21]" office:value-type="currency" office:currency="USD" office:value="2201.96506368437" calcext:value-type="currency">
            <text:p>$2,202</text:p>
          </table:table-cell>
          <table:table-cell table:style-name="ce46" table:formula="of:=[.$B$14]*([.$B$15]*[.$B$16]+[.$B$17]*(1-[.$B$16])) + [.$B$19]*(1-(1+[.$B$20])^(-[.CK$31]))/[.$B$20]-[.$B$24]*(1-EXP(-[.$B$25]*[.CK$31]))^2/(1+[.$B$20])^[.CK$31]  - IF([.CK31]=[.$B$21];1;0)*[.$B$23]*[.$B$24]*(1-EXP(-[.$B$25]*[.$B$21]))^2/(1+[.$B$20])^[.$B$21]" office:value-type="currency" office:currency="USD" office:value="2205.10107892471" calcext:value-type="currency">
            <text:p>$2,205</text:p>
          </table:table-cell>
          <table:table-cell table:style-name="ce46" table:formula="of:=[.$B$14]*([.$B$15]*[.$B$16]+[.$B$17]*(1-[.$B$16])) + [.$B$19]*(1-(1+[.$B$20])^(-[.CL$31]))/[.$B$20]-[.$B$24]*(1-EXP(-[.$B$25]*[.CL$31]))^2/(1+[.$B$20])^[.CL$31]  - IF([.CL31]=[.$B$21];1;0)*[.$B$23]*[.$B$24]*(1-EXP(-[.$B$25]*[.$B$21]))^2/(1+[.$B$20])^[.$B$21]" office:value-type="currency" office:currency="USD" office:value="2208.14600214768" calcext:value-type="currency">
            <text:p>$2,208</text:p>
          </table:table-cell>
          <table:table-cell table:style-name="ce46" table:formula="of:=[.$B$14]*([.$B$15]*[.$B$16]+[.$B$17]*(1-[.$B$16])) + [.$B$19]*(1-(1+[.$B$20])^(-[.CM$31]))/[.$B$20]-[.$B$24]*(1-EXP(-[.$B$25]*[.CM$31]))^2/(1+[.$B$20])^[.CM$31]  - IF([.CM31]=[.$B$21];1;0)*[.$B$23]*[.$B$24]*(1-EXP(-[.$B$25]*[.$B$21]))^2/(1+[.$B$20])^[.$B$21]" office:value-type="currency" office:currency="USD" office:value="2211.10247753234" calcext:value-type="currency">
            <text:p>$2,211</text:p>
          </table:table-cell>
          <table:table-cell table:style-name="ce46" table:formula="of:=[.$B$14]*([.$B$15]*[.$B$16]+[.$B$17]*(1-[.$B$16])) + [.$B$19]*(1-(1+[.$B$20])^(-[.CN$31]))/[.$B$20]-[.$B$24]*(1-EXP(-[.$B$25]*[.CN$31]))^2/(1+[.$B$20])^[.CN$31]  - IF([.CN31]=[.$B$21];1;0)*[.$B$23]*[.$B$24]*(1-EXP(-[.$B$25]*[.$B$21]))^2/(1+[.$B$20])^[.$B$21]" office:value-type="currency" office:currency="USD" office:value="2213.97307252522" calcext:value-type="currency">
            <text:p>$2,214</text:p>
          </table:table-cell>
          <table:table-cell table:style-name="ce46" table:formula="of:=[.$B$14]*([.$B$15]*[.$B$16]+[.$B$17]*(1-[.$B$16])) + [.$B$19]*(1-(1+[.$B$20])^(-[.CO$31]))/[.$B$20]-[.$B$24]*(1-EXP(-[.$B$25]*[.CO$31]))^2/(1+[.$B$20])^[.CO$31]  - IF([.CO31]=[.$B$21];1;0)*[.$B$23]*[.$B$24]*(1-EXP(-[.$B$25]*[.$B$21]))^2/(1+[.$B$20])^[.$B$21]" office:value-type="currency" office:currency="USD" office:value="2216.76028006941" calcext:value-type="currency">
            <text:p>$2,217</text:p>
          </table:table-cell>
          <table:table-cell table:style-name="ce46" table:formula="of:=[.$B$14]*([.$B$15]*[.$B$16]+[.$B$17]*(1-[.$B$16])) + [.$B$19]*(1-(1+[.$B$20])^(-[.CP$31]))/[.$B$20]-[.$B$24]*(1-EXP(-[.$B$25]*[.CP$31]))^2/(1+[.$B$20])^[.CP$31]  - IF([.CP31]=[.$B$21];1;0)*[.$B$23]*[.$B$24]*(1-EXP(-[.$B$25]*[.$B$21]))^2/(1+[.$B$20])^[.$B$21]" office:value-type="currency" office:currency="USD" office:value="2219.46652076861" calcext:value-type="currency">
            <text:p>$2,219</text:p>
          </table:table-cell>
          <table:table-cell table:style-name="ce46" table:formula="of:=[.$B$14]*([.$B$15]*[.$B$16]+[.$B$17]*(1-[.$B$16])) + [.$B$19]*(1-(1+[.$B$20])^(-[.CQ$31]))/[.$B$20]-[.$B$24]*(1-EXP(-[.$B$25]*[.CQ$31]))^2/(1+[.$B$20])^[.CQ$31]  - IF([.CQ31]=[.$B$21];1;0)*[.$B$23]*[.$B$24]*(1-EXP(-[.$B$25]*[.$B$21]))^2/(1+[.$B$20])^[.$B$21]" office:value-type="currency" office:currency="USD" office:value="2222.09414498803" calcext:value-type="currency">
            <text:p>$2,222</text:p>
          </table:table-cell>
          <table:table-cell table:style-name="ce46" table:formula="of:=[.$B$14]*([.$B$15]*[.$B$16]+[.$B$17]*(1-[.$B$16])) + [.$B$19]*(1-(1+[.$B$20])^(-[.CR$31]))/[.$B$20]-[.$B$24]*(1-EXP(-[.$B$25]*[.CR$31]))^2/(1+[.$B$20])^[.CR$31]  - IF([.CR31]=[.$B$21];1;0)*[.$B$23]*[.$B$24]*(1-EXP(-[.$B$25]*[.$B$21]))^2/(1+[.$B$20])^[.$B$21]" office:value-type="currency" office:currency="USD" office:value="2224.64543489409" calcext:value-type="currency">
            <text:p>$2,225</text:p>
          </table:table-cell>
          <table:table-cell table:style-name="ce46" table:formula="of:=[.$B$14]*([.$B$15]*[.$B$16]+[.$B$17]*(1-[.$B$16])) + [.$B$19]*(1-(1+[.$B$20])^(-[.CS$31]))/[.$B$20]-[.$B$24]*(1-EXP(-[.$B$25]*[.CS$31]))^2/(1+[.$B$20])^[.CS$31]  - IF([.CS31]=[.$B$21];1;0)*[.$B$23]*[.$B$24]*(1-EXP(-[.$B$25]*[.$B$21]))^2/(1+[.$B$20])^[.$B$21]" office:value-type="currency" office:currency="USD" office:value="2227.12260643457" calcext:value-type="currency">
            <text:p>$2,227</text:p>
          </table:table-cell>
          <table:table-cell table:style-name="ce46" table:formula="of:=[.$B$14]*([.$B$15]*[.$B$16]+[.$B$17]*(1-[.$B$16])) + [.$B$19]*(1-(1+[.$B$20])^(-[.CT$31]))/[.$B$20]-[.$B$24]*(1-EXP(-[.$B$25]*[.CT$31]))^2/(1+[.$B$20])^[.CT$31]  - IF([.CT31]=[.$B$21];1;0)*[.$B$23]*[.$B$24]*(1-EXP(-[.$B$25]*[.$B$21]))^2/(1+[.$B$20])^[.$B$21]" office:value-type="currency" office:currency="USD" office:value="2229.52781126113" calcext:value-type="currency">
            <text:p>$2,230</text:p>
          </table:table-cell>
          <table:table-cell table:style-name="ce46" table:formula="of:=[.$B$14]*([.$B$15]*[.$B$16]+[.$B$17]*(1-[.$B$16])) + [.$B$19]*(1-(1+[.$B$20])^(-[.CU$31]))/[.$B$20]-[.$B$24]*(1-EXP(-[.$B$25]*[.CU$31]))^2/(1+[.$B$20])^[.CU$31]  - IF([.CU31]=[.$B$21];1;0)*[.$B$23]*[.$B$24]*(1-EXP(-[.$B$25]*[.$B$21]))^2/(1+[.$B$20])^[.$B$21]" office:value-type="currency" office:currency="USD" office:value="2231.86313859575" calcext:value-type="currency">
            <text:p>$2,232</text:p>
          </table:table-cell>
          <table:table-cell table:style-name="ce46" table:formula="of:=[.$B$14]*([.$B$15]*[.$B$16]+[.$B$17]*(1-[.$B$16])) + [.$B$19]*(1-(1+[.$B$20])^(-[.CV$31]))/[.$B$20]-[.$B$24]*(1-EXP(-[.$B$25]*[.CV$31]))^2/(1+[.$B$20])^[.CV$31]  - IF([.CV31]=[.$B$21];1;0)*[.$B$23]*[.$B$24]*(1-EXP(-[.$B$25]*[.$B$21]))^2/(1+[.$B$20])^[.$B$21]" office:value-type="currency" office:currency="USD" office:value="2234.13061704288" calcext:value-type="currency">
            <text:p>$2,234</text:p>
          </table:table-cell>
          <table:table-cell table:style-name="ce46" table:formula="of:=[.$B$14]*([.$B$15]*[.$B$16]+[.$B$17]*(1-[.$B$16])) + [.$B$19]*(1-(1+[.$B$20])^(-[.CW$31]))/[.$B$20]-[.$B$24]*(1-EXP(-[.$B$25]*[.CW$31]))^2/(1+[.$B$20])^[.CW$31]  - IF([.CW31]=[.$B$21];1;0)*[.$B$23]*[.$B$24]*(1-EXP(-[.$B$25]*[.$B$21]))^2/(1+[.$B$20])^[.$B$21]" office:value-type="currency" office:currency="USD" office:value="2236.3322163488" calcext:value-type="currency">
            <text:p>$2,236</text:p>
          </table:table-cell>
          <table:table-cell table:style-name="ce46" table:formula="of:=[.$B$14]*([.$B$15]*[.$B$16]+[.$B$17]*(1-[.$B$16])) + [.$B$19]*(1-(1+[.$B$20])^(-[.CX$31]))/[.$B$20]-[.$B$24]*(1-EXP(-[.$B$25]*[.CX$31]))^2/(1+[.$B$20])^[.CX$31]  - IF([.CX31]=[.$B$21];1;0)*[.$B$23]*[.$B$24]*(1-EXP(-[.$B$25]*[.$B$21]))^2/(1+[.$B$20])^[.$B$21]" office:value-type="currency" office:currency="USD" office:value="2238.46984910976" calcext:value-type="currency">
            <text:p>$2,238</text:p>
          </table:table-cell>
          <table:table-cell table:style-name="ce46" table:formula="of:=[.$B$14]*([.$B$15]*[.$B$16]+[.$B$17]*(1-[.$B$16])) + [.$B$19]*(1-(1+[.$B$20])^(-[.CY$31]))/[.$B$20]-[.$B$24]*(1-EXP(-[.$B$25]*[.CY$31]))^2/(1+[.$B$20])^[.CY$31]  - IF([.CY31]=[.$B$21];1;0)*[.$B$23]*[.$B$24]*(1-EXP(-[.$B$25]*[.$B$21]))^2/(1+[.$B$20])^[.$B$21]" office:value-type="currency" office:currency="USD" office:value="2240.54537243043" calcext:value-type="currency">
            <text:p>$2,241</text:p>
          </table:table-cell>
          <table:table-cell table:style-name="ce46" table:formula="of:=[.$B$14]*([.$B$15]*[.$B$16]+[.$B$17]*(1-[.$B$16])) + [.$B$19]*(1-(1+[.$B$20])^(-[.CZ$31]))/[.$B$20]-[.$B$24]*(1-EXP(-[.$B$25]*[.CZ$31]))^2/(1+[.$B$20])^[.CZ$31]  - IF([.CZ31]=[.$B$21];1;0)*[.$B$23]*[.$B$24]*(1-EXP(-[.$B$25]*[.$B$21]))^2/(1+[.$B$20])^[.$B$21]" office:value-type="currency" office:currency="USD" office:value="2242.56058953409" calcext:value-type="currency">
            <text:p>$2,243</text:p>
          </table:table-cell>
          <table:table-cell table:style-name="ce46" table:formula="of:=[.$B$14]*([.$B$15]*[.$B$16]+[.$B$17]*(1-[.$B$16])) + [.$B$19]*(1-(1+[.$B$20])^(-[.DA$31]))/[.$B$20]-[.$B$24]*(1-EXP(-[.$B$25]*[.DA$31]))^2/(1+[.$B$20])^[.DA$31]  - IF([.DA31]=[.$B$21];1;0)*[.$B$23]*[.$B$24]*(1-EXP(-[.$B$25]*[.$B$21]))^2/(1+[.$B$20])^[.$B$21]" office:value-type="currency" office:currency="USD" office:value="2244.51725132604" calcext:value-type="currency">
            <text:p>$2,245</text:p>
          </table:table-cell>
          <table:table-cell table:style-name="ce46" table:formula="of:=[.$B$14]*([.$B$15]*[.$B$16]+[.$B$17]*(1-[.$B$16])) + [.$B$19]*(1-(1+[.$B$20])^(-[.DB$31]))/[.$B$20]-[.$B$24]*(1-EXP(-[.$B$25]*[.DB$31]))^2/(1+[.$B$20])^[.DB$31]  - IF([.DB31]=[.$B$21];1;0)*[.$B$23]*[.$B$24]*(1-EXP(-[.$B$25]*[.$B$21]))^2/(1+[.$B$20])^[.$B$21]" office:value-type="currency" office:currency="USD" office:value="2246.41705791144" calcext:value-type="currency">
            <text:p>$2,246</text:p>
          </table:table-cell>
          <table:table-cell table:style-name="ce46" table:formula="of:=[.$B$14]*([.$B$15]*[.$B$16]+[.$B$17]*(1-[.$B$16])) + [.$B$19]*(1-(1+[.$B$20])^(-[.DC$31]))/[.$B$20]-[.$B$24]*(1-EXP(-[.$B$25]*[.DC$31]))^2/(1+[.$B$20])^[.DC$31]  - IF([.DC31]=[.$B$21];1;0)*[.$B$23]*[.$B$24]*(1-EXP(-[.$B$25]*[.$B$21]))^2/(1+[.$B$20])^[.$B$21]" office:value-type="currency" office:currency="USD" office:value="2248.26166006915" calcext:value-type="currency">
            <text:p>$2,248</text:p>
          </table:table-cell>
          <table:table-cell table:style-name="ce46" table:formula="of:=[.$B$14]*([.$B$15]*[.$B$16]+[.$B$17]*(1-[.$B$16])) + [.$B$19]*(1-(1+[.$B$20])^(-[.DD$31]))/[.$B$20]-[.$B$24]*(1-EXP(-[.$B$25]*[.DD$31]))^2/(1+[.$B$20])^[.DD$31]  - IF([.DD31]=[.$B$21];1;0)*[.$B$23]*[.$B$24]*(1-EXP(-[.$B$25]*[.$B$21]))^2/(1+[.$B$20])^[.$B$21]" office:value-type="currency" office:currency="USD" office:value="2250.05266068266" calcext:value-type="currency">
            <text:p>$2,250</text:p>
          </table:table-cell>
          <table:table-cell table:style-name="ce46" table:formula="of:=[.$B$14]*([.$B$15]*[.$B$16]+[.$B$17]*(1-[.$B$16])) + [.$B$19]*(1-(1+[.$B$20])^(-[.DE$31]))/[.$B$20]-[.$B$24]*(1-EXP(-[.$B$25]*[.DE$31]))^2/(1+[.$B$20])^[.DE$31]  - IF([.DE31]=[.$B$21];1;0)*[.$B$23]*[.$B$24]*(1-EXP(-[.$B$25]*[.$B$21]))^2/(1+[.$B$20])^[.$B$21]" office:value-type="currency" office:currency="USD" office:value="2251.79161612945" calcext:value-type="currency">
            <text:p>$2,252</text:p>
          </table:table-cell>
          <table:table-cell table:style-name="ce46" table:formula="of:=[.$B$14]*([.$B$15]*[.$B$16]+[.$B$17]*(1-[.$B$16])) + [.$B$19]*(1-(1+[.$B$20])^(-[.DF$31]))/[.$B$20]-[.$B$24]*(1-EXP(-[.$B$25]*[.DF$31]))^2/(1+[.$B$20])^[.DF$31]  - IF([.DF31]=[.$B$21];1;0)*[.$B$23]*[.$B$24]*(1-EXP(-[.$B$25]*[.$B$21]))^2/(1+[.$B$20])^[.$B$21]" office:value-type="currency" office:currency="USD" office:value="2253.48003762999" calcext:value-type="currency">
            <text:p>$2,253</text:p>
          </table:table-cell>
          <table:table-cell table:style-name="ce46" table:formula="of:=[.$B$14]*([.$B$15]*[.$B$16]+[.$B$17]*(1-[.$B$16])) + [.$B$19]*(1-(1+[.$B$20])^(-[.DG$31]))/[.$B$20]-[.$B$24]*(1-EXP(-[.$B$25]*[.DG$31]))^2/(1+[.$B$20])^[.DG$31]  - IF([.DG31]=[.$B$21];1;0)*[.$B$23]*[.$B$24]*(1-EXP(-[.$B$25]*[.$B$21]))^2/(1+[.$B$20])^[.$B$21]" office:value-type="currency" office:currency="USD" office:value="2255.11939255758" calcext:value-type="currency">
            <text:p>$2,255</text:p>
          </table:table-cell>
          <table:table-cell table:style-name="ce46" table:formula="of:=[.$B$14]*([.$B$15]*[.$B$16]+[.$B$17]*(1-[.$B$16])) + [.$B$19]*(1-(1+[.$B$20])^(-[.DH$31]))/[.$B$20]-[.$B$24]*(1-EXP(-[.$B$25]*[.DH$31]))^2/(1+[.$B$20])^[.DH$31]  - IF([.DH31]=[.$B$21];1;0)*[.$B$23]*[.$B$24]*(1-EXP(-[.$B$25]*[.$B$21]))^2/(1+[.$B$20])^[.$B$21]" office:value-type="currency" office:currency="USD" office:value="2256.71110571006" calcext:value-type="currency">
            <text:p>$2,257</text:p>
          </table:table-cell>
          <table:table-cell table:style-name="ce46" table:formula="of:=[.$B$14]*([.$B$15]*[.$B$16]+[.$B$17]*(1-[.$B$16])) + [.$B$19]*(1-(1+[.$B$20])^(-[.DI$31]))/[.$B$20]-[.$B$24]*(1-EXP(-[.$B$25]*[.DI$31]))^2/(1+[.$B$20])^[.DI$31]  - IF([.DI31]=[.$B$21];1;0)*[.$B$23]*[.$B$24]*(1-EXP(-[.$B$25]*[.$B$21]))^2/(1+[.$B$20])^[.$B$21]" office:value-type="currency" office:currency="USD" office:value="2258.25656054473" calcext:value-type="currency">
            <text:p>$2,258</text:p>
          </table:table-cell>
          <table:table-cell table:style-name="ce46" table:formula="of:=[.$B$14]*([.$B$15]*[.$B$16]+[.$B$17]*(1-[.$B$16])) + [.$B$19]*(1-(1+[.$B$20])^(-[.DJ$31]))/[.$B$20]-[.$B$24]*(1-EXP(-[.$B$25]*[.DJ$31]))^2/(1+[.$B$20])^[.DJ$31]  - IF([.DJ31]=[.$B$21];1;0)*[.$B$23]*[.$B$24]*(1-EXP(-[.$B$25]*[.$B$21]))^2/(1+[.$B$20])^[.$B$21]" office:value-type="currency" office:currency="USD" office:value="2259.75710037728" calcext:value-type="currency">
            <text:p>$2,260</text:p>
          </table:table-cell>
          <table:table-cell table:style-name="ce46" table:formula="of:=[.$B$14]*([.$B$15]*[.$B$16]+[.$B$17]*(1-[.$B$16])) + [.$B$19]*(1-(1+[.$B$20])^(-[.DK$31]))/[.$B$20]-[.$B$24]*(1-EXP(-[.$B$25]*[.DK$31]))^2/(1+[.$B$20])^[.DK$31]  - IF([.DK31]=[.$B$21];1;0)*[.$B$23]*[.$B$24]*(1-EXP(-[.$B$25]*[.$B$21]))^2/(1+[.$B$20])^[.$B$21]" office:value-type="currency" office:currency="USD" office:value="2261.21402954602" calcext:value-type="currency">
            <text:p>$2,261</text:p>
          </table:table-cell>
          <table:table-cell table:style-name="ce46" table:formula="of:=[.$B$14]*([.$B$15]*[.$B$16]+[.$B$17]*(1-[.$B$16])) + [.$B$19]*(1-(1+[.$B$20])^(-[.DL$31]))/[.$B$20]-[.$B$24]*(1-EXP(-[.$B$25]*[.DL$31]))^2/(1+[.$B$20])^[.DL$31]  - IF([.DL31]=[.$B$21];1;0)*[.$B$23]*[.$B$24]*(1-EXP(-[.$B$25]*[.$B$21]))^2/(1+[.$B$20])^[.$B$21]" office:value-type="currency" office:currency="USD" office:value="2262.62861454222" calcext:value-type="currency">
            <text:p>$2,263</text:p>
          </table:table-cell>
          <table:table-cell table:style-name="ce46" table:formula="of:=[.$B$14]*([.$B$15]*[.$B$16]+[.$B$17]*(1-[.$B$16])) + [.$B$19]*(1-(1+[.$B$20])^(-[.DM$31]))/[.$B$20]-[.$B$24]*(1-EXP(-[.$B$25]*[.DM$31]))^2/(1+[.$B$20])^[.DM$31]  - IF([.DM31]=[.$B$21];1;0)*[.$B$23]*[.$B$24]*(1-EXP(-[.$B$25]*[.$B$21]))^2/(1+[.$B$20])^[.$B$21]" office:value-type="currency" office:currency="USD" office:value="2264.00208510775" calcext:value-type="currency">
            <text:p>$2,264</text:p>
          </table:table-cell>
          <table:table-cell table:style-name="ce46" table:formula="of:=[.$B$14]*([.$B$15]*[.$B$16]+[.$B$17]*(1-[.$B$16])) + [.$B$19]*(1-(1+[.$B$20])^(-[.DN$31]))/[.$B$20]-[.$B$24]*(1-EXP(-[.$B$25]*[.DN$31]))^2/(1+[.$B$20])^[.DN$31]  - IF([.DN31]=[.$B$21];1;0)*[.$B$23]*[.$B$24]*(1-EXP(-[.$B$25]*[.$B$21]))^2/(1+[.$B$20])^[.$B$21]" office:value-type="currency" office:currency="USD" office:value="2265.33563530078" calcext:value-type="currency">
            <text:p>$2,265</text:p>
          </table:table-cell>
          <table:table-cell table:style-name="ce46" table:formula="of:=[.$B$14]*([.$B$15]*[.$B$16]+[.$B$17]*(1-[.$B$16])) + [.$B$19]*(1-(1+[.$B$20])^(-[.DO$31]))/[.$B$20]-[.$B$24]*(1-EXP(-[.$B$25]*[.DO$31]))^2/(1+[.$B$20])^[.DO$31]  - IF([.DO31]=[.$B$21];1;0)*[.$B$23]*[.$B$24]*(1-EXP(-[.$B$25]*[.$B$21]))^2/(1+[.$B$20])^[.$B$21]" office:value-type="currency" office:currency="USD" office:value="2266.6304245306" calcext:value-type="currency">
            <text:p>$2,267</text:p>
          </table:table-cell>
          <table:table-cell table:style-name="ce46" table:formula="of:=[.$B$14]*([.$B$15]*[.$B$16]+[.$B$17]*(1-[.$B$16])) + [.$B$19]*(1-(1+[.$B$20])^(-[.DP$31]))/[.$B$20]-[.$B$24]*(1-EXP(-[.$B$25]*[.DP$31]))^2/(1+[.$B$20])^[.DP$31]  - IF([.DP31]=[.$B$21];1;0)*[.$B$23]*[.$B$24]*(1-EXP(-[.$B$25]*[.$B$21]))^2/(1+[.$B$20])^[.$B$21]" office:value-type="currency" office:currency="USD" office:value="2267.88757856241" calcext:value-type="currency">
            <text:p>$2,268</text:p>
          </table:table-cell>
          <table:table-cell table:style-name="ce46" table:formula="of:=[.$B$14]*([.$B$15]*[.$B$16]+[.$B$17]*(1-[.$B$16])) + [.$B$19]*(1-(1+[.$B$20])^(-[.DQ$31]))/[.$B$20]-[.$B$24]*(1-EXP(-[.$B$25]*[.DQ$31]))^2/(1+[.$B$20])^[.DQ$31]  - IF([.DQ31]=[.$B$21];1;0)*[.$B$23]*[.$B$24]*(1-EXP(-[.$B$25]*[.$B$21]))^2/(1+[.$B$20])^[.$B$21]" office:value-type="currency" office:currency="USD" office:value="2255.0777476225" calcext:value-type="currency">
            <text:p>$2,255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Bid score: bid[0,t]/W[forestry,t]</text:p>
          </table:table-cell>
          <table:table-cell table:number-columns-repeated="10"/>
          <table:table-cell table:style-name="ce52" table:formula="of:=[.L37]/[.L36]" office:value-type="float" office:value="1099428.19933221" calcext:value-type="float">
            <text:p>1,099,428</text:p>
          </table:table-cell>
          <table:table-cell table:style-name="ce52" table:formula="of:=[.M37]/[.M36]" office:value-type="float" office:value="955662.871417044" calcext:value-type="float">
            <text:p>955,663</text:p>
          </table:table-cell>
          <table:table-cell table:style-name="ce52" table:formula="of:=[.N37]/[.N36]" office:value-type="float" office:value="842057.061674247" calcext:value-type="float">
            <text:p>842,057</text:p>
          </table:table-cell>
          <table:table-cell table:style-name="ce52" table:formula="of:=[.O37]/[.O36]" office:value-type="float" office:value="750496.341045247" calcext:value-type="float">
            <text:p>750,496</text:p>
          </table:table-cell>
          <table:table-cell table:style-name="ce52" table:formula="of:=[.P37]/[.P36]" office:value-type="float" office:value="675434.96788838" calcext:value-type="float">
            <text:p>675,435</text:p>
          </table:table-cell>
          <table:table-cell table:style-name="ce52" table:formula="of:=[.Q37]/[.Q36]" office:value-type="float" office:value="612985.428123022" calcext:value-type="float">
            <text:p>612,985</text:p>
          </table:table-cell>
          <table:table-cell table:style-name="ce52" table:formula="of:=[.R37]/[.R36]" office:value-type="float" office:value="560363.747605798" calcext:value-type="float">
            <text:p>560,364</text:p>
          </table:table-cell>
          <table:table-cell table:style-name="ce52" table:formula="of:=[.S37]/[.S36]" office:value-type="float" office:value="515556.062026563" calcext:value-type="float">
            <text:p>515,556</text:p>
          </table:table-cell>
          <table:table-cell table:style-name="ce52" table:formula="of:=[.T37]/[.T36]" office:value-type="float" office:value="477029.419512081" calcext:value-type="float">
            <text:p>477,029</text:p>
          </table:table-cell>
          <table:table-cell table:style-name="ce52" table:formula="of:=[.U37]/[.U36]" office:value-type="float" office:value="443602.713254756" calcext:value-type="float">
            <text:p>443,603</text:p>
          </table:table-cell>
          <table:table-cell table:style-name="ce52" table:formula="of:=[.V37]/[.V36]" office:value-type="float" office:value="414379.933646774" calcext:value-type="float">
            <text:p>414,380</text:p>
          </table:table-cell>
          <table:table-cell table:style-name="ce52" table:formula="of:=[.W37]/[.W36]" office:value-type="float" office:value="388662.448071317" calcext:value-type="float">
            <text:p>388,662</text:p>
          </table:table-cell>
          <table:table-cell table:style-name="ce52" table:formula="of:=[.X37]/[.X36]" office:value-type="float" office:value="365881.299313398" calcext:value-type="float">
            <text:p>365,881</text:p>
          </table:table-cell>
          <table:table-cell table:style-name="ce52" table:formula="of:=[.Y37]/[.Y36]" office:value-type="float" office:value="345584.331231212" calcext:value-type="float">
            <text:p>345,584</text:p>
          </table:table-cell>
          <table:table-cell table:style-name="ce52" table:formula="of:=[.Z37]/[.Z36]" office:value-type="float" office:value="327409.912152238" calcext:value-type="float">
            <text:p>327,410</text:p>
          </table:table-cell>
          <table:table-cell table:style-name="ce52" table:formula="of:=[.AA37]/[.AA36]" office:value-type="float" office:value="311057.966490388" calcext:value-type="float">
            <text:p>311,058</text:p>
          </table:table-cell>
          <table:table-cell table:style-name="ce52" table:formula="of:=[.AB37]/[.AB36]" office:value-type="float" office:value="296281.602492625" calcext:value-type="float">
            <text:p>296,282</text:p>
          </table:table-cell>
          <table:table-cell table:style-name="ce52" table:formula="of:=[.AC37]/[.AC36]" office:value-type="float" office:value="282875.094686597" calcext:value-type="float">
            <text:p>282,875</text:p>
          </table:table-cell>
          <table:table-cell table:style-name="ce52" table:formula="of:=[.AD37]/[.AD36]" office:value-type="float" office:value="270666.130658796" calcext:value-type="float">
            <text:p>270,666</text:p>
          </table:table-cell>
          <table:table-cell table:style-name="ce52" table:formula="of:=[.AE37]/[.AE36]" office:value-type="float" office:value="259506.686001498" calcext:value-type="float">
            <text:p>259,507</text:p>
          </table:table-cell>
          <table:table-cell table:style-name="ce52" table:formula="of:=[.AF37]/[.AF36]" office:value-type="float" office:value="249273.632579219" calcext:value-type="float">
            <text:p>249,274</text:p>
          </table:table-cell>
          <table:table-cell table:style-name="ce52" table:formula="of:=[.AG37]/[.AG36]" office:value-type="float" office:value="239862.242506991" calcext:value-type="float">
            <text:p>239,862</text:p>
          </table:table-cell>
          <table:table-cell table:style-name="ce52" table:formula="of:=[.AH37]/[.AH36]" office:value-type="float" office:value="231182.394789856" calcext:value-type="float">
            <text:p>231,182</text:p>
          </table:table-cell>
          <table:table-cell table:style-name="ce52" table:formula="of:=[.AI37]/[.AI36]" office:value-type="float" office:value="223158.620786626" calcext:value-type="float">
            <text:p>223,159</text:p>
          </table:table-cell>
          <table:table-cell table:style-name="ce52" table:formula="of:=[.AJ37]/[.AJ36]" office:value-type="float" office:value="215716.473315238" calcext:value-type="float">
            <text:p>215,716</text:p>
          </table:table-cell>
          <table:table-cell table:style-name="ce52" table:formula="of:=[.AK37]/[.AK36]" office:value-type="float" office:value="208800.133029574" calcext:value-type="float">
            <text:p>208,800</text:p>
          </table:table-cell>
          <table:table-cell table:style-name="ce52" table:formula="of:=[.AL37]/[.AL36]" office:value-type="float" office:value="202358.884582331" calcext:value-type="float">
            <text:p>202,359</text:p>
          </table:table-cell>
          <table:table-cell table:style-name="ce52" table:formula="of:=[.AM37]/[.AM36]" office:value-type="float" office:value="196348.052097252" calcext:value-type="float">
            <text:p>196,348</text:p>
          </table:table-cell>
          <table:table-cell table:style-name="ce52" table:formula="of:=[.AN37]/[.AN36]" office:value-type="float" office:value="190729.705845045" calcext:value-type="float">
            <text:p>190,730</text:p>
          </table:table-cell>
          <table:table-cell table:style-name="ce52" table:formula="of:=[.AO37]/[.AO36]" office:value-type="float" office:value="185466.537489043" calcext:value-type="float">
            <text:p>185,467</text:p>
          </table:table-cell>
          <table:table-cell table:style-name="ce52" table:formula="of:=[.AP37]/[.AP36]" office:value-type="float" office:value="180529.623959175" calcext:value-type="float">
            <text:p>180,530</text:p>
          </table:table-cell>
          <table:table-cell table:style-name="ce52" table:formula="of:=[.AQ37]/[.AQ36]" office:value-type="float" office:value="175892.337188344" calcext:value-type="float">
            <text:p>175,892</text:p>
          </table:table-cell>
          <table:table-cell table:style-name="ce52" table:formula="of:=[.AR37]/[.AR36]" office:value-type="float" office:value="171531.734884089" calcext:value-type="float">
            <text:p>171,532</text:p>
          </table:table-cell>
          <table:table-cell table:style-name="ce52" table:formula="of:=[.AS37]/[.AS36]" office:value-type="float" office:value="167422.895735613" calcext:value-type="float">
            <text:p>167,423</text:p>
          </table:table-cell>
          <table:table-cell table:style-name="ce52" table:formula="of:=[.AT37]/[.AT36]" office:value-type="float" office:value="163546.94999824" calcext:value-type="float">
            <text:p>163,547</text:p>
          </table:table-cell>
          <table:table-cell table:style-name="ce52" table:formula="of:=[.AU37]/[.AU36]" office:value-type="float" office:value="159886.075753174" calcext:value-type="float">
            <text:p>159,886</text:p>
          </table:table-cell>
          <table:table-cell table:style-name="ce52" table:formula="of:=[.AV37]/[.AV36]" office:value-type="float" office:value="156421.748617241" calcext:value-type="float">
            <text:p>156,422</text:p>
          </table:table-cell>
          <table:table-cell table:style-name="ce52" table:formula="of:=[.AW37]/[.AW36]" office:value-type="float" office:value="153141.867943828" calcext:value-type="float">
            <text:p>153,142</text:p>
          </table:table-cell>
          <table:table-cell table:style-name="ce52" table:formula="of:=[.AX37]/[.AX36]" office:value-type="float" office:value="150031.103101858" calcext:value-type="float">
            <text:p>150,031</text:p>
          </table:table-cell>
          <table:table-cell table:style-name="ce52" table:formula="of:=[.AY37]/[.AY36]" office:value-type="float" office:value="147077.343466694" calcext:value-type="float">
            <text:p>147,077</text:p>
          </table:table-cell>
          <table:table-cell table:style-name="ce52" table:formula="of:=[.AZ37]/[.AZ36]" office:value-type="float" office:value="144271.103004639" calcext:value-type="float">
            <text:p>144,271</text:p>
          </table:table-cell>
          <table:table-cell table:style-name="ce52" table:formula="of:=[.BA37]/[.BA36]" office:value-type="float" office:value="141601.035603435" calcext:value-type="float">
            <text:p>141,601</text:p>
          </table:table-cell>
          <table:table-cell table:style-name="ce52" table:formula="of:=[.BB37]/[.BB36]" office:value-type="float" office:value="139060.625027541" calcext:value-type="float">
            <text:p>139,061</text:p>
          </table:table-cell>
          <table:table-cell table:style-name="ce52" table:formula="of:=[.BC37]/[.BC36]" office:value-type="float" office:value="136639.43247126" calcext:value-type="float">
            <text:p>136,639</text:p>
          </table:table-cell>
          <table:table-cell table:style-name="ce52" table:formula="of:=[.BD37]/[.BD36]" office:value-type="float" office:value="134330.444136613" calcext:value-type="float">
            <text:p>134,330</text:p>
          </table:table-cell>
          <table:table-cell table:style-name="ce52" table:formula="of:=[.BE37]/[.BE36]" office:value-type="float" office:value="132125.620814886" calcext:value-type="float">
            <text:p>132,126</text:p>
          </table:table-cell>
          <table:table-cell table:style-name="ce52" table:formula="of:=[.BF37]/[.BF36]" office:value-type="float" office:value="130017.992747232" calcext:value-type="float">
            <text:p>130,018</text:p>
          </table:table-cell>
          <table:table-cell table:style-name="ce52" table:formula="of:=[.BG37]/[.BG36]" office:value-type="float" office:value="128002.003123639" calcext:value-type="float">
            <text:p>128,002</text:p>
          </table:table-cell>
          <table:table-cell table:style-name="ce52" table:formula="of:=[.BH37]/[.BH36]" office:value-type="float" office:value="126072.724740893" calcext:value-type="float">
            <text:p>126,073</text:p>
          </table:table-cell>
          <table:table-cell table:style-name="ce52" table:formula="of:=[.BI37]/[.BI36]" office:value-type="float" office:value="124224.962636659" calcext:value-type="float">
            <text:p>124,225</text:p>
          </table:table-cell>
          <table:table-cell table:style-name="ce52" table:formula="of:=[.BJ37]/[.BJ36]" office:value-type="float" office:value="122453.71116969" calcext:value-type="float">
            <text:p>122,454</text:p>
          </table:table-cell>
          <table:table-cell table:style-name="ce52" table:formula="of:=[.BK37]/[.BK36]" office:value-type="float" office:value="120755.172907146" calcext:value-type="float">
            <text:p>120,755</text:p>
          </table:table-cell>
          <table:table-cell table:style-name="ce52" table:formula="of:=[.BL37]/[.BL36]" office:value-type="float" office:value="119124.892364071" calcext:value-type="float">
            <text:p>119,125</text:p>
          </table:table-cell>
          <table:table-cell table:style-name="ce52" table:formula="of:=[.BM37]/[.BM36]" office:value-type="float" office:value="117559.532358484" calcext:value-type="float">
            <text:p>117,560</text:p>
          </table:table-cell>
          <table:table-cell table:style-name="ce52" table:formula="of:=[.BN37]/[.BN36]" office:value-type="float" office:value="116055.412711326" calcext:value-type="float">
            <text:p>116,055</text:p>
          </table:table-cell>
          <table:table-cell table:style-name="ce52" table:formula="of:=[.BO37]/[.BO36]" office:value-type="float" office:value="114609.32110966" calcext:value-type="float">
            <text:p>114,609</text:p>
          </table:table-cell>
          <table:table-cell table:style-name="ce52" table:formula="of:=[.BP37]/[.BP36]" office:value-type="float" office:value="113218.137218094" calcext:value-type="float">
            <text:p>113,218</text:p>
          </table:table-cell>
          <table:table-cell table:style-name="ce52" table:formula="of:=[.BQ37]/[.BQ36]" office:value-type="float" office:value="111878.778087625" calcext:value-type="float">
            <text:p>111,879</text:p>
          </table:table-cell>
          <table:table-cell table:style-name="ce52" table:formula="of:=[.BR37]/[.BR36]" office:value-type="float" office:value="110588.91278919" calcext:value-type="float">
            <text:p>110,589</text:p>
          </table:table-cell>
          <table:table-cell table:style-name="ce52" table:formula="of:=[.BS37]/[.BS36]" office:value-type="float" office:value="109345.791756" calcext:value-type="float">
            <text:p>109,346</text:p>
          </table:table-cell>
          <table:table-cell table:style-name="ce52" table:formula="of:=[.BT37]/[.BT36]" office:value-type="float" office:value="108147.104578055" calcext:value-type="float">
            <text:p>108,147</text:p>
          </table:table-cell>
          <table:table-cell table:style-name="ce52" table:formula="of:=[.BU37]/[.BU36]" office:value-type="float" office:value="106991.34794197" calcext:value-type="float">
            <text:p>106,991</text:p>
          </table:table-cell>
          <table:table-cell table:style-name="ce52" table:formula="of:=[.BV37]/[.BV36]" office:value-type="float" office:value="105875.941772255" calcext:value-type="float">
            <text:p>105,876</text:p>
          </table:table-cell>
          <table:table-cell table:style-name="ce52" table:formula="of:=[.BW37]/[.BW36]" office:value-type="float" office:value="104799.319715" calcext:value-type="float">
            <text:p>104,799</text:p>
          </table:table-cell>
          <table:table-cell table:style-name="ce52" table:formula="of:=[.BX37]/[.BX36]" office:value-type="float" office:value="103759.112697807" calcext:value-type="float">
            <text:p>103,759</text:p>
          </table:table-cell>
          <table:table-cell table:style-name="ce52" table:formula="of:=[.BY37]/[.BY36]" office:value-type="float" office:value="102754.578916132" calcext:value-type="float">
            <text:p>102,755</text:p>
          </table:table-cell>
          <table:table-cell table:style-name="ce52" table:formula="of:=[.BZ37]/[.BZ36]" office:value-type="float" office:value="101783.917000892" calcext:value-type="float">
            <text:p>101,784</text:p>
          </table:table-cell>
          <table:table-cell table:style-name="ce52" table:formula="of:=[.CA37]/[.CA36]" office:value-type="float" office:value="100845.078279019" calcext:value-type="float">
            <text:p>100,845</text:p>
          </table:table-cell>
          <table:table-cell table:style-name="ce52" table:formula="of:=[.CB37]/[.CB36]" office:value-type="float" office:value="99937.1975526339" calcext:value-type="float">
            <text:p>99,937</text:p>
          </table:table-cell>
          <table:table-cell table:style-name="ce52" table:formula="of:=[.CC37]/[.CC36]" office:value-type="float" office:value="99058.6909633021" calcext:value-type="float">
            <text:p>99,059</text:p>
          </table:table-cell>
          <table:table-cell table:style-name="ce52" table:formula="of:=[.CD37]/[.CD36]" office:value-type="float" office:value="98208.4069568806" calcext:value-type="float">
            <text:p>98,208</text:p>
          </table:table-cell>
          <table:table-cell table:style-name="ce52" table:formula="of:=[.CE37]/[.CE36]" office:value-type="float" office:value="97385.1165496082" calcext:value-type="float">
            <text:p>97,385</text:p>
          </table:table-cell>
          <table:table-cell table:style-name="ce52" table:formula="of:=[.CF37]/[.CF36]" office:value-type="float" office:value="96587.6266345518" calcext:value-type="float">
            <text:p>96,588</text:p>
          </table:table-cell>
          <table:table-cell table:style-name="ce52" table:formula="of:=[.CG37]/[.CG36]" office:value-type="float" office:value="95815.3043099506" calcext:value-type="float">
            <text:p>95,815</text:p>
          </table:table-cell>
          <table:table-cell table:style-name="ce52" table:formula="of:=[.CH37]/[.CH36]" office:value-type="float" office:value="95066.6644567955" calcext:value-type="float">
            <text:p>95,067</text:p>
          </table:table-cell>
          <table:table-cell table:style-name="ce52" table:formula="of:=[.CI37]/[.CI36]" office:value-type="float" office:value="94341.1210633715" calcext:value-type="float">
            <text:p>94,341</text:p>
          </table:table-cell>
          <table:table-cell table:style-name="ce52" table:formula="of:=[.CJ37]/[.CJ36]" office:value-type="float" office:value="93637.7150136476" calcext:value-type="float">
            <text:p>93,638</text:p>
          </table:table-cell>
          <table:table-cell table:style-name="ce52" table:formula="of:=[.CK37]/[.CK36]" office:value-type="float" office:value="92955.5873221607" calcext:value-type="float">
            <text:p>92,956</text:p>
          </table:table-cell>
          <table:table-cell table:style-name="ce52" table:formula="of:=[.CL37]/[.CL36]" office:value-type="float" office:value="92293.7519312031" calcext:value-type="float">
            <text:p>92,294</text:p>
          </table:table-cell>
          <table:table-cell table:style-name="ce52" table:formula="of:=[.CM37]/[.CM36]" office:value-type="float" office:value="91651.5614395608" calcext:value-type="float">
            <text:p>91,652</text:p>
          </table:table-cell>
          <table:table-cell table:style-name="ce52" table:formula="of:=[.CN37]/[.CN36]" office:value-type="float" office:value="91028.4449650893" calcext:value-type="float">
            <text:p>91,028</text:p>
          </table:table-cell>
          <table:table-cell table:style-name="ce52" table:formula="of:=[.CO37]/[.CO36]" office:value-type="float" office:value="90423.4878138081" calcext:value-type="float">
            <text:p>90,423</text:p>
          </table:table-cell>
          <table:table-cell table:style-name="ce52" table:formula="of:=[.CP37]/[.CP36]" office:value-type="float" office:value="89836.0465859526" calcext:value-type="float">
            <text:p>89,836</text:p>
          </table:table-cell>
          <table:table-cell table:style-name="ce52" table:formula="of:=[.CQ37]/[.CQ36]" office:value-type="float" office:value="89265.9533911403" calcext:value-type="float">
            <text:p>89,266</text:p>
          </table:table-cell>
          <table:table-cell table:style-name="ce52" table:formula="of:=[.CR37]/[.CR36]" office:value-type="float" office:value="88712.3071778119" calcext:value-type="float">
            <text:p>88,712</text:p>
          </table:table-cell>
          <table:table-cell table:style-name="ce52" table:formula="of:=[.CS37]/[.CS36]" office:value-type="float" office:value="88174.9969009512" calcext:value-type="float">
            <text:p>88,175</text:p>
          </table:table-cell>
          <table:table-cell table:style-name="ce52" table:formula="of:=[.CT37]/[.CT36]" office:value-type="float" office:value="87653.0118335623" calcext:value-type="float">
            <text:p>87,653</text:p>
          </table:table-cell>
          <table:table-cell table:style-name="ce52" table:formula="of:=[.CU37]/[.CU36]" office:value-type="float" office:value="87146.4299856881" calcext:value-type="float">
            <text:p>87,146</text:p>
          </table:table-cell>
          <table:table-cell table:style-name="ce52" table:formula="of:=[.CV37]/[.CV36]" office:value-type="float" office:value="86654.3735216317" calcext:value-type="float">
            <text:p>86,654</text:p>
          </table:table-cell>
          <table:table-cell table:style-name="ce52" table:formula="of:=[.CW37]/[.CW36]" office:value-type="float" office:value="86176.3461912479" calcext:value-type="float">
            <text:p>86,176</text:p>
          </table:table-cell>
          <table:table-cell table:style-name="ce52" table:formula="of:=[.CX37]/[.CX36]" office:value-type="float" office:value="85711.6487428297" calcext:value-type="float">
            <text:p>85,712</text:p>
          </table:table-cell>
          <table:table-cell table:style-name="ce52" table:formula="of:=[.CY37]/[.CY36]" office:value-type="float" office:value="85260.0156752331" calcext:value-type="float">
            <text:p>85,260</text:p>
          </table:table-cell>
          <table:table-cell table:style-name="ce52" table:formula="of:=[.CZ37]/[.CZ36]" office:value-type="float" office:value="84821.2191939591" calcext:value-type="float">
            <text:p>84,821</text:p>
          </table:table-cell>
          <table:table-cell table:style-name="ce52" table:formula="of:=[.DA37]/[.DA36]" office:value-type="float" office:value="84394.7049787694" calcext:value-type="float">
            <text:p>84,395</text:p>
          </table:table-cell>
          <table:table-cell table:style-name="ce52" table:formula="of:=[.DB37]/[.DB36]" office:value-type="float" office:value="83980.0876732892" calcext:value-type="float">
            <text:p>83,980</text:p>
          </table:table-cell>
          <table:table-cell table:style-name="ce52" table:formula="of:=[.DC37]/[.DC36]" office:value-type="float" office:value="83577.1844912866" calcext:value-type="float">
            <text:p>83,577</text:p>
          </table:table-cell>
          <table:table-cell table:style-name="ce52" table:formula="of:=[.DD37]/[.DD36]" office:value-type="float" office:value="83185.2771779594" calcext:value-type="float">
            <text:p>83,185</text:p>
          </table:table-cell>
          <table:table-cell table:style-name="ce52" table:formula="of:=[.DE37]/[.DE36]" office:value-type="float" office:value="82804.379524725" calcext:value-type="float">
            <text:p>82,804</text:p>
          </table:table-cell>
          <table:table-cell table:style-name="ce52" table:formula="of:=[.DF37]/[.DF36]" office:value-type="float" office:value="82434.0219250811" calcext:value-type="float">
            <text:p>82,434</text:p>
          </table:table-cell>
          <table:table-cell table:style-name="ce52" table:formula="of:=[.DG37]/[.DG36]" office:value-type="float" office:value="82073.6832224253" calcext:value-type="float">
            <text:p>82,074</text:p>
          </table:table-cell>
          <table:table-cell table:style-name="ce52" table:formula="of:=[.DH37]/[.DH36]" office:value-type="float" office:value="81723.4076109142" calcext:value-type="float">
            <text:p>81,723</text:p>
          </table:table-cell>
          <table:table-cell table:style-name="ce52" table:formula="of:=[.DI37]/[.DI36]" office:value-type="float" office:value="81382.7686857149" calcext:value-type="float">
            <text:p>81,383</text:p>
          </table:table-cell>
          <table:table-cell table:style-name="ce52" table:formula="of:=[.DJ37]/[.DJ36]" office:value-type="float" office:value="81051.6630937968" calcext:value-type="float">
            <text:p>81,052</text:p>
          </table:table-cell>
          <table:table-cell table:style-name="ce52" table:formula="of:=[.DK37]/[.DK36]" office:value-type="float" office:value="80729.6566078258" calcext:value-type="float">
            <text:p>80,730</text:p>
          </table:table-cell>
          <table:table-cell table:style-name="ce52" table:formula="of:=[.DL37]/[.DL36]" office:value-type="float" office:value="80416.5166140123" calcext:value-type="float">
            <text:p>80,417</text:p>
          </table:table-cell>
          <table:table-cell table:style-name="ce52" table:formula="of:=[.DM37]/[.DM36]" office:value-type="float" office:value="80111.7986712694" calcext:value-type="float">
            <text:p>80,112</text:p>
          </table:table-cell>
          <table:table-cell table:style-name="ce52" table:formula="of:=[.DN37]/[.DN36]" office:value-type="float" office:value="79815.3956315653" calcext:value-type="float">
            <text:p>79,815</text:p>
          </table:table-cell>
          <table:table-cell table:style-name="ce52" table:formula="of:=[.DO37]/[.DO36]" office:value-type="float" office:value="79527.1060314964" calcext:value-type="float">
            <text:p>79,527</text:p>
          </table:table-cell>
          <table:table-cell table:style-name="ce52" table:formula="of:=[.DP37]/[.DP36]" office:value-type="float" office:value="79246.7135948219" calcext:value-type="float">
            <text:p>79,247</text:p>
          </table:table-cell>
          <table:table-cell table:style-name="ce52" table:formula="of:=[.DQ37]/[.DQ36]" office:value-type="float" office:value="78485.6659725907" calcext:value-type="float">
            <text:p>78,486</text:p>
          </table:table-cell>
          <table:table-cell table:number-columns-repeated="16262"/>
        </table:table-row>
        <table:table-row table:style-name="ro1">
          <table:table-cell table:style-name="Default" office:value-type="string" calcext:value-type="string">
            <text:p>Year with best bid score</text:p>
          </table:table-cell>
          <table:table-cell table:style-name="ce52" table:formula="of:=MATCH(MIN([.B38:.DQ38]);[.B38:.DQ38];0)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st bid</text:p>
          </table:table-cell>
          <table:table-cell table:style-name="ce46" table:formula="of:=INDEX([.$B37:.$DQ37];1;[.B39])" office:value-type="currency" office:currency="USD" office:value="2255.0777476225" calcext:value-type="currency">
            <text:p>$2,2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de total carbon</text:p>
          </table:table-cell>
          <table:table-cell table:style-name="ce53" table:formula="of:=SUMIF([.$B31:.$DQ31];&quot;&lt;=&quot;&amp;[.B39];[.B32:.DQ32])" office:value-type="float" office:value="3.98029985234857" calcext:value-type="float">
            <text:p>4.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de $/tC</text:p>
          </table:table-cell>
          <table:table-cell table:style-name="ce46" table:formula="of:=[.B40]/[.B41]" office:value-type="currency" office:currency="USD" office:value="566.559764659914" calcext:value-type="currency">
            <text:p>$567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3"/>
        </table:table-row>
        <table:table-row table:style-name="ro2" table:number-rows-repeated="3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6" number:min-decimal-places="6"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4" number:min-decimal-places="14" number:min-integer-digits="1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 loext:blank-width-char=")1">-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4" number:min-decimal-places="4" number:min-integer-digits="1"/>
    </number:number-style>
    <number:number-style style:name="N173">
      <number:number number:decimal-places="1" number:min-decimal-places="1" number:min-integer-digits="1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number-style style:name="N176">
      <number:number number:decimal-places="5" number:min-decimal-places="5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number-style style:name="N178">
      <number:number number:decimal-places="7" number:min-decimal-places="7" number:min-integer-digits="1" number:grouping="true"/>
    </number:number-style>
    <number:number-style style:name="N179">
      <number:number number:decimal-places="8" number:min-decimal-places="8" number:min-integer-digits="1" number:grouping="true"/>
    </number:number-style>
    <number:number-style style:name="N180">
      <number:number number:decimal-places="9" number:min-decimal-places="9" number:min-integer-digits="1" number:grouping="true"/>
    </number:number-style>
    <number:number-style style:name="N181">
      <number:number number:decimal-places="10" number:min-decimal-places="10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83P0"/>
    </number:currency-style>
    <number:number-style style:name="N184">
      <number:number number:decimal-places="16" number:min-decimal-places="1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4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49P0"/>
    </number:currency-style>
    <number:number-style style:name="N10150" number:language="en" number:country="US">
      <number:number number:decimal-places="1" number:min-decimal-places="1" number:min-integer-digits="1" number:grouping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5:02:20.72501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tation_20_example" style:display-name="PageStyle_Plantation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 F. Raffensperger</meta:initial-creator>
    <meta:creation-date>2026-07-02T19:58:07</meta:creation-date>
    <dc:date>2026-07-18T15:02:51.105210100</dc:date>
    <meta:editing-cycles>27</meta:editing-cycles>
    <meta:editing-duration>P1DT5H23M16S</meta:editing-duration>
    <meta:generator>LibreOffice/26.2.4.2$Windows_X86_64 LibreOffice_project/0229ac93fcf0d7cbc6376066c6f35021cef002dc</meta:generator>
    <meta:document-statistic meta:table-count="1" meta:cell-count="93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37cm" svg:height="13.352cm" xlink:href=".." xlink:type="simple" chart:class="chart:scatter" chart:style-name="ch1">
        <chart:title svg:x="9.81cm" svg:y="0.403cm" chart:style-name="ch2">
          <text:p>Bid[1,t]/W[forestry,t]</text:p>
        </chart:title>
        <chart:plot-area chart:style-name="ch3" svg:x="0.474cm" svg:y="1.449cm" svg:width="22.789cm" svg:height="11.636cm">
          <chart:coordinate-region svg:x="2.446cm" svg:y="1.648cm" svg:width="20.528cm" svg:height="10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lantation example'.L38:'Plantation example'.DQ38" chart:class="chart:scatter">
            <chart:domain table:cell-range-address="'Plantation example'.L34:'Plantation example'.DQ34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Plantation example'.L34:'Plantation example'.DQ3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1099428.19933221">
                <text:p>1099428.19933221</text:p>
                <draw:g>
                  <svg:desc>'Plantation example'.L38:'Plantation example'.DQ38</svg:desc>
                </draw:g>
              </table:table-cell>
              <table:table-cell office:value-type="float" office:value="955662.871417044">
                <text:p>955662.871417044</text:p>
              </table:table-cell>
              <table:table-cell office:value-type="float" office:value="842057.061674247">
                <text:p>842057.061674247</text:p>
              </table:table-cell>
              <table:table-cell office:value-type="float" office:value="750496.341045247">
                <text:p>750496.341045247</text:p>
              </table:table-cell>
              <table:table-cell office:value-type="float" office:value="675434.96788838">
                <text:p>675434.96788838</text:p>
              </table:table-cell>
              <table:table-cell office:value-type="float" office:value="612985.428123022">
                <text:p>612985.428123022</text:p>
              </table:table-cell>
              <table:table-cell office:value-type="float" office:value="560363.747605798">
                <text:p>560363.747605798</text:p>
              </table:table-cell>
              <table:table-cell office:value-type="float" office:value="515556.062026563">
                <text:p>515556.062026563</text:p>
              </table:table-cell>
              <table:table-cell office:value-type="float" office:value="477029.419512081">
                <text:p>477029.419512081</text:p>
              </table:table-cell>
              <table:table-cell office:value-type="float" office:value="443602.713254756">
                <text:p>443602.713254756</text:p>
              </table:table-cell>
              <table:table-cell office:value-type="float" office:value="414379.933646774">
                <text:p>414379.933646774</text:p>
              </table:table-cell>
              <table:table-cell office:value-type="float" office:value="388662.448071317">
                <text:p>388662.448071317</text:p>
              </table:table-cell>
              <table:table-cell office:value-type="float" office:value="365881.299313398">
                <text:p>365881.299313398</text:p>
              </table:table-cell>
              <table:table-cell office:value-type="float" office:value="345584.331231212">
                <text:p>345584.331231212</text:p>
              </table:table-cell>
              <table:table-cell office:value-type="float" office:value="327409.912152238">
                <text:p>327409.912152238</text:p>
              </table:table-cell>
              <table:table-cell office:value-type="float" office:value="311057.966490388">
                <text:p>311057.966490388</text:p>
              </table:table-cell>
              <table:table-cell office:value-type="float" office:value="296281.602492625">
                <text:p>296281.602492625</text:p>
              </table:table-cell>
              <table:table-cell office:value-type="float" office:value="282875.094686597">
                <text:p>282875.094686597</text:p>
              </table:table-cell>
              <table:table-cell office:value-type="float" office:value="270666.130658796">
                <text:p>270666.130658796</text:p>
              </table:table-cell>
              <table:table-cell office:value-type="float" office:value="259506.686001498">
                <text:p>259506.686001498</text:p>
              </table:table-cell>
              <table:table-cell office:value-type="float" office:value="249273.632579219">
                <text:p>249273.632579219</text:p>
              </table:table-cell>
              <table:table-cell office:value-type="float" office:value="239862.242506991">
                <text:p>239862.242506991</text:p>
              </table:table-cell>
              <table:table-cell office:value-type="float" office:value="231182.394789856">
                <text:p>231182.394789856</text:p>
              </table:table-cell>
              <table:table-cell office:value-type="float" office:value="223158.620786626">
                <text:p>223158.620786626</text:p>
              </table:table-cell>
              <table:table-cell office:value-type="float" office:value="215716.473315238">
                <text:p>215716.473315238</text:p>
              </table:table-cell>
              <table:table-cell office:value-type="float" office:value="208800.133029574">
                <text:p>208800.133029574</text:p>
              </table:table-cell>
              <table:table-cell office:value-type="float" office:value="202358.884582331">
                <text:p>202358.884582331</text:p>
              </table:table-cell>
              <table:table-cell office:value-type="float" office:value="196348.052097252">
                <text:p>196348.052097252</text:p>
              </table:table-cell>
              <table:table-cell office:value-type="float" office:value="190729.705845045">
                <text:p>190729.705845045</text:p>
              </table:table-cell>
              <table:table-cell office:value-type="float" office:value="185466.537489043">
                <text:p>185466.537489043</text:p>
              </table:table-cell>
              <table:table-cell office:value-type="float" office:value="180529.623959175">
                <text:p>180529.623959175</text:p>
              </table:table-cell>
              <table:table-cell office:value-type="float" office:value="175892.337188344">
                <text:p>175892.337188344</text:p>
              </table:table-cell>
              <table:table-cell office:value-type="float" office:value="171531.734884089">
                <text:p>171531.734884089</text:p>
              </table:table-cell>
              <table:table-cell office:value-type="float" office:value="167422.895735613">
                <text:p>167422.895735613</text:p>
              </table:table-cell>
              <table:table-cell office:value-type="float" office:value="163546.94999824">
                <text:p>163546.94999824</text:p>
              </table:table-cell>
              <table:table-cell office:value-type="float" office:value="159886.075753174">
                <text:p>159886.075753174</text:p>
              </table:table-cell>
              <table:table-cell office:value-type="float" office:value="156421.748617241">
                <text:p>156421.748617241</text:p>
              </table:table-cell>
              <table:table-cell office:value-type="float" office:value="153141.867943828">
                <text:p>153141.867943828</text:p>
              </table:table-cell>
              <table:table-cell office:value-type="float" office:value="150031.103101858">
                <text:p>150031.103101858</text:p>
              </table:table-cell>
              <table:table-cell office:value-type="float" office:value="147077.343466694">
                <text:p>147077.343466694</text:p>
              </table:table-cell>
              <table:table-cell office:value-type="float" office:value="144271.103004639">
                <text:p>144271.103004639</text:p>
              </table:table-cell>
              <table:table-cell office:value-type="float" office:value="141601.035603435">
                <text:p>141601.035603435</text:p>
              </table:table-cell>
              <table:table-cell office:value-type="float" office:value="139060.625027541">
                <text:p>139060.625027541</text:p>
              </table:table-cell>
              <table:table-cell office:value-type="float" office:value="136639.43247126">
                <text:p>136639.43247126</text:p>
              </table:table-cell>
              <table:table-cell office:value-type="float" office:value="134330.444136613">
                <text:p>134330.444136613</text:p>
              </table:table-cell>
              <table:table-cell office:value-type="float" office:value="132125.620814886">
                <text:p>132125.620814886</text:p>
              </table:table-cell>
              <table:table-cell office:value-type="float" office:value="130017.992747232">
                <text:p>130017.992747232</text:p>
              </table:table-cell>
              <table:table-cell office:value-type="float" office:value="128002.003123639">
                <text:p>128002.003123639</text:p>
              </table:table-cell>
              <table:table-cell office:value-type="float" office:value="126072.724740893">
                <text:p>126072.724740893</text:p>
              </table:table-cell>
              <table:table-cell office:value-type="float" office:value="124224.962636659">
                <text:p>124224.962636659</text:p>
              </table:table-cell>
              <table:table-cell office:value-type="float" office:value="122453.71116969">
                <text:p>122453.71116969</text:p>
              </table:table-cell>
              <table:table-cell office:value-type="float" office:value="120755.172907146">
                <text:p>120755.172907146</text:p>
              </table:table-cell>
              <table:table-cell office:value-type="float" office:value="119124.892364071">
                <text:p>119124.892364071</text:p>
              </table:table-cell>
              <table:table-cell office:value-type="float" office:value="117559.532358484">
                <text:p>117559.532358484</text:p>
              </table:table-cell>
              <table:table-cell office:value-type="float" office:value="116055.412711326">
                <text:p>116055.412711326</text:p>
              </table:table-cell>
              <table:table-cell office:value-type="float" office:value="114609.32110966">
                <text:p>114609.32110966</text:p>
              </table:table-cell>
              <table:table-cell office:value-type="float" office:value="113218.137218094">
                <text:p>113218.137218094</text:p>
              </table:table-cell>
              <table:table-cell office:value-type="float" office:value="111878.778087625">
                <text:p>111878.778087625</text:p>
              </table:table-cell>
              <table:table-cell office:value-type="float" office:value="110588.91278919">
                <text:p>110588.91278919</text:p>
              </table:table-cell>
              <table:table-cell office:value-type="float" office:value="109345.791756">
                <text:p>109345.791756</text:p>
              </table:table-cell>
              <table:table-cell office:value-type="float" office:value="108147.104578055">
                <text:p>108147.104578055</text:p>
              </table:table-cell>
              <table:table-cell office:value-type="float" office:value="106991.34794197">
                <text:p>106991.34794197</text:p>
              </table:table-cell>
              <table:table-cell office:value-type="float" office:value="105875.941772255">
                <text:p>105875.941772255</text:p>
              </table:table-cell>
              <table:table-cell office:value-type="float" office:value="104799.319715">
                <text:p>104799.319715</text:p>
              </table:table-cell>
              <table:table-cell office:value-type="float" office:value="103759.112697807">
                <text:p>103759.112697807</text:p>
              </table:table-cell>
              <table:table-cell office:value-type="float" office:value="102754.578916132">
                <text:p>102754.578916132</text:p>
              </table:table-cell>
              <table:table-cell office:value-type="float" office:value="101783.917000892">
                <text:p>101783.917000892</text:p>
              </table:table-cell>
              <table:table-cell office:value-type="float" office:value="100845.078279019">
                <text:p>100845.078279019</text:p>
              </table:table-cell>
              <table:table-cell office:value-type="float" office:value="99937.1975526339">
                <text:p>99937.1975526339</text:p>
              </table:table-cell>
              <table:table-cell office:value-type="float" office:value="99058.6909633021">
                <text:p>99058.6909633021</text:p>
              </table:table-cell>
              <table:table-cell office:value-type="float" office:value="98208.4069568806">
                <text:p>98208.4069568806</text:p>
              </table:table-cell>
              <table:table-cell office:value-type="float" office:value="97385.1165496082">
                <text:p>97385.1165496082</text:p>
              </table:table-cell>
              <table:table-cell office:value-type="float" office:value="96587.6266345518">
                <text:p>96587.6266345518</text:p>
              </table:table-cell>
              <table:table-cell office:value-type="float" office:value="95815.3043099506">
                <text:p>95815.3043099506</text:p>
              </table:table-cell>
              <table:table-cell office:value-type="float" office:value="95066.6644567955">
                <text:p>95066.6644567955</text:p>
              </table:table-cell>
              <table:table-cell office:value-type="float" office:value="94341.1210633715">
                <text:p>94341.1210633715</text:p>
              </table:table-cell>
              <table:table-cell office:value-type="float" office:value="93637.7150136476">
                <text:p>93637.7150136476</text:p>
              </table:table-cell>
              <table:table-cell office:value-type="float" office:value="92955.5873221607">
                <text:p>92955.5873221607</text:p>
              </table:table-cell>
              <table:table-cell office:value-type="float" office:value="92293.7519312031">
                <text:p>92293.7519312031</text:p>
              </table:table-cell>
              <table:table-cell office:value-type="float" office:value="91651.5614395608">
                <text:p>91651.5614395608</text:p>
              </table:table-cell>
              <table:table-cell office:value-type="float" office:value="91028.4449650893">
                <text:p>91028.4449650893</text:p>
              </table:table-cell>
              <table:table-cell office:value-type="float" office:value="90423.4878138081">
                <text:p>90423.4878138081</text:p>
              </table:table-cell>
              <table:table-cell office:value-type="float" office:value="89836.0465859526">
                <text:p>89836.0465859526</text:p>
              </table:table-cell>
              <table:table-cell office:value-type="float" office:value="89265.9533911403">
                <text:p>89265.9533911403</text:p>
              </table:table-cell>
              <table:table-cell office:value-type="float" office:value="88712.3071778119">
                <text:p>88712.3071778119</text:p>
              </table:table-cell>
              <table:table-cell office:value-type="float" office:value="88174.9969009512">
                <text:p>88174.9969009512</text:p>
              </table:table-cell>
              <table:table-cell office:value-type="float" office:value="87653.0118335623">
                <text:p>87653.0118335623</text:p>
              </table:table-cell>
              <table:table-cell office:value-type="float" office:value="87146.4299856881">
                <text:p>87146.4299856881</text:p>
              </table:table-cell>
              <table:table-cell office:value-type="float" office:value="86654.3735216317">
                <text:p>86654.3735216317</text:p>
              </table:table-cell>
              <table:table-cell office:value-type="float" office:value="86176.3461912479">
                <text:p>86176.3461912479</text:p>
              </table:table-cell>
              <table:table-cell office:value-type="float" office:value="85711.6487428297">
                <text:p>85711.6487428297</text:p>
              </table:table-cell>
              <table:table-cell office:value-type="float" office:value="85260.0156752331">
                <text:p>85260.0156752331</text:p>
              </table:table-cell>
              <table:table-cell office:value-type="float" office:value="84821.2191939591">
                <text:p>84821.2191939591</text:p>
              </table:table-cell>
              <table:table-cell office:value-type="float" office:value="84394.7049787694">
                <text:p>84394.7049787694</text:p>
              </table:table-cell>
              <table:table-cell office:value-type="float" office:value="83980.0876732892">
                <text:p>83980.0876732892</text:p>
              </table:table-cell>
              <table:table-cell office:value-type="float" office:value="83577.1844912866">
                <text:p>83577.1844912866</text:p>
              </table:table-cell>
              <table:table-cell office:value-type="float" office:value="83185.2771779594">
                <text:p>83185.2771779594</text:p>
              </table:table-cell>
              <table:table-cell office:value-type="float" office:value="82804.379524725">
                <text:p>82804.379524725</text:p>
              </table:table-cell>
              <table:table-cell office:value-type="float" office:value="82434.0219250811">
                <text:p>82434.0219250811</text:p>
              </table:table-cell>
              <table:table-cell office:value-type="float" office:value="82073.6832224253">
                <text:p>82073.6832224253</text:p>
              </table:table-cell>
              <table:table-cell office:value-type="float" office:value="81723.4076109142">
                <text:p>81723.4076109142</text:p>
              </table:table-cell>
              <table:table-cell office:value-type="float" office:value="81382.7686857149">
                <text:p>81382.7686857149</text:p>
              </table:table-cell>
              <table:table-cell office:value-type="float" office:value="81051.6630937968">
                <text:p>81051.6630937968</text:p>
              </table:table-cell>
              <table:table-cell office:value-type="float" office:value="80729.6566078258">
                <text:p>80729.6566078258</text:p>
              </table:table-cell>
              <table:table-cell office:value-type="float" office:value="80416.5166140123">
                <text:p>80416.5166140123</text:p>
              </table:table-cell>
              <table:table-cell office:value-type="float" office:value="80111.7986712694">
                <text:p>80111.7986712694</text:p>
              </table:table-cell>
              <table:table-cell office:value-type="float" office:value="79815.3956315653">
                <text:p>79815.3956315653</text:p>
              </table:table-cell>
              <table:table-cell office:value-type="float" office:value="79527.1060314964">
                <text:p>79527.1060314964</text:p>
              </table:table-cell>
              <table:table-cell office:value-type="float" office:value="79246.7135948219">
                <text:p>79246.7135948219</text:p>
              </table:table-cell>
              <table:table-cell office:value-type="float" office:value="78485.6659725907">
                <text:p>78485.6659725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4.2$Windows_X86_64 LibreOffice_project/0229ac93fcf0d7cbc6376066c6f35021cef002d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